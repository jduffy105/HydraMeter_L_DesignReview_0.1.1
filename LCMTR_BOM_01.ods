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66in"/>
    </style:style>
    <style:style style:name="co7" style:family="table-column">
      <style:table-column-properties fo:break-before="auto" style:column-width="2.1929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4945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1.2102in"/>
    </style:style>
    <style:style style:name="co12" style:family="table-column">
      <style:table-column-properties fo:break-before="auto" style:column-width="1.2744in"/>
    </style:style>
    <style:style style:name="co13" style:family="table-column">
      <style:table-column-properties fo:break-before="auto" style:column-width="1.1173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2.3709in"/>
    </style:style>
    <style:style style:name="co16" style:family="table-column">
      <style:table-column-properties fo:break-before="auto" style:column-width="2.439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0.2453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398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0.2665in"/>
    </style:style>
    <style:style style:name="co24" style:family="table-column">
      <style:table-column-properties fo:break-before="auto" style:column-width="1.5244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6217in"/>
    </style:style>
    <style:style style:name="co27" style:family="table-column">
      <style:table-column-properties fo:break-before="auto" style:column-width="1.4016in"/>
    </style:style>
    <style:style style:name="co28" style:family="table-column">
      <style:table-column-properties fo:break-before="auto" style:column-width="1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>
      <style:map style:condition="is-true-formula(ISNUMBER([$Linking.$P26]))" style:apply-style-name="Good" style:base-cell-address="Supplier_Lookup.D26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map style:condition="is-true-formula(ISNUMBER([$Linking.$P1]))" style:apply-style-name="Good" style:base-cell-address="Linking.B1"/>
    </style:style>
    <style:style style:name="ce12" style:family="table-cell" style:parent-style-name="Default">
      <style:map style:condition="is-true-formula(NOT(ISNUMBER([$Linking.$P1])))" style:apply-style-name="Bad" style:base-cell-address="Linking.F1"/>
    </style:style>
    <style:style style:name="ce13" style:family="table-cell" style:parent-style-name="Default" style:data-style-name="N0">
      <style:map style:condition="is-true-formula(NOT(ISNUMBER([$Linking.$P1])))" style:apply-style-name="Bad" style:base-cell-address="Linking.F1"/>
    </style:style>
    <style:style style:name="ce14" style:family="table-cell" style:parent-style-name="Default" style:data-style-name="N99">
      <style:map style:condition="is-true-formula(NOT(ISNUMBER([$Linking.$P1])))" style:apply-style-name="Bad" style:base-cell-address="Linking.F1"/>
    </style:style>
    <style:style style:name="ce15" style:family="table-cell" style:parent-style-name="Default">
      <style:text-properties fo:color="#cccccc"/>
    </style:style>
    <style:style style:name="ce16" style:family="table-cell" style:parent-style-name="Default" style:data-style-name="N0">
      <style:text-properties fo:color="#ccccc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6f9d4"/>
    </style:style>
    <style:style style:name="ce20" style:family="table-cell" style:parent-style-name="Default">
      <style:table-cell-properties fo:background-color="#fff5ce"/>
    </style:style>
    <style:style style:name="ce21" style:family="table-cell" style:parent-style-name="Default">
      <style:table-cell-properties fo:background-color="#fff5ce"/>
      <style:text-properties fo:color="#999999"/>
    </style:style>
    <style:style style:name="ce40" style:family="table-cell" style:parent-style-name="Default" style:data-style-name="N0">
      <style:table-cell-properties fo:background-color="#fff5ce"/>
      <style:text-properties fo:color="#999999"/>
    </style:style>
    <style:style style:name="ce22" style:family="table-cell" style:parent-style-name="Default">
      <style:text-properties fo:color="#999999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inal 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SUM([.M4:.M57])" office:value-type="float" office:value="15.625" calcext:value-type="float">
            <text:p>15.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 #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 Part #</text:p>
          </table:table-cell>
          <table:table-cell office:value-type="string" calcext:value-type="string">
            <text:p>Desc / Value</text:p>
          </table:table-cell>
          <table:table-cell office:value-type="string" calcext:value-type="string">
            <text:p>Package/footprint</text:p>
          </table:table-cell>
          <table:table-cell office:value-type="string" calcext:value-type="string">
            <text:p>Supplier 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Appx price ea</text:p>
          </table:table-cell>
          <table:table-cell office:value-type="string" calcext:value-type="string">
            <text:p>Appx Sub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table:formula="of:=[$Linking.AE6]" office:value-type="string" office:string-value="1" calcext:value-type="string">
            <text:p>1</text:p>
          </table:table-cell>
          <table:table-cell table:formula="of:=[$Linking.AD6]" office:value-type="string" office:string-value="C2,C3,C4" calcext:value-type="string">
            <text:p>C2,C3,C4</text:p>
          </table:table-cell>
          <table:table-cell table:formula="of:=[$Linking.O6]" office:value-type="float" office:value="3" calcext:value-type="float">
            <text:p>3</text:p>
          </table:table-cell>
          <table:table-cell table:formula="of:=[$Linking.T6]" office:value-type="string" office:string-value="muRata" calcext:value-type="string">
            <text:p>muRata</text:p>
          </table:table-cell>
          <table:table-cell table:formula="of:=[$Linking.U6]" office:value-type="string" office:string-value="GRM31A5C3A331JWA1D" calcext:value-type="string">
            <text:p>GRM31A5C3A331JWA1D</text:p>
          </table:table-cell>
          <table:table-cell table:formula="of:=[$Linking.Q6]" office:value-type="string" office:string-value="330p" calcext:value-type="string">
            <text:p>330p</text:p>
          </table:table-cell>
          <table:table-cell table:formula="of:=[$Linking.N6]" office:value-type="string" office:string-value="1206" calcext:value-type="string">
            <text:p>1206</text:p>
          </table:table-cell>
          <table:table-cell table:formula="of:=[$Linking.V6]" office:value-type="string" office:string-value="Digikey" calcext:value-type="string">
            <text:p>Digikey</text:p>
          </table:table-cell>
          <table:table-cell table:formula="of:=[$Linking.W6]" office:value-type="string" office:string-value="490-GRM31A5C3A331JWA1DCT-ND" calcext:value-type="string">
            <text:p>490-GRM31A5C3A331JWA1DCT-ND</text:p>
          </table:table-cell>
          <table:table-cell table:formula="of:=[$Linking.X6]" office:value-type="string" office:string-value="https://www.digikey.com/en/products/detail/murata-electronics/GRM31A5C3A331JWA1D/10692922" calcext:value-type="string">
            <text:p>https://www.digikey.com/en/products/detail/murata-electronics/GRM31A5C3A331JWA1D/10692922</text:p>
          </table:table-cell>
          <table:table-cell table:formula="of:=[$Linking.Y6]" office:value-type="float" office:value="0.164" calcext:value-type="float">
            <text:p>0.164</text:p>
          </table:table-cell>
          <table:table-cell table:formula="of:=[.L4]*[.D4]" office:value-type="float" office:value="0.492" calcext:value-type="float">
            <text:p>0.492</text:p>
          </table:table-cell>
          <table:table-cell/>
        </table:table-row>
        <table:table-row table:style-name="ro1">
          <table:table-cell/>
          <table:table-cell table:formula="of:=[$Linking.AE7]" office:value-type="string" office:string-value="2" calcext:value-type="string">
            <text:p>2</text:p>
          </table:table-cell>
          <table:table-cell table:formula="of:=[$Linking.AD7]" office:value-type="string" office:string-value="C5,C14,C43,C44" calcext:value-type="string">
            <text:p>C5,C14,C43,C44</text:p>
          </table:table-cell>
          <table:table-cell table:formula="of:=[$Linking.O7]" office:value-type="float" office:value="4" calcext:value-type="float">
            <text:p>4</text:p>
          </table:table-cell>
          <table:table-cell table:formula="of:=[$Linking.T7]" office:value-type="string" office:string-value="Yaego" calcext:value-type="string">
            <text:p>Yaego</text:p>
          </table:table-cell>
          <table:table-cell table:formula="of:=[$Linking.U7]" office:value-type="string" office:string-value="CC0603FRNPO9BN101" calcext:value-type="string">
            <text:p>CC0603FRNPO9BN101</text:p>
          </table:table-cell>
          <table:table-cell table:formula="of:=[$Linking.Q7]" office:value-type="string" office:string-value="100p" calcext:value-type="string">
            <text:p>100p</text:p>
          </table:table-cell>
          <table:table-cell table:formula="of:=[$Linking.N7]" office:value-type="string" office:string-value="0603" calcext:value-type="string">
            <text:p>0603</text:p>
          </table:table-cell>
          <table:table-cell table:formula="of:=[$Linking.V7]" office:value-type="string" office:string-value="LCSC" calcext:value-type="string">
            <text:p>LCSC</text:p>
          </table:table-cell>
          <table:table-cell table:formula="of:=[$Linking.W7]" office:value-type="string" office:string-value="C513648" calcext:value-type="string">
            <text:p>C513648</text:p>
          </table:table-cell>
          <table:table-cell table:formula="of:=[$Linking.X7]" office:value-type="string" office:string-value="https://www.lcsc.com/product-detail/C513648.html" calcext:value-type="string">
            <text:p>https://www.lcsc.com/product-detail/C513648.html</text:p>
          </table:table-cell>
          <table:table-cell table:formula="of:=[$Linking.Y7]" office:value-type="float" office:value="0.0089" calcext:value-type="float">
            <text:p>0.0089</text:p>
          </table:table-cell>
          <table:table-cell table:formula="of:=[.L5]*[.D5]" office:value-type="float" office:value="0.0356" calcext:value-type="float">
            <text:p>0.0356</text:p>
          </table:table-cell>
          <table:table-cell/>
        </table:table-row>
        <table:table-row table:style-name="ro1">
          <table:table-cell/>
          <table:table-cell table:formula="of:=[$Linking.AE8]" office:value-type="string" office:string-value="3" calcext:value-type="string">
            <text:p>3</text:p>
          </table:table-cell>
          <table:table-cell table:formula="of:=[$Linking.AD8]" office:value-type="string" office:string-value="C6,C10,C13,C85,C86,C87,C88,C95" calcext:value-type="string">
            <text:p>C6,C10,C13,C85,C86,C87,C88,C95</text:p>
          </table:table-cell>
          <table:table-cell table:formula="of:=[$Linking.O8]" office:value-type="float" office:value="8" calcext:value-type="float">
            <text:p>8</text:p>
          </table:table-cell>
          <table:table-cell table:formula="of:=[$Linking.T8]" office:value-type="string" office:string-value="Yaego" calcext:value-type="string">
            <text:p>Yaego</text:p>
          </table:table-cell>
          <table:table-cell table:formula="of:=[$Linking.U8]" office:value-type="string" office:string-value="CC0603FRNPO9BN102" calcext:value-type="string">
            <text:p>CC0603FRNPO9BN102</text:p>
          </table:table-cell>
          <table:table-cell table:formula="of:=[$Linking.Q8]" office:value-type="string" office:string-value="1n" calcext:value-type="string">
            <text:p>1n</text:p>
          </table:table-cell>
          <table:table-cell table:formula="of:=[$Linking.N8]" office:value-type="string" office:string-value="0603" calcext:value-type="string">
            <text:p>0603</text:p>
          </table:table-cell>
          <table:table-cell table:formula="of:=[$Linking.V8]" office:value-type="string" office:string-value="LCSC" calcext:value-type="string">
            <text:p>LCSC</text:p>
          </table:table-cell>
          <table:table-cell table:formula="of:=[$Linking.W8]" office:value-type="string" office:string-value="C309468" calcext:value-type="string">
            <text:p>C309468</text:p>
          </table:table-cell>
          <table:table-cell table:formula="of:=[$Linking.X8]" office:value-type="string" office:string-value="https://www.lcsc.com/product-detail/C309468.html" calcext:value-type="string">
            <text:p>https://www.lcsc.com/product-detail/C309468.html</text:p>
          </table:table-cell>
          <table:table-cell table:formula="of:=[$Linking.Y8]" office:value-type="float" office:value="0.0138" calcext:value-type="float">
            <text:p>0.0138</text:p>
          </table:table-cell>
          <table:table-cell table:formula="of:=[.L6]*[.D6]" office:value-type="float" office:value="0.1104" calcext:value-type="float">
            <text:p>0.1104</text:p>
          </table:table-cell>
          <table:table-cell/>
        </table:table-row>
        <table:table-row table:style-name="ro1">
          <table:table-cell/>
          <table:table-cell table:formula="of:=[$Linking.AE9]" office:value-type="string" office:string-value="4" calcext:value-type="string">
            <text:p>4</text:p>
          </table:table-cell>
          <table:table-cell table:formula="of:=[$Linking.AD9]" office:value-type="string" office:string-value="C7" calcext:value-type="string">
            <text:p>C7</text:p>
          </table:table-cell>
          <table:table-cell table:formula="of:=[$Linking.O9]" office:value-type="float" office:value="1" calcext:value-type="float">
            <text:p>1</text:p>
          </table:table-cell>
          <table:table-cell table:formula="of:=[$Linking.T9]" office:value-type="string" office:string-value="muRata" calcext:value-type="string">
            <text:p>muRata</text:p>
          </table:table-cell>
          <table:table-cell table:formula="of:=[$Linking.U9]" office:value-type="string" office:string-value="GRM1887U1A303JA01J" calcext:value-type="string">
            <text:p>GRM1887U1A303JA01J</text:p>
          </table:table-cell>
          <table:table-cell table:formula="of:=[$Linking.Q9]" office:value-type="string" office:string-value="33n" calcext:value-type="string">
            <text:p>33n</text:p>
          </table:table-cell>
          <table:table-cell table:formula="of:=[$Linking.N9]" office:value-type="string" office:string-value="0603" calcext:value-type="string">
            <text:p>0603</text:p>
          </table:table-cell>
          <table:table-cell table:formula="of:=[$Linking.V9]" office:value-type="string" office:string-value="Digikey" calcext:value-type="string">
            <text:p>Digikey</text:p>
          </table:table-cell>
          <table:table-cell table:formula="of:=[$Linking.W9]" office:value-type="string" office:string-value="490-GRM1887U1A303JA01JCT-ND" calcext:value-type="string">
            <text:p>490-GRM1887U1A303JA01JCT-ND</text:p>
          </table:table-cell>
          <table:table-cell table:formula="of:=[$Linking.X9]" office:value-type="string" office:string-value="https://www.digikey.com/en/products/detail/murata-electronics/GRM1887U1A303JA01J/17862050" calcext:value-type="string">
            <text:p>https://www.digikey.com/en/products/detail/murata-electronics/GRM1887U1A303JA01J/17862050</text:p>
          </table:table-cell>
          <table:table-cell table:formula="of:=[$Linking.Y9]" office:value-type="float" office:value="0.137" calcext:value-type="float">
            <text:p>0.137</text:p>
          </table:table-cell>
          <table:table-cell table:formula="of:=[.L7]*[.D7]" office:value-type="float" office:value="0.137" calcext:value-type="float">
            <text:p>0.137</text:p>
          </table:table-cell>
          <table:table-cell/>
        </table:table-row>
        <table:table-row table:style-name="ro1">
          <table:table-cell/>
          <table:table-cell table:formula="of:=[$Linking.AE10]" office:value-type="string" office:string-value="5" calcext:value-type="string">
            <text:p>5</text:p>
          </table:table-cell>
          <table:table-cell table:formula="of:=[$Linking.AD10]" office:value-type="string" office:string-value="C9,C21,C33,C34,C35,C36,C37,C38,C39,C81" calcext:value-type="string">
            <text:p>C9,C21,C33,C34,C35,C36,C37,C38,C39,C81</text:p>
          </table:table-cell>
          <table:table-cell table:formula="of:=[$Linking.O10]" office:value-type="float" office:value="10" calcext:value-type="float">
            <text:p>10</text:p>
          </table:table-cell>
          <table:table-cell table:formula="of:=[$Linking.T10]" office:value-type="string" office:string-value="Yaego" calcext:value-type="string">
            <text:p>Yaego</text:p>
          </table:table-cell>
          <table:table-cell table:formula="of:=[$Linking.U10]" office:value-type="string" office:string-value="CC0603JRNPO9BN103" calcext:value-type="string">
            <text:p>CC0603JRNPO9BN103</text:p>
          </table:table-cell>
          <table:table-cell table:formula="of:=[$Linking.Q10]" office:value-type="string" office:string-value="10n" calcext:value-type="string">
            <text:p>10n</text:p>
          </table:table-cell>
          <table:table-cell table:formula="of:=[$Linking.N10]" office:value-type="string" office:string-value="0603" calcext:value-type="string">
            <text:p>0603</text:p>
          </table:table-cell>
          <table:table-cell table:formula="of:=[$Linking.V10]" office:value-type="string" office:string-value="LCSC" calcext:value-type="string">
            <text:p>LCSC</text:p>
          </table:table-cell>
          <table:table-cell table:formula="of:=[$Linking.W10]" office:value-type="string" office:string-value="C389113" calcext:value-type="string">
            <text:p>C389113</text:p>
          </table:table-cell>
          <table:table-cell table:formula="of:=[$Linking.X10]" office:value-type="string" office:string-value="https://www.lcsc.com/product-detail/C389113.html" calcext:value-type="string">
            <text:p>https://www.lcsc.com/product-detail/C389113.html</text:p>
          </table:table-cell>
          <table:table-cell table:formula="of:=[$Linking.Y10]" office:value-type="float" office:value="0.0134" calcext:value-type="float">
            <text:p>0.0134</text:p>
          </table:table-cell>
          <table:table-cell table:formula="of:=[.L8]*[.D8]" office:value-type="float" office:value="0.134" calcext:value-type="float">
            <text:p>0.134</text:p>
          </table:table-cell>
          <table:table-cell/>
        </table:table-row>
        <table:table-row table:style-name="ro1">
          <table:table-cell/>
          <table:table-cell table:formula="of:=[$Linking.AE11]" office:value-type="string" office:string-value="6" calcext:value-type="string">
            <text:p>6</text:p>
          </table:table-cell>
          <table:table-cell table:formula="of:=[$Linking.AD11]" office:value-type="string" office:string-value="C11" calcext:value-type="string">
            <text:p>C11</text:p>
          </table:table-cell>
          <table:table-cell table:formula="of:=[$Linking.O11]" office:value-type="float" office:value="1" calcext:value-type="float">
            <text:p>1</text:p>
          </table:table-cell>
          <table:table-cell table:formula="of:=[$Linking.T11]" office:value-type="string" office:string-value="muRata" calcext:value-type="string">
            <text:p>muRata</text:p>
          </table:table-cell>
          <table:table-cell table:formula="of:=[$Linking.U11]" office:value-type="string" office:string-value="GRM1885C1H332JA01D" calcext:value-type="string">
            <text:p>GRM1885C1H332JA01D</text:p>
          </table:table-cell>
          <table:table-cell table:formula="of:=[$Linking.Q11]" office:value-type="string" office:string-value="3.3n" calcext:value-type="string">
            <text:p>3.3n</text:p>
          </table:table-cell>
          <table:table-cell table:formula="of:=[$Linking.N11]" office:value-type="string" office:string-value="0603" calcext:value-type="string">
            <text:p>0603</text:p>
          </table:table-cell>
          <table:table-cell table:formula="of:=[$Linking.V11]" office:value-type="string" office:string-value="LCSC" calcext:value-type="string">
            <text:p>LCSC</text:p>
          </table:table-cell>
          <table:table-cell table:formula="of:=[$Linking.W11]" office:value-type="string" office:string-value="C77036" calcext:value-type="string">
            <text:p>C77036</text:p>
          </table:table-cell>
          <table:table-cell table:formula="of:=[$Linking.X11]" office:value-type="string" office:string-value="https://www.lcsc.com/product-detail/C77036.html" calcext:value-type="string">
            <text:p>https://www.lcsc.com/product-detail/C77036.html</text:p>
          </table:table-cell>
          <table:table-cell table:formula="of:=[$Linking.Y11]" office:value-type="float" office:value="0.0153" calcext:value-type="float">
            <text:p>0.0153</text:p>
          </table:table-cell>
          <table:table-cell table:formula="of:=[.L9]*[.D9]" office:value-type="float" office:value="0.0153" calcext:value-type="float">
            <text:p>0.0153</text:p>
          </table:table-cell>
          <table:table-cell/>
        </table:table-row>
        <table:table-row table:style-name="ro1">
          <table:table-cell/>
          <table:table-cell table:formula="of:=[$Linking.AE12]" office:value-type="string" office:string-value="7" calcext:value-type="string">
            <text:p>7</text:p>
          </table:table-cell>
          <table:table-cell table:formula="of:=[$Linking.AD12]" office:value-type="string" office:string-value="C16" calcext:value-type="string">
            <text:p>C16</text:p>
          </table:table-cell>
          <table:table-cell table:formula="of:=[$Linking.O12]" office:value-type="float" office:value="1" calcext:value-type="float">
            <text:p>1</text:p>
          </table:table-cell>
          <table:table-cell table:formula="of:=[$Linking.T12]" office:value-type="string" office:string-value="Yaego" calcext:value-type="string">
            <text:p>Yaego</text:p>
          </table:table-cell>
          <table:table-cell table:formula="of:=[$Linking.U12]" office:value-type="string" office:string-value="CC0603JRNPO9BN331" calcext:value-type="string">
            <text:p>CC0603JRNPO9BN331</text:p>
          </table:table-cell>
          <table:table-cell table:formula="of:=[$Linking.Q12]" office:value-type="string" office:string-value="330p" calcext:value-type="string">
            <text:p>330p</text:p>
          </table:table-cell>
          <table:table-cell table:formula="of:=[$Linking.N12]" office:value-type="string" office:string-value="0603" calcext:value-type="string">
            <text:p>0603</text:p>
          </table:table-cell>
          <table:table-cell table:formula="of:=[$Linking.V12]" office:value-type="string" office:string-value="LCSC" calcext:value-type="string">
            <text:p>LCSC</text:p>
          </table:table-cell>
          <table:table-cell table:formula="of:=[$Linking.W12]" office:value-type="string" office:string-value="C62784" calcext:value-type="string">
            <text:p>C62784</text:p>
          </table:table-cell>
          <table:table-cell table:formula="of:=[$Linking.X12]" office:value-type="string" office:string-value="https://www.lcsc.com/product-detail/C62784.html" calcext:value-type="string">
            <text:p>https://www.lcsc.com/product-detail/C62784.html</text:p>
          </table:table-cell>
          <table:table-cell table:formula="of:=[$Linking.Y12]" office:value-type="float" office:value="0.0045" calcext:value-type="float">
            <text:p>0.0045</text:p>
          </table:table-cell>
          <table:table-cell table:formula="of:=[.L10]*[.D10]" office:value-type="float" office:value="0.0045" calcext:value-type="float">
            <text:p>0.0045</text:p>
          </table:table-cell>
          <table:table-cell/>
        </table:table-row>
        <table:table-row table:style-name="ro1">
          <table:table-cell/>
          <table:table-cell table:formula="of:=[$Linking.AE13]" office:value-type="string" office:string-value="8" calcext:value-type="string">
            <text:p>8</text:p>
          </table:table-cell>
          <table:table-cell table:formula="of:=[$Linking.AD13]" office:value-type="string" office:string-value="C17,C18,C19,C20,C23,C24,C25,C45,C46,C52,C53,C55" calcext:value-type="string">
            <text:p>C17,C18,C19,C20,C23,C24,C25,C45,C46,C52,C53,C55</text:p>
          </table:table-cell>
          <table:table-cell table:formula="of:=[$Linking.O13]" office:value-type="float" office:value="12" calcext:value-type="float">
            <text:p>12</text:p>
          </table:table-cell>
          <table:table-cell table:formula="of:=[$Linking.T13]" office:value-type="string" office:string-value="Samsung" calcext:value-type="string">
            <text:p>Samsung</text:p>
          </table:table-cell>
          <table:table-cell table:formula="of:=[$Linking.U13]" office:value-type="string" office:string-value="CL10B104KB8NNNC" calcext:value-type="string">
            <text:p>CL10B104KB8NNNC</text:p>
          </table:table-cell>
          <table:table-cell table:formula="of:=[$Linking.Q13]" office:value-type="string" office:string-value="100n" calcext:value-type="string">
            <text:p>100n</text:p>
          </table:table-cell>
          <table:table-cell table:formula="of:=[$Linking.N13]" office:value-type="string" office:string-value="0603" calcext:value-type="string">
            <text:p>0603</text:p>
          </table:table-cell>
          <table:table-cell table:formula="of:=[$Linking.V13]" office:value-type="string" office:string-value="LCSC" calcext:value-type="string">
            <text:p>LCSC</text:p>
          </table:table-cell>
          <table:table-cell table:formula="of:=[$Linking.W13]" office:value-type="string" office:string-value="C1591" calcext:value-type="string">
            <text:p>C1591</text:p>
          </table:table-cell>
          <table:table-cell table:formula="of:=[$Linking.X13]" office:value-type="string" office:string-value="https://www.lcsc.com/product-detail/C1591.html" calcext:value-type="string">
            <text:p>https://www.lcsc.com/product-detail/C1591.html</text:p>
          </table:table-cell>
          <table:table-cell table:formula="of:=[$Linking.Y13]" office:value-type="float" office:value="0.0028" calcext:value-type="float">
            <text:p>0.0028</text:p>
          </table:table-cell>
          <table:table-cell table:formula="of:=[.L11]*[.D11]" office:value-type="float" office:value="0.0336" calcext:value-type="float">
            <text:p>0.0336</text:p>
          </table:table-cell>
          <table:table-cell/>
        </table:table-row>
        <table:table-row table:style-name="ro1">
          <table:table-cell/>
          <table:table-cell table:formula="of:=[$Linking.AE14]" office:value-type="string" office:string-value="9" calcext:value-type="string">
            <text:p>9</text:p>
          </table:table-cell>
          <table:table-cell table:formula="of:=[$Linking.AD14]" office:value-type="string" office:string-value="C22,C26,C28,C29,C30,C31,C32,C40,C41,C42,C47,C48,C49,C50,C51,C54,C56,C57,C58,C59,C60,C61,C62,C63,C64,C65,C66,C67,C68,C69,C70,C73,C76,C78,C79,C80,C82,C83,C84,C89,C90,C91" calcext:value-type="string">
            <text:p>C22,C26,C28,C29,C30,C31,C32,C40,C41,C42,C47,C48,C49,C50,C51,C54,C56,C57,C58,C59,C60,C61,C62,C63,C64,C65,C66,C67,C68,C69,C70,C73,C76,C78,C79,C80,C82,C83,C84,C89,C90,C91</text:p>
          </table:table-cell>
          <table:table-cell table:formula="of:=[$Linking.O14]" office:value-type="float" office:value="42" calcext:value-type="float">
            <text:p>42</text:p>
          </table:table-cell>
          <table:table-cell table:formula="of:=[$Linking.T14]" office:value-type="string" office:string-value="Samsung" calcext:value-type="string">
            <text:p>Samsung</text:p>
          </table:table-cell>
          <table:table-cell table:formula="of:=[$Linking.U14]" office:value-type="string" office:string-value="CL10B105KB8NQNC" calcext:value-type="string">
            <text:p>CL10B105KB8NQNC</text:p>
          </table:table-cell>
          <table:table-cell table:formula="of:=[$Linking.Q14]" office:value-type="string" office:string-value="1u" calcext:value-type="string">
            <text:p>1u</text:p>
          </table:table-cell>
          <table:table-cell table:formula="of:=[$Linking.N14]" office:value-type="string" office:string-value="0603" calcext:value-type="string">
            <text:p>0603</text:p>
          </table:table-cell>
          <table:table-cell table:formula="of:=[$Linking.V14]" office:value-type="string" office:string-value="LCSC" calcext:value-type="string">
            <text:p>LCSC</text:p>
          </table:table-cell>
          <table:table-cell table:formula="of:=[$Linking.W14]" office:value-type="string" office:string-value="C5199872" calcext:value-type="string">
            <text:p>C5199872</text:p>
          </table:table-cell>
          <table:table-cell table:formula="of:=[$Linking.X14]" office:value-type="string" office:string-value="https://www.lcsc.com/product-detail/C5199872.html&amp;spm=wm.fly.bg.9.xh___wm.fly.tp.4.ml" calcext:value-type="string">
            <text:p>https://www.lcsc.com/product-detail/C5199872.html&amp;spm=wm.fly.bg.9.xh___wm.fly.tp.4.ml</text:p>
          </table:table-cell>
          <table:table-cell table:formula="of:=[$Linking.Y14]" office:value-type="float" office:value="0.0082" calcext:value-type="float">
            <text:p>0.0082</text:p>
          </table:table-cell>
          <table:table-cell table:formula="of:=[.L12]*[.D12]" office:value-type="float" office:value="0.3444" calcext:value-type="float">
            <text:p>0.3444</text:p>
          </table:table-cell>
          <table:table-cell office:value-type="string" calcext:value-type="string">
            <text:p>Equivalent substitutions allowed</text:p>
          </table:table-cell>
        </table:table-row>
        <table:table-row table:style-name="ro1">
          <table:table-cell/>
          <table:table-cell table:formula="of:=[$Linking.AE15]" office:value-type="string" office:string-value="10" calcext:value-type="string">
            <text:p>10</text:p>
          </table:table-cell>
          <table:table-cell table:formula="of:=[$Linking.AD15]" office:value-type="string" office:string-value="C71,C72,C74,C75" calcext:value-type="string">
            <text:p>C71,C72,C74,C75</text:p>
          </table:table-cell>
          <table:table-cell table:formula="of:=[$Linking.O15]" office:value-type="float" office:value="4" calcext:value-type="float">
            <text:p>4</text:p>
          </table:table-cell>
          <table:table-cell table:formula="of:=[$Linking.T15]" office:value-type="string" office:string-value="Samsung" calcext:value-type="string">
            <text:p>Samsung</text:p>
          </table:table-cell>
          <table:table-cell table:formula="of:=[$Linking.U15]" office:value-type="string" office:string-value="CL10C150JB8NNNC" calcext:value-type="string">
            <text:p>CL10C150JB8NNNC</text:p>
          </table:table-cell>
          <table:table-cell table:formula="of:=[$Linking.Q15]" office:value-type="string" office:string-value="15p" calcext:value-type="string">
            <text:p>15p</text:p>
          </table:table-cell>
          <table:table-cell table:formula="of:=[$Linking.N15]" office:value-type="string" office:string-value="0603" calcext:value-type="string">
            <text:p>0603</text:p>
          </table:table-cell>
          <table:table-cell table:formula="of:=[$Linking.V15]" office:value-type="string" office:string-value="LCSC" calcext:value-type="string">
            <text:p>LCSC</text:p>
          </table:table-cell>
          <table:table-cell table:formula="of:=[$Linking.W15]" office:value-type="string" office:string-value="CL10C150JB8NNNC" calcext:value-type="string">
            <text:p>CL10C150JB8NNNC</text:p>
          </table:table-cell>
          <table:table-cell table:formula="of:=[$Linking.X15]" office:value-type="string" office:string-value="https://www.lcsc.com/product-detail/C1644.html" calcext:value-type="string">
            <text:p>https://www.lcsc.com/product-detail/C1644.html</text:p>
          </table:table-cell>
          <table:table-cell table:formula="of:=[$Linking.Y15]" office:value-type="float" office:value="0.0054" calcext:value-type="float">
            <text:p>0.0054</text:p>
          </table:table-cell>
          <table:table-cell table:formula="of:=[.L13]*[.D13]" office:value-type="float" office:value="0.0216" calcext:value-type="float">
            <text:p>0.0216</text:p>
          </table:table-cell>
          <table:table-cell/>
        </table:table-row>
        <table:table-row table:style-name="ro1">
          <table:table-cell/>
          <table:table-cell table:formula="of:=[$Linking.AE16]" office:value-type="string" office:string-value="11" calcext:value-type="string">
            <text:p>11</text:p>
          </table:table-cell>
          <table:table-cell table:formula="of:=[$Linking.AD16]" office:value-type="string" office:string-value="D1,D4,D5,D6,D7,D8" calcext:value-type="string">
            <text:p>D1,D4,D5,D6,D7,D8</text:p>
          </table:table-cell>
          <table:table-cell table:formula="of:=[$Linking.O16]" office:value-type="float" office:value="6" calcext:value-type="float">
            <text:p>6</text:p>
          </table:table-cell>
          <table:table-cell table:formula="of:=[$Linking.T16]" office:value-type="string" office:string-value="SMC" calcext:value-type="string">
            <text:p>SMC</text:p>
          </table:table-cell>
          <table:table-cell table:formula="of:=[$Linking.U16]" office:value-type="string" office:string-value="1N4007FL" calcext:value-type="string">
            <text:p>1N4007FL</text:p>
          </table:table-cell>
          <table:table-cell table:formula="of:=[$Linking.Q16]" office:value-type="string" office:string-value="1N4007FL" calcext:value-type="string">
            <text:p>1N4007FL</text:p>
          </table:table-cell>
          <table:table-cell table:formula="of:=[$Linking.N16]" office:value-type="string" office:string-value="1N4007FL" calcext:value-type="string">
            <text:p>1N4007FL</text:p>
          </table:table-cell>
          <table:table-cell table:formula="of:=[$Linking.V16]" office:value-type="string" office:string-value="LCSC" calcext:value-type="string">
            <text:p>LCSC</text:p>
          </table:table-cell>
          <table:table-cell table:formula="of:=[$Linking.W16]" office:value-type="string" office:string-value="C493190" calcext:value-type="string">
            <text:p>C493190</text:p>
          </table:table-cell>
          <table:table-cell table:formula="of:=[$Linking.X16]" office:value-type="string" office:string-value="https://www.lcsc.com/product-detail/C493190.html" calcext:value-type="string">
            <text:p>https://www.lcsc.com/product-detail/C493190.html</text:p>
          </table:table-cell>
          <table:table-cell table:formula="of:=[$Linking.Y16]" office:value-type="float" office:value="0.0217" calcext:value-type="float">
            <text:p>0.0217</text:p>
          </table:table-cell>
          <table:table-cell table:formula="of:=[.L14]*[.D14]" office:value-type="float" office:value="0.1302" calcext:value-type="float">
            <text:p>0.1302</text:p>
          </table:table-cell>
          <table:table-cell/>
        </table:table-row>
        <table:table-row table:style-name="ro1">
          <table:table-cell/>
          <table:table-cell table:formula="of:=[$Linking.AE17]" office:value-type="string" office:string-value="12" calcext:value-type="string">
            <text:p>12</text:p>
          </table:table-cell>
          <table:table-cell table:formula="of:=[$Linking.AD17]" office:value-type="string" office:string-value="D2" calcext:value-type="string">
            <text:p>D2</text:p>
          </table:table-cell>
          <table:table-cell table:formula="of:=[$Linking.O17]" office:value-type="float" office:value="1" calcext:value-type="float">
            <text:p>1</text:p>
          </table:table-cell>
          <table:table-cell table:formula="of:=[$Linking.T17]" office:value-type="string" office:string-value="VISHAY" calcext:value-type="string">
            <text:p>VISHAY</text:p>
          </table:table-cell>
          <table:table-cell table:formula="of:=[$Linking.U17]" office:value-type="string" office:string-value="MMSZ4691-E3-08" calcext:value-type="string">
            <text:p>MMSZ4691-E3-08</text:p>
          </table:table-cell>
          <table:table-cell table:formula="of:=[$Linking.Q17]" office:value-type="string" office:string-value="6.1V" calcext:value-type="string">
            <text:p>6.1V</text:p>
          </table:table-cell>
          <table:table-cell table:formula="of:=[$Linking.N17]" office:value-type="string" office:string-value="SOD123_MMSZ5231B-7-F" calcext:value-type="string">
            <text:p>SOD123_MMSZ5231B-7-F</text:p>
          </table:table-cell>
          <table:table-cell table:formula="of:=[$Linking.V17]" office:value-type="string" office:string-value="Digikey" calcext:value-type="string">
            <text:p>Digikey</text:p>
          </table:table-cell>
          <table:table-cell table:formula="of:=[$Linking.W17]" office:value-type="string" office:string-value="MMSZ4691-E3-08GICT-ND" calcext:value-type="string">
            <text:p>MMSZ4691-E3-08GICT-ND</text:p>
          </table:table-cell>
          <table:table-cell table:formula="of:=[$Linking.X17]" office:value-type="string" office:string-value="https://www.digikey.com/en/products/detail/vishay-general-semiconductor-diodes-division/MMSZ4691-E3-08/4832264" calcext:value-type="string">
            <text:p>https://www.digikey.com/en/products/detail/vishay-general-semiconductor-diodes-division/MMSZ4691-E3-08/4832264</text:p>
          </table:table-cell>
          <table:table-cell table:formula="of:=[$Linking.Y17]" office:value-type="float" office:value="0.28" calcext:value-type="float">
            <text:p>0.28</text:p>
          </table:table-cell>
          <table:table-cell table:formula="of:=[.L15]*[.D15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table:formula="of:=[$Linking.AE18]" office:value-type="string" office:string-value="13" calcext:value-type="string">
            <text:p>13</text:p>
          </table:table-cell>
          <table:table-cell table:formula="of:=[$Linking.AD18]" office:value-type="string" office:string-value="D3" calcext:value-type="string">
            <text:p>D3</text:p>
          </table:table-cell>
          <table:table-cell table:formula="of:=[$Linking.O18]" office:value-type="float" office:value="1" calcext:value-type="float">
            <text:p>1</text:p>
          </table:table-cell>
          <table:table-cell table:formula="of:=[$Linking.T18]" office:value-type="string" office:string-value="Diodes Inc" calcext:value-type="string">
            <text:p>Diodes Inc</text:p>
          </table:table-cell>
          <table:table-cell table:formula="of:=[$Linking.U18]" office:value-type="string" office:string-value="MMSZ5232B-7-F" calcext:value-type="string">
            <text:p>MMSZ5232B-7-F</text:p>
          </table:table-cell>
          <table:table-cell table:formula="of:=[$Linking.Q18]" office:value-type="string" office:string-value="5.6V" calcext:value-type="string">
            <text:p>5.6V</text:p>
          </table:table-cell>
          <table:table-cell table:formula="of:=[$Linking.N18]" office:value-type="string" office:string-value="SOD123_MMSZ5231B-7-F" calcext:value-type="string">
            <text:p>SOD123_MMSZ5231B-7-F</text:p>
          </table:table-cell>
          <table:table-cell table:formula="of:=[$Linking.V18]" office:value-type="string" office:string-value="LCSC" calcext:value-type="string">
            <text:p>LCSC</text:p>
          </table:table-cell>
          <table:table-cell table:formula="of:=[$Linking.W18]" office:value-type="string" office:string-value="C156265" calcext:value-type="string">
            <text:p>C156265</text:p>
          </table:table-cell>
          <table:table-cell table:formula="of:=[$Linking.X18]" office:value-type="string" office:string-value="https://www.lcsc.com/product-detail/C156265.html" calcext:value-type="string">
            <text:p>https://www.lcsc.com/product-detail/C156265.html</text:p>
          </table:table-cell>
          <table:table-cell table:formula="of:=[$Linking.Y18]" office:value-type="float" office:value="0.0475" calcext:value-type="float">
            <text:p>0.0475</text:p>
          </table:table-cell>
          <table:table-cell table:formula="of:=[.L16]*[.D16]" office:value-type="float" office:value="0.0475" calcext:value-type="float">
            <text:p>0.0475</text:p>
          </table:table-cell>
          <table:table-cell/>
        </table:table-row>
        <table:table-row table:style-name="ro1">
          <table:table-cell/>
          <table:table-cell table:formula="of:=[$Linking.AE19]" office:value-type="string" office:string-value="14" calcext:value-type="string">
            <text:p>14</text:p>
          </table:table-cell>
          <table:table-cell table:formula="of:=[$Linking.AD19]" office:value-type="string" office:string-value="Q1,Q3,Q5,Q7,Q8,Q9,Q12,Q13,Q14,Q17,Q20,Q26,Q30,Q37" calcext:value-type="string">
            <text:p>Q1,Q3,Q5,Q7,Q8,Q9,Q12,Q13,Q14,Q17,Q20,Q26,Q30,Q37</text:p>
          </table:table-cell>
          <table:table-cell table:formula="of:=[$Linking.O19]" office:value-type="float" office:value="14" calcext:value-type="float">
            <text:p>14</text:p>
          </table:table-cell>
          <table:table-cell table:formula="of:=[$Linking.T19]" office:value-type="string" office:string-value="onsemi" calcext:value-type="string">
            <text:p>onsemi</text:p>
          </table:table-cell>
          <table:table-cell table:formula="of:=[$Linking.U19]" office:value-type="string" office:string-value="MMBT3904LT1G" calcext:value-type="string">
            <text:p>MMBT3904LT1G</text:p>
          </table:table-cell>
          <table:table-cell table:formula="of:=[$Linking.Q19]" office:value-type="float" office:value="0" calcext:value-type="float">
            <text:p>0</text:p>
          </table:table-cell>
          <table:table-cell table:formula="of:=[$Linking.N19]" office:value-type="string" office:string-value="SOT23-3" calcext:value-type="string">
            <text:p>SOT23-3</text:p>
          </table:table-cell>
          <table:table-cell table:formula="of:=[$Linking.V19]" office:value-type="string" office:string-value="LCSC" calcext:value-type="string">
            <text:p>LCSC</text:p>
          </table:table-cell>
          <table:table-cell table:formula="of:=[$Linking.W19]" office:value-type="string" office:string-value="C81464" calcext:value-type="string">
            <text:p>C81464</text:p>
          </table:table-cell>
          <table:table-cell table:formula="of:=[$Linking.X19]" office:value-type="string" office:string-value="https://www.lcsc.com/product-detail/C81464.html" calcext:value-type="string">
            <text:p>https://www.lcsc.com/product-detail/C81464.html</text:p>
          </table:table-cell>
          <table:table-cell table:formula="of:=[$Linking.Y19]" office:value-type="float" office:value="0.0141" calcext:value-type="float">
            <text:p>0.0141</text:p>
          </table:table-cell>
          <table:table-cell table:formula="of:=[.L17]*[.D17]" office:value-type="float" office:value="0.1974" calcext:value-type="float">
            <text:p>0.1974</text:p>
          </table:table-cell>
          <table:table-cell/>
        </table:table-row>
        <table:table-row table:style-name="ro1">
          <table:table-cell/>
          <table:table-cell table:formula="of:=[$Linking.AE20]" office:value-type="string" office:string-value="15" calcext:value-type="string">
            <text:p>15</text:p>
          </table:table-cell>
          <table:table-cell table:formula="of:=[$Linking.AD20]" office:value-type="string" office:string-value="Q2,Q4,Q6,Q11,Q15,Q18,Q22,Q24,Q25,Q27,Q29,Q31" calcext:value-type="string">
            <text:p>Q2,Q4,Q6,Q11,Q15,Q18,Q22,Q24,Q25,Q27,Q29,Q31</text:p>
          </table:table-cell>
          <table:table-cell table:formula="of:=[$Linking.O20]" office:value-type="float" office:value="12" calcext:value-type="float">
            <text:p>12</text:p>
          </table:table-cell>
          <table:table-cell table:formula="of:=[$Linking.T20]" office:value-type="string" office:string-value="Diotec" calcext:value-type="string">
            <text:p>Diotec</text:p>
          </table:table-cell>
          <table:table-cell table:formula="of:=[$Linking.U20]" office:value-type="string" office:string-value="MMFTP84" calcext:value-type="string">
            <text:p>MMFTP84</text:p>
          </table:table-cell>
          <table:table-cell table:formula="of:=[$Linking.Q20]" office:value-type="float" office:value="0" calcext:value-type="float">
            <text:p>0</text:p>
          </table:table-cell>
          <table:table-cell table:formula="of:=[$Linking.N20]" office:value-type="string" office:string-value="DMN65D8L-7" calcext:value-type="string">
            <text:p>DMN65D8L-7</text:p>
          </table:table-cell>
          <table:table-cell table:formula="of:=[$Linking.V20]" office:value-type="string" office:string-value="Digikey" calcext:value-type="string">
            <text:p>Digikey</text:p>
          </table:table-cell>
          <table:table-cell table:formula="of:=[$Linking.W20]" office:value-type="string" office:string-value="4878-MMFTP84CT-ND" calcext:value-type="string">
            <text:p>4878-MMFTP84CT-ND</text:p>
          </table:table-cell>
          <table:table-cell table:formula="of:=[$Linking.X20]" office:value-type="string" office:string-value="https://www.digikey.com/en/products/detail/diotec-semiconductor/MMFTP84/13154778" calcext:value-type="string">
            <text:p>https://www.digikey.com/en/products/detail/diotec-semiconductor/MMFTP84/13154778</text:p>
          </table:table-cell>
          <table:table-cell table:formula="of:=[$Linking.Y20]" office:value-type="float" office:value="0.0831" calcext:value-type="float">
            <text:p>0.0831</text:p>
          </table:table-cell>
          <table:table-cell table:formula="of:=[.L18]*[.D18]" office:value-type="float" office:value="0.9972" calcext:value-type="float">
            <text:p>0.9972</text:p>
          </table:table-cell>
          <table:table-cell/>
        </table:table-row>
        <table:table-row table:style-name="ro1">
          <table:table-cell/>
          <table:table-cell table:formula="of:=[$Linking.AE21]" office:value-type="string" office:string-value="16" calcext:value-type="string">
            <text:p>16</text:p>
          </table:table-cell>
          <table:table-cell table:formula="of:=[$Linking.AD21]" office:value-type="string" office:string-value="Q16,Q19,Q21,Q23" calcext:value-type="string">
            <text:p>Q16,Q19,Q21,Q23</text:p>
          </table:table-cell>
          <table:table-cell table:formula="of:=[$Linking.O21]" office:value-type="float" office:value="4" calcext:value-type="float">
            <text:p>4</text:p>
          </table:table-cell>
          <table:table-cell table:formula="of:=[$Linking.T21]" office:value-type="string" office:string-value="Infineon" calcext:value-type="string">
            <text:p>Infineon</text:p>
          </table:table-cell>
          <table:table-cell table:formula="of:=[$Linking.U21]" office:value-type="string" office:string-value="IRLML6344TRPBF" calcext:value-type="string">
            <text:p>IRLML6344TRPBF</text:p>
          </table:table-cell>
          <table:table-cell table:formula="of:=[$Linking.Q21]" office:value-type="float" office:value="0" calcext:value-type="float">
            <text:p>0</text:p>
          </table:table-cell>
          <table:table-cell table:formula="of:=[$Linking.N21]" office:value-type="string" office:string-value="DMN65D8L-7" calcext:value-type="string">
            <text:p>DMN65D8L-7</text:p>
          </table:table-cell>
          <table:table-cell table:formula="of:=[$Linking.V21]" office:value-type="string" office:string-value="LCSC" calcext:value-type="string">
            <text:p>LCSC</text:p>
          </table:table-cell>
          <table:table-cell table:formula="of:=[$Linking.W21]" office:value-type="string" office:string-value="C53550" calcext:value-type="string">
            <text:p>C53550</text:p>
          </table:table-cell>
          <table:table-cell table:formula="of:=[$Linking.X21]" office:value-type="string" office:string-value="https://www.lcsc.com/product-detail/C53550.html" calcext:value-type="string">
            <text:p>https://www.lcsc.com/product-detail/C53550.html</text:p>
          </table:table-cell>
          <table:table-cell table:formula="of:=[$Linking.Y21]" office:value-type="float" office:value="0.1652" calcext:value-type="float">
            <text:p>0.1652</text:p>
          </table:table-cell>
          <table:table-cell table:formula="of:=[.L19]*[.D19]" office:value-type="float" office:value="0.6608" calcext:value-type="float">
            <text:p>0.6608</text:p>
          </table:table-cell>
          <table:table-cell/>
        </table:table-row>
        <table:table-row table:style-name="ro1">
          <table:table-cell/>
          <table:table-cell table:formula="of:=[$Linking.AE22]" office:value-type="string" office:string-value="17" calcext:value-type="string">
            <text:p>17</text:p>
          </table:table-cell>
          <table:table-cell table:formula="of:=[$Linking.AD22]" office:value-type="string" office:string-value="R1,R11,R17,R26,R34,R39,R45,R49,R50,R52,R53,R71,R72,R95,R96,R97" calcext:value-type="string">
            <text:p>R1,R11,R17,R26,R34,R39,R45,R49,R50,R52,R53,R71,R72,R95,R96,R97</text:p>
          </table:table-cell>
          <table:table-cell table:formula="of:=[$Linking.O22]" office:value-type="float" office:value="16" calcext:value-type="float">
            <text:p>16</text:p>
          </table:table-cell>
          <table:table-cell table:formula="of:=[$Linking.T22]" office:value-type="string" office:string-value="Yaego" calcext:value-type="string">
            <text:p>Yaego</text:p>
          </table:table-cell>
          <table:table-cell table:formula="of:=[$Linking.U22]" office:value-type="string" office:string-value="RC0603FR-07100KL" calcext:value-type="string">
            <text:p>RC0603FR-07100KL</text:p>
          </table:table-cell>
          <table:table-cell table:formula="of:=[$Linking.Q22]" office:value-type="string" office:string-value="100K" calcext:value-type="string">
            <text:p>100K</text:p>
          </table:table-cell>
          <table:table-cell table:formula="of:=[$Linking.N22]" office:value-type="string" office:string-value="0603" calcext:value-type="string">
            <text:p>0603</text:p>
          </table:table-cell>
          <table:table-cell table:formula="of:=[$Linking.V22]" office:value-type="string" office:string-value="LCSC" calcext:value-type="string">
            <text:p>LCSC</text:p>
          </table:table-cell>
          <table:table-cell table:formula="of:=[$Linking.W22]" office:value-type="string" office:string-value="C14675" calcext:value-type="string">
            <text:p>C14675</text:p>
          </table:table-cell>
          <table:table-cell table:formula="of:=[$Linking.X22]" office:value-type="string" office:string-value="https://www.lcsc.com/product-detail/C14675.html" calcext:value-type="string">
            <text:p>https://www.lcsc.com/product-detail/C14675.html</text:p>
          </table:table-cell>
          <table:table-cell table:formula="of:=[$Linking.Y22]" office:value-type="float" office:value="0.0014" calcext:value-type="float">
            <text:p>0.0014</text:p>
          </table:table-cell>
          <table:table-cell table:formula="of:=[.L20]*[.D20]" office:value-type="float" office:value="0.0224" calcext:value-type="float">
            <text:p>0.0224</text:p>
          </table:table-cell>
          <table:table-cell/>
        </table:table-row>
        <table:table-row table:style-name="ro1">
          <table:table-cell/>
          <table:table-cell table:formula="of:=[$Linking.AE23]" office:value-type="string" office:string-value="18" calcext:value-type="string">
            <text:p>18</text:p>
          </table:table-cell>
          <table:table-cell table:formula="of:=[$Linking.AD23]" office:value-type="string" office:string-value="R2,R13,R20,R27,R35,R36,R47,R54,R68,R69,R70,R73,R74" calcext:value-type="string">
            <text:p>R2,R13,R20,R27,R35,R36,R47,R54,R68,R69,R70,R73,R74</text:p>
          </table:table-cell>
          <table:table-cell table:formula="of:=[$Linking.O23]" office:value-type="float" office:value="13" calcext:value-type="float">
            <text:p>13</text:p>
          </table:table-cell>
          <table:table-cell table:formula="of:=[$Linking.T23]" office:value-type="string" office:string-value="Yaego" calcext:value-type="string">
            <text:p>Yaego</text:p>
          </table:table-cell>
          <table:table-cell table:formula="of:=[$Linking.U23]" office:value-type="string" office:string-value="RT0603FRE07330KL" calcext:value-type="string">
            <text:p>RT0603FRE07330KL</text:p>
          </table:table-cell>
          <table:table-cell table:formula="of:=[$Linking.Q23]" office:value-type="string" office:string-value="330K" calcext:value-type="string">
            <text:p>330K</text:p>
          </table:table-cell>
          <table:table-cell table:formula="of:=[$Linking.N23]" office:value-type="string" office:string-value="0603" calcext:value-type="string">
            <text:p>0603</text:p>
          </table:table-cell>
          <table:table-cell table:formula="of:=[$Linking.V23]" office:value-type="string" office:string-value="LCSC" calcext:value-type="string">
            <text:p>LCSC</text:p>
          </table:table-cell>
          <table:table-cell table:formula="of:=[$Linking.W23]" office:value-type="string" office:string-value="C863745" calcext:value-type="string">
            <text:p>C863745</text:p>
          </table:table-cell>
          <table:table-cell table:formula="of:=[$Linking.X23]" office:value-type="string" office:string-value="https://www.lcsc.com/product-detail/C863745.html" calcext:value-type="string">
            <text:p>https://www.lcsc.com/product-detail/C863745.html</text:p>
          </table:table-cell>
          <table:table-cell table:formula="of:=[$Linking.Y23]" office:value-type="float" office:value="0.0105" calcext:value-type="float">
            <text:p>0.0105</text:p>
          </table:table-cell>
          <table:table-cell table:formula="of:=[.L21]*[.D21]" office:value-type="float" office:value="0.1365" calcext:value-type="float">
            <text:p>0.1365</text:p>
          </table:table-cell>
          <table:table-cell/>
        </table:table-row>
        <table:table-row table:style-name="ro1">
          <table:table-cell/>
          <table:table-cell table:formula="of:=[$Linking.AE24]" office:value-type="string" office:string-value="19" calcext:value-type="string">
            <text:p>19</text:p>
          </table:table-cell>
          <table:table-cell table:formula="of:=[$Linking.AD24]" office:value-type="string" office:string-value="R14,R33,R42,R55,R80,R83,R86,R88,R109" calcext:value-type="string">
            <text:p>R14,R33,R42,R55,R80,R83,R86,R88,R109</text:p>
          </table:table-cell>
          <table:table-cell table:formula="of:=[$Linking.O24]" office:value-type="float" office:value="9" calcext:value-type="float">
            <text:p>9</text:p>
          </table:table-cell>
          <table:table-cell table:formula="of:=[$Linking.T24]" office:value-type="string" office:string-value="Yaego" calcext:value-type="string">
            <text:p>Yaego</text:p>
          </table:table-cell>
          <table:table-cell table:formula="of:=[$Linking.U24]" office:value-type="string" office:string-value="RC0603FR-071KL" calcext:value-type="string">
            <text:p>RC0603FR-071KL</text:p>
          </table:table-cell>
          <table:table-cell table:formula="of:=[$Linking.Q24]" office:value-type="string" office:string-value="1K" calcext:value-type="string">
            <text:p>1K</text:p>
          </table:table-cell>
          <table:table-cell table:formula="of:=[$Linking.N24]" office:value-type="string" office:string-value="0603" calcext:value-type="string">
            <text:p>0603</text:p>
          </table:table-cell>
          <table:table-cell table:formula="of:=[$Linking.V24]" office:value-type="string" office:string-value="LCSC" calcext:value-type="string">
            <text:p>LCSC</text:p>
          </table:table-cell>
          <table:table-cell table:formula="of:=[$Linking.W24]" office:value-type="string" office:string-value="C22548" calcext:value-type="string">
            <text:p>C22548</text:p>
          </table:table-cell>
          <table:table-cell table:formula="of:=[$Linking.X24]" office:value-type="string" office:string-value="https://www.lcsc.com/product-detail/C22548.html" calcext:value-type="string">
            <text:p>https://www.lcsc.com/product-detail/C22548.html</text:p>
          </table:table-cell>
          <table:table-cell table:formula="of:=[$Linking.Y24]" office:value-type="float" office:value="0.0015" calcext:value-type="float">
            <text:p>0.0015</text:p>
          </table:table-cell>
          <table:table-cell table:formula="of:=[.L22]*[.D22]" office:value-type="float" office:value="0.0135" calcext:value-type="float">
            <text:p>0.0135</text:p>
          </table:table-cell>
          <table:table-cell/>
        </table:table-row>
        <table:table-row table:style-name="ro1">
          <table:table-cell/>
          <table:table-cell table:formula="of:=[$Linking.AE25]" office:value-type="string" office:string-value="20" calcext:value-type="string">
            <text:p>20</text:p>
          </table:table-cell>
          <table:table-cell table:formula="of:=[$Linking.AD25]" office:value-type="string" office:string-value="R16" calcext:value-type="string">
            <text:p>R16</text:p>
          </table:table-cell>
          <table:table-cell table:formula="of:=[$Linking.O25]" office:value-type="float" office:value="1" calcext:value-type="float">
            <text:p>1</text:p>
          </table:table-cell>
          <table:table-cell table:formula="of:=[$Linking.T25]" office:value-type="string" office:string-value="Bourns" calcext:value-type="string">
            <text:p>Bourns</text:p>
          </table:table-cell>
          <table:table-cell table:formula="of:=[$Linking.U25]" office:value-type="string" office:string-value="CHV1206-FX-1003ELF" calcext:value-type="string">
            <text:p>CHV1206-FX-1003ELF</text:p>
          </table:table-cell>
          <table:table-cell table:formula="of:=[$Linking.Q25]" office:value-type="string" office:string-value="100K" calcext:value-type="string">
            <text:p>100K</text:p>
          </table:table-cell>
          <table:table-cell table:formula="of:=[$Linking.N25]" office:value-type="string" office:string-value="1206" calcext:value-type="string">
            <text:p>1206</text:p>
          </table:table-cell>
          <table:table-cell table:formula="of:=[$Linking.V25]" office:value-type="string" office:string-value="LCSC" calcext:value-type="string">
            <text:p>LCSC</text:p>
          </table:table-cell>
          <table:table-cell table:formula="of:=[$Linking.W25]" office:value-type="string" office:string-value="C2078737" calcext:value-type="string">
            <text:p>C2078737</text:p>
          </table:table-cell>
          <table:table-cell table:formula="of:=[$Linking.X25]" office:value-type="string" office:string-value="https://www.lcsc.com/product-detail/C2078737.html" calcext:value-type="string">
            <text:p>https://www.lcsc.com/product-detail/C2078737.html</text:p>
          </table:table-cell>
          <table:table-cell table:formula="of:=[$Linking.Y25]" office:value-type="float" office:value="0.1034" calcext:value-type="float">
            <text:p>0.1034</text:p>
          </table:table-cell>
          <table:table-cell table:formula="of:=[.L23]*[.D23]" office:value-type="float" office:value="0.1034" calcext:value-type="float">
            <text:p>0.1034</text:p>
          </table:table-cell>
          <table:table-cell/>
        </table:table-row>
        <table:table-row table:style-name="ro1">
          <table:table-cell/>
          <table:table-cell table:formula="of:=[$Linking.AE26]" office:value-type="string" office:string-value="21" calcext:value-type="string">
            <text:p>21</text:p>
          </table:table-cell>
          <table:table-cell table:formula="of:=[$Linking.AD26]" office:value-type="string" office:string-value="R18" calcext:value-type="string">
            <text:p>R18</text:p>
          </table:table-cell>
          <table:table-cell table:formula="of:=[$Linking.O26]" office:value-type="float" office:value="1" calcext:value-type="float">
            <text:p>1</text:p>
          </table:table-cell>
          <table:table-cell table:formula="of:=[$Linking.T26]" office:value-type="string" office:string-value="Yaego" calcext:value-type="string">
            <text:p>Yaego</text:p>
          </table:table-cell>
          <table:table-cell table:formula="of:=[$Linking.U26]" office:value-type="string" office:string-value="SR1206JR-7W470RL" calcext:value-type="string">
            <text:p>SR1206JR-7W470RL</text:p>
          </table:table-cell>
          <table:table-cell table:formula="of:=[$Linking.Q26]" office:value-type="float" office:value="470" calcext:value-type="float">
            <text:p>470</text:p>
          </table:table-cell>
          <table:table-cell table:formula="of:=[$Linking.N26]" office:value-type="string" office:string-value="1206" calcext:value-type="string">
            <text:p>1206</text:p>
          </table:table-cell>
          <table:table-cell table:formula="of:=[$Linking.V26]" office:value-type="string" office:string-value="LCSC" calcext:value-type="string">
            <text:p>LCSC</text:p>
          </table:table-cell>
          <table:table-cell table:formula="of:=[$Linking.W26]" office:value-type="string" office:string-value="C874087" calcext:value-type="string">
            <text:p>C874087</text:p>
          </table:table-cell>
          <table:table-cell table:formula="of:=[$Linking.X26]" office:value-type="string" office:string-value="https://www.lcsc.com/product-detail/C874087.html" calcext:value-type="string">
            <text:p>https://www.lcsc.com/product-detail/C874087.html</text:p>
          </table:table-cell>
          <table:table-cell table:formula="of:=[$Linking.Y26]" office:value-type="float" office:value="0.0253" calcext:value-type="float">
            <text:p>0.0253</text:p>
          </table:table-cell>
          <table:table-cell table:formula="of:=[.L24]*[.D24]" office:value-type="float" office:value="0.0253" calcext:value-type="float">
            <text:p>0.0253</text:p>
          </table:table-cell>
          <table:table-cell/>
        </table:table-row>
        <table:table-row table:style-name="ro1">
          <table:table-cell/>
          <table:table-cell table:formula="of:=[$Linking.AE27]" office:value-type="string" office:string-value="22" calcext:value-type="string">
            <text:p>22</text:p>
          </table:table-cell>
          <table:table-cell table:formula="of:=[$Linking.AD27]" office:value-type="string" office:string-value="R21,R22" calcext:value-type="string">
            <text:p>R21,R22</text:p>
          </table:table-cell>
          <table:table-cell table:formula="of:=[$Linking.O27]" office:value-type="float" office:value="2" calcext:value-type="float">
            <text:p>2</text:p>
          </table:table-cell>
          <table:table-cell table:formula="of:=[$Linking.T27]" office:value-type="string" office:string-value="Yaego" calcext:value-type="string">
            <text:p>Yaego</text:p>
          </table:table-cell>
          <table:table-cell table:formula="of:=[$Linking.U27]" office:value-type="string" office:string-value="AH1206FR-071ML" calcext:value-type="string">
            <text:p>AH1206FR-071ML</text:p>
          </table:table-cell>
          <table:table-cell table:formula="of:=[$Linking.Q27]" office:value-type="string" office:string-value="1M" calcext:value-type="string">
            <text:p>1M</text:p>
          </table:table-cell>
          <table:table-cell table:formula="of:=[$Linking.N27]" office:value-type="string" office:string-value="1206" calcext:value-type="string">
            <text:p>1206</text:p>
          </table:table-cell>
          <table:table-cell table:formula="of:=[$Linking.V27]" office:value-type="string" office:string-value="LCSC" calcext:value-type="string">
            <text:p>LCSC</text:p>
          </table:table-cell>
          <table:table-cell table:formula="of:=[$Linking.W27]" office:value-type="string" office:string-value="C43749042" calcext:value-type="string">
            <text:p>C43749042</text:p>
          </table:table-cell>
          <table:table-cell table:formula="of:=[$Linking.X27]" office:value-type="string" office:string-value="https://www.lcsc.com/product-detail/C43749042.html" calcext:value-type="string">
            <text:p>https://www.lcsc.com/product-detail/C43749042.html</text:p>
          </table:table-cell>
          <table:table-cell table:formula="of:=[$Linking.Y27]" office:value-type="float" office:value="0.0275" calcext:value-type="float">
            <text:p>0.0275</text:p>
          </table:table-cell>
          <table:table-cell table:formula="of:=[.L25]*[.D25]" office:value-type="float" office:value="0.055" calcext:value-type="float">
            <text:p>0.055</text:p>
          </table:table-cell>
          <table:table-cell/>
        </table:table-row>
        <table:table-row table:style-name="ro1">
          <table:table-cell/>
          <table:table-cell table:formula="of:=[$Linking.AE28]" office:value-type="string" office:string-value="23" calcext:value-type="string">
            <text:p>23</text:p>
          </table:table-cell>
          <table:table-cell table:formula="of:=[$Linking.AD28]" office:value-type="string" office:string-value="R41,R48,R66,R67,R76,R77,R82,R87" calcext:value-type="string">
            <text:p>R41,R48,R66,R67,R76,R77,R82,R87</text:p>
          </table:table-cell>
          <table:table-cell table:formula="of:=[$Linking.O28]" office:value-type="float" office:value="8" calcext:value-type="float">
            <text:p>8</text:p>
          </table:table-cell>
          <table:table-cell table:formula="of:=[$Linking.T28]" office:value-type="string" office:string-value="Yaego" calcext:value-type="string">
            <text:p>Yaego</text:p>
          </table:table-cell>
          <table:table-cell table:formula="of:=[$Linking.U28]" office:value-type="string" office:string-value="RC0603FR-0710KL" calcext:value-type="string">
            <text:p>RC0603FR-0710KL</text:p>
          </table:table-cell>
          <table:table-cell table:formula="of:=[$Linking.Q28]" office:value-type="string" office:string-value="10K" calcext:value-type="string">
            <text:p>10K</text:p>
          </table:table-cell>
          <table:table-cell table:formula="of:=[$Linking.N28]" office:value-type="string" office:string-value="0603" calcext:value-type="string">
            <text:p>0603</text:p>
          </table:table-cell>
          <table:table-cell table:formula="of:=[$Linking.V28]" office:value-type="string" office:string-value="LCSC" calcext:value-type="string">
            <text:p>LCSC</text:p>
          </table:table-cell>
          <table:table-cell table:formula="of:=[$Linking.W28]" office:value-type="string" office:string-value="C98220" calcext:value-type="string">
            <text:p>C98220</text:p>
          </table:table-cell>
          <table:table-cell table:formula="of:=[$Linking.X28]" office:value-type="string" office:string-value="https://www.lcsc.com/product-detail/C98220.html" calcext:value-type="string">
            <text:p>https://www.lcsc.com/product-detail/C98220.html</text:p>
          </table:table-cell>
          <table:table-cell table:formula="of:=[$Linking.Y28]" office:value-type="float" office:value="0.0015" calcext:value-type="float">
            <text:p>0.0015</text:p>
          </table:table-cell>
          <table:table-cell table:formula="of:=[.L26]*[.D26]" office:value-type="float" office:value="0.012" calcext:value-type="float">
            <text:p>0.012</text:p>
          </table:table-cell>
          <table:table-cell/>
        </table:table-row>
        <table:table-row table:style-name="ro1">
          <table:table-cell/>
          <table:table-cell table:formula="of:=[$Linking.AE29]" office:value-type="string" office:string-value="24" calcext:value-type="string">
            <text:p>24</text:p>
          </table:table-cell>
          <table:table-cell table:formula="of:=[$Linking.AD29]" office:value-type="string" office:string-value="R43,R44" calcext:value-type="string">
            <text:p>R43,R44</text:p>
          </table:table-cell>
          <table:table-cell table:formula="of:=[$Linking.O29]" office:value-type="float" office:value="2" calcext:value-type="float">
            <text:p>2</text:p>
          </table:table-cell>
          <table:table-cell table:formula="of:=[$Linking.T29]" office:value-type="string" office:string-value="Yaego" calcext:value-type="string">
            <text:p>Yaego</text:p>
          </table:table-cell>
          <table:table-cell table:formula="of:=[$Linking.U29]" office:value-type="string" office:string-value="RT0603BRD073K3L" calcext:value-type="string">
            <text:p>RT0603BRD073K3L</text:p>
          </table:table-cell>
          <table:table-cell table:formula="of:=[$Linking.Q29]" office:value-type="string" office:string-value="3.3K" calcext:value-type="string">
            <text:p>3.3K</text:p>
          </table:table-cell>
          <table:table-cell table:formula="of:=[$Linking.N29]" office:value-type="string" office:string-value="0603" calcext:value-type="string">
            <text:p>0603</text:p>
          </table:table-cell>
          <table:table-cell table:formula="of:=[$Linking.V29]" office:value-type="string" office:string-value="LCSC" calcext:value-type="string">
            <text:p>LCSC</text:p>
          </table:table-cell>
          <table:table-cell table:formula="of:=[$Linking.W29]" office:value-type="string" office:string-value="C309653" calcext:value-type="string">
            <text:p>C309653</text:p>
          </table:table-cell>
          <table:table-cell table:formula="of:=[$Linking.X29]" office:value-type="string" office:string-value="https://www.lcsc.com/product-detail/C309653.html" calcext:value-type="string">
            <text:p>https://www.lcsc.com/product-detail/C309653.html</text:p>
          </table:table-cell>
          <table:table-cell table:formula="of:=[$Linking.Y29]" office:value-type="float" office:value="0.0271" calcext:value-type="float">
            <text:p>0.0271</text:p>
          </table:table-cell>
          <table:table-cell table:formula="of:=[.L27]*[.D27]" office:value-type="float" office:value="0.0542" calcext:value-type="float">
            <text:p>0.0542</text:p>
          </table:table-cell>
          <table:table-cell/>
        </table:table-row>
        <table:table-row table:style-name="ro1">
          <table:table-cell/>
          <table:table-cell table:formula="of:=[$Linking.AE30]" office:value-type="string" office:string-value="25" calcext:value-type="string">
            <text:p>25</text:p>
          </table:table-cell>
          <table:table-cell table:formula="of:=[$Linking.AD30]" office:value-type="string" office:string-value="R46,R51,R94,R98,R99,R100,R101,R102" calcext:value-type="string">
            <text:p>R46,R51,R94,R98,R99,R100,R101,R102</text:p>
          </table:table-cell>
          <table:table-cell table:formula="of:=[$Linking.O30]" office:value-type="float" office:value="8" calcext:value-type="float">
            <text:p>8</text:p>
          </table:table-cell>
          <table:table-cell table:formula="of:=[$Linking.T30]" office:value-type="string" office:string-value="Vishay" calcext:value-type="string">
            <text:p>Vishay</text:p>
          </table:table-cell>
          <table:table-cell table:formula="of:=[$Linking.U30]" office:value-type="string" office:string-value="CRCW060333K0FKEA" calcext:value-type="string">
            <text:p>CRCW060333K0FKEA</text:p>
          </table:table-cell>
          <table:table-cell table:formula="of:=[$Linking.Q30]" office:value-type="string" office:string-value="33K" calcext:value-type="string">
            <text:p>33K</text:p>
          </table:table-cell>
          <table:table-cell table:formula="of:=[$Linking.N30]" office:value-type="string" office:string-value="0603" calcext:value-type="string">
            <text:p>0603</text:p>
          </table:table-cell>
          <table:table-cell table:formula="of:=[$Linking.V30]" office:value-type="string" office:string-value="LCSC" calcext:value-type="string">
            <text:p>LCSC</text:p>
          </table:table-cell>
          <table:table-cell table:formula="of:=[$Linking.W30]" office:value-type="string" office:string-value="C844778" calcext:value-type="string">
            <text:p>C844778</text:p>
          </table:table-cell>
          <table:table-cell table:formula="of:=[$Linking.X30]" office:value-type="string" office:string-value="https://www.lcsc.com/product-detail/C844778.html" calcext:value-type="string">
            <text:p>https://www.lcsc.com/product-detail/C844778.html</text:p>
          </table:table-cell>
          <table:table-cell table:formula="of:=[$Linking.Y30]" office:value-type="float" office:value="0.0046" calcext:value-type="float">
            <text:p>0.0046</text:p>
          </table:table-cell>
          <table:table-cell table:formula="of:=[.L28]*[.D28]" office:value-type="float" office:value="0.0368" calcext:value-type="float">
            <text:p>0.0368</text:p>
          </table:table-cell>
          <table:table-cell/>
        </table:table-row>
        <table:table-row table:style-name="ro1">
          <table:table-cell/>
          <table:table-cell table:formula="of:=[$Linking.AE31]" office:value-type="string" office:string-value="26" calcext:value-type="string">
            <text:p>26</text:p>
          </table:table-cell>
          <table:table-cell table:formula="of:=[$Linking.AD31]" office:value-type="string" office:string-value="R56" calcext:value-type="string">
            <text:p>R56</text:p>
          </table:table-cell>
          <table:table-cell table:formula="of:=[$Linking.O31]" office:value-type="float" office:value="1" calcext:value-type="float">
            <text:p>1</text:p>
          </table:table-cell>
          <table:table-cell table:formula="of:=[$Linking.T31]" office:value-type="string" office:string-value="Yaego" calcext:value-type="string">
            <text:p>Yaego</text:p>
          </table:table-cell>
          <table:table-cell table:formula="of:=[$Linking.U31]" office:value-type="string" office:string-value="RT1206BRB07100RL" calcext:value-type="string">
            <text:p>RT1206BRB07100RL</text:p>
          </table:table-cell>
          <table:table-cell table:formula="of:=[$Linking.Q31]" office:value-type="float" office:value="100" calcext:value-type="float">
            <text:p>100</text:p>
          </table:table-cell>
          <table:table-cell table:formula="of:=[$Linking.N31]" office:value-type="string" office:string-value="1206" calcext:value-type="string">
            <text:p>1206</text:p>
          </table:table-cell>
          <table:table-cell table:formula="of:=[$Linking.V31]" office:value-type="string" office:string-value="LCSC" calcext:value-type="string">
            <text:p>LCSC</text:p>
          </table:table-cell>
          <table:table-cell table:formula="of:=[$Linking.W31]" office:value-type="string" office:string-value="C869681" calcext:value-type="string">
            <text:p>C869681</text:p>
          </table:table-cell>
          <table:table-cell table:formula="of:=[$Linking.X31]" office:value-type="string" office:string-value="https://www.lcsc.com/product-detail/C869681.html" calcext:value-type="string">
            <text:p>https://www.lcsc.com/product-detail/C869681.html</text:p>
          </table:table-cell>
          <table:table-cell table:formula="of:=[$Linking.Y31]" office:value-type="float" office:value="0.0916" calcext:value-type="float">
            <text:p>0.0916</text:p>
          </table:table-cell>
          <table:table-cell table:formula="of:=[.L29]*[.D29]" office:value-type="float" office:value="0.0916" calcext:value-type="float">
            <text:p>0.0916</text:p>
          </table:table-cell>
          <table:table-cell/>
        </table:table-row>
        <table:table-row table:style-name="ro1">
          <table:table-cell/>
          <table:table-cell table:formula="of:=[$Linking.AE32]" office:value-type="string" office:string-value="27" calcext:value-type="string">
            <text:p>27</text:p>
          </table:table-cell>
          <table:table-cell table:formula="of:=[$Linking.AD32]" office:value-type="string" office:string-value="R59,R60,R61,R62,R63,R64,R65,R106,R107" calcext:value-type="string">
            <text:p>R59,R60,R61,R62,R63,R64,R65,R106,R107</text:p>
          </table:table-cell>
          <table:table-cell table:formula="of:=[$Linking.O32]" office:value-type="float" office:value="9" calcext:value-type="float">
            <text:p>9</text:p>
          </table:table-cell>
          <table:table-cell table:formula="of:=[$Linking.T32]" office:value-type="string" office:string-value="Yaego" calcext:value-type="string">
            <text:p>Yaego</text:p>
          </table:table-cell>
          <table:table-cell table:formula="of:=[$Linking.U32]" office:value-type="string" office:string-value="ERJ3EKF2200V" calcext:value-type="string">
            <text:p>ERJ3EKF2200V</text:p>
          </table:table-cell>
          <table:table-cell table:formula="of:=[$Linking.Q32]" office:value-type="float" office:value="220" calcext:value-type="float">
            <text:p>220</text:p>
          </table:table-cell>
          <table:table-cell table:formula="of:=[$Linking.N32]" office:value-type="string" office:string-value="0603" calcext:value-type="string">
            <text:p>0603</text:p>
          </table:table-cell>
          <table:table-cell table:formula="of:=[$Linking.V32]" office:value-type="string" office:string-value="LCSC" calcext:value-type="string">
            <text:p>LCSC</text:p>
          </table:table-cell>
          <table:table-cell table:formula="of:=[$Linking.W32]" office:value-type="string" office:string-value="C403073" calcext:value-type="string">
            <text:p>C403073</text:p>
          </table:table-cell>
          <table:table-cell table:formula="of:=[$Linking.X32]" office:value-type="string" office:string-value="https://www.lcsc.com/product-detail/C403073.html" calcext:value-type="string">
            <text:p>https://www.lcsc.com/product-detail/C403073.html</text:p>
          </table:table-cell>
          <table:table-cell table:formula="of:=[$Linking.Y32]" office:value-type="float" office:value="0.0053" calcext:value-type="float">
            <text:p>0.0053</text:p>
          </table:table-cell>
          <table:table-cell table:formula="of:=[.L30]*[.D30]" office:value-type="float" office:value="0.0477" calcext:value-type="float">
            <text:p>0.0477</text:p>
          </table:table-cell>
          <table:table-cell/>
        </table:table-row>
        <table:table-row table:style-name="ro1">
          <table:table-cell/>
          <table:table-cell table:formula="of:=[$Linking.AE33]" office:value-type="string" office:string-value="28" calcext:value-type="string">
            <text:p>28</text:p>
          </table:table-cell>
          <table:table-cell table:formula="of:=[$Linking.AD33]" office:value-type="string" office:string-value="R75,R78,R79,R81,R84,R85,R103,R104,R105" calcext:value-type="string">
            <text:p>R75,R78,R79,R81,R84,R85,R103,R104,R105</text:p>
          </table:table-cell>
          <table:table-cell table:formula="of:=[$Linking.O33]" office:value-type="float" office:value="9" calcext:value-type="float">
            <text:p>9</text:p>
          </table:table-cell>
          <table:table-cell table:formula="of:=[$Linking.T33]" office:value-type="string" office:string-value="Yaego" calcext:value-type="string">
            <text:p>Yaego</text:p>
          </table:table-cell>
          <table:table-cell table:formula="of:=[$Linking.U33]" office:value-type="string" office:string-value="CRCW060327R0FKEA" calcext:value-type="string">
            <text:p>CRCW060327R0FKEA</text:p>
          </table:table-cell>
          <table:table-cell table:formula="of:=[$Linking.Q33]" office:value-type="float" office:value="27" calcext:value-type="float">
            <text:p>27</text:p>
          </table:table-cell>
          <table:table-cell table:formula="of:=[$Linking.N33]" office:value-type="string" office:string-value="0603" calcext:value-type="string">
            <text:p>0603</text:p>
          </table:table-cell>
          <table:table-cell table:formula="of:=[$Linking.V33]" office:value-type="string" office:string-value="LCSC" calcext:value-type="string">
            <text:p>LCSC</text:p>
          </table:table-cell>
          <table:table-cell table:formula="of:=[$Linking.W33]" office:value-type="string" office:string-value="C844545" calcext:value-type="string">
            <text:p>C844545</text:p>
          </table:table-cell>
          <table:table-cell table:formula="of:=[$Linking.X33]" office:value-type="string" office:string-value="https://www.lcsc.com/product-detail/C844545.html" calcext:value-type="string">
            <text:p>https://www.lcsc.com/product-detail/C844545.html</text:p>
          </table:table-cell>
          <table:table-cell table:formula="of:=[$Linking.Y33]" office:value-type="float" office:value="0.0045" calcext:value-type="float">
            <text:p>0.0045</text:p>
          </table:table-cell>
          <table:table-cell table:formula="of:=[.L31]*[.D31]" office:value-type="float" office:value="0.0405" calcext:value-type="float">
            <text:p>0.0405</text:p>
          </table:table-cell>
          <table:table-cell/>
        </table:table-row>
        <table:table-row table:style-name="ro1">
          <table:table-cell/>
          <table:table-cell table:formula="of:=[$Linking.AE34]" office:value-type="string" office:string-value="29" calcext:value-type="string">
            <text:p>29</text:p>
          </table:table-cell>
          <table:table-cell table:formula="of:=[$Linking.AD34]" office:value-type="string" office:string-value="R89,R90,R91,R92" calcext:value-type="string">
            <text:p>R89,R90,R91,R92</text:p>
          </table:table-cell>
          <table:table-cell table:formula="of:=[$Linking.O34]" office:value-type="float" office:value="4" calcext:value-type="float">
            <text:p>4</text:p>
          </table:table-cell>
          <table:table-cell table:formula="of:=[$Linking.T34]" office:value-type="string" office:string-value="Yaego" calcext:value-type="string">
            <text:p>Yaego</text:p>
          </table:table-cell>
          <table:table-cell table:formula="of:=[$Linking.U34]" office:value-type="string" office:string-value="AC0603FR-075K1L" calcext:value-type="string">
            <text:p>AC0603FR-075K1L</text:p>
          </table:table-cell>
          <table:table-cell table:formula="of:=[$Linking.Q34]" office:value-type="string" office:string-value="5.1K" calcext:value-type="string">
            <text:p>5.1K</text:p>
          </table:table-cell>
          <table:table-cell table:formula="of:=[$Linking.N34]" office:value-type="string" office:string-value="0603" calcext:value-type="string">
            <text:p>0603</text:p>
          </table:table-cell>
          <table:table-cell table:formula="of:=[$Linking.V34]" office:value-type="string" office:string-value="LCSC" calcext:value-type="string">
            <text:p>LCSC</text:p>
          </table:table-cell>
          <table:table-cell table:formula="of:=[$Linking.W34]" office:value-type="string" office:string-value="C125891" calcext:value-type="string">
            <text:p>C125891</text:p>
          </table:table-cell>
          <table:table-cell table:formula="of:=[$Linking.X34]" office:value-type="string" office:string-value="https://www.lcsc.com/product-detail/C125891.html" calcext:value-type="string">
            <text:p>https://www.lcsc.com/product-detail/C125891.html</text:p>
          </table:table-cell>
          <table:table-cell table:formula="of:=[$Linking.Y34]" office:value-type="float" office:value="0.0024" calcext:value-type="float">
            <text:p>0.0024</text:p>
          </table:table-cell>
          <table:table-cell table:formula="of:=[.L32]*[.D32]" office:value-type="float" office:value="0.0096" calcext:value-type="float">
            <text:p>0.0096</text:p>
          </table:table-cell>
          <table:table-cell/>
        </table:table-row>
        <table:table-row table:style-name="ro1">
          <table:table-cell/>
          <table:table-cell table:formula="of:=[$Linking.AE35]" office:value-type="string" office:string-value="30" calcext:value-type="string">
            <text:p>30</text:p>
          </table:table-cell>
          <table:table-cell table:formula="of:=[$Linking.AD35]" office:value-type="string" office:string-value="U1" calcext:value-type="string">
            <text:p>U1</text:p>
          </table:table-cell>
          <table:table-cell table:formula="of:=[$Linking.O35]" office:value-type="float" office:value="1" calcext:value-type="float">
            <text:p>1</text:p>
          </table:table-cell>
          <table:table-cell table:formula="of:=[$Linking.T35]" office:value-type="string" office:string-value="Diodes Inc" calcext:value-type="string">
            <text:p>Diodes Inc</text:p>
          </table:table-cell>
          <table:table-cell table:formula="of:=[$Linking.U35]" office:value-type="string" office:string-value="AS2376QS-13" calcext:value-type="string">
            <text:p>AS2376QS-13</text:p>
          </table:table-cell>
          <table:table-cell table:formula="of:=[$Linking.Q35]" office:value-type="string" office:string-value="0.2pA 5uV" calcext:value-type="string">
            <text:p>0.2pA 5uV</text:p>
          </table:table-cell>
          <table:table-cell table:formula="of:=[$Linking.N35]" office:value-type="string" office:string-value="SOIC-8_AS2376S-13" calcext:value-type="string">
            <text:p>SOIC-8_AS2376S-13</text:p>
          </table:table-cell>
          <table:table-cell table:formula="of:=[$Linking.V35]" office:value-type="string" office:string-value="LCSC" calcext:value-type="string">
            <text:p>LCSC</text:p>
          </table:table-cell>
          <table:table-cell table:formula="of:=[$Linking.W35]" office:value-type="string" office:string-value="C19948478" calcext:value-type="string">
            <text:p>C19948478</text:p>
          </table:table-cell>
          <table:table-cell table:formula="of:=[$Linking.X35]" office:value-type="string" office:string-value="https://www.lcsc.com/product-detail/C19948478.html" calcext:value-type="string">
            <text:p>https://www.lcsc.com/product-detail/C19948478.html</text:p>
          </table:table-cell>
          <table:table-cell table:formula="of:=[$Linking.Y35]" office:value-type="float" office:value="0.53" calcext:value-type="float">
            <text:p>0.53</text:p>
          </table:table-cell>
          <table:table-cell table:formula="of:=[.L33]*[.D33]" office:value-type="float" office:value="0.53" calcext:value-type="float">
            <text:p>0.53</text:p>
          </table:table-cell>
          <table:table-cell/>
        </table:table-row>
        <table:table-row table:style-name="ro1">
          <table:table-cell/>
          <table:table-cell table:formula="of:=[$Linking.AE36]" office:value-type="string" office:string-value="31" calcext:value-type="string">
            <text:p>31</text:p>
          </table:table-cell>
          <table:table-cell table:formula="of:=[$Linking.AD36]" office:value-type="string" office:string-value="U2,U3,U4,U5" calcext:value-type="string">
            <text:p>U2,U3,U4,U5</text:p>
          </table:table-cell>
          <table:table-cell table:formula="of:=[$Linking.O36]" office:value-type="float" office:value="4" calcext:value-type="float">
            <text:p>4</text:p>
          </table:table-cell>
          <table:table-cell table:formula="of:=[$Linking.T36]" office:value-type="string" office:string-value="TI" calcext:value-type="string">
            <text:p>TI</text:p>
          </table:table-cell>
          <table:table-cell table:formula="of:=[$Linking.U36]" office:value-type="string" office:string-value="TS5A3159DCKR" calcext:value-type="string">
            <text:p>TS5A3159DCKR</text:p>
          </table:table-cell>
          <table:table-cell table:formula="of:=[$Linking.Q36]" office:value-type="string" office:string-value="TS5A3159DCKR" calcext:value-type="string">
            <text:p>TS5A3159DCKR</text:p>
          </table:table-cell>
          <table:table-cell table:formula="of:=[$Linking.N36]" office:value-type="string" office:string-value="SC-70_TS5A3159DCKR" calcext:value-type="string">
            <text:p>SC-70_TS5A3159DCKR</text:p>
          </table:table-cell>
          <table:table-cell table:formula="of:=[$Linking.V36]" office:value-type="string" office:string-value="LCSC" calcext:value-type="string">
            <text:p>LCSC</text:p>
          </table:table-cell>
          <table:table-cell table:formula="of:=[$Linking.W36]" office:value-type="string" office:string-value="C46388" calcext:value-type="string">
            <text:p>C46388</text:p>
          </table:table-cell>
          <table:table-cell table:formula="of:=[$Linking.X36]" office:value-type="string" office:string-value="https://www.lcsc.com/product-detail/C46388.html" calcext:value-type="string">
            <text:p>https://www.lcsc.com/product-detail/C46388.html</text:p>
          </table:table-cell>
          <table:table-cell table:formula="of:=[$Linking.Y36]" office:value-type="float" office:value="0.1724" calcext:value-type="float">
            <text:p>0.1724</text:p>
          </table:table-cell>
          <table:table-cell table:formula="of:=[.L34]*[.D34]" office:value-type="float" office:value="0.6896" calcext:value-type="float">
            <text:p>0.6896</text:p>
          </table:table-cell>
          <table:table-cell/>
        </table:table-row>
        <table:table-row table:style-name="ro1">
          <table:table-cell/>
          <table:table-cell table:formula="of:=[$Linking.AE37]" office:value-type="string" office:string-value="32" calcext:value-type="string">
            <text:p>32</text:p>
          </table:table-cell>
          <table:table-cell table:formula="of:=[$Linking.AD37]" office:value-type="string" office:string-value="U6,U7,U8,U12,U13,U16" calcext:value-type="string">
            <text:p>U6,U7,U8,U12,U13,U16</text:p>
          </table:table-cell>
          <table:table-cell table:formula="of:=[$Linking.O37]" office:value-type="float" office:value="6" calcext:value-type="float">
            <text:p>6</text:p>
          </table:table-cell>
          <table:table-cell table:formula="of:=[$Linking.T37]" office:value-type="string" office:string-value="TI" calcext:value-type="string">
            <text:p>TI</text:p>
          </table:table-cell>
          <table:table-cell table:formula="of:=[$Linking.U37]" office:value-type="string" office:string-value="TLV333IDCKR" calcext:value-type="string">
            <text:p>TLV333IDCKR</text:p>
          </table:table-cell>
          <table:table-cell table:formula="of:=[$Linking.Q37]" office:value-type="string" office:string-value="70pA 8uV" calcext:value-type="string">
            <text:p>70pA 8uV</text:p>
          </table:table-cell>
          <table:table-cell table:formula="of:=[$Linking.N37]" office:value-type="string" office:string-value="SC-70-5_AS333SE-7" calcext:value-type="string">
            <text:p>SC-70-5_AS333SE-7</text:p>
          </table:table-cell>
          <table:table-cell table:formula="of:=[$Linking.V37]" office:value-type="string" office:string-value="LCSC" calcext:value-type="string">
            <text:p>LCSC</text:p>
          </table:table-cell>
          <table:table-cell table:formula="of:=[$Linking.W37]" office:value-type="string" office:string-value="C181502" calcext:value-type="string">
            <text:p>C181502</text:p>
          </table:table-cell>
          <table:table-cell table:formula="of:=[$Linking.X37]" office:value-type="string" office:string-value="https://www.lcsc.com/product-detail/C181502.html" calcext:value-type="string">
            <text:p>https://www.lcsc.com/product-detail/C181502.html</text:p>
          </table:table-cell>
          <table:table-cell table:formula="of:=[$Linking.Y37]" office:value-type="float" office:value="0.2764" calcext:value-type="float">
            <text:p>0.2764</text:p>
          </table:table-cell>
          <table:table-cell table:formula="of:=[.L35]*[.D35]" office:value-type="float" office:value="1.6584" calcext:value-type="float">
            <text:p>1.6584</text:p>
          </table:table-cell>
          <table:table-cell/>
        </table:table-row>
        <table:table-row table:style-name="ro1">
          <table:table-cell/>
          <table:table-cell table:formula="of:=[$Linking.AE38]" office:value-type="string" office:string-value="33" calcext:value-type="string">
            <text:p>33</text:p>
          </table:table-cell>
          <table:table-cell table:formula="of:=[$Linking.AD38]" office:value-type="string" office:string-value="U9,U10" calcext:value-type="string">
            <text:p>U9,U10</text:p>
          </table:table-cell>
          <table:table-cell table:formula="of:=[$Linking.O38]" office:value-type="float" office:value="2" calcext:value-type="float">
            <text:p>2</text:p>
          </table:table-cell>
          <table:table-cell table:formula="of:=[$Linking.T38]" office:value-type="string" office:string-value="Diodes Inc" calcext:value-type="string">
            <text:p>Diodes Inc</text:p>
          </table:table-cell>
          <table:table-cell table:formula="of:=[$Linking.U38]" office:value-type="string" office:string-value="AP2210K-5.0TRG1" calcext:value-type="string">
            <text:p>AP2210K-5.0TRG1</text:p>
          </table:table-cell>
          <table:table-cell table:formula="of:=[$Linking.Q38]" office:value-type="string" office:string-value="5V" calcext:value-type="string">
            <text:p>5V</text:p>
          </table:table-cell>
          <table:table-cell table:formula="of:=[$Linking.N38]" office:value-type="string" office:string-value="SOT23-5" calcext:value-type="string">
            <text:p>SOT23-5</text:p>
          </table:table-cell>
          <table:table-cell table:formula="of:=[$Linking.V38]" office:value-type="string" office:string-value="LCSC" calcext:value-type="string">
            <text:p>LCSC</text:p>
          </table:table-cell>
          <table:table-cell table:formula="of:=[$Linking.W38]" office:value-type="string" office:string-value="C500758" calcext:value-type="string">
            <text:p>C500758</text:p>
          </table:table-cell>
          <table:table-cell table:formula="of:=[$Linking.X38]" office:value-type="string" office:string-value="https://www.lcsc.com/product-detail/C500758.html" calcext:value-type="string">
            <text:p>https://www.lcsc.com/product-detail/C500758.html</text:p>
          </table:table-cell>
          <table:table-cell table:formula="of:=[$Linking.Y38]" office:value-type="float" office:value="0.16" calcext:value-type="float">
            <text:p>0.16</text:p>
          </table:table-cell>
          <table:table-cell table:formula="of:=[.L36]*[.D36]" office:value-type="float" office:value="0.32" calcext:value-type="float">
            <text:p>0.32</text:p>
          </table:table-cell>
          <table:table-cell/>
        </table:table-row>
        <table:table-row table:style-name="ro1">
          <table:table-cell/>
          <table:table-cell table:formula="of:=[$Linking.AE39]" office:value-type="string" office:string-value="34" calcext:value-type="string">
            <text:p>34</text:p>
          </table:table-cell>
          <table:table-cell table:formula="of:=[$Linking.AD39]" office:value-type="string" office:string-value="U11,U15,U27" calcext:value-type="string">
            <text:p>U11,U15,U27</text:p>
          </table:table-cell>
          <table:table-cell table:formula="of:=[$Linking.O39]" office:value-type="float" office:value="3" calcext:value-type="float">
            <text:p>3</text:p>
          </table:table-cell>
          <table:table-cell table:formula="of:=[$Linking.T39]" office:value-type="string" office:string-value="Toshiba" calcext:value-type="string">
            <text:p>Toshiba</text:p>
          </table:table-cell>
          <table:table-cell table:formula="of:=[$Linking.U39]" office:value-type="string" office:string-value="TCR2EF33,LM(CT" calcext:value-type="string">
            <text:p>TCR2EF33,LM(CT</text:p>
          </table:table-cell>
          <table:table-cell table:formula="of:=[$Linking.Q39]" office:value-type="string" office:string-value="3.3V" calcext:value-type="string">
            <text:p>3.3V</text:p>
          </table:table-cell>
          <table:table-cell table:formula="of:=[$Linking.N39]" office:value-type="string" office:string-value="SC-74A_standard" calcext:value-type="string">
            <text:p>SC-74A_standard</text:p>
          </table:table-cell>
          <table:table-cell table:formula="of:=[$Linking.V39]" office:value-type="string" office:string-value="LCSC" calcext:value-type="string">
            <text:p>LCSC</text:p>
          </table:table-cell>
          <table:table-cell table:formula="of:=[$Linking.W39]" office:value-type="string" office:string-value="C843273" calcext:value-type="string">
            <text:p>C843273</text:p>
          </table:table-cell>
          <table:table-cell table:formula="of:=[$Linking.X39]" office:value-type="string" office:string-value="https://www.lcsc.com/product-detail/C843273.html" calcext:value-type="string">
            <text:p>https://www.lcsc.com/product-detail/C843273.html</text:p>
          </table:table-cell>
          <table:table-cell table:formula="of:=[$Linking.Y39]" office:value-type="float" office:value="0.1047" calcext:value-type="float">
            <text:p>0.1047</text:p>
          </table:table-cell>
          <table:table-cell table:formula="of:=[.L37]*[.D37]" office:value-type="float" office:value="0.3141" calcext:value-type="float">
            <text:p>0.3141</text:p>
          </table:table-cell>
          <table:table-cell/>
        </table:table-row>
        <table:table-row table:style-name="ro1">
          <table:table-cell/>
          <table:table-cell table:formula="of:=[$Linking.AE40]" office:value-type="string" office:string-value="35" calcext:value-type="string">
            <text:p>35</text:p>
          </table:table-cell>
          <table:table-cell table:formula="of:=[$Linking.AD40]" office:value-type="string" office:string-value="U14" calcext:value-type="string">
            <text:p>U14</text:p>
          </table:table-cell>
          <table:table-cell table:formula="of:=[$Linking.O40]" office:value-type="float" office:value="1" calcext:value-type="float">
            <text:p>1</text:p>
          </table:table-cell>
          <table:table-cell table:formula="of:=[$Linking.T40]" office:value-type="string" office:string-value="Nexperia" calcext:value-type="string">
            <text:p>Nexperia</text:p>
          </table:table-cell>
          <table:table-cell table:formula="of:=[$Linking.U40]" office:value-type="string" office:string-value="NMUX1308BQX" calcext:value-type="string">
            <text:p>NMUX1308BQX</text:p>
          </table:table-cell>
          <table:table-cell table:formula="of:=[$Linking.Q40]" office:value-type="string" office:string-value="NMUX1308" calcext:value-type="string">
            <text:p>NMUX1308</text:p>
          </table:table-cell>
          <table:table-cell table:formula="of:=[$Linking.N40]" office:value-type="string" office:string-value="16-DHVQFN_NMUX1308" calcext:value-type="string">
            <text:p>16-DHVQFN_NMUX1308</text:p>
          </table:table-cell>
          <table:table-cell table:formula="of:=[$Linking.V40]" office:value-type="string" office:string-value="Digikey" calcext:value-type="string">
            <text:p>Digikey</text:p>
          </table:table-cell>
          <table:table-cell table:formula="of:=[$Linking.W40]" office:value-type="string" office:string-value="1727-NMUX1308BQXCT-ND" calcext:value-type="string">
            <text:p>1727-NMUX1308BQXCT-ND</text:p>
          </table:table-cell>
          <table:table-cell table:formula="of:=[$Linking.X40]" office:value-type="string" office:string-value="https://www.digikey.com/en/products/detail/nexperia-usa-inc/NMUX1308BQX/22050149?s=N4IgTCBcDaIHIFkCqANAjAZgAwA4BCAiiiALoC%2BQA" calcext:value-type="string">
            <text:p>https://www.digikey.com/en/products/detail/nexperia-usa-inc/NMUX1308BQX/22050149?s=N4IgTCBcDaIHIFkCqANAjAZgAwA4BCAiiiALoC%2BQA</text:p>
          </table:table-cell>
          <table:table-cell table:formula="of:=[$Linking.Y40]" office:value-type="float" office:value="0.229" calcext:value-type="float">
            <text:p>0.229</text:p>
          </table:table-cell>
          <table:table-cell table:formula="of:=[.L38]*[.D38]" office:value-type="float" office:value="0.229" calcext:value-type="float">
            <text:p>0.229</text:p>
          </table:table-cell>
          <table:table-cell/>
        </table:table-row>
        <table:table-row table:style-name="ro1">
          <table:table-cell/>
          <table:table-cell table:formula="of:=[$Linking.AE41]" office:value-type="string" office:string-value="36" calcext:value-type="string">
            <text:p>36</text:p>
          </table:table-cell>
          <table:table-cell table:formula="of:=[$Linking.AD41]" office:value-type="string" office:string-value="U17" calcext:value-type="string">
            <text:p>U17</text:p>
          </table:table-cell>
          <table:table-cell table:formula="of:=[$Linking.O41]" office:value-type="float" office:value="1" calcext:value-type="float">
            <text:p>1</text:p>
          </table:table-cell>
          <table:table-cell table:formula="of:=[$Linking.T41]" office:value-type="string" office:string-value="Microchip" calcext:value-type="string">
            <text:p>Microchip</text:p>
          </table:table-cell>
          <table:table-cell table:formula="of:=[$Linking.U41]" office:value-type="string" office:string-value="MCP3460RT-E/2LX" calcext:value-type="string">
            <text:p>MCP3460RT-E/2LX</text:p>
          </table:table-cell>
          <table:table-cell table:formula="of:=[$Linking.Q41]" office:value-type="string" office:string-value="MCP3460RT" calcext:value-type="string">
            <text:p>MCP3460RT</text:p>
          </table:table-cell>
          <table:table-cell table:formula="of:=[$Linking.N41]" office:value-type="string" office:string-value="MCP3460R_VQFN-20_3x3mm_EP" calcext:value-type="string">
            <text:p>MCP3460R_VQFN-20_3x3mm_EP</text:p>
          </table:table-cell>
          <table:table-cell table:formula="of:=[$Linking.V41]" office:value-type="string" office:string-value="Digikey" calcext:value-type="string">
            <text:p>Digikey</text:p>
          </table:table-cell>
          <table:table-cell table:formula="of:=[$Linking.W41]" office:value-type="string" office:string-value="150-MCP3460RT-E/2LXCT-ND" calcext:value-type="string">
            <text:p>150-MCP3460RT-E/2LXCT-ND</text:p>
          </table:table-cell>
          <table:table-cell table:formula="of:=[$Linking.X41]" office:value-type="string" office:string-value="https://www.digikey.com/en/products/detail/microchip-technology/MCP3460RT-E-2LX/26653549?s=N4IgjCBcpgnAHLKoDGUBmBDANgZwKYA0IA9lANogAMIAugL73EBMFIAsgMIAKAzACwA2KgCU69IA" calcext:value-type="string">
            <text:p>https://www.digikey.com/en/products/detail/microchip-technology/MCP3460RT-E-2LX/26653549?s=N4IgjCBcpgnAHLKoDGUBmBDANgZwKYA0IA9lANogAMIAugL73EBMFIAsgMIAKAzACwA2KgCU69IA</text:p>
          </table:table-cell>
          <table:table-cell table:formula="of:=[$Linking.Y41]" office:value-type="float" office:value="1.35" calcext:value-type="float">
            <text:p>1.35</text:p>
          </table:table-cell>
          <table:table-cell table:formula="of:=[.L39]*[.D39]" office:value-type="float" office:value="1.35" calcext:value-type="float">
            <text:p>1.35</text:p>
          </table:table-cell>
          <table:table-cell/>
        </table:table-row>
        <table:table-row table:style-name="ro1">
          <table:table-cell/>
          <table:table-cell table:formula="of:=[$Linking.AE42]" office:value-type="string" office:string-value="37" calcext:value-type="string">
            <text:p>37</text:p>
          </table:table-cell>
          <table:table-cell table:formula="of:=[$Linking.AD42]" office:value-type="string" office:string-value="U18,U19,U20,U31" calcext:value-type="string">
            <text:p>U18,U19,U20,U31</text:p>
          </table:table-cell>
          <table:table-cell table:formula="of:=[$Linking.O42]" office:value-type="float" office:value="4" calcext:value-type="float">
            <text:p>4</text:p>
          </table:table-cell>
          <table:table-cell table:formula="of:=[$Linking.T42]" office:value-type="string" office:string-value="Nexperia" calcext:value-type="string">
            <text:p>Nexperia</text:p>
          </table:table-cell>
          <table:table-cell table:formula="of:=[$Linking.U42]" office:value-type="string" office:string-value="74HC595BQ,115" calcext:value-type="string">
            <text:p>74HC595BQ,115</text:p>
          </table:table-cell>
          <table:table-cell table:formula="of:=[$Linking.Q42]" office:value-type="string" office:string-value="74HC595BQ,115" calcext:value-type="string">
            <text:p>74HC595BQ,115</text:p>
          </table:table-cell>
          <table:table-cell table:formula="of:=[$Linking.N42]" office:value-type="string" office:string-value="16-DHVQFN_74HC595BQ" calcext:value-type="string">
            <text:p>16-DHVQFN_74HC595BQ</text:p>
          </table:table-cell>
          <table:table-cell table:formula="of:=[$Linking.V42]" office:value-type="string" office:string-value="LCSC" calcext:value-type="string">
            <text:p>LCSC</text:p>
          </table:table-cell>
          <table:table-cell table:formula="of:=[$Linking.W42]" office:value-type="string" office:string-value="C730243" calcext:value-type="string">
            <text:p>C730243</text:p>
          </table:table-cell>
          <table:table-cell table:formula="of:=[$Linking.X42]" office:value-type="string" office:string-value="https://www.lcsc.com/product-detail/C730243.html?s_z=n_q_74HC595BQ%252C115&amp;spm=wm.ssy.bg.0.xh&amp;lcsc_vid=ElkMVlNXTgcPUgBXFgILUwdVEVRWUlEFQ1VXUgAHFFMxVlNRQFRdUVVUR1lXVjsOAxUeFF5JWBYZEEoKFBINSQcJGk4eFQsCAgIaSgADAwAHC0slQ1hdVl1WWQkaCgg%3D" calcext:value-type="string">
            <text:p>https://www.lcsc.com/product-detail/C730243.html?s_z=n_q_74HC595BQ%252C115&amp;spm=wm.ssy.bg.0.xh&amp;lcsc_vid=ElkMVlNXTgcPUgBXFgILUwdVEVRWUlEFQ1VXUgAHFFMxVlNRQFRdUVVUR1lXVjsOAxUeFF5JWBYZEEoKFBINSQcJGk4eFQsCAgIaSgADAwAHC0slQ1hdVl1WWQkaCgg%3D</text:p>
          </table:table-cell>
          <table:table-cell table:formula="of:=[$Linking.Y42]" office:value-type="float" office:value="0.177" calcext:value-type="float">
            <text:p>0.177</text:p>
          </table:table-cell>
          <table:table-cell table:formula="of:=[.L40]*[.D40]"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table:formula="of:=[$Linking.AE43]" office:value-type="string" office:string-value="38" calcext:value-type="string">
            <text:p>38</text:p>
          </table:table-cell>
          <table:table-cell table:formula="of:=[$Linking.AD43]" office:value-type="string" office:string-value="U21" calcext:value-type="string">
            <text:p>U21</text:p>
          </table:table-cell>
          <table:table-cell table:formula="of:=[$Linking.O43]" office:value-type="float" office:value="1" calcext:value-type="float">
            <text:p>1</text:p>
          </table:table-cell>
          <table:table-cell table:formula="of:=[$Linking.T43]" office:value-type="string" office:string-value="Microchip" calcext:value-type="string">
            <text:p>Microchip</text:p>
          </table:table-cell>
          <table:table-cell table:formula="of:=[$Linking.U43]" office:value-type="string" office:string-value="11AA160T-I/TT" calcext:value-type="string">
            <text:p>11AA160T-I/TT</text:p>
          </table:table-cell>
          <table:table-cell table:formula="of:=[$Linking.Q43]" office:value-type="string" office:string-value="16Kbit" calcext:value-type="string">
            <text:p>16Kbit</text:p>
          </table:table-cell>
          <table:table-cell table:formula="of:=[$Linking.N43]" office:value-type="string" office:string-value="SOT23-3" calcext:value-type="string">
            <text:p>SOT23-3</text:p>
          </table:table-cell>
          <table:table-cell table:formula="of:=[$Linking.V43]" office:value-type="string" office:string-value="Digikey" calcext:value-type="string">
            <text:p>Digikey</text:p>
          </table:table-cell>
          <table:table-cell table:formula="of:=[$Linking.W43]" office:value-type="string" office:string-value="11AA160T-I/TTCT-ND" calcext:value-type="string">
            <text:p>11AA160T-I/TTCT-ND</text:p>
          </table:table-cell>
          <table:table-cell table:formula="of:=[$Linking.X43]" office:value-type="string" office:string-value="https://www.digikey.com/en/products/detail/microchip-technology/11AA160T-I-TT/1851330" calcext:value-type="string">
            <text:p>https://www.digikey.com/en/products/detail/microchip-technology/11AA160T-I-TT/1851330</text:p>
          </table:table-cell>
          <table:table-cell table:formula="of:=[$Linking.Y43]" office:value-type="float" office:value="0.37" calcext:value-type="float">
            <text:p>0.37</text:p>
          </table:table-cell>
          <table:table-cell table:formula="of:=[.L41]*[.D41]" office:value-type="float" office:value="0.37" calcext:value-type="float">
            <text:p>0.37</text:p>
          </table:table-cell>
          <table:table-cell/>
        </table:table-row>
        <table:table-row table:style-name="ro1">
          <table:table-cell/>
          <table:table-cell table:formula="of:=[$Linking.AE44]" office:value-type="string" office:string-value="39" calcext:value-type="string">
            <text:p>39</text:p>
          </table:table-cell>
          <table:table-cell table:formula="of:=[$Linking.AD44]" office:value-type="string" office:string-value="U23" calcext:value-type="string">
            <text:p>U23</text:p>
          </table:table-cell>
          <table:table-cell table:formula="of:=[$Linking.O44]" office:value-type="float" office:value="1" calcext:value-type="float">
            <text:p>1</text:p>
          </table:table-cell>
          <table:table-cell table:formula="of:=[$Linking.T44]" office:value-type="string" office:string-value="ST" calcext:value-type="string">
            <text:p>ST</text:p>
          </table:table-cell>
          <table:table-cell table:formula="of:=[$Linking.U44]" office:value-type="string" office:string-value="STISO621TR" calcext:value-type="string">
            <text:p>STISO621TR</text:p>
          </table:table-cell>
          <table:table-cell table:formula="of:=[$Linking.Q44]" office:value-type="string" office:string-value="STISO621TR" calcext:value-type="string">
            <text:p>STISO621TR</text:p>
          </table:table-cell>
          <table:table-cell table:formula="of:=[$Linking.N44]" office:value-type="string" office:string-value="SOIC-8_STISO621TR" calcext:value-type="string">
            <text:p>SOIC-8_STISO621TR</text:p>
          </table:table-cell>
          <table:table-cell table:formula="of:=[$Linking.V44]" office:value-type="string" office:string-value="LCSC" calcext:value-type="string">
            <text:p>LCSC</text:p>
          </table:table-cell>
          <table:table-cell table:formula="of:=[$Linking.W44]" office:value-type="string" office:string-value="C5447162" calcext:value-type="string">
            <text:p>C5447162</text:p>
          </table:table-cell>
          <table:table-cell table:formula="of:=[$Linking.X44]" office:value-type="string" office:string-value="https://www.lcsc.com/product-detail/C5447162.html" calcext:value-type="string">
            <text:p>https://www.lcsc.com/product-detail/C5447162.html</text:p>
          </table:table-cell>
          <table:table-cell table:formula="of:=[$Linking.Y44]" office:value-type="float" office:value="1.071" calcext:value-type="float">
            <text:p>1.071</text:p>
          </table:table-cell>
          <table:table-cell table:formula="of:=[.L42]*[.D42]" office:value-type="float" office:value="1.071" calcext:value-type="float">
            <text:p>1.071</text:p>
          </table:table-cell>
          <table:table-cell/>
        </table:table-row>
        <table:table-row table:style-name="ro1">
          <table:table-cell/>
          <table:table-cell table:formula="of:=[$Linking.AE45]" office:value-type="string" office:string-value="40" calcext:value-type="string">
            <text:p>40</text:p>
          </table:table-cell>
          <table:table-cell table:formula="of:=[$Linking.AD45]" office:value-type="string" office:string-value="U25,U26" calcext:value-type="string">
            <text:p>U25,U26</text:p>
          </table:table-cell>
          <table:table-cell table:formula="of:=[$Linking.O45]" office:value-type="float" office:value="2" calcext:value-type="float">
            <text:p>2</text:p>
          </table:table-cell>
          <table:table-cell table:formula="of:=[$Linking.T45]" office:value-type="string" office:string-value="Raspberry Pi" calcext:value-type="string">
            <text:p>Raspberry Pi</text:p>
          </table:table-cell>
          <table:table-cell table:formula="of:=[$Linking.U45]" office:value-type="string" office:string-value="RP2040" calcext:value-type="string">
            <text:p>RP2040</text:p>
          </table:table-cell>
          <table:table-cell table:formula="of:=[$Linking.Q45]" office:value-type="string" office:string-value="RP2040" calcext:value-type="string">
            <text:p>RP2040</text:p>
          </table:table-cell>
          <table:table-cell table:formula="of:=[$Linking.N45]" office:value-type="string" office:string-value="QFN-56-1EP_7x7mm_P0.4mm_EP3.2x3.2mm" calcext:value-type="string">
            <text:p>QFN-56-1EP_7x7mm_P0.4mm_EP3.2x3.2mm</text:p>
          </table:table-cell>
          <table:table-cell table:formula="of:=[$Linking.V45]" office:value-type="string" office:string-value="LCSC" calcext:value-type="string">
            <text:p>LCSC</text:p>
          </table:table-cell>
          <table:table-cell table:formula="of:=[$Linking.W45]" office:value-type="string" office:string-value="C2040" calcext:value-type="string">
            <text:p>C2040</text:p>
          </table:table-cell>
          <table:table-cell table:formula="of:=[$Linking.X45]" office:value-type="string" office:string-value="https://www.lcsc.com/product-detail/C2040.html" calcext:value-type="string">
            <text:p>https://www.lcsc.com/product-detail/C2040.html</text:p>
          </table:table-cell>
          <table:table-cell table:formula="of:=[$Linking.Y45]" office:value-type="float" office:value="0.87" calcext:value-type="float">
            <text:p>0.87</text:p>
          </table:table-cell>
          <table:table-cell table:formula="of:=[.L43]*[.D43]" office:value-type="float" office:value="1.74" calcext:value-type="float">
            <text:p>1.74</text:p>
          </table:table-cell>
          <table:table-cell/>
        </table:table-row>
        <table:table-row table:style-name="ro1">
          <table:table-cell/>
          <table:table-cell table:formula="of:=[$Linking.AE46]" office:value-type="string" office:string-value="41" calcext:value-type="string">
            <text:p>41</text:p>
          </table:table-cell>
          <table:table-cell table:formula="of:=[$Linking.AD46]" office:value-type="string" office:string-value="U28,U29" calcext:value-type="string">
            <text:p>U28,U29</text:p>
          </table:table-cell>
          <table:table-cell table:formula="of:=[$Linking.O46]" office:value-type="float" office:value="2" calcext:value-type="float">
            <text:p>2</text:p>
          </table:table-cell>
          <table:table-cell table:formula="of:=[$Linking.T46]" office:value-type="string" office:string-value="Winbond" calcext:value-type="string">
            <text:p>Winbond</text:p>
          </table:table-cell>
          <table:table-cell table:formula="of:=[$Linking.U46]" office:value-type="string" office:string-value="W25Q16JVSS" calcext:value-type="string">
            <text:p>W25Q16JVSS</text:p>
          </table:table-cell>
          <table:table-cell table:formula="of:=[$Linking.Q46]" office:value-type="string" office:string-value="W25Q16JVSS" calcext:value-type="string">
            <text:p>W25Q16JVSS</text:p>
          </table:table-cell>
          <table:table-cell table:formula="of:=[$Linking.N46]" office:value-type="string" office:string-value="SOIC-8_5.3x5.3mm_P1.27mm" calcext:value-type="string">
            <text:p>SOIC-8_5.3x5.3mm_P1.27mm</text:p>
          </table:table-cell>
          <table:table-cell table:formula="of:=[$Linking.V46]" office:value-type="string" office:string-value="LCSC" calcext:value-type="string">
            <text:p>LCSC</text:p>
          </table:table-cell>
          <table:table-cell table:formula="of:=[$Linking.W46]" office:value-type="string" office:string-value="C82317" calcext:value-type="string">
            <text:p>C82317</text:p>
          </table:table-cell>
          <table:table-cell table:formula="of:=[$Linking.X46]" office:value-type="string" office:string-value="https://www.lcsc.com/product-detail/C82317.html" calcext:value-type="string">
            <text:p>https://www.lcsc.com/product-detail/C82317.html</text:p>
          </table:table-cell>
          <table:table-cell table:formula="of:=[$Linking.Y46]" office:value-type="float" office:value="0.74" calcext:value-type="float">
            <text:p>0.74</text:p>
          </table:table-cell>
          <table:table-cell table:formula="of:=[.L44]*[.D44]" office:value-type="float" office:value="1.48" calcext:value-type="float">
            <text:p>1.48</text:p>
          </table:table-cell>
          <table:table-cell/>
        </table:table-row>
        <table:table-row table:style-name="ro1">
          <table:table-cell/>
          <table:table-cell table:formula="of:=[$Linking.AE47]" office:value-type="string" office:string-value="42" calcext:value-type="string">
            <text:p>42</text:p>
          </table:table-cell>
          <table:table-cell table:formula="of:=[$Linking.AD47]" office:value-type="string" office:string-value="U30,U32,U33,U34,U35,U36,U37" calcext:value-type="string">
            <text:p>U30,U32,U33,U34,U35,U36,U37</text:p>
          </table:table-cell>
          <table:table-cell table:formula="of:=[$Linking.O47]" office:value-type="float" office:value="7" calcext:value-type="float">
            <text:p>7</text:p>
          </table:table-cell>
          <table:table-cell table:formula="of:=[$Linking.T47]" office:value-type="string" office:string-value="onsemi" calcext:value-type="string">
            <text:p>onsemi</text:p>
          </table:table-cell>
          <table:table-cell table:formula="of:=[$Linking.U47]" office:value-type="string" office:string-value="NST3904DP6T5G" calcext:value-type="string">
            <text:p>NST3904DP6T5G</text:p>
          </table:table-cell>
          <table:table-cell table:formula="of:=[$Linking.Q47]" office:value-type="string" office:string-value="NST3904DP6T5G" calcext:value-type="string">
            <text:p>NST3904DP6T5G</text:p>
          </table:table-cell>
          <table:table-cell table:formula="of:=[$Linking.N47]" office:value-type="string" office:string-value="SOT-963_NST3904DP6T5G" calcext:value-type="string">
            <text:p>SOT-963_NST3904DP6T5G</text:p>
          </table:table-cell>
          <table:table-cell table:formula="of:=[$Linking.V47]" office:value-type="string" office:string-value="LCSC" calcext:value-type="string">
            <text:p>LCSC</text:p>
          </table:table-cell>
          <table:table-cell table:formula="of:=[$Linking.W47]" office:value-type="string" office:string-value="C462939" calcext:value-type="string">
            <text:p>C462939</text:p>
          </table:table-cell>
          <table:table-cell table:formula="of:=[$Linking.X47]" office:value-type="string" office:string-value="https://www.lcsc.com/product-detail/C462939.html" calcext:value-type="string">
            <text:p>https://www.lcsc.com/product-detail/C462939.html</text:p>
          </table:table-cell>
          <table:table-cell table:formula="of:=[$Linking.Y47]" office:value-type="float" office:value="0.0411" calcext:value-type="float">
            <text:p>0.0411</text:p>
          </table:table-cell>
          <table:table-cell table:formula="of:=[.L45]*[.D45]" office:value-type="float" office:value="0.2877" calcext:value-type="float">
            <text:p>0.2877</text:p>
          </table:table-cell>
          <table:table-cell/>
        </table:table-row>
        <table:table-row table:style-name="ro1">
          <table:table-cell/>
          <table:table-cell table:formula="of:=[$Linking.AE48]" office:value-type="string" office:string-value="43" calcext:value-type="string">
            <text:p>43</text:p>
          </table:table-cell>
          <table:table-cell table:formula="of:=[$Linking.AD48]" office:value-type="string" office:string-value="Y1,Y2" calcext:value-type="string">
            <text:p>Y1,Y2</text:p>
          </table:table-cell>
          <table:table-cell table:formula="of:=[$Linking.O48]" office:value-type="float" office:value="2" calcext:value-type="float">
            <text:p>2</text:p>
          </table:table-cell>
          <table:table-cell table:formula="of:=[$Linking.T48]" office:value-type="string" office:string-value="Abracon" calcext:value-type="string">
            <text:p>Abracon</text:p>
          </table:table-cell>
          <table:table-cell table:formula="of:=[$Linking.U48]" office:value-type="string" office:string-value="ABM8-272-T3" calcext:value-type="string">
            <text:p>ABM8-272-T3</text:p>
          </table:table-cell>
          <table:table-cell table:formula="of:=[$Linking.Q48]" office:value-type="string" office:string-value="ABM8-272-T3" calcext:value-type="string">
            <text:p>ABM8-272-T3</text:p>
          </table:table-cell>
          <table:table-cell table:formula="of:=[$Linking.N48]" office:value-type="string" office:string-value="XTAL_3225-4Pin_3.2x2.5mm" calcext:value-type="string">
            <text:p>XTAL_3225-4Pin_3.2x2.5mm</text:p>
          </table:table-cell>
          <table:table-cell table:formula="of:=[$Linking.V48]" office:value-type="string" office:string-value="LCSC" calcext:value-type="string">
            <text:p>LCSC</text:p>
          </table:table-cell>
          <table:table-cell table:formula="of:=[$Linking.W48]" office:value-type="string" office:string-value="C20625731" calcext:value-type="string">
            <text:p>C20625731</text:p>
          </table:table-cell>
          <table:table-cell table:formula="of:=[$Linking.X48]" office:value-type="string" office:string-value="https://www.lcsc.com/product-detail/C20625731.html" calcext:value-type="string">
            <text:p>https://www.lcsc.com/product-detail/C20625731.html</text:p>
          </table:table-cell>
          <table:table-cell table:formula="of:=[$Linking.Y48]" office:value-type="float" office:value="0.2936" calcext:value-type="float">
            <text:p>0.2936</text:p>
          </table:table-cell>
          <table:table-cell table:formula="of:=[.L46]*[.D46]" office:value-type="float" office:value="0.5872" calcext:value-type="float">
            <text:p>0.5872</text:p>
          </table:table-cell>
          <table:table-cell/>
        </table:table-row>
        <table:table-row table:style-name="ro1">
          <table:table-cell/>
          <table:table-cell table:formula="of:=[$Linking.AE49]">
            <text:p/>
          </table:table-cell>
          <table:table-cell table:formula="of:=[$Linking.AD49]">
            <text:p/>
          </table:table-cell>
          <table:table-cell table:formula="of:=[$Linking.O49]" office:value-type="float" office:value="0" calcext:value-type="float">
            <text:p>0</text:p>
          </table:table-cell>
          <table:table-cell table:formula="of:=[$Linking.T49]" office:value-type="float" office:value="0" calcext:value-type="float">
            <text:p>0</text:p>
          </table:table-cell>
          <table:table-cell table:formula="of:=[$Linking.U49]" office:value-type="float" office:value="0" calcext:value-type="float">
            <text:p>0</text:p>
          </table:table-cell>
          <table:table-cell table:formula="of:=[$Linking.Q49]" office:value-type="float" office:value="0" calcext:value-type="float">
            <text:p>0</text:p>
          </table:table-cell>
          <table:table-cell table:formula="of:=[$Linking.N49]" office:value-type="string" office:string-value="" calcext:value-type="error">
            <text:p>#VALUE!</text:p>
          </table:table-cell>
          <table:table-cell table:formula="of:=[$Linking.V49]" office:value-type="float" office:value="0" calcext:value-type="float">
            <text:p>0</text:p>
          </table:table-cell>
          <table:table-cell table:formula="of:=[$Linking.W49]" office:value-type="float" office:value="0" calcext:value-type="float">
            <text:p>0</text:p>
          </table:table-cell>
          <table:table-cell table:formula="of:=[$Linking.X49]" office:value-type="float" office:value="0" calcext:value-type="float">
            <text:p>0</text:p>
          </table:table-cell>
          <table:table-cell table:formula="of:=[$Linking.Y49]" office:value-type="float" office:value="0" calcext:value-type="float">
            <text:p>0</text:p>
          </table:table-cell>
          <table:table-cell table:formula="of:=[.L47]*[.D4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0]">
            <text:p/>
          </table:table-cell>
          <table:table-cell table:formula="of:=[$Linking.AD50]">
            <text:p/>
          </table:table-cell>
          <table:table-cell table:formula="of:=[$Linking.O50]" office:value-type="float" office:value="0" calcext:value-type="float">
            <text:p>0</text:p>
          </table:table-cell>
          <table:table-cell table:formula="of:=[$Linking.T50]" office:value-type="float" office:value="0" calcext:value-type="float">
            <text:p>0</text:p>
          </table:table-cell>
          <table:table-cell table:formula="of:=[$Linking.U50]" office:value-type="float" office:value="0" calcext:value-type="float">
            <text:p>0</text:p>
          </table:table-cell>
          <table:table-cell table:formula="of:=[$Linking.Q50]" office:value-type="float" office:value="0" calcext:value-type="float">
            <text:p>0</text:p>
          </table:table-cell>
          <table:table-cell table:formula="of:=[$Linking.N50]" office:value-type="string" office:string-value="" calcext:value-type="error">
            <text:p>#VALUE!</text:p>
          </table:table-cell>
          <table:table-cell table:formula="of:=[$Linking.V50]" office:value-type="float" office:value="0" calcext:value-type="float">
            <text:p>0</text:p>
          </table:table-cell>
          <table:table-cell table:formula="of:=[$Linking.W50]" office:value-type="float" office:value="0" calcext:value-type="float">
            <text:p>0</text:p>
          </table:table-cell>
          <table:table-cell table:formula="of:=[$Linking.X50]" office:value-type="float" office:value="0" calcext:value-type="float">
            <text:p>0</text:p>
          </table:table-cell>
          <table:table-cell table:formula="of:=[$Linking.Y50]" office:value-type="float" office:value="0" calcext:value-type="float">
            <text:p>0</text:p>
          </table:table-cell>
          <table:table-cell table:formula="of:=[.L48]*[.D4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1]">
            <text:p/>
          </table:table-cell>
          <table:table-cell table:formula="of:=[$Linking.AD51]">
            <text:p/>
          </table:table-cell>
          <table:table-cell table:formula="of:=[$Linking.O51]" office:value-type="float" office:value="0" calcext:value-type="float">
            <text:p>0</text:p>
          </table:table-cell>
          <table:table-cell table:formula="of:=[$Linking.T51]" office:value-type="float" office:value="0" calcext:value-type="float">
            <text:p>0</text:p>
          </table:table-cell>
          <table:table-cell table:formula="of:=[$Linking.U51]" office:value-type="float" office:value="0" calcext:value-type="float">
            <text:p>0</text:p>
          </table:table-cell>
          <table:table-cell table:formula="of:=[$Linking.Q51]" office:value-type="float" office:value="0" calcext:value-type="float">
            <text:p>0</text:p>
          </table:table-cell>
          <table:table-cell table:formula="of:=[$Linking.N51]" office:value-type="string" office:string-value="" calcext:value-type="error">
            <text:p>#VALUE!</text:p>
          </table:table-cell>
          <table:table-cell table:formula="of:=[$Linking.V51]" office:value-type="float" office:value="0" calcext:value-type="float">
            <text:p>0</text:p>
          </table:table-cell>
          <table:table-cell table:formula="of:=[$Linking.W51]" office:value-type="float" office:value="0" calcext:value-type="float">
            <text:p>0</text:p>
          </table:table-cell>
          <table:table-cell table:formula="of:=[$Linking.X51]" office:value-type="float" office:value="0" calcext:value-type="float">
            <text:p>0</text:p>
          </table:table-cell>
          <table:table-cell table:formula="of:=[$Linking.Y51]" office:value-type="float" office:value="0" calcext:value-type="float">
            <text:p>0</text:p>
          </table:table-cell>
          <table:table-cell table:formula="of:=[.L49]*[.D4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2]">
            <text:p/>
          </table:table-cell>
          <table:table-cell table:formula="of:=[$Linking.AD52]">
            <text:p/>
          </table:table-cell>
          <table:table-cell table:formula="of:=[$Linking.O52]" office:value-type="float" office:value="0" calcext:value-type="float">
            <text:p>0</text:p>
          </table:table-cell>
          <table:table-cell table:formula="of:=[$Linking.T52]" office:value-type="float" office:value="0" calcext:value-type="float">
            <text:p>0</text:p>
          </table:table-cell>
          <table:table-cell table:formula="of:=[$Linking.U52]" office:value-type="float" office:value="0" calcext:value-type="float">
            <text:p>0</text:p>
          </table:table-cell>
          <table:table-cell table:formula="of:=[$Linking.Q52]" office:value-type="float" office:value="0" calcext:value-type="float">
            <text:p>0</text:p>
          </table:table-cell>
          <table:table-cell table:formula="of:=[$Linking.N52]" office:value-type="string" office:string-value="" calcext:value-type="error">
            <text:p>#VALUE!</text:p>
          </table:table-cell>
          <table:table-cell table:formula="of:=[$Linking.V52]" office:value-type="float" office:value="0" calcext:value-type="float">
            <text:p>0</text:p>
          </table:table-cell>
          <table:table-cell table:formula="of:=[$Linking.W52]" office:value-type="float" office:value="0" calcext:value-type="float">
            <text:p>0</text:p>
          </table:table-cell>
          <table:table-cell table:formula="of:=[$Linking.X52]" office:value-type="float" office:value="0" calcext:value-type="float">
            <text:p>0</text:p>
          </table:table-cell>
          <table:table-cell table:formula="of:=[$Linking.Y52]" office:value-type="float" office:value="0" calcext:value-type="float">
            <text:p>0</text:p>
          </table:table-cell>
          <table:table-cell table:formula="of:=[.L50]*[.D5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3]">
            <text:p/>
          </table:table-cell>
          <table:table-cell table:formula="of:=[$Linking.AD53]">
            <text:p/>
          </table:table-cell>
          <table:table-cell table:formula="of:=[$Linking.O53]" office:value-type="float" office:value="0" calcext:value-type="float">
            <text:p>0</text:p>
          </table:table-cell>
          <table:table-cell table:formula="of:=[$Linking.T53]" office:value-type="float" office:value="0" calcext:value-type="float">
            <text:p>0</text:p>
          </table:table-cell>
          <table:table-cell table:formula="of:=[$Linking.U53]" office:value-type="float" office:value="0" calcext:value-type="float">
            <text:p>0</text:p>
          </table:table-cell>
          <table:table-cell table:formula="of:=[$Linking.Q53]" office:value-type="float" office:value="0" calcext:value-type="float">
            <text:p>0</text:p>
          </table:table-cell>
          <table:table-cell table:formula="of:=[$Linking.N53]" office:value-type="string" office:string-value="" calcext:value-type="error">
            <text:p>#VALUE!</text:p>
          </table:table-cell>
          <table:table-cell table:formula="of:=[$Linking.V53]" office:value-type="float" office:value="0" calcext:value-type="float">
            <text:p>0</text:p>
          </table:table-cell>
          <table:table-cell table:formula="of:=[$Linking.W53]" office:value-type="float" office:value="0" calcext:value-type="float">
            <text:p>0</text:p>
          </table:table-cell>
          <table:table-cell table:formula="of:=[$Linking.X53]" office:value-type="float" office:value="0" calcext:value-type="float">
            <text:p>0</text:p>
          </table:table-cell>
          <table:table-cell table:formula="of:=[$Linking.Y53]" office:value-type="float" office:value="0" calcext:value-type="float">
            <text:p>0</text:p>
          </table:table-cell>
          <table:table-cell table:formula="of:=[.L51]*[.D5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4]">
            <text:p/>
          </table:table-cell>
          <table:table-cell table:formula="of:=[$Linking.AD54]">
            <text:p/>
          </table:table-cell>
          <table:table-cell table:formula="of:=[$Linking.O54]" office:value-type="float" office:value="0" calcext:value-type="float">
            <text:p>0</text:p>
          </table:table-cell>
          <table:table-cell table:formula="of:=[$Linking.T54]" office:value-type="float" office:value="0" calcext:value-type="float">
            <text:p>0</text:p>
          </table:table-cell>
          <table:table-cell table:formula="of:=[$Linking.U54]" office:value-type="float" office:value="0" calcext:value-type="float">
            <text:p>0</text:p>
          </table:table-cell>
          <table:table-cell table:formula="of:=[$Linking.Q54]" office:value-type="float" office:value="0" calcext:value-type="float">
            <text:p>0</text:p>
          </table:table-cell>
          <table:table-cell table:formula="of:=[$Linking.N54]" office:value-type="string" office:string-value="" calcext:value-type="error">
            <text:p>#VALUE!</text:p>
          </table:table-cell>
          <table:table-cell table:formula="of:=[$Linking.V54]" office:value-type="float" office:value="0" calcext:value-type="float">
            <text:p>0</text:p>
          </table:table-cell>
          <table:table-cell table:formula="of:=[$Linking.W54]" office:value-type="float" office:value="0" calcext:value-type="float">
            <text:p>0</text:p>
          </table:table-cell>
          <table:table-cell table:formula="of:=[$Linking.X54]" office:value-type="float" office:value="0" calcext:value-type="float">
            <text:p>0</text:p>
          </table:table-cell>
          <table:table-cell table:formula="of:=[$Linking.Y54]" office:value-type="float" office:value="0" calcext:value-type="float">
            <text:p>0</text:p>
          </table:table-cell>
          <table:table-cell table:formula="of:=[.L52]*[.D5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5]">
            <text:p/>
          </table:table-cell>
          <table:table-cell table:formula="of:=[$Linking.AD55]">
            <text:p/>
          </table:table-cell>
          <table:table-cell table:formula="of:=[$Linking.O55]" office:value-type="float" office:value="0" calcext:value-type="float">
            <text:p>0</text:p>
          </table:table-cell>
          <table:table-cell table:formula="of:=[$Linking.T55]" office:value-type="float" office:value="0" calcext:value-type="float">
            <text:p>0</text:p>
          </table:table-cell>
          <table:table-cell table:formula="of:=[$Linking.U55]" office:value-type="float" office:value="0" calcext:value-type="float">
            <text:p>0</text:p>
          </table:table-cell>
          <table:table-cell table:formula="of:=[$Linking.Q55]" office:value-type="float" office:value="0" calcext:value-type="float">
            <text:p>0</text:p>
          </table:table-cell>
          <table:table-cell table:formula="of:=[$Linking.N55]" office:value-type="string" office:string-value="" calcext:value-type="error">
            <text:p>#VALUE!</text:p>
          </table:table-cell>
          <table:table-cell table:formula="of:=[$Linking.V55]" office:value-type="float" office:value="0" calcext:value-type="float">
            <text:p>0</text:p>
          </table:table-cell>
          <table:table-cell table:formula="of:=[$Linking.W55]" office:value-type="float" office:value="0" calcext:value-type="float">
            <text:p>0</text:p>
          </table:table-cell>
          <table:table-cell table:formula="of:=[$Linking.X55]" office:value-type="float" office:value="0" calcext:value-type="float">
            <text:p>0</text:p>
          </table:table-cell>
          <table:table-cell table:formula="of:=[$Linking.Y55]" office:value-type="float" office:value="0" calcext:value-type="float">
            <text:p>0</text:p>
          </table:table-cell>
          <table:table-cell table:formula="of:=[.L53]*[.D5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6]">
            <text:p/>
          </table:table-cell>
          <table:table-cell table:formula="of:=[$Linking.AD56]">
            <text:p/>
          </table:table-cell>
          <table:table-cell table:formula="of:=[$Linking.O56]" office:value-type="float" office:value="0" calcext:value-type="float">
            <text:p>0</text:p>
          </table:table-cell>
          <table:table-cell table:formula="of:=[$Linking.T56]" office:value-type="float" office:value="0" calcext:value-type="float">
            <text:p>0</text:p>
          </table:table-cell>
          <table:table-cell table:formula="of:=[$Linking.U56]" office:value-type="float" office:value="0" calcext:value-type="float">
            <text:p>0</text:p>
          </table:table-cell>
          <table:table-cell table:formula="of:=[$Linking.Q56]" office:value-type="float" office:value="0" calcext:value-type="float">
            <text:p>0</text:p>
          </table:table-cell>
          <table:table-cell table:formula="of:=[$Linking.N56]" office:value-type="string" office:string-value="" calcext:value-type="error">
            <text:p>#VALUE!</text:p>
          </table:table-cell>
          <table:table-cell table:formula="of:=[$Linking.V56]" office:value-type="float" office:value="0" calcext:value-type="float">
            <text:p>0</text:p>
          </table:table-cell>
          <table:table-cell table:formula="of:=[$Linking.W56]" office:value-type="float" office:value="0" calcext:value-type="float">
            <text:p>0</text:p>
          </table:table-cell>
          <table:table-cell table:formula="of:=[$Linking.X56]" office:value-type="float" office:value="0" calcext:value-type="float">
            <text:p>0</text:p>
          </table:table-cell>
          <table:table-cell table:formula="of:=[$Linking.Y56]" office:value-type="float" office:value="0" calcext:value-type="float">
            <text:p>0</text:p>
          </table:table-cell>
          <table:table-cell table:formula="of:=[.L54]*[.D5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7]">
            <text:p/>
          </table:table-cell>
          <table:table-cell table:formula="of:=[$Linking.AD57]">
            <text:p/>
          </table:table-cell>
          <table:table-cell table:formula="of:=[$Linking.O57]" office:value-type="float" office:value="0" calcext:value-type="float">
            <text:p>0</text:p>
          </table:table-cell>
          <table:table-cell table:formula="of:=[$Linking.T57]" office:value-type="float" office:value="0" calcext:value-type="float">
            <text:p>0</text:p>
          </table:table-cell>
          <table:table-cell table:formula="of:=[$Linking.U57]" office:value-type="float" office:value="0" calcext:value-type="float">
            <text:p>0</text:p>
          </table:table-cell>
          <table:table-cell table:formula="of:=[$Linking.Q57]" office:value-type="float" office:value="0" calcext:value-type="float">
            <text:p>0</text:p>
          </table:table-cell>
          <table:table-cell table:formula="of:=[$Linking.N57]" office:value-type="string" office:string-value="" calcext:value-type="error">
            <text:p>#VALUE!</text:p>
          </table:table-cell>
          <table:table-cell table:formula="of:=[$Linking.V57]" office:value-type="float" office:value="0" calcext:value-type="float">
            <text:p>0</text:p>
          </table:table-cell>
          <table:table-cell table:formula="of:=[$Linking.W57]" office:value-type="float" office:value="0" calcext:value-type="float">
            <text:p>0</text:p>
          </table:table-cell>
          <table:table-cell table:formula="of:=[$Linking.X57]" office:value-type="float" office:value="0" calcext:value-type="float">
            <text:p>0</text:p>
          </table:table-cell>
          <table:table-cell table:formula="of:=[$Linking.Y57]" office:value-type="float" office:value="0" calcext:value-type="float">
            <text:p>0</text:p>
          </table:table-cell>
          <table:table-cell table:formula="of:=[.L55]*[.D5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8]">
            <text:p/>
          </table:table-cell>
          <table:table-cell table:formula="of:=[$Linking.AD58]">
            <text:p/>
          </table:table-cell>
          <table:table-cell table:formula="of:=[$Linking.O58]" office:value-type="float" office:value="0" calcext:value-type="float">
            <text:p>0</text:p>
          </table:table-cell>
          <table:table-cell table:formula="of:=[$Linking.T58]" office:value-type="float" office:value="0" calcext:value-type="float">
            <text:p>0</text:p>
          </table:table-cell>
          <table:table-cell table:formula="of:=[$Linking.U58]" office:value-type="float" office:value="0" calcext:value-type="float">
            <text:p>0</text:p>
          </table:table-cell>
          <table:table-cell table:formula="of:=[$Linking.Q58]" office:value-type="float" office:value="0" calcext:value-type="float">
            <text:p>0</text:p>
          </table:table-cell>
          <table:table-cell table:formula="of:=[$Linking.N58]" office:value-type="string" office:string-value="" calcext:value-type="error">
            <text:p>#VALUE!</text:p>
          </table:table-cell>
          <table:table-cell table:formula="of:=[$Linking.V58]" office:value-type="float" office:value="0" calcext:value-type="float">
            <text:p>0</text:p>
          </table:table-cell>
          <table:table-cell table:formula="of:=[$Linking.W58]" office:value-type="float" office:value="0" calcext:value-type="float">
            <text:p>0</text:p>
          </table:table-cell>
          <table:table-cell table:formula="of:=[$Linking.X58]" office:value-type="float" office:value="0" calcext:value-type="float">
            <text:p>0</text:p>
          </table:table-cell>
          <table:table-cell table:formula="of:=[$Linking.Y58]" office:value-type="float" office:value="0" calcext:value-type="float">
            <text:p>0</text:p>
          </table:table-cell>
          <table:table-cell table:formula="of:=[.L56]*[.D5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$Linking.AE59]">
            <text:p/>
          </table:table-cell>
          <table:table-cell table:formula="of:=[$Linking.AD59]">
            <text:p/>
          </table:table-cell>
          <table:table-cell table:formula="of:=[$Linking.O59]" office:value-type="float" office:value="0" calcext:value-type="float">
            <text:p>0</text:p>
          </table:table-cell>
          <table:table-cell table:formula="of:=[$Linking.T59]" office:value-type="float" office:value="0" calcext:value-type="float">
            <text:p>0</text:p>
          </table:table-cell>
          <table:table-cell table:formula="of:=[$Linking.U59]" office:value-type="float" office:value="0" calcext:value-type="float">
            <text:p>0</text:p>
          </table:table-cell>
          <table:table-cell table:formula="of:=[$Linking.Q59]" office:value-type="float" office:value="0" calcext:value-type="float">
            <text:p>0</text:p>
          </table:table-cell>
          <table:table-cell table:formula="of:=[$Linking.N59]" office:value-type="string" office:string-value="" calcext:value-type="error">
            <text:p>#VALUE!</text:p>
          </table:table-cell>
          <table:table-cell table:formula="of:=[$Linking.V59]" office:value-type="float" office:value="0" calcext:value-type="float">
            <text:p>0</text:p>
          </table:table-cell>
          <table:table-cell table:formula="of:=[$Linking.W59]" office:value-type="float" office:value="0" calcext:value-type="float">
            <text:p>0</text:p>
          </table:table-cell>
          <table:table-cell table:formula="of:=[$Linking.X59]" office:value-type="float" office:value="0" calcext:value-type="float">
            <text:p>0</text:p>
          </table:table-cell>
          <table:table-cell table:formula="of:=[$Linking.Y59]" office:value-type="float" office:value="0" calcext:value-type="float">
            <text:p>0</text:p>
          </table:table-cell>
          <table:table-cell table:formula="of:=[.L57]*[.D57]" office:value-type="float" office:value="0" calcext:value-type="float">
            <text:p>0</text:p>
          </table:table-cell>
          <table:table-cell/>
        </table:table-row>
      </table:table>
      <table:table table:name="CopyFromThing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formula="of:=IF(['file:///G:/Other%20computers/My%20Laptop/Hobby/mmtr/PCBs/LCMTR_01_01/LCMTR_01_01.csv'#$LCMTR_01_01.A1] = &quot;&quot;;&quot;&quot;;['file:///G:/Other%20computers/My%20Laptop/Hobby/mmtr/PCBs/LCMTR_01_01/LCMTR_01_01.csv'#$LCMTR_01_01.A1])" office:value-type="string" office:string-value="Reference" calcext:value-type="string">
            <text:p>Reference</text:p>
          </table:table-cell>
          <table:table-cell table:formula="of:=IF(['file:///G:/Other%20computers/My%20Laptop/Hobby/mmtr/PCBs/LCMTR_01_01/LCMTR_01_01.csv'#$LCMTR_01_01.B1] = &quot;&quot;;&quot;&quot;;['file:///G:/Other%20computers/My%20Laptop/Hobby/mmtr/PCBs/LCMTR_01_01/LCMTR_01_01.csv'#$LCMTR_01_01.B1])" office:value-type="string" office:string-value="Value" calcext:value-type="string">
            <text:p>Value</text:p>
          </table:table-cell>
          <table:table-cell table:formula="of:=IF(['file:///G:/Other%20computers/My%20Laptop/Hobby/mmtr/PCBs/LCMTR_01_01/LCMTR_01_01.csv'#$LCMTR_01_01.C1] = &quot;&quot;;&quot;&quot;;['file:///G:/Other%20computers/My%20Laptop/Hobby/mmtr/PCBs/LCMTR_01_01/LCMTR_01_01.csv'#$LCMTR_01_01.C1])" office:value-type="string" office:string-value="Datasheet" calcext:value-type="string">
            <text:p>Datasheet</text:p>
          </table:table-cell>
          <table:table-cell table:formula="of:=IF(['file:///G:/Other%20computers/My%20Laptop/Hobby/mmtr/PCBs/LCMTR_01_01/LCMTR_01_01.csv'#$LCMTR_01_01.D1] = &quot;&quot;;&quot;&quot;;['file:///G:/Other%20computers/My%20Laptop/Hobby/mmtr/PCBs/LCMTR_01_01/LCMTR_01_01.csv'#$LCMTR_01_01.D1])" office:value-type="string" office:string-value="Footprint" calcext:value-type="string">
            <text:p>Footprint</text:p>
          </table:table-cell>
          <table:table-cell table:formula="of:=IF(['file:///G:/Other%20computers/My%20Laptop/Hobby/mmtr/PCBs/LCMTR_01_01/LCMTR_01_01.csv'#$LCMTR_01_01.E1] = &quot;&quot;;&quot;&quot;;['file:///G:/Other%20computers/My%20Laptop/Hobby/mmtr/PCBs/LCMTR_01_01/LCMTR_01_01.csv'#$LCMTR_01_01.E1])" office:value-type="string" office:string-value="Qty" calcext:value-type="string">
            <text:p>Qty</text:p>
          </table:table-cell>
          <table:table-cell table:formula="of:=IF(['file:///G:/Other%20computers/My%20Laptop/Hobby/mmtr/PCBs/LCMTR_01_01/LCMTR_01_01.csv'#$LCMTR_01_01.F1] = &quot;&quot;;&quot;&quot;;['file:///G:/Other%20computers/My%20Laptop/Hobby/mmtr/PCBs/LCMTR_01_01/LCMTR_01_01.csv'#$LCMTR_01_01.F1])" office:value-type="string" office:string-value="DNP" calcext:value-type="string">
            <text:p>DNP</text:p>
          </table:table-cell>
          <table:table-cell table:formula="of:=IF(['file:///G:/Other%20computers/My%20Laptop/Hobby/mmtr/PCBs/LCMTR_01_01/LCMTR_01_01.csv'#$LCMTR_01_01.G1] = &quot;&quot;;&quot;&quot;;['file:///G:/Other%20computers/My%20Laptop/Hobby/mmtr/PCBs/LCMTR_01_01/LCMTR_01_01.csv'#$LCMTR_01_01.G1])" office:value-type="string" office:string-value="#" calcext:value-type="string">
            <text:p>#</text:p>
          </table:table-cell>
          <table:table-cell table:style-name="ce2" table:formula="of:=IF(['file:///G:/Other%20computers/My%20Laptop/Hobby/mmtr/PCBs/LCMTR_01_01/LCMTR_01_01.csv'#$LCMTR_01_01.H1] = &quot;&quot;;&quot;&quot;;['file:///G:/Other%20computers/My%20Laptop/Hobby/mmtr/PCBs/LCMTR_01_01/LCMTR_01_01.csv'#$LCMTR_01_01.H1])" office:value-type="string" office:string-value="Manufacturer" calcext:value-type="string">
            <text:p>Manufacturer</text:p>
          </table:table-cell>
          <table:table-cell table:style-name="ce2" table:formula="of:=IF(['file:///G:/Other%20computers/My%20Laptop/Hobby/mmtr/PCBs/LCMTR_01_01/LCMTR_01_01.csv'#$LCMTR_01_01.I1] = &quot;&quot;;&quot;&quot;;['file:///G:/Other%20computers/My%20Laptop/Hobby/mmtr/PCBs/LCMTR_01_01/LCMTR_01_01.csv'#$LCMTR_01_01.I1])" office:value-type="string" office:string-value="Manufacturer Part #" calcext:value-type="string">
            <text:p>Manufacturer Part #</text:p>
          </table:table-cell>
          <table:table-cell table:formula="of:=IF(['file:///G:/Other%20computers/My%20Laptop/Hobby/mmtr/PCBs/LCMTR_01_01/LCMTR_01_01.csv'#$LCMTR_01_01.J1] = &quot;&quot;;&quot;&quot;;['file:///G:/Other%20computers/My%20Laptop/Hobby/mmtr/PCBs/LCMTR_01_01/LCMTR_01_01.csv'#$LCMTR_01_01.J1])" office:value-type="string" office:string-value="Supplier 1" calcext:value-type="string">
            <text:p>Supplier 1</text:p>
          </table:table-cell>
          <table:table-cell table:style-name="ce2" table:formula="of:=IF(['file:///G:/Other%20computers/My%20Laptop/Hobby/mmtr/PCBs/LCMTR_01_01/LCMTR_01_01.csv'#$LCMTR_01_01.K1] = &quot;&quot;;&quot;&quot;;['file:///G:/Other%20computers/My%20Laptop/Hobby/mmtr/PCBs/LCMTR_01_01/LCMTR_01_01.csv'#$LCMTR_01_01.K1])" office:value-type="string" office:string-value="Supplier 1 Link" calcext:value-type="string">
            <text:p>Supplier 1 Link</text:p>
          </table:table-cell>
          <table:table-cell table:style-name="ce2" table:formula="of:=IF(['file:///G:/Other%20computers/My%20Laptop/Hobby/mmtr/PCBs/LCMTR_01_01/LCMTR_01_01.csv'#$LCMTR_01_01.L1] = &quot;&quot;;&quot;&quot;;['file:///G:/Other%20computers/My%20Laptop/Hobby/mmtr/PCBs/LCMTR_01_01/LCMTR_01_01.csv'#$LCMTR_01_01.L1])" office:value-type="string" office:string-value="Supplier 1 Part #" calcext:value-type="string">
            <text:p>Supplier 1 Part #</text:p>
          </table:table-cell>
          <table:table-cell table:style-name="ce2" table:formula="of:=IF(['file:///G:/Other%20computers/My%20Laptop/Hobby/mmtr/PCBs/LCMTR_01_01/LCMTR_01_01.csv'#$LCMTR_01_01.M1] = &quot;&quot;;&quot;&quot;;['file:///G:/Other%20computers/My%20Laptop/Hobby/mmtr/PCBs/LCMTR_01_01/LCMTR_01_01.csv'#$LCMTR_01_01.M1])" office:value-type="string" office:string-value="Supplier 2" calcext:value-type="string">
            <text:p>Supplier 2</text:p>
          </table:table-cell>
        </table:table-row>
        <table:table-row table:style-name="ro1">
          <table:table-cell table:formula="of:=IF(['file:///G:/Other%20computers/My%20Laptop/Hobby/mmtr/PCBs/LCMTR_01_01/LCMTR_01_01.csv'#$LCMTR_01_01.A2] = &quot;&quot;;&quot;&quot;;['file:///G:/Other%20computers/My%20Laptop/Hobby/mmtr/PCBs/LCMTR_01_01/LCMTR_01_01.csv'#$LCMTR_01_01.A2])" office:value-type="string" office:string-value="C2,C3,C4" calcext:value-type="string">
            <text:p>C2,C3,C4</text:p>
          </table:table-cell>
          <table:table-cell table:formula="of:=IF(['file:///G:/Other%20computers/My%20Laptop/Hobby/mmtr/PCBs/LCMTR_01_01/LCMTR_01_01.csv'#$LCMTR_01_01.B2] = &quot;&quot;;&quot;&quot;;['file:///G:/Other%20computers/My%20Laptop/Hobby/mmtr/PCBs/LCMTR_01_01/LCMTR_01_01.csv'#$LCMTR_01_01.B2])" office:value-type="string" office:string-value="330p" calcext:value-type="string">
            <text:p>330p</text:p>
          </table:table-cell>
          <table:table-cell table:formula="of:=IF(['file:///G:/Other%20computers/My%20Laptop/Hobby/mmtr/PCBs/LCMTR_01_01/LCMTR_01_01.csv'#$LCMTR_01_01.C2] = &quot;&quot;;&quot;&quot;;['file:///G:/Other%20computers/My%20Laptop/Hobby/mmtr/PCBs/LCMTR_01_01/LCMTR_01_01.csv'#$LCMTR_01_01.C2])">
            <text:p/>
          </table:table-cell>
          <table:table-cell table:formula="of:=IF(['file:///G:/Other%20computers/My%20Laptop/Hobby/mmtr/PCBs/LCMTR_01_01/LCMTR_01_01.csv'#$LCMTR_01_01.D2] = &quot;&quot;;&quot;&quot;;['file:///G:/Other%20computers/My%20Laptop/Hobby/mmtr/PCBs/LCMTR_01_01/LCMTR_01_01.csv'#$LCMTR_01_01.D2])" office:value-type="string" office:string-value="AADuffy:Resistor_1206_ThinEnds" calcext:value-type="string">
            <text:p>AADuffy:Resistor_1206_ThinEnds</text:p>
          </table:table-cell>
          <table:table-cell table:formula="of:=IF(['file:///G:/Other%20computers/My%20Laptop/Hobby/mmtr/PCBs/LCMTR_01_01/LCMTR_01_01.csv'#$LCMTR_01_01.E2] = &quot;&quot;;&quot;&quot;;['file:///G:/Other%20computers/My%20Laptop/Hobby/mmtr/PCBs/LCMTR_01_01/LCMTR_01_01.csv'#$LCMTR_01_01.E2])" office:value-type="string" office:string-value="3" calcext:value-type="string">
            <text:p>3</text:p>
          </table:table-cell>
          <table:table-cell table:formula="of:=IF(['file:///G:/Other%20computers/My%20Laptop/Hobby/mmtr/PCBs/LCMTR_01_01/LCMTR_01_01.csv'#$LCMTR_01_01.F2] = &quot;&quot;;&quot;&quot;;['file:///G:/Other%20computers/My%20Laptop/Hobby/mmtr/PCBs/LCMTR_01_01/LCMTR_01_01.csv'#$LCMTR_01_01.F2])">
            <text:p/>
          </table:table-cell>
          <table:table-cell table:formula="of:=IF(['file:///G:/Other%20computers/My%20Laptop/Hobby/mmtr/PCBs/LCMTR_01_01/LCMTR_01_01.csv'#$LCMTR_01_01.G2] = &quot;&quot;;&quot;&quot;;['file:///G:/Other%20computers/My%20Laptop/Hobby/mmtr/PCBs/LCMTR_01_01/LCMTR_01_01.csv'#$LCMTR_01_01.G2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H2] = &quot;&quot;;&quot;&quot;;['file:///G:/Other%20computers/My%20Laptop/Hobby/mmtr/PCBs/LCMTR_01_01/LCMTR_01_01.csv'#$LCMTR_01_01.H2])">
            <text:p/>
          </table:table-cell>
          <table:table-cell table:formula="of:=IF(['file:///G:/Other%20computers/My%20Laptop/Hobby/mmtr/PCBs/LCMTR_01_01/LCMTR_01_01.csv'#$LCMTR_01_01.I2] = &quot;&quot;;&quot;&quot;;['file:///G:/Other%20computers/My%20Laptop/Hobby/mmtr/PCBs/LCMTR_01_01/LCMTR_01_01.csv'#$LCMTR_01_01.I2])">
            <text:p/>
          </table:table-cell>
          <table:table-cell table:style-name="Default" table:formula="of:=IF(['file:///G:/Other%20computers/My%20Laptop/Hobby/mmtr/PCBs/LCMTR_01_01/LCMTR_01_01.csv'#$LCMTR_01_01.J2] = &quot;&quot;;&quot;&quot;;['file:///G:/Other%20computers/My%20Laptop/Hobby/mmtr/PCBs/LCMTR_01_01/LCMTR_01_01.csv'#$LCMTR_01_01.J2])">
            <text:p/>
          </table:table-cell>
          <table:table-cell table:formula="of:=IF(['file:///G:/Other%20computers/My%20Laptop/Hobby/mmtr/PCBs/LCMTR_01_01/LCMTR_01_01.csv'#$LCMTR_01_01.K2] = &quot;&quot;;&quot;&quot;;['file:///G:/Other%20computers/My%20Laptop/Hobby/mmtr/PCBs/LCMTR_01_01/LCMTR_01_01.csv'#$LCMTR_01_01.K2])">
            <text:p/>
          </table:table-cell>
          <table:table-cell table:formula="of:=IF(['file:///G:/Other%20computers/My%20Laptop/Hobby/mmtr/PCBs/LCMTR_01_01/LCMTR_01_01.csv'#$LCMTR_01_01.L2] = &quot;&quot;;&quot;&quot;;['file:///G:/Other%20computers/My%20Laptop/Hobby/mmtr/PCBs/LCMTR_01_01/LCMTR_01_01.csv'#$LCMTR_01_01.L2])">
            <text:p/>
          </table:table-cell>
          <table:table-cell table:formula="of:=IF(['file:///G:/Other%20computers/My%20Laptop/Hobby/mmtr/PCBs/LCMTR_01_01/LCMTR_01_01.csv'#$LCMTR_01_01.M2] = &quot;&quot;;&quot;&quot;;['file:///G:/Other%20computers/My%20Laptop/Hobby/mmtr/PCBs/LCMTR_01_01/LCMTR_01_01.csv'#$LCMTR_01_01.M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] = &quot;&quot;;&quot;&quot;;['file:///G:/Other%20computers/My%20Laptop/Hobby/mmtr/PCBs/LCMTR_01_01/LCMTR_01_01.csv'#$LCMTR_01_01.A3])" office:value-type="string" office:string-value="C5,C14,C43,C44" calcext:value-type="string">
            <text:p>C5,C14,C43,C44</text:p>
          </table:table-cell>
          <table:table-cell table:formula="of:=IF(['file:///G:/Other%20computers/My%20Laptop/Hobby/mmtr/PCBs/LCMTR_01_01/LCMTR_01_01.csv'#$LCMTR_01_01.B3] = &quot;&quot;;&quot;&quot;;['file:///G:/Other%20computers/My%20Laptop/Hobby/mmtr/PCBs/LCMTR_01_01/LCMTR_01_01.csv'#$LCMTR_01_01.B3])" office:value-type="string" office:string-value="100p" calcext:value-type="string">
            <text:p>100p</text:p>
          </table:table-cell>
          <table:table-cell table:formula="of:=IF(['file:///G:/Other%20computers/My%20Laptop/Hobby/mmtr/PCBs/LCMTR_01_01/LCMTR_01_01.csv'#$LCMTR_01_01.C3] = &quot;&quot;;&quot;&quot;;['file:///G:/Other%20computers/My%20Laptop/Hobby/mmtr/PCBs/LCMTR_01_01/LCMTR_01_01.csv'#$LCMTR_01_01.C3])">
            <text:p/>
          </table:table-cell>
          <table:table-cell table:formula="of:=IF(['file:///G:/Other%20computers/My%20Laptop/Hobby/mmtr/PCBs/LCMTR_01_01/LCMTR_01_01.csv'#$LCMTR_01_01.D3] = &quot;&quot;;&quot;&quot;;['file:///G:/Other%20computers/My%20Laptop/Hobby/mmtr/PCBs/LCMTR_01_01/LCMTR_01_01.csv'#$LCMTR_01_01.D3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3] = &quot;&quot;;&quot;&quot;;['file:///G:/Other%20computers/My%20Laptop/Hobby/mmtr/PCBs/LCMTR_01_01/LCMTR_01_01.csv'#$LCMTR_01_01.E3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3] = &quot;&quot;;&quot;&quot;;['file:///G:/Other%20computers/My%20Laptop/Hobby/mmtr/PCBs/LCMTR_01_01/LCMTR_01_01.csv'#$LCMTR_01_01.F3])">
            <text:p/>
          </table:table-cell>
          <table:table-cell table:formula="of:=IF(['file:///G:/Other%20computers/My%20Laptop/Hobby/mmtr/PCBs/LCMTR_01_01/LCMTR_01_01.csv'#$LCMTR_01_01.G3] = &quot;&quot;;&quot;&quot;;['file:///G:/Other%20computers/My%20Laptop/Hobby/mmtr/PCBs/LCMTR_01_01/LCMTR_01_01.csv'#$LCMTR_01_01.G3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H3] = &quot;&quot;;&quot;&quot;;['file:///G:/Other%20computers/My%20Laptop/Hobby/mmtr/PCBs/LCMTR_01_01/LCMTR_01_01.csv'#$LCMTR_01_01.H3])">
            <text:p/>
          </table:table-cell>
          <table:table-cell table:formula="of:=IF(['file:///G:/Other%20computers/My%20Laptop/Hobby/mmtr/PCBs/LCMTR_01_01/LCMTR_01_01.csv'#$LCMTR_01_01.I3] = &quot;&quot;;&quot;&quot;;['file:///G:/Other%20computers/My%20Laptop/Hobby/mmtr/PCBs/LCMTR_01_01/LCMTR_01_01.csv'#$LCMTR_01_01.I3])">
            <text:p/>
          </table:table-cell>
          <table:table-cell table:style-name="Default" table:formula="of:=IF(['file:///G:/Other%20computers/My%20Laptop/Hobby/mmtr/PCBs/LCMTR_01_01/LCMTR_01_01.csv'#$LCMTR_01_01.J3] = &quot;&quot;;&quot;&quot;;['file:///G:/Other%20computers/My%20Laptop/Hobby/mmtr/PCBs/LCMTR_01_01/LCMTR_01_01.csv'#$LCMTR_01_01.J3])">
            <text:p/>
          </table:table-cell>
          <table:table-cell table:formula="of:=IF(['file:///G:/Other%20computers/My%20Laptop/Hobby/mmtr/PCBs/LCMTR_01_01/LCMTR_01_01.csv'#$LCMTR_01_01.K3] = &quot;&quot;;&quot;&quot;;['file:///G:/Other%20computers/My%20Laptop/Hobby/mmtr/PCBs/LCMTR_01_01/LCMTR_01_01.csv'#$LCMTR_01_01.K3])">
            <text:p/>
          </table:table-cell>
          <table:table-cell table:formula="of:=IF(['file:///G:/Other%20computers/My%20Laptop/Hobby/mmtr/PCBs/LCMTR_01_01/LCMTR_01_01.csv'#$LCMTR_01_01.L3] = &quot;&quot;;&quot;&quot;;['file:///G:/Other%20computers/My%20Laptop/Hobby/mmtr/PCBs/LCMTR_01_01/LCMTR_01_01.csv'#$LCMTR_01_01.L3])">
            <text:p/>
          </table:table-cell>
          <table:table-cell table:formula="of:=IF(['file:///G:/Other%20computers/My%20Laptop/Hobby/mmtr/PCBs/LCMTR_01_01/LCMTR_01_01.csv'#$LCMTR_01_01.M3] = &quot;&quot;;&quot;&quot;;['file:///G:/Other%20computers/My%20Laptop/Hobby/mmtr/PCBs/LCMTR_01_01/LCMTR_01_01.csv'#$LCMTR_01_01.M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] = &quot;&quot;;&quot;&quot;;['file:///G:/Other%20computers/My%20Laptop/Hobby/mmtr/PCBs/LCMTR_01_01/LCMTR_01_01.csv'#$LCMTR_01_01.A4])" office:value-type="string" office:string-value="C6,C10,C13,C85,C86,C87,C88,C95" calcext:value-type="string">
            <text:p>C6,C10,C13,C85,C86,C87,C88,C95</text:p>
          </table:table-cell>
          <table:table-cell table:formula="of:=IF(['file:///G:/Other%20computers/My%20Laptop/Hobby/mmtr/PCBs/LCMTR_01_01/LCMTR_01_01.csv'#$LCMTR_01_01.B4] = &quot;&quot;;&quot;&quot;;['file:///G:/Other%20computers/My%20Laptop/Hobby/mmtr/PCBs/LCMTR_01_01/LCMTR_01_01.csv'#$LCMTR_01_01.B4])" office:value-type="string" office:string-value="1n" calcext:value-type="string">
            <text:p>1n</text:p>
          </table:table-cell>
          <table:table-cell table:formula="of:=IF(['file:///G:/Other%20computers/My%20Laptop/Hobby/mmtr/PCBs/LCMTR_01_01/LCMTR_01_01.csv'#$LCMTR_01_01.C4] = &quot;&quot;;&quot;&quot;;['file:///G:/Other%20computers/My%20Laptop/Hobby/mmtr/PCBs/LCMTR_01_01/LCMTR_01_01.csv'#$LCMTR_01_01.C4])">
            <text:p/>
          </table:table-cell>
          <table:table-cell table:formula="of:=IF(['file:///G:/Other%20computers/My%20Laptop/Hobby/mmtr/PCBs/LCMTR_01_01/LCMTR_01_01.csv'#$LCMTR_01_01.D4] = &quot;&quot;;&quot;&quot;;['file:///G:/Other%20computers/My%20Laptop/Hobby/mmtr/PCBs/LCMTR_01_01/LCMTR_01_01.csv'#$LCMTR_01_01.D4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4] = &quot;&quot;;&quot;&quot;;['file:///G:/Other%20computers/My%20Laptop/Hobby/mmtr/PCBs/LCMTR_01_01/LCMTR_01_01.csv'#$LCMTR_01_01.E4])" office:value-type="string" office:string-value="8" calcext:value-type="string">
            <text:p>8</text:p>
          </table:table-cell>
          <table:table-cell table:formula="of:=IF(['file:///G:/Other%20computers/My%20Laptop/Hobby/mmtr/PCBs/LCMTR_01_01/LCMTR_01_01.csv'#$LCMTR_01_01.F4] = &quot;&quot;;&quot;&quot;;['file:///G:/Other%20computers/My%20Laptop/Hobby/mmtr/PCBs/LCMTR_01_01/LCMTR_01_01.csv'#$LCMTR_01_01.F4])">
            <text:p/>
          </table:table-cell>
          <table:table-cell table:formula="of:=IF(['file:///G:/Other%20computers/My%20Laptop/Hobby/mmtr/PCBs/LCMTR_01_01/LCMTR_01_01.csv'#$LCMTR_01_01.G4] = &quot;&quot;;&quot;&quot;;['file:///G:/Other%20computers/My%20Laptop/Hobby/mmtr/PCBs/LCMTR_01_01/LCMTR_01_01.csv'#$LCMTR_01_01.G4])" office:value-type="string" office:string-value="3" calcext:value-type="string">
            <text:p>3</text:p>
          </table:table-cell>
          <table:table-cell table:formula="of:=IF(['file:///G:/Other%20computers/My%20Laptop/Hobby/mmtr/PCBs/LCMTR_01_01/LCMTR_01_01.csv'#$LCMTR_01_01.H4] = &quot;&quot;;&quot;&quot;;['file:///G:/Other%20computers/My%20Laptop/Hobby/mmtr/PCBs/LCMTR_01_01/LCMTR_01_01.csv'#$LCMTR_01_01.H4])">
            <text:p/>
          </table:table-cell>
          <table:table-cell table:formula="of:=IF(['file:///G:/Other%20computers/My%20Laptop/Hobby/mmtr/PCBs/LCMTR_01_01/LCMTR_01_01.csv'#$LCMTR_01_01.I4] = &quot;&quot;;&quot;&quot;;['file:///G:/Other%20computers/My%20Laptop/Hobby/mmtr/PCBs/LCMTR_01_01/LCMTR_01_01.csv'#$LCMTR_01_01.I4])">
            <text:p/>
          </table:table-cell>
          <table:table-cell table:style-name="Default" table:formula="of:=IF(['file:///G:/Other%20computers/My%20Laptop/Hobby/mmtr/PCBs/LCMTR_01_01/LCMTR_01_01.csv'#$LCMTR_01_01.J4] = &quot;&quot;;&quot;&quot;;['file:///G:/Other%20computers/My%20Laptop/Hobby/mmtr/PCBs/LCMTR_01_01/LCMTR_01_01.csv'#$LCMTR_01_01.J4])">
            <text:p/>
          </table:table-cell>
          <table:table-cell table:formula="of:=IF(['file:///G:/Other%20computers/My%20Laptop/Hobby/mmtr/PCBs/LCMTR_01_01/LCMTR_01_01.csv'#$LCMTR_01_01.K4] = &quot;&quot;;&quot;&quot;;['file:///G:/Other%20computers/My%20Laptop/Hobby/mmtr/PCBs/LCMTR_01_01/LCMTR_01_01.csv'#$LCMTR_01_01.K4])">
            <text:p/>
          </table:table-cell>
          <table:table-cell table:formula="of:=IF(['file:///G:/Other%20computers/My%20Laptop/Hobby/mmtr/PCBs/LCMTR_01_01/LCMTR_01_01.csv'#$LCMTR_01_01.L4] = &quot;&quot;;&quot;&quot;;['file:///G:/Other%20computers/My%20Laptop/Hobby/mmtr/PCBs/LCMTR_01_01/LCMTR_01_01.csv'#$LCMTR_01_01.L4])">
            <text:p/>
          </table:table-cell>
          <table:table-cell table:formula="of:=IF(['file:///G:/Other%20computers/My%20Laptop/Hobby/mmtr/PCBs/LCMTR_01_01/LCMTR_01_01.csv'#$LCMTR_01_01.M4] = &quot;&quot;;&quot;&quot;;['file:///G:/Other%20computers/My%20Laptop/Hobby/mmtr/PCBs/LCMTR_01_01/LCMTR_01_01.csv'#$LCMTR_01_01.M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] = &quot;&quot;;&quot;&quot;;['file:///G:/Other%20computers/My%20Laptop/Hobby/mmtr/PCBs/LCMTR_01_01/LCMTR_01_01.csv'#$LCMTR_01_01.A5])" office:value-type="string" office:string-value="C7" calcext:value-type="string">
            <text:p>C7</text:p>
          </table:table-cell>
          <table:table-cell table:formula="of:=IF(['file:///G:/Other%20computers/My%20Laptop/Hobby/mmtr/PCBs/LCMTR_01_01/LCMTR_01_01.csv'#$LCMTR_01_01.B5] = &quot;&quot;;&quot;&quot;;['file:///G:/Other%20computers/My%20Laptop/Hobby/mmtr/PCBs/LCMTR_01_01/LCMTR_01_01.csv'#$LCMTR_01_01.B5])" office:value-type="string" office:string-value="33n" calcext:value-type="string">
            <text:p>33n</text:p>
          </table:table-cell>
          <table:table-cell table:formula="of:=IF(['file:///G:/Other%20computers/My%20Laptop/Hobby/mmtr/PCBs/LCMTR_01_01/LCMTR_01_01.csv'#$LCMTR_01_01.C5] = &quot;&quot;;&quot;&quot;;['file:///G:/Other%20computers/My%20Laptop/Hobby/mmtr/PCBs/LCMTR_01_01/LCMTR_01_01.csv'#$LCMTR_01_01.C5])">
            <text:p/>
          </table:table-cell>
          <table:table-cell table:formula="of:=IF(['file:///G:/Other%20computers/My%20Laptop/Hobby/mmtr/PCBs/LCMTR_01_01/LCMTR_01_01.csv'#$LCMTR_01_01.D5] = &quot;&quot;;&quot;&quot;;['file:///G:/Other%20computers/My%20Laptop/Hobby/mmtr/PCBs/LCMTR_01_01/LCMTR_01_01.csv'#$LCMTR_01_01.D5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5] = &quot;&quot;;&quot;&quot;;['file:///G:/Other%20computers/My%20Laptop/Hobby/mmtr/PCBs/LCMTR_01_01/LCMTR_01_01.csv'#$LCMTR_01_01.E5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5] = &quot;&quot;;&quot;&quot;;['file:///G:/Other%20computers/My%20Laptop/Hobby/mmtr/PCBs/LCMTR_01_01/LCMTR_01_01.csv'#$LCMTR_01_01.F5])">
            <text:p/>
          </table:table-cell>
          <table:table-cell table:formula="of:=IF(['file:///G:/Other%20computers/My%20Laptop/Hobby/mmtr/PCBs/LCMTR_01_01/LCMTR_01_01.csv'#$LCMTR_01_01.G5] = &quot;&quot;;&quot;&quot;;['file:///G:/Other%20computers/My%20Laptop/Hobby/mmtr/PCBs/LCMTR_01_01/LCMTR_01_01.csv'#$LCMTR_01_01.G5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H5] = &quot;&quot;;&quot;&quot;;['file:///G:/Other%20computers/My%20Laptop/Hobby/mmtr/PCBs/LCMTR_01_01/LCMTR_01_01.csv'#$LCMTR_01_01.H5])">
            <text:p/>
          </table:table-cell>
          <table:table-cell table:formula="of:=IF(['file:///G:/Other%20computers/My%20Laptop/Hobby/mmtr/PCBs/LCMTR_01_01/LCMTR_01_01.csv'#$LCMTR_01_01.I5] = &quot;&quot;;&quot;&quot;;['file:///G:/Other%20computers/My%20Laptop/Hobby/mmtr/PCBs/LCMTR_01_01/LCMTR_01_01.csv'#$LCMTR_01_01.I5])">
            <text:p/>
          </table:table-cell>
          <table:table-cell table:style-name="Default" table:formula="of:=IF(['file:///G:/Other%20computers/My%20Laptop/Hobby/mmtr/PCBs/LCMTR_01_01/LCMTR_01_01.csv'#$LCMTR_01_01.J5] = &quot;&quot;;&quot;&quot;;['file:///G:/Other%20computers/My%20Laptop/Hobby/mmtr/PCBs/LCMTR_01_01/LCMTR_01_01.csv'#$LCMTR_01_01.J5])">
            <text:p/>
          </table:table-cell>
          <table:table-cell table:formula="of:=IF(['file:///G:/Other%20computers/My%20Laptop/Hobby/mmtr/PCBs/LCMTR_01_01/LCMTR_01_01.csv'#$LCMTR_01_01.K5] = &quot;&quot;;&quot;&quot;;['file:///G:/Other%20computers/My%20Laptop/Hobby/mmtr/PCBs/LCMTR_01_01/LCMTR_01_01.csv'#$LCMTR_01_01.K5])">
            <text:p/>
          </table:table-cell>
          <table:table-cell table:formula="of:=IF(['file:///G:/Other%20computers/My%20Laptop/Hobby/mmtr/PCBs/LCMTR_01_01/LCMTR_01_01.csv'#$LCMTR_01_01.L5] = &quot;&quot;;&quot;&quot;;['file:///G:/Other%20computers/My%20Laptop/Hobby/mmtr/PCBs/LCMTR_01_01/LCMTR_01_01.csv'#$LCMTR_01_01.L5])">
            <text:p/>
          </table:table-cell>
          <table:table-cell table:formula="of:=IF(['file:///G:/Other%20computers/My%20Laptop/Hobby/mmtr/PCBs/LCMTR_01_01/LCMTR_01_01.csv'#$LCMTR_01_01.M5] = &quot;&quot;;&quot;&quot;;['file:///G:/Other%20computers/My%20Laptop/Hobby/mmtr/PCBs/LCMTR_01_01/LCMTR_01_01.csv'#$LCMTR_01_01.M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6] = &quot;&quot;;&quot;&quot;;['file:///G:/Other%20computers/My%20Laptop/Hobby/mmtr/PCBs/LCMTR_01_01/LCMTR_01_01.csv'#$LCMTR_01_01.A6])" office:value-type="string" office:string-value="C9,C21,C33,C34,C35,C36,C37,C38,C39,C81" calcext:value-type="string">
            <text:p>C9,C21,C33,C34,C35,C36,C37,C38,C39,C81</text:p>
          </table:table-cell>
          <table:table-cell table:formula="of:=IF(['file:///G:/Other%20computers/My%20Laptop/Hobby/mmtr/PCBs/LCMTR_01_01/LCMTR_01_01.csv'#$LCMTR_01_01.B6] = &quot;&quot;;&quot;&quot;;['file:///G:/Other%20computers/My%20Laptop/Hobby/mmtr/PCBs/LCMTR_01_01/LCMTR_01_01.csv'#$LCMTR_01_01.B6])" office:value-type="string" office:string-value="10n" calcext:value-type="string">
            <text:p>10n</text:p>
          </table:table-cell>
          <table:table-cell table:formula="of:=IF(['file:///G:/Other%20computers/My%20Laptop/Hobby/mmtr/PCBs/LCMTR_01_01/LCMTR_01_01.csv'#$LCMTR_01_01.C6] = &quot;&quot;;&quot;&quot;;['file:///G:/Other%20computers/My%20Laptop/Hobby/mmtr/PCBs/LCMTR_01_01/LCMTR_01_01.csv'#$LCMTR_01_01.C6])">
            <text:p/>
          </table:table-cell>
          <table:table-cell table:formula="of:=IF(['file:///G:/Other%20computers/My%20Laptop/Hobby/mmtr/PCBs/LCMTR_01_01/LCMTR_01_01.csv'#$LCMTR_01_01.D6] = &quot;&quot;;&quot;&quot;;['file:///G:/Other%20computers/My%20Laptop/Hobby/mmtr/PCBs/LCMTR_01_01/LCMTR_01_01.csv'#$LCMTR_01_01.D6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6] = &quot;&quot;;&quot;&quot;;['file:///G:/Other%20computers/My%20Laptop/Hobby/mmtr/PCBs/LCMTR_01_01/LCMTR_01_01.csv'#$LCMTR_01_01.E6])" office:value-type="string" office:string-value="10" calcext:value-type="string">
            <text:p>10</text:p>
          </table:table-cell>
          <table:table-cell table:formula="of:=IF(['file:///G:/Other%20computers/My%20Laptop/Hobby/mmtr/PCBs/LCMTR_01_01/LCMTR_01_01.csv'#$LCMTR_01_01.F6] = &quot;&quot;;&quot;&quot;;['file:///G:/Other%20computers/My%20Laptop/Hobby/mmtr/PCBs/LCMTR_01_01/LCMTR_01_01.csv'#$LCMTR_01_01.F6])">
            <text:p/>
          </table:table-cell>
          <table:table-cell table:formula="of:=IF(['file:///G:/Other%20computers/My%20Laptop/Hobby/mmtr/PCBs/LCMTR_01_01/LCMTR_01_01.csv'#$LCMTR_01_01.G6] = &quot;&quot;;&quot;&quot;;['file:///G:/Other%20computers/My%20Laptop/Hobby/mmtr/PCBs/LCMTR_01_01/LCMTR_01_01.csv'#$LCMTR_01_01.G6])" office:value-type="string" office:string-value="5" calcext:value-type="string">
            <text:p>5</text:p>
          </table:table-cell>
          <table:table-cell table:formula="of:=IF(['file:///G:/Other%20computers/My%20Laptop/Hobby/mmtr/PCBs/LCMTR_01_01/LCMTR_01_01.csv'#$LCMTR_01_01.H6] = &quot;&quot;;&quot;&quot;;['file:///G:/Other%20computers/My%20Laptop/Hobby/mmtr/PCBs/LCMTR_01_01/LCMTR_01_01.csv'#$LCMTR_01_01.H6])">
            <text:p/>
          </table:table-cell>
          <table:table-cell table:formula="of:=IF(['file:///G:/Other%20computers/My%20Laptop/Hobby/mmtr/PCBs/LCMTR_01_01/LCMTR_01_01.csv'#$LCMTR_01_01.I6] = &quot;&quot;;&quot;&quot;;['file:///G:/Other%20computers/My%20Laptop/Hobby/mmtr/PCBs/LCMTR_01_01/LCMTR_01_01.csv'#$LCMTR_01_01.I6])">
            <text:p/>
          </table:table-cell>
          <table:table-cell table:style-name="Default" table:formula="of:=IF(['file:///G:/Other%20computers/My%20Laptop/Hobby/mmtr/PCBs/LCMTR_01_01/LCMTR_01_01.csv'#$LCMTR_01_01.J6] = &quot;&quot;;&quot;&quot;;['file:///G:/Other%20computers/My%20Laptop/Hobby/mmtr/PCBs/LCMTR_01_01/LCMTR_01_01.csv'#$LCMTR_01_01.J6])">
            <text:p/>
          </table:table-cell>
          <table:table-cell table:formula="of:=IF(['file:///G:/Other%20computers/My%20Laptop/Hobby/mmtr/PCBs/LCMTR_01_01/LCMTR_01_01.csv'#$LCMTR_01_01.K6] = &quot;&quot;;&quot;&quot;;['file:///G:/Other%20computers/My%20Laptop/Hobby/mmtr/PCBs/LCMTR_01_01/LCMTR_01_01.csv'#$LCMTR_01_01.K6])">
            <text:p/>
          </table:table-cell>
          <table:table-cell table:formula="of:=IF(['file:///G:/Other%20computers/My%20Laptop/Hobby/mmtr/PCBs/LCMTR_01_01/LCMTR_01_01.csv'#$LCMTR_01_01.L6] = &quot;&quot;;&quot;&quot;;['file:///G:/Other%20computers/My%20Laptop/Hobby/mmtr/PCBs/LCMTR_01_01/LCMTR_01_01.csv'#$LCMTR_01_01.L6])">
            <text:p/>
          </table:table-cell>
          <table:table-cell table:formula="of:=IF(['file:///G:/Other%20computers/My%20Laptop/Hobby/mmtr/PCBs/LCMTR_01_01/LCMTR_01_01.csv'#$LCMTR_01_01.M6] = &quot;&quot;;&quot;&quot;;['file:///G:/Other%20computers/My%20Laptop/Hobby/mmtr/PCBs/LCMTR_01_01/LCMTR_01_01.csv'#$LCMTR_01_01.M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7] = &quot;&quot;;&quot;&quot;;['file:///G:/Other%20computers/My%20Laptop/Hobby/mmtr/PCBs/LCMTR_01_01/LCMTR_01_01.csv'#$LCMTR_01_01.A7])" office:value-type="string" office:string-value="C11" calcext:value-type="string">
            <text:p>C11</text:p>
          </table:table-cell>
          <table:table-cell table:formula="of:=IF(['file:///G:/Other%20computers/My%20Laptop/Hobby/mmtr/PCBs/LCMTR_01_01/LCMTR_01_01.csv'#$LCMTR_01_01.B7] = &quot;&quot;;&quot;&quot;;['file:///G:/Other%20computers/My%20Laptop/Hobby/mmtr/PCBs/LCMTR_01_01/LCMTR_01_01.csv'#$LCMTR_01_01.B7])" office:value-type="string" office:string-value="3.3n" calcext:value-type="string">
            <text:p>3.3n</text:p>
          </table:table-cell>
          <table:table-cell table:formula="of:=IF(['file:///G:/Other%20computers/My%20Laptop/Hobby/mmtr/PCBs/LCMTR_01_01/LCMTR_01_01.csv'#$LCMTR_01_01.C7] = &quot;&quot;;&quot;&quot;;['file:///G:/Other%20computers/My%20Laptop/Hobby/mmtr/PCBs/LCMTR_01_01/LCMTR_01_01.csv'#$LCMTR_01_01.C7])">
            <text:p/>
          </table:table-cell>
          <table:table-cell table:formula="of:=IF(['file:///G:/Other%20computers/My%20Laptop/Hobby/mmtr/PCBs/LCMTR_01_01/LCMTR_01_01.csv'#$LCMTR_01_01.D7] = &quot;&quot;;&quot;&quot;;['file:///G:/Other%20computers/My%20Laptop/Hobby/mmtr/PCBs/LCMTR_01_01/LCMTR_01_01.csv'#$LCMTR_01_01.D7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7] = &quot;&quot;;&quot;&quot;;['file:///G:/Other%20computers/My%20Laptop/Hobby/mmtr/PCBs/LCMTR_01_01/LCMTR_01_01.csv'#$LCMTR_01_01.E7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7] = &quot;&quot;;&quot;&quot;;['file:///G:/Other%20computers/My%20Laptop/Hobby/mmtr/PCBs/LCMTR_01_01/LCMTR_01_01.csv'#$LCMTR_01_01.F7])">
            <text:p/>
          </table:table-cell>
          <table:table-cell table:formula="of:=IF(['file:///G:/Other%20computers/My%20Laptop/Hobby/mmtr/PCBs/LCMTR_01_01/LCMTR_01_01.csv'#$LCMTR_01_01.G7] = &quot;&quot;;&quot;&quot;;['file:///G:/Other%20computers/My%20Laptop/Hobby/mmtr/PCBs/LCMTR_01_01/LCMTR_01_01.csv'#$LCMTR_01_01.G7])" office:value-type="string" office:string-value="6" calcext:value-type="string">
            <text:p>6</text:p>
          </table:table-cell>
          <table:table-cell table:formula="of:=IF(['file:///G:/Other%20computers/My%20Laptop/Hobby/mmtr/PCBs/LCMTR_01_01/LCMTR_01_01.csv'#$LCMTR_01_01.H7] = &quot;&quot;;&quot;&quot;;['file:///G:/Other%20computers/My%20Laptop/Hobby/mmtr/PCBs/LCMTR_01_01/LCMTR_01_01.csv'#$LCMTR_01_01.H7])">
            <text:p/>
          </table:table-cell>
          <table:table-cell table:formula="of:=IF(['file:///G:/Other%20computers/My%20Laptop/Hobby/mmtr/PCBs/LCMTR_01_01/LCMTR_01_01.csv'#$LCMTR_01_01.I7] = &quot;&quot;;&quot;&quot;;['file:///G:/Other%20computers/My%20Laptop/Hobby/mmtr/PCBs/LCMTR_01_01/LCMTR_01_01.csv'#$LCMTR_01_01.I7])">
            <text:p/>
          </table:table-cell>
          <table:table-cell table:style-name="Default" table:formula="of:=IF(['file:///G:/Other%20computers/My%20Laptop/Hobby/mmtr/PCBs/LCMTR_01_01/LCMTR_01_01.csv'#$LCMTR_01_01.J7] = &quot;&quot;;&quot;&quot;;['file:///G:/Other%20computers/My%20Laptop/Hobby/mmtr/PCBs/LCMTR_01_01/LCMTR_01_01.csv'#$LCMTR_01_01.J7])">
            <text:p/>
          </table:table-cell>
          <table:table-cell table:formula="of:=IF(['file:///G:/Other%20computers/My%20Laptop/Hobby/mmtr/PCBs/LCMTR_01_01/LCMTR_01_01.csv'#$LCMTR_01_01.K7] = &quot;&quot;;&quot;&quot;;['file:///G:/Other%20computers/My%20Laptop/Hobby/mmtr/PCBs/LCMTR_01_01/LCMTR_01_01.csv'#$LCMTR_01_01.K7])">
            <text:p/>
          </table:table-cell>
          <table:table-cell table:formula="of:=IF(['file:///G:/Other%20computers/My%20Laptop/Hobby/mmtr/PCBs/LCMTR_01_01/LCMTR_01_01.csv'#$LCMTR_01_01.L7] = &quot;&quot;;&quot;&quot;;['file:///G:/Other%20computers/My%20Laptop/Hobby/mmtr/PCBs/LCMTR_01_01/LCMTR_01_01.csv'#$LCMTR_01_01.L7])">
            <text:p/>
          </table:table-cell>
          <table:table-cell table:formula="of:=IF(['file:///G:/Other%20computers/My%20Laptop/Hobby/mmtr/PCBs/LCMTR_01_01/LCMTR_01_01.csv'#$LCMTR_01_01.M7] = &quot;&quot;;&quot;&quot;;['file:///G:/Other%20computers/My%20Laptop/Hobby/mmtr/PCBs/LCMTR_01_01/LCMTR_01_01.csv'#$LCMTR_01_01.M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8] = &quot;&quot;;&quot;&quot;;['file:///G:/Other%20computers/My%20Laptop/Hobby/mmtr/PCBs/LCMTR_01_01/LCMTR_01_01.csv'#$LCMTR_01_01.A8])" office:value-type="string" office:string-value="C16" calcext:value-type="string">
            <text:p>C16</text:p>
          </table:table-cell>
          <table:table-cell table:formula="of:=IF(['file:///G:/Other%20computers/My%20Laptop/Hobby/mmtr/PCBs/LCMTR_01_01/LCMTR_01_01.csv'#$LCMTR_01_01.B8] = &quot;&quot;;&quot;&quot;;['file:///G:/Other%20computers/My%20Laptop/Hobby/mmtr/PCBs/LCMTR_01_01/LCMTR_01_01.csv'#$LCMTR_01_01.B8])" office:value-type="string" office:string-value="330p" calcext:value-type="string">
            <text:p>330p</text:p>
          </table:table-cell>
          <table:table-cell table:formula="of:=IF(['file:///G:/Other%20computers/My%20Laptop/Hobby/mmtr/PCBs/LCMTR_01_01/LCMTR_01_01.csv'#$LCMTR_01_01.C8] = &quot;&quot;;&quot;&quot;;['file:///G:/Other%20computers/My%20Laptop/Hobby/mmtr/PCBs/LCMTR_01_01/LCMTR_01_01.csv'#$LCMTR_01_01.C8])">
            <text:p/>
          </table:table-cell>
          <table:table-cell table:formula="of:=IF(['file:///G:/Other%20computers/My%20Laptop/Hobby/mmtr/PCBs/LCMTR_01_01/LCMTR_01_01.csv'#$LCMTR_01_01.D8] = &quot;&quot;;&quot;&quot;;['file:///G:/Other%20computers/My%20Laptop/Hobby/mmtr/PCBs/LCMTR_01_01/LCMTR_01_01.csv'#$LCMTR_01_01.D8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8] = &quot;&quot;;&quot;&quot;;['file:///G:/Other%20computers/My%20Laptop/Hobby/mmtr/PCBs/LCMTR_01_01/LCMTR_01_01.csv'#$LCMTR_01_01.E8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8] = &quot;&quot;;&quot;&quot;;['file:///G:/Other%20computers/My%20Laptop/Hobby/mmtr/PCBs/LCMTR_01_01/LCMTR_01_01.csv'#$LCMTR_01_01.F8])">
            <text:p/>
          </table:table-cell>
          <table:table-cell table:formula="of:=IF(['file:///G:/Other%20computers/My%20Laptop/Hobby/mmtr/PCBs/LCMTR_01_01/LCMTR_01_01.csv'#$LCMTR_01_01.G8] = &quot;&quot;;&quot;&quot;;['file:///G:/Other%20computers/My%20Laptop/Hobby/mmtr/PCBs/LCMTR_01_01/LCMTR_01_01.csv'#$LCMTR_01_01.G8])" office:value-type="string" office:string-value="7" calcext:value-type="string">
            <text:p>7</text:p>
          </table:table-cell>
          <table:table-cell table:formula="of:=IF(['file:///G:/Other%20computers/My%20Laptop/Hobby/mmtr/PCBs/LCMTR_01_01/LCMTR_01_01.csv'#$LCMTR_01_01.H8] = &quot;&quot;;&quot;&quot;;['file:///G:/Other%20computers/My%20Laptop/Hobby/mmtr/PCBs/LCMTR_01_01/LCMTR_01_01.csv'#$LCMTR_01_01.H8])">
            <text:p/>
          </table:table-cell>
          <table:table-cell table:formula="of:=IF(['file:///G:/Other%20computers/My%20Laptop/Hobby/mmtr/PCBs/LCMTR_01_01/LCMTR_01_01.csv'#$LCMTR_01_01.I8] = &quot;&quot;;&quot;&quot;;['file:///G:/Other%20computers/My%20Laptop/Hobby/mmtr/PCBs/LCMTR_01_01/LCMTR_01_01.csv'#$LCMTR_01_01.I8])">
            <text:p/>
          </table:table-cell>
          <table:table-cell table:style-name="Default" table:formula="of:=IF(['file:///G:/Other%20computers/My%20Laptop/Hobby/mmtr/PCBs/LCMTR_01_01/LCMTR_01_01.csv'#$LCMTR_01_01.J8] = &quot;&quot;;&quot;&quot;;['file:///G:/Other%20computers/My%20Laptop/Hobby/mmtr/PCBs/LCMTR_01_01/LCMTR_01_01.csv'#$LCMTR_01_01.J8])">
            <text:p/>
          </table:table-cell>
          <table:table-cell table:formula="of:=IF(['file:///G:/Other%20computers/My%20Laptop/Hobby/mmtr/PCBs/LCMTR_01_01/LCMTR_01_01.csv'#$LCMTR_01_01.K8] = &quot;&quot;;&quot;&quot;;['file:///G:/Other%20computers/My%20Laptop/Hobby/mmtr/PCBs/LCMTR_01_01/LCMTR_01_01.csv'#$LCMTR_01_01.K8])">
            <text:p/>
          </table:table-cell>
          <table:table-cell table:formula="of:=IF(['file:///G:/Other%20computers/My%20Laptop/Hobby/mmtr/PCBs/LCMTR_01_01/LCMTR_01_01.csv'#$LCMTR_01_01.L8] = &quot;&quot;;&quot;&quot;;['file:///G:/Other%20computers/My%20Laptop/Hobby/mmtr/PCBs/LCMTR_01_01/LCMTR_01_01.csv'#$LCMTR_01_01.L8])">
            <text:p/>
          </table:table-cell>
          <table:table-cell table:formula="of:=IF(['file:///G:/Other%20computers/My%20Laptop/Hobby/mmtr/PCBs/LCMTR_01_01/LCMTR_01_01.csv'#$LCMTR_01_01.M8] = &quot;&quot;;&quot;&quot;;['file:///G:/Other%20computers/My%20Laptop/Hobby/mmtr/PCBs/LCMTR_01_01/LCMTR_01_01.csv'#$LCMTR_01_01.M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9] = &quot;&quot;;&quot;&quot;;['file:///G:/Other%20computers/My%20Laptop/Hobby/mmtr/PCBs/LCMTR_01_01/LCMTR_01_01.csv'#$LCMTR_01_01.A9])" office:value-type="string" office:string-value="C17,C18,C19,C20,C23,C24,C25,C45,C46,C52,C53,C55" calcext:value-type="string">
            <text:p>C17,C18,C19,C20,C23,C24,C25,C45,C46,C52,C53,C55</text:p>
          </table:table-cell>
          <table:table-cell table:formula="of:=IF(['file:///G:/Other%20computers/My%20Laptop/Hobby/mmtr/PCBs/LCMTR_01_01/LCMTR_01_01.csv'#$LCMTR_01_01.B9] = &quot;&quot;;&quot;&quot;;['file:///G:/Other%20computers/My%20Laptop/Hobby/mmtr/PCBs/LCMTR_01_01/LCMTR_01_01.csv'#$LCMTR_01_01.B9])" office:value-type="string" office:string-value="100n" calcext:value-type="string">
            <text:p>100n</text:p>
          </table:table-cell>
          <table:table-cell table:formula="of:=IF(['file:///G:/Other%20computers/My%20Laptop/Hobby/mmtr/PCBs/LCMTR_01_01/LCMTR_01_01.csv'#$LCMTR_01_01.C9] = &quot;&quot;;&quot;&quot;;['file:///G:/Other%20computers/My%20Laptop/Hobby/mmtr/PCBs/LCMTR_01_01/LCMTR_01_01.csv'#$LCMTR_01_01.C9])">
            <text:p/>
          </table:table-cell>
          <table:table-cell table:formula="of:=IF(['file:///G:/Other%20computers/My%20Laptop/Hobby/mmtr/PCBs/LCMTR_01_01/LCMTR_01_01.csv'#$LCMTR_01_01.D9] = &quot;&quot;;&quot;&quot;;['file:///G:/Other%20computers/My%20Laptop/Hobby/mmtr/PCBs/LCMTR_01_01/LCMTR_01_01.csv'#$LCMTR_01_01.D9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9] = &quot;&quot;;&quot;&quot;;['file:///G:/Other%20computers/My%20Laptop/Hobby/mmtr/PCBs/LCMTR_01_01/LCMTR_01_01.csv'#$LCMTR_01_01.E9])" office:value-type="string" office:string-value="12" calcext:value-type="string">
            <text:p>12</text:p>
          </table:table-cell>
          <table:table-cell table:formula="of:=IF(['file:///G:/Other%20computers/My%20Laptop/Hobby/mmtr/PCBs/LCMTR_01_01/LCMTR_01_01.csv'#$LCMTR_01_01.F9] = &quot;&quot;;&quot;&quot;;['file:///G:/Other%20computers/My%20Laptop/Hobby/mmtr/PCBs/LCMTR_01_01/LCMTR_01_01.csv'#$LCMTR_01_01.F9])">
            <text:p/>
          </table:table-cell>
          <table:table-cell table:formula="of:=IF(['file:///G:/Other%20computers/My%20Laptop/Hobby/mmtr/PCBs/LCMTR_01_01/LCMTR_01_01.csv'#$LCMTR_01_01.G9] = &quot;&quot;;&quot;&quot;;['file:///G:/Other%20computers/My%20Laptop/Hobby/mmtr/PCBs/LCMTR_01_01/LCMTR_01_01.csv'#$LCMTR_01_01.G9])" office:value-type="string" office:string-value="8" calcext:value-type="string">
            <text:p>8</text:p>
          </table:table-cell>
          <table:table-cell table:formula="of:=IF(['file:///G:/Other%20computers/My%20Laptop/Hobby/mmtr/PCBs/LCMTR_01_01/LCMTR_01_01.csv'#$LCMTR_01_01.H9] = &quot;&quot;;&quot;&quot;;['file:///G:/Other%20computers/My%20Laptop/Hobby/mmtr/PCBs/LCMTR_01_01/LCMTR_01_01.csv'#$LCMTR_01_01.H9])">
            <text:p/>
          </table:table-cell>
          <table:table-cell table:formula="of:=IF(['file:///G:/Other%20computers/My%20Laptop/Hobby/mmtr/PCBs/LCMTR_01_01/LCMTR_01_01.csv'#$LCMTR_01_01.I9] = &quot;&quot;;&quot;&quot;;['file:///G:/Other%20computers/My%20Laptop/Hobby/mmtr/PCBs/LCMTR_01_01/LCMTR_01_01.csv'#$LCMTR_01_01.I9])">
            <text:p/>
          </table:table-cell>
          <table:table-cell table:style-name="Default" table:formula="of:=IF(['file:///G:/Other%20computers/My%20Laptop/Hobby/mmtr/PCBs/LCMTR_01_01/LCMTR_01_01.csv'#$LCMTR_01_01.J9] = &quot;&quot;;&quot;&quot;;['file:///G:/Other%20computers/My%20Laptop/Hobby/mmtr/PCBs/LCMTR_01_01/LCMTR_01_01.csv'#$LCMTR_01_01.J9])">
            <text:p/>
          </table:table-cell>
          <table:table-cell table:formula="of:=IF(['file:///G:/Other%20computers/My%20Laptop/Hobby/mmtr/PCBs/LCMTR_01_01/LCMTR_01_01.csv'#$LCMTR_01_01.K9] = &quot;&quot;;&quot;&quot;;['file:///G:/Other%20computers/My%20Laptop/Hobby/mmtr/PCBs/LCMTR_01_01/LCMTR_01_01.csv'#$LCMTR_01_01.K9])">
            <text:p/>
          </table:table-cell>
          <table:table-cell table:formula="of:=IF(['file:///G:/Other%20computers/My%20Laptop/Hobby/mmtr/PCBs/LCMTR_01_01/LCMTR_01_01.csv'#$LCMTR_01_01.L9] = &quot;&quot;;&quot;&quot;;['file:///G:/Other%20computers/My%20Laptop/Hobby/mmtr/PCBs/LCMTR_01_01/LCMTR_01_01.csv'#$LCMTR_01_01.L9])">
            <text:p/>
          </table:table-cell>
          <table:table-cell table:formula="of:=IF(['file:///G:/Other%20computers/My%20Laptop/Hobby/mmtr/PCBs/LCMTR_01_01/LCMTR_01_01.csv'#$LCMTR_01_01.M9] = &quot;&quot;;&quot;&quot;;['file:///G:/Other%20computers/My%20Laptop/Hobby/mmtr/PCBs/LCMTR_01_01/LCMTR_01_01.csv'#$LCMTR_01_01.M9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0] = &quot;&quot;;&quot;&quot;;['file:///G:/Other%20computers/My%20Laptop/Hobby/mmtr/PCBs/LCMTR_01_01/LCMTR_01_01.csv'#$LCMTR_01_01.A10])" office:value-type="string" office:string-value="C22,C26,C28,C29,C30,C31,C32,C40,C41,C42,C47,C48,C49,C50,C51,C54,C56,C57,C58,C59,C60,C61,C62,C63,C64,C65,C66,C67,C68,C69,C70,C73,C76,C78,C79,C80,C82,C83,C84,C89,C90,C91" calcext:value-type="string">
            <text:p>C22,C26,C28,C29,C30,C31,C32,C40,C41,C42,C47,C48,C49,C50,C51,C54,C56,C57,C58,C59,C60,C61,C62,C63,C64,C65,C66,C67,C68,C69,C70,C73,C76,C78,C79,C80,C82,C83,C84,C89,C90,C91</text:p>
          </table:table-cell>
          <table:table-cell table:formula="of:=IF(['file:///G:/Other%20computers/My%20Laptop/Hobby/mmtr/PCBs/LCMTR_01_01/LCMTR_01_01.csv'#$LCMTR_01_01.B10] = &quot;&quot;;&quot;&quot;;['file:///G:/Other%20computers/My%20Laptop/Hobby/mmtr/PCBs/LCMTR_01_01/LCMTR_01_01.csv'#$LCMTR_01_01.B10])" office:value-type="string" office:string-value="1u" calcext:value-type="string">
            <text:p>1u</text:p>
          </table:table-cell>
          <table:table-cell table:formula="of:=IF(['file:///G:/Other%20computers/My%20Laptop/Hobby/mmtr/PCBs/LCMTR_01_01/LCMTR_01_01.csv'#$LCMTR_01_01.C10] = &quot;&quot;;&quot;&quot;;['file:///G:/Other%20computers/My%20Laptop/Hobby/mmtr/PCBs/LCMTR_01_01/LCMTR_01_01.csv'#$LCMTR_01_01.C10])">
            <text:p/>
          </table:table-cell>
          <table:table-cell table:formula="of:=IF(['file:///G:/Other%20computers/My%20Laptop/Hobby/mmtr/PCBs/LCMTR_01_01/LCMTR_01_01.csv'#$LCMTR_01_01.D10] = &quot;&quot;;&quot;&quot;;['file:///G:/Other%20computers/My%20Laptop/Hobby/mmtr/PCBs/LCMTR_01_01/LCMTR_01_01.csv'#$LCMTR_01_01.D10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10] = &quot;&quot;;&quot;&quot;;['file:///G:/Other%20computers/My%20Laptop/Hobby/mmtr/PCBs/LCMTR_01_01/LCMTR_01_01.csv'#$LCMTR_01_01.E10])" office:value-type="string" office:string-value="42" calcext:value-type="string">
            <text:p>42</text:p>
          </table:table-cell>
          <table:table-cell table:formula="of:=IF(['file:///G:/Other%20computers/My%20Laptop/Hobby/mmtr/PCBs/LCMTR_01_01/LCMTR_01_01.csv'#$LCMTR_01_01.F10] = &quot;&quot;;&quot;&quot;;['file:///G:/Other%20computers/My%20Laptop/Hobby/mmtr/PCBs/LCMTR_01_01/LCMTR_01_01.csv'#$LCMTR_01_01.F10])">
            <text:p/>
          </table:table-cell>
          <table:table-cell table:formula="of:=IF(['file:///G:/Other%20computers/My%20Laptop/Hobby/mmtr/PCBs/LCMTR_01_01/LCMTR_01_01.csv'#$LCMTR_01_01.G10] = &quot;&quot;;&quot;&quot;;['file:///G:/Other%20computers/My%20Laptop/Hobby/mmtr/PCBs/LCMTR_01_01/LCMTR_01_01.csv'#$LCMTR_01_01.G10])" office:value-type="string" office:string-value="9" calcext:value-type="string">
            <text:p>9</text:p>
          </table:table-cell>
          <table:table-cell table:formula="of:=IF(['file:///G:/Other%20computers/My%20Laptop/Hobby/mmtr/PCBs/LCMTR_01_01/LCMTR_01_01.csv'#$LCMTR_01_01.H10] = &quot;&quot;;&quot;&quot;;['file:///G:/Other%20computers/My%20Laptop/Hobby/mmtr/PCBs/LCMTR_01_01/LCMTR_01_01.csv'#$LCMTR_01_01.H10])">
            <text:p/>
          </table:table-cell>
          <table:table-cell table:formula="of:=IF(['file:///G:/Other%20computers/My%20Laptop/Hobby/mmtr/PCBs/LCMTR_01_01/LCMTR_01_01.csv'#$LCMTR_01_01.I10] = &quot;&quot;;&quot;&quot;;['file:///G:/Other%20computers/My%20Laptop/Hobby/mmtr/PCBs/LCMTR_01_01/LCMTR_01_01.csv'#$LCMTR_01_01.I10])">
            <text:p/>
          </table:table-cell>
          <table:table-cell table:style-name="Default" table:formula="of:=IF(['file:///G:/Other%20computers/My%20Laptop/Hobby/mmtr/PCBs/LCMTR_01_01/LCMTR_01_01.csv'#$LCMTR_01_01.J10] = &quot;&quot;;&quot;&quot;;['file:///G:/Other%20computers/My%20Laptop/Hobby/mmtr/PCBs/LCMTR_01_01/LCMTR_01_01.csv'#$LCMTR_01_01.J10])">
            <text:p/>
          </table:table-cell>
          <table:table-cell table:formula="of:=IF(['file:///G:/Other%20computers/My%20Laptop/Hobby/mmtr/PCBs/LCMTR_01_01/LCMTR_01_01.csv'#$LCMTR_01_01.K10] = &quot;&quot;;&quot;&quot;;['file:///G:/Other%20computers/My%20Laptop/Hobby/mmtr/PCBs/LCMTR_01_01/LCMTR_01_01.csv'#$LCMTR_01_01.K10])">
            <text:p/>
          </table:table-cell>
          <table:table-cell table:formula="of:=IF(['file:///G:/Other%20computers/My%20Laptop/Hobby/mmtr/PCBs/LCMTR_01_01/LCMTR_01_01.csv'#$LCMTR_01_01.L10] = &quot;&quot;;&quot;&quot;;['file:///G:/Other%20computers/My%20Laptop/Hobby/mmtr/PCBs/LCMTR_01_01/LCMTR_01_01.csv'#$LCMTR_01_01.L10])">
            <text:p/>
          </table:table-cell>
          <table:table-cell table:formula="of:=IF(['file:///G:/Other%20computers/My%20Laptop/Hobby/mmtr/PCBs/LCMTR_01_01/LCMTR_01_01.csv'#$LCMTR_01_01.M10] = &quot;&quot;;&quot;&quot;;['file:///G:/Other%20computers/My%20Laptop/Hobby/mmtr/PCBs/LCMTR_01_01/LCMTR_01_01.csv'#$LCMTR_01_01.M10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1] = &quot;&quot;;&quot;&quot;;['file:///G:/Other%20computers/My%20Laptop/Hobby/mmtr/PCBs/LCMTR_01_01/LCMTR_01_01.csv'#$LCMTR_01_01.A11])" office:value-type="string" office:string-value="C71,C72,C74,C75" calcext:value-type="string">
            <text:p>C71,C72,C74,C75</text:p>
          </table:table-cell>
          <table:table-cell table:formula="of:=IF(['file:///G:/Other%20computers/My%20Laptop/Hobby/mmtr/PCBs/LCMTR_01_01/LCMTR_01_01.csv'#$LCMTR_01_01.B11] = &quot;&quot;;&quot;&quot;;['file:///G:/Other%20computers/My%20Laptop/Hobby/mmtr/PCBs/LCMTR_01_01/LCMTR_01_01.csv'#$LCMTR_01_01.B11])" office:value-type="string" office:string-value="15p" calcext:value-type="string">
            <text:p>15p</text:p>
          </table:table-cell>
          <table:table-cell table:formula="of:=IF(['file:///G:/Other%20computers/My%20Laptop/Hobby/mmtr/PCBs/LCMTR_01_01/LCMTR_01_01.csv'#$LCMTR_01_01.C11] = &quot;&quot;;&quot;&quot;;['file:///G:/Other%20computers/My%20Laptop/Hobby/mmtr/PCBs/LCMTR_01_01/LCMTR_01_01.csv'#$LCMTR_01_01.C11])">
            <text:p/>
          </table:table-cell>
          <table:table-cell table:formula="of:=IF(['file:///G:/Other%20computers/My%20Laptop/Hobby/mmtr/PCBs/LCMTR_01_01/LCMTR_01_01.csv'#$LCMTR_01_01.D11] = &quot;&quot;;&quot;&quot;;['file:///G:/Other%20computers/My%20Laptop/Hobby/mmtr/PCBs/LCMTR_01_01/LCMTR_01_01.csv'#$LCMTR_01_01.D11])" office:value-type="string" office:string-value="AADuffy:Cap_SMD_0603" calcext:value-type="string">
            <text:p>AADuffy:Cap_SMD_0603</text:p>
          </table:table-cell>
          <table:table-cell table:formula="of:=IF(['file:///G:/Other%20computers/My%20Laptop/Hobby/mmtr/PCBs/LCMTR_01_01/LCMTR_01_01.csv'#$LCMTR_01_01.E11] = &quot;&quot;;&quot;&quot;;['file:///G:/Other%20computers/My%20Laptop/Hobby/mmtr/PCBs/LCMTR_01_01/LCMTR_01_01.csv'#$LCMTR_01_01.E11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11] = &quot;&quot;;&quot;&quot;;['file:///G:/Other%20computers/My%20Laptop/Hobby/mmtr/PCBs/LCMTR_01_01/LCMTR_01_01.csv'#$LCMTR_01_01.F11])">
            <text:p/>
          </table:table-cell>
          <table:table-cell table:formula="of:=IF(['file:///G:/Other%20computers/My%20Laptop/Hobby/mmtr/PCBs/LCMTR_01_01/LCMTR_01_01.csv'#$LCMTR_01_01.G11] = &quot;&quot;;&quot;&quot;;['file:///G:/Other%20computers/My%20Laptop/Hobby/mmtr/PCBs/LCMTR_01_01/LCMTR_01_01.csv'#$LCMTR_01_01.G11])" office:value-type="string" office:string-value="10" calcext:value-type="string">
            <text:p>10</text:p>
          </table:table-cell>
          <table:table-cell table:formula="of:=IF(['file:///G:/Other%20computers/My%20Laptop/Hobby/mmtr/PCBs/LCMTR_01_01/LCMTR_01_01.csv'#$LCMTR_01_01.H11] = &quot;&quot;;&quot;&quot;;['file:///G:/Other%20computers/My%20Laptop/Hobby/mmtr/PCBs/LCMTR_01_01/LCMTR_01_01.csv'#$LCMTR_01_01.H11])">
            <text:p/>
          </table:table-cell>
          <table:table-cell table:formula="of:=IF(['file:///G:/Other%20computers/My%20Laptop/Hobby/mmtr/PCBs/LCMTR_01_01/LCMTR_01_01.csv'#$LCMTR_01_01.I11] = &quot;&quot;;&quot;&quot;;['file:///G:/Other%20computers/My%20Laptop/Hobby/mmtr/PCBs/LCMTR_01_01/LCMTR_01_01.csv'#$LCMTR_01_01.I11])">
            <text:p/>
          </table:table-cell>
          <table:table-cell table:style-name="Default" table:formula="of:=IF(['file:///G:/Other%20computers/My%20Laptop/Hobby/mmtr/PCBs/LCMTR_01_01/LCMTR_01_01.csv'#$LCMTR_01_01.J11] = &quot;&quot;;&quot;&quot;;['file:///G:/Other%20computers/My%20Laptop/Hobby/mmtr/PCBs/LCMTR_01_01/LCMTR_01_01.csv'#$LCMTR_01_01.J11])">
            <text:p/>
          </table:table-cell>
          <table:table-cell table:formula="of:=IF(['file:///G:/Other%20computers/My%20Laptop/Hobby/mmtr/PCBs/LCMTR_01_01/LCMTR_01_01.csv'#$LCMTR_01_01.K11] = &quot;&quot;;&quot;&quot;;['file:///G:/Other%20computers/My%20Laptop/Hobby/mmtr/PCBs/LCMTR_01_01/LCMTR_01_01.csv'#$LCMTR_01_01.K11])">
            <text:p/>
          </table:table-cell>
          <table:table-cell table:formula="of:=IF(['file:///G:/Other%20computers/My%20Laptop/Hobby/mmtr/PCBs/LCMTR_01_01/LCMTR_01_01.csv'#$LCMTR_01_01.L11] = &quot;&quot;;&quot;&quot;;['file:///G:/Other%20computers/My%20Laptop/Hobby/mmtr/PCBs/LCMTR_01_01/LCMTR_01_01.csv'#$LCMTR_01_01.L11])">
            <text:p/>
          </table:table-cell>
          <table:table-cell table:formula="of:=IF(['file:///G:/Other%20computers/My%20Laptop/Hobby/mmtr/PCBs/LCMTR_01_01/LCMTR_01_01.csv'#$LCMTR_01_01.M11] = &quot;&quot;;&quot;&quot;;['file:///G:/Other%20computers/My%20Laptop/Hobby/mmtr/PCBs/LCMTR_01_01/LCMTR_01_01.csv'#$LCMTR_01_01.M11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2] = &quot;&quot;;&quot;&quot;;['file:///G:/Other%20computers/My%20Laptop/Hobby/mmtr/PCBs/LCMTR_01_01/LCMTR_01_01.csv'#$LCMTR_01_01.A12])" office:value-type="string" office:string-value="D1,D4,D5,D6,D7,D8" calcext:value-type="string">
            <text:p>D1,D4,D5,D6,D7,D8</text:p>
          </table:table-cell>
          <table:table-cell table:formula="of:=IF(['file:///G:/Other%20computers/My%20Laptop/Hobby/mmtr/PCBs/LCMTR_01_01/LCMTR_01_01.csv'#$LCMTR_01_01.B12] = &quot;&quot;;&quot;&quot;;['file:///G:/Other%20computers/My%20Laptop/Hobby/mmtr/PCBs/LCMTR_01_01/LCMTR_01_01.csv'#$LCMTR_01_01.B12])" office:value-type="string" office:string-value="1N4007FL" calcext:value-type="string">
            <text:p>1N4007FL</text:p>
          </table:table-cell>
          <table:table-cell table:formula="of:=IF(['file:///G:/Other%20computers/My%20Laptop/Hobby/mmtr/PCBs/LCMTR_01_01/LCMTR_01_01.csv'#$LCMTR_01_01.C12] = &quot;&quot;;&quot;&quot;;['file:///G:/Other%20computers/My%20Laptop/Hobby/mmtr/PCBs/LCMTR_01_01/LCMTR_01_01.csv'#$LCMTR_01_01.C12])" office:value-type="string" office:string-value="https://www.smc-diodes.com/propdf/1N4001FL-1N4007FL%20N1646%20REV.A.pdf" calcext:value-type="string">
            <text:p>https://www.smc-diodes.com/propdf/1N4001FL-1N4007FL%20N1646%20REV.A.pdf</text:p>
          </table:table-cell>
          <table:table-cell table:formula="of:=IF(['file:///G:/Other%20computers/My%20Laptop/Hobby/mmtr/PCBs/LCMTR_01_01/LCMTR_01_01.csv'#$LCMTR_01_01.D12] = &quot;&quot;;&quot;&quot;;['file:///G:/Other%20computers/My%20Laptop/Hobby/mmtr/PCBs/LCMTR_01_01/LCMTR_01_01.csv'#$LCMTR_01_01.D12])" office:value-type="string" office:string-value="AADuffy:1N4007FL" calcext:value-type="string">
            <text:p>AADuffy:1N4007FL</text:p>
          </table:table-cell>
          <table:table-cell table:formula="of:=IF(['file:///G:/Other%20computers/My%20Laptop/Hobby/mmtr/PCBs/LCMTR_01_01/LCMTR_01_01.csv'#$LCMTR_01_01.E12] = &quot;&quot;;&quot;&quot;;['file:///G:/Other%20computers/My%20Laptop/Hobby/mmtr/PCBs/LCMTR_01_01/LCMTR_01_01.csv'#$LCMTR_01_01.E12])" office:value-type="string" office:string-value="6" calcext:value-type="string">
            <text:p>6</text:p>
          </table:table-cell>
          <table:table-cell table:formula="of:=IF(['file:///G:/Other%20computers/My%20Laptop/Hobby/mmtr/PCBs/LCMTR_01_01/LCMTR_01_01.csv'#$LCMTR_01_01.F12] = &quot;&quot;;&quot;&quot;;['file:///G:/Other%20computers/My%20Laptop/Hobby/mmtr/PCBs/LCMTR_01_01/LCMTR_01_01.csv'#$LCMTR_01_01.F12])">
            <text:p/>
          </table:table-cell>
          <table:table-cell table:formula="of:=IF(['file:///G:/Other%20computers/My%20Laptop/Hobby/mmtr/PCBs/LCMTR_01_01/LCMTR_01_01.csv'#$LCMTR_01_01.G12] = &quot;&quot;;&quot;&quot;;['file:///G:/Other%20computers/My%20Laptop/Hobby/mmtr/PCBs/LCMTR_01_01/LCMTR_01_01.csv'#$LCMTR_01_01.G12])" office:value-type="string" office:string-value="11" calcext:value-type="string">
            <text:p>11</text:p>
          </table:table-cell>
          <table:table-cell table:formula="of:=IF(['file:///G:/Other%20computers/My%20Laptop/Hobby/mmtr/PCBs/LCMTR_01_01/LCMTR_01_01.csv'#$LCMTR_01_01.H12] = &quot;&quot;;&quot;&quot;;['file:///G:/Other%20computers/My%20Laptop/Hobby/mmtr/PCBs/LCMTR_01_01/LCMTR_01_01.csv'#$LCMTR_01_01.H12])" office:value-type="string" office:string-value="SMC" calcext:value-type="string">
            <text:p>SMC</text:p>
          </table:table-cell>
          <table:table-cell table:style-name="ce2" table:formula="of:=IF(['file:///G:/Other%20computers/My%20Laptop/Hobby/mmtr/PCBs/LCMTR_01_01/LCMTR_01_01.csv'#$LCMTR_01_01.I12] = &quot;&quot;;&quot;&quot;;['file:///G:/Other%20computers/My%20Laptop/Hobby/mmtr/PCBs/LCMTR_01_01/LCMTR_01_01.csv'#$LCMTR_01_01.I12])" office:value-type="string" office:string-value="1N4007FL" calcext:value-type="string">
            <text:p>1N4007FL</text:p>
          </table:table-cell>
          <table:table-cell table:formula="of:=IF(['file:///G:/Other%20computers/My%20Laptop/Hobby/mmtr/PCBs/LCMTR_01_01/LCMTR_01_01.csv'#$LCMTR_01_01.J12] = &quot;&quot;;&quot;&quot;;['file:///G:/Other%20computers/My%20Laptop/Hobby/mmtr/PCBs/LCMTR_01_01/LCMTR_01_01.csv'#$LCMTR_01_01.J12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2] = &quot;&quot;;&quot;&quot;;['file:///G:/Other%20computers/My%20Laptop/Hobby/mmtr/PCBs/LCMTR_01_01/LCMTR_01_01.csv'#$LCMTR_01_01.K12])" office:value-type="string" office:string-value="https://www.digikey.com/en/products/detail/smc-diode-solutions/1N4007FL/11657817" calcext:value-type="string">
            <text:p>https://www.digikey.com/en/products/detail/smc-diode-solutions/1N4007FL/11657817</text:p>
          </table:table-cell>
          <table:table-cell table:style-name="ce2" table:formula="of:=IF(['file:///G:/Other%20computers/My%20Laptop/Hobby/mmtr/PCBs/LCMTR_01_01/LCMTR_01_01.csv'#$LCMTR_01_01.L12] = &quot;&quot;;&quot;&quot;;['file:///G:/Other%20computers/My%20Laptop/Hobby/mmtr/PCBs/LCMTR_01_01/LCMTR_01_01.csv'#$LCMTR_01_01.L12])" office:value-type="string" office:string-value="1655-1N4007FLCT-ND" calcext:value-type="string">
            <text:p>1655-1N4007FLCT-ND</text:p>
          </table:table-cell>
          <table:table-cell table:formula="of:=IF(['file:///G:/Other%20computers/My%20Laptop/Hobby/mmtr/PCBs/LCMTR_01_01/LCMTR_01_01.csv'#$LCMTR_01_01.M12] = &quot;&quot;;&quot;&quot;;['file:///G:/Other%20computers/My%20Laptop/Hobby/mmtr/PCBs/LCMTR_01_01/LCMTR_01_01.csv'#$LCMTR_01_01.M1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3] = &quot;&quot;;&quot;&quot;;['file:///G:/Other%20computers/My%20Laptop/Hobby/mmtr/PCBs/LCMTR_01_01/LCMTR_01_01.csv'#$LCMTR_01_01.A13])" office:value-type="string" office:string-value="D2" calcext:value-type="string">
            <text:p>D2</text:p>
          </table:table-cell>
          <table:table-cell table:formula="of:=IF(['file:///G:/Other%20computers/My%20Laptop/Hobby/mmtr/PCBs/LCMTR_01_01/LCMTR_01_01.csv'#$LCMTR_01_01.B13] = &quot;&quot;;&quot;&quot;;['file:///G:/Other%20computers/My%20Laptop/Hobby/mmtr/PCBs/LCMTR_01_01/LCMTR_01_01.csv'#$LCMTR_01_01.B13])" office:value-type="string" office:string-value="6.1V" calcext:value-type="string">
            <text:p>6.1V</text:p>
          </table:table-cell>
          <table:table-cell table:formula="of:=IF(['file:///G:/Other%20computers/My%20Laptop/Hobby/mmtr/PCBs/LCMTR_01_01/LCMTR_01_01.csv'#$LCMTR_01_01.C13] = &quot;&quot;;&quot;&quot;;['file:///G:/Other%20computers/My%20Laptop/Hobby/mmtr/PCBs/LCMTR_01_01/LCMTR_01_01.csv'#$LCMTR_01_01.C13])" office:value-type="string" office:string-value="https://www.diodes.com/assets/Datasheets/ds18010.pdf" calcext:value-type="string">
            <text:p>https://www.diodes.com/assets/Datasheets/ds18010.pdf</text:p>
          </table:table-cell>
          <table:table-cell table:formula="of:=IF(['file:///G:/Other%20computers/My%20Laptop/Hobby/mmtr/PCBs/LCMTR_01_01/LCMTR_01_01.csv'#$LCMTR_01_01.D13] = &quot;&quot;;&quot;&quot;;['file:///G:/Other%20computers/My%20Laptop/Hobby/mmtr/PCBs/LCMTR_01_01/LCMTR_01_01.csv'#$LCMTR_01_01.D13])" office:value-type="string" office:string-value="AADuffy:SOD123_MMSZ5231B-7-F" calcext:value-type="string">
            <text:p>AADuffy:SOD123_MMSZ5231B-7-F</text:p>
          </table:table-cell>
          <table:table-cell table:formula="of:=IF(['file:///G:/Other%20computers/My%20Laptop/Hobby/mmtr/PCBs/LCMTR_01_01/LCMTR_01_01.csv'#$LCMTR_01_01.E13] = &quot;&quot;;&quot;&quot;;['file:///G:/Other%20computers/My%20Laptop/Hobby/mmtr/PCBs/LCMTR_01_01/LCMTR_01_01.csv'#$LCMTR_01_01.E13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13] = &quot;&quot;;&quot;&quot;;['file:///G:/Other%20computers/My%20Laptop/Hobby/mmtr/PCBs/LCMTR_01_01/LCMTR_01_01.csv'#$LCMTR_01_01.F13])">
            <text:p/>
          </table:table-cell>
          <table:table-cell table:formula="of:=IF(['file:///G:/Other%20computers/My%20Laptop/Hobby/mmtr/PCBs/LCMTR_01_01/LCMTR_01_01.csv'#$LCMTR_01_01.G13] = &quot;&quot;;&quot;&quot;;['file:///G:/Other%20computers/My%20Laptop/Hobby/mmtr/PCBs/LCMTR_01_01/LCMTR_01_01.csv'#$LCMTR_01_01.G13])" office:value-type="string" office:string-value="12" calcext:value-type="string">
            <text:p>12</text:p>
          </table:table-cell>
          <table:table-cell table:formula="of:=IF(['file:///G:/Other%20computers/My%20Laptop/Hobby/mmtr/PCBs/LCMTR_01_01/LCMTR_01_01.csv'#$LCMTR_01_01.H13] = &quot;&quot;;&quot;&quot;;['file:///G:/Other%20computers/My%20Laptop/Hobby/mmtr/PCBs/LCMTR_01_01/LCMTR_01_01.csv'#$LCMTR_01_01.H13])" office:value-type="string" office:string-value="Diodes Inc" calcext:value-type="string">
            <text:p>Diodes Inc</text:p>
          </table:table-cell>
          <table:table-cell table:style-name="ce2" table:formula="of:=IF(['file:///G:/Other%20computers/My%20Laptop/Hobby/mmtr/PCBs/LCMTR_01_01/LCMTR_01_01.csv'#$LCMTR_01_01.I13] = &quot;&quot;;&quot;&quot;;['file:///G:/Other%20computers/My%20Laptop/Hobby/mmtr/PCBs/LCMTR_01_01/LCMTR_01_01.csv'#$LCMTR_01_01.I13])" office:value-type="string" office:string-value="MMSZ5231B-7-F" calcext:value-type="string">
            <text:p>MMSZ5231B-7-F</text:p>
          </table:table-cell>
          <table:table-cell table:formula="of:=IF(['file:///G:/Other%20computers/My%20Laptop/Hobby/mmtr/PCBs/LCMTR_01_01/LCMTR_01_01.csv'#$LCMTR_01_01.J13] = &quot;&quot;;&quot;&quot;;['file:///G:/Other%20computers/My%20Laptop/Hobby/mmtr/PCBs/LCMTR_01_01/LCMTR_01_01.csv'#$LCMTR_01_01.J13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3] = &quot;&quot;;&quot;&quot;;['file:///G:/Other%20computers/My%20Laptop/Hobby/mmtr/PCBs/LCMTR_01_01/LCMTR_01_01.csv'#$LCMTR_01_01.K13])" office:value-type="string" office:string-value="https://www.digikey.com/en/products/detail/diodes-incorporated/MMSZ5231B-7-F/755472" calcext:value-type="string">
            <text:p>https://www.digikey.com/en/products/detail/diodes-incorporated/MMSZ5231B-7-F/755472</text:p>
          </table:table-cell>
          <table:table-cell table:style-name="ce2" table:formula="of:=IF(['file:///G:/Other%20computers/My%20Laptop/Hobby/mmtr/PCBs/LCMTR_01_01/LCMTR_01_01.csv'#$LCMTR_01_01.L13] = &quot;&quot;;&quot;&quot;;['file:///G:/Other%20computers/My%20Laptop/Hobby/mmtr/PCBs/LCMTR_01_01/LCMTR_01_01.csv'#$LCMTR_01_01.L13])" office:value-type="string" office:string-value="MMSZ5231B-FDICT-ND" calcext:value-type="string">
            <text:p>MMSZ5231B-FDICT-ND</text:p>
          </table:table-cell>
          <table:table-cell table:formula="of:=IF(['file:///G:/Other%20computers/My%20Laptop/Hobby/mmtr/PCBs/LCMTR_01_01/LCMTR_01_01.csv'#$LCMTR_01_01.M13] = &quot;&quot;;&quot;&quot;;['file:///G:/Other%20computers/My%20Laptop/Hobby/mmtr/PCBs/LCMTR_01_01/LCMTR_01_01.csv'#$LCMTR_01_01.M1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4] = &quot;&quot;;&quot;&quot;;['file:///G:/Other%20computers/My%20Laptop/Hobby/mmtr/PCBs/LCMTR_01_01/LCMTR_01_01.csv'#$LCMTR_01_01.A14])" office:value-type="string" office:string-value="D3" calcext:value-type="string">
            <text:p>D3</text:p>
          </table:table-cell>
          <table:table-cell table:formula="of:=IF(['file:///G:/Other%20computers/My%20Laptop/Hobby/mmtr/PCBs/LCMTR_01_01/LCMTR_01_01.csv'#$LCMTR_01_01.B14] = &quot;&quot;;&quot;&quot;;['file:///G:/Other%20computers/My%20Laptop/Hobby/mmtr/PCBs/LCMTR_01_01/LCMTR_01_01.csv'#$LCMTR_01_01.B14])" office:value-type="string" office:string-value="5.6V" calcext:value-type="string">
            <text:p>5.6V</text:p>
          </table:table-cell>
          <table:table-cell table:formula="of:=IF(['file:///G:/Other%20computers/My%20Laptop/Hobby/mmtr/PCBs/LCMTR_01_01/LCMTR_01_01.csv'#$LCMTR_01_01.C14] = &quot;&quot;;&quot;&quot;;['file:///G:/Other%20computers/My%20Laptop/Hobby/mmtr/PCBs/LCMTR_01_01/LCMTR_01_01.csv'#$LCMTR_01_01.C14])" office:value-type="string" office:string-value="https://www.diodes.com/assets/Datasheets/ds18010.pdf" calcext:value-type="string">
            <text:p>https://www.diodes.com/assets/Datasheets/ds18010.pdf</text:p>
          </table:table-cell>
          <table:table-cell table:formula="of:=IF(['file:///G:/Other%20computers/My%20Laptop/Hobby/mmtr/PCBs/LCMTR_01_01/LCMTR_01_01.csv'#$LCMTR_01_01.D14] = &quot;&quot;;&quot;&quot;;['file:///G:/Other%20computers/My%20Laptop/Hobby/mmtr/PCBs/LCMTR_01_01/LCMTR_01_01.csv'#$LCMTR_01_01.D14])" office:value-type="string" office:string-value="AADuffy:SOD123_MMSZ5231B-7-F" calcext:value-type="string">
            <text:p>AADuffy:SOD123_MMSZ5231B-7-F</text:p>
          </table:table-cell>
          <table:table-cell table:formula="of:=IF(['file:///G:/Other%20computers/My%20Laptop/Hobby/mmtr/PCBs/LCMTR_01_01/LCMTR_01_01.csv'#$LCMTR_01_01.E14] = &quot;&quot;;&quot;&quot;;['file:///G:/Other%20computers/My%20Laptop/Hobby/mmtr/PCBs/LCMTR_01_01/LCMTR_01_01.csv'#$LCMTR_01_01.E14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14] = &quot;&quot;;&quot;&quot;;['file:///G:/Other%20computers/My%20Laptop/Hobby/mmtr/PCBs/LCMTR_01_01/LCMTR_01_01.csv'#$LCMTR_01_01.F14])">
            <text:p/>
          </table:table-cell>
          <table:table-cell table:formula="of:=IF(['file:///G:/Other%20computers/My%20Laptop/Hobby/mmtr/PCBs/LCMTR_01_01/LCMTR_01_01.csv'#$LCMTR_01_01.G14] = &quot;&quot;;&quot;&quot;;['file:///G:/Other%20computers/My%20Laptop/Hobby/mmtr/PCBs/LCMTR_01_01/LCMTR_01_01.csv'#$LCMTR_01_01.G14])" office:value-type="string" office:string-value="13" calcext:value-type="string">
            <text:p>13</text:p>
          </table:table-cell>
          <table:table-cell table:formula="of:=IF(['file:///G:/Other%20computers/My%20Laptop/Hobby/mmtr/PCBs/LCMTR_01_01/LCMTR_01_01.csv'#$LCMTR_01_01.H14] = &quot;&quot;;&quot;&quot;;['file:///G:/Other%20computers/My%20Laptop/Hobby/mmtr/PCBs/LCMTR_01_01/LCMTR_01_01.csv'#$LCMTR_01_01.H14])" office:value-type="string" office:string-value="Diodes Inc" calcext:value-type="string">
            <text:p>Diodes Inc</text:p>
          </table:table-cell>
          <table:table-cell table:style-name="ce2" table:formula="of:=IF(['file:///G:/Other%20computers/My%20Laptop/Hobby/mmtr/PCBs/LCMTR_01_01/LCMTR_01_01.csv'#$LCMTR_01_01.I14] = &quot;&quot;;&quot;&quot;;['file:///G:/Other%20computers/My%20Laptop/Hobby/mmtr/PCBs/LCMTR_01_01/LCMTR_01_01.csv'#$LCMTR_01_01.I14])" office:value-type="string" office:string-value="MMSZ5231B-7-F" calcext:value-type="string">
            <text:p>MMSZ5231B-7-F</text:p>
          </table:table-cell>
          <table:table-cell table:formula="of:=IF(['file:///G:/Other%20computers/My%20Laptop/Hobby/mmtr/PCBs/LCMTR_01_01/LCMTR_01_01.csv'#$LCMTR_01_01.J14] = &quot;&quot;;&quot;&quot;;['file:///G:/Other%20computers/My%20Laptop/Hobby/mmtr/PCBs/LCMTR_01_01/LCMTR_01_01.csv'#$LCMTR_01_01.J14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4] = &quot;&quot;;&quot;&quot;;['file:///G:/Other%20computers/My%20Laptop/Hobby/mmtr/PCBs/LCMTR_01_01/LCMTR_01_01.csv'#$LCMTR_01_01.K14])" office:value-type="string" office:string-value="https://www.digikey.com/en/products/detail/diodes-incorporated/MMSZ5231B-7-F/755472" calcext:value-type="string">
            <text:p>https://www.digikey.com/en/products/detail/diodes-incorporated/MMSZ5231B-7-F/755472</text:p>
          </table:table-cell>
          <table:table-cell table:style-name="ce2" table:formula="of:=IF(['file:///G:/Other%20computers/My%20Laptop/Hobby/mmtr/PCBs/LCMTR_01_01/LCMTR_01_01.csv'#$LCMTR_01_01.L14] = &quot;&quot;;&quot;&quot;;['file:///G:/Other%20computers/My%20Laptop/Hobby/mmtr/PCBs/LCMTR_01_01/LCMTR_01_01.csv'#$LCMTR_01_01.L14])" office:value-type="string" office:string-value="MMSZ5231B-FDICT-ND" calcext:value-type="string">
            <text:p>MMSZ5231B-FDICT-ND</text:p>
          </table:table-cell>
          <table:table-cell table:formula="of:=IF(['file:///G:/Other%20computers/My%20Laptop/Hobby/mmtr/PCBs/LCMTR_01_01/LCMTR_01_01.csv'#$LCMTR_01_01.M14] = &quot;&quot;;&quot;&quot;;['file:///G:/Other%20computers/My%20Laptop/Hobby/mmtr/PCBs/LCMTR_01_01/LCMTR_01_01.csv'#$LCMTR_01_01.M1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5] = &quot;&quot;;&quot;&quot;;['file:///G:/Other%20computers/My%20Laptop/Hobby/mmtr/PCBs/LCMTR_01_01/LCMTR_01_01.csv'#$LCMTR_01_01.A15])" office:value-type="string" office:string-value="Q1,Q3,Q5,Q7,Q8,Q9,Q12,Q13,Q14,Q17,Q20,Q26,Q30,Q37" calcext:value-type="string">
            <text:p>Q1,Q3,Q5,Q7,Q8,Q9,Q12,Q13,Q14,Q17,Q20,Q26,Q30,Q37</text:p>
          </table:table-cell>
          <table:table-cell table:formula="of:=IF(['file:///G:/Other%20computers/My%20Laptop/Hobby/mmtr/PCBs/LCMTR_01_01/LCMTR_01_01.csv'#$LCMTR_01_01.B15] = &quot;&quot;;&quot;&quot;;['file:///G:/Other%20computers/My%20Laptop/Hobby/mmtr/PCBs/LCMTR_01_01/LCMTR_01_01.csv'#$LCMTR_01_01.B15])">
            <text:p/>
          </table:table-cell>
          <table:table-cell table:formula="of:=IF(['file:///G:/Other%20computers/My%20Laptop/Hobby/mmtr/PCBs/LCMTR_01_01/LCMTR_01_01.csv'#$LCMTR_01_01.C15] = &quot;&quot;;&quot;&quot;;['file:///G:/Other%20computers/My%20Laptop/Hobby/mmtr/PCBs/LCMTR_01_01/LCMTR_01_01.csv'#$LCMTR_01_01.C15])" office:value-type="string" office:string-value="https://www.mccsemi.com/pdf/Products/MMBT3904(SOT-23).pdf" calcext:value-type="string">
            <text:p>https://www.mccsemi.com/pdf/Products/MMBT3904(SOT-23).pdf</text:p>
          </table:table-cell>
          <table:table-cell table:formula="of:=IF(['file:///G:/Other%20computers/My%20Laptop/Hobby/mmtr/PCBs/LCMTR_01_01/LCMTR_01_01.csv'#$LCMTR_01_01.D15] = &quot;&quot;;&quot;&quot;;['file:///G:/Other%20computers/My%20Laptop/Hobby/mmtr/PCBs/LCMTR_01_01/LCMTR_01_01.csv'#$LCMTR_01_01.D15])" office:value-type="string" office:string-value="AADuffy:SOT23-3" calcext:value-type="string">
            <text:p>AADuffy:SOT23-3</text:p>
          </table:table-cell>
          <table:table-cell table:formula="of:=IF(['file:///G:/Other%20computers/My%20Laptop/Hobby/mmtr/PCBs/LCMTR_01_01/LCMTR_01_01.csv'#$LCMTR_01_01.E15] = &quot;&quot;;&quot;&quot;;['file:///G:/Other%20computers/My%20Laptop/Hobby/mmtr/PCBs/LCMTR_01_01/LCMTR_01_01.csv'#$LCMTR_01_01.E15])" office:value-type="string" office:string-value="14" calcext:value-type="string">
            <text:p>14</text:p>
          </table:table-cell>
          <table:table-cell table:formula="of:=IF(['file:///G:/Other%20computers/My%20Laptop/Hobby/mmtr/PCBs/LCMTR_01_01/LCMTR_01_01.csv'#$LCMTR_01_01.F15] = &quot;&quot;;&quot;&quot;;['file:///G:/Other%20computers/My%20Laptop/Hobby/mmtr/PCBs/LCMTR_01_01/LCMTR_01_01.csv'#$LCMTR_01_01.F15])">
            <text:p/>
          </table:table-cell>
          <table:table-cell table:formula="of:=IF(['file:///G:/Other%20computers/My%20Laptop/Hobby/mmtr/PCBs/LCMTR_01_01/LCMTR_01_01.csv'#$LCMTR_01_01.G15] = &quot;&quot;;&quot;&quot;;['file:///G:/Other%20computers/My%20Laptop/Hobby/mmtr/PCBs/LCMTR_01_01/LCMTR_01_01.csv'#$LCMTR_01_01.G15])" office:value-type="string" office:string-value="14" calcext:value-type="string">
            <text:p>14</text:p>
          </table:table-cell>
          <table:table-cell table:formula="of:=IF(['file:///G:/Other%20computers/My%20Laptop/Hobby/mmtr/PCBs/LCMTR_01_01/LCMTR_01_01.csv'#$LCMTR_01_01.H15] = &quot;&quot;;&quot;&quot;;['file:///G:/Other%20computers/My%20Laptop/Hobby/mmtr/PCBs/LCMTR_01_01/LCMTR_01_01.csv'#$LCMTR_01_01.H15])" office:value-type="string" office:string-value="Micro Commercial" calcext:value-type="string">
            <text:p>Micro Commercial</text:p>
          </table:table-cell>
          <table:table-cell table:formula="of:=IF(['file:///G:/Other%20computers/My%20Laptop/Hobby/mmtr/PCBs/LCMTR_01_01/LCMTR_01_01.csv'#$LCMTR_01_01.I15] = &quot;&quot;;&quot;&quot;;['file:///G:/Other%20computers/My%20Laptop/Hobby/mmtr/PCBs/LCMTR_01_01/LCMTR_01_01.csv'#$LCMTR_01_01.I15])" office:value-type="string" office:string-value="MMBT3904-TP" calcext:value-type="string">
            <text:p>MMBT3904-TP</text:p>
          </table:table-cell>
          <table:table-cell table:formula="of:=IF(['file:///G:/Other%20computers/My%20Laptop/Hobby/mmtr/PCBs/LCMTR_01_01/LCMTR_01_01.csv'#$LCMTR_01_01.J15] = &quot;&quot;;&quot;&quot;;['file:///G:/Other%20computers/My%20Laptop/Hobby/mmtr/PCBs/LCMTR_01_01/LCMTR_01_01.csv'#$LCMTR_01_01.J15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15] = &quot;&quot;;&quot;&quot;;['file:///G:/Other%20computers/My%20Laptop/Hobby/mmtr/PCBs/LCMTR_01_01/LCMTR_01_01.csv'#$LCMTR_01_01.K15])" office:value-type="string" office:string-value="https://www.digikey.com/en/products/detail/micro-commercial-co/MMBT3904-TP/717280" calcext:value-type="string">
            <text:p>https://www.digikey.com/en/products/detail/micro-commercial-co/MMBT3904-TP/717280</text:p>
          </table:table-cell>
          <table:table-cell table:formula="of:=IF(['file:///G:/Other%20computers/My%20Laptop/Hobby/mmtr/PCBs/LCMTR_01_01/LCMTR_01_01.csv'#$LCMTR_01_01.L15] = &quot;&quot;;&quot;&quot;;['file:///G:/Other%20computers/My%20Laptop/Hobby/mmtr/PCBs/LCMTR_01_01/LCMTR_01_01.csv'#$LCMTR_01_01.L15])" office:value-type="string" office:string-value="MMBT3904TPMSCT-ND" calcext:value-type="string">
            <text:p>MMBT3904TPMSCT-ND</text:p>
          </table:table-cell>
          <table:table-cell table:formula="of:=IF(['file:///G:/Other%20computers/My%20Laptop/Hobby/mmtr/PCBs/LCMTR_01_01/LCMTR_01_01.csv'#$LCMTR_01_01.M15] = &quot;&quot;;&quot;&quot;;['file:///G:/Other%20computers/My%20Laptop/Hobby/mmtr/PCBs/LCMTR_01_01/LCMTR_01_01.csv'#$LCMTR_01_01.M1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6] = &quot;&quot;;&quot;&quot;;['file:///G:/Other%20computers/My%20Laptop/Hobby/mmtr/PCBs/LCMTR_01_01/LCMTR_01_01.csv'#$LCMTR_01_01.A16])" office:value-type="string" office:string-value="Q2,Q4,Q6,Q11,Q15,Q18,Q22,Q24,Q25,Q27,Q29,Q31" calcext:value-type="string">
            <text:p>Q2,Q4,Q6,Q11,Q15,Q18,Q22,Q24,Q25,Q27,Q29,Q31</text:p>
          </table:table-cell>
          <table:table-cell table:formula="of:=IF(['file:///G:/Other%20computers/My%20Laptop/Hobby/mmtr/PCBs/LCMTR_01_01/LCMTR_01_01.csv'#$LCMTR_01_01.B16] = &quot;&quot;;&quot;&quot;;['file:///G:/Other%20computers/My%20Laptop/Hobby/mmtr/PCBs/LCMTR_01_01/LCMTR_01_01.csv'#$LCMTR_01_01.B16])">
            <text:p/>
          </table:table-cell>
          <table:table-cell table:formula="of:=IF(['file:///G:/Other%20computers/My%20Laptop/Hobby/mmtr/PCBs/LCMTR_01_01/LCMTR_01_01.csv'#$LCMTR_01_01.C16] = &quot;&quot;;&quot;&quot;;['file:///G:/Other%20computers/My%20Laptop/Hobby/mmtr/PCBs/LCMTR_01_01/LCMTR_01_01.csv'#$LCMTR_01_01.C16])" office:value-type="string" office:string-value="https://diotec.com/request/datasheet/mmftp84.pdf" calcext:value-type="string">
            <text:p>https://diotec.com/request/datasheet/mmftp84.pdf</text:p>
          </table:table-cell>
          <table:table-cell table:formula="of:=IF(['file:///G:/Other%20computers/My%20Laptop/Hobby/mmtr/PCBs/LCMTR_01_01/LCMTR_01_01.csv'#$LCMTR_01_01.D16] = &quot;&quot;;&quot;&quot;;['file:///G:/Other%20computers/My%20Laptop/Hobby/mmtr/PCBs/LCMTR_01_01/LCMTR_01_01.csv'#$LCMTR_01_01.D16])" office:value-type="string" office:string-value="AADuffy:DMN65D8L-7" calcext:value-type="string">
            <text:p>AADuffy:DMN65D8L-7</text:p>
          </table:table-cell>
          <table:table-cell table:formula="of:=IF(['file:///G:/Other%20computers/My%20Laptop/Hobby/mmtr/PCBs/LCMTR_01_01/LCMTR_01_01.csv'#$LCMTR_01_01.E16] = &quot;&quot;;&quot;&quot;;['file:///G:/Other%20computers/My%20Laptop/Hobby/mmtr/PCBs/LCMTR_01_01/LCMTR_01_01.csv'#$LCMTR_01_01.E16])" office:value-type="string" office:string-value="12" calcext:value-type="string">
            <text:p>12</text:p>
          </table:table-cell>
          <table:table-cell table:formula="of:=IF(['file:///G:/Other%20computers/My%20Laptop/Hobby/mmtr/PCBs/LCMTR_01_01/LCMTR_01_01.csv'#$LCMTR_01_01.F16] = &quot;&quot;;&quot;&quot;;['file:///G:/Other%20computers/My%20Laptop/Hobby/mmtr/PCBs/LCMTR_01_01/LCMTR_01_01.csv'#$LCMTR_01_01.F16])">
            <text:p/>
          </table:table-cell>
          <table:table-cell table:formula="of:=IF(['file:///G:/Other%20computers/My%20Laptop/Hobby/mmtr/PCBs/LCMTR_01_01/LCMTR_01_01.csv'#$LCMTR_01_01.G16] = &quot;&quot;;&quot;&quot;;['file:///G:/Other%20computers/My%20Laptop/Hobby/mmtr/PCBs/LCMTR_01_01/LCMTR_01_01.csv'#$LCMTR_01_01.G16])" office:value-type="string" office:string-value="15" calcext:value-type="string">
            <text:p>15</text:p>
          </table:table-cell>
          <table:table-cell table:formula="of:=IF(['file:///G:/Other%20computers/My%20Laptop/Hobby/mmtr/PCBs/LCMTR_01_01/LCMTR_01_01.csv'#$LCMTR_01_01.H16] = &quot;&quot;;&quot;&quot;;['file:///G:/Other%20computers/My%20Laptop/Hobby/mmtr/PCBs/LCMTR_01_01/LCMTR_01_01.csv'#$LCMTR_01_01.H16])" office:value-type="string" office:string-value="Diotec" calcext:value-type="string">
            <text:p>Diotec</text:p>
          </table:table-cell>
          <table:table-cell table:style-name="ce2" table:formula="of:=IF(['file:///G:/Other%20computers/My%20Laptop/Hobby/mmtr/PCBs/LCMTR_01_01/LCMTR_01_01.csv'#$LCMTR_01_01.I16] = &quot;&quot;;&quot;&quot;;['file:///G:/Other%20computers/My%20Laptop/Hobby/mmtr/PCBs/LCMTR_01_01/LCMTR_01_01.csv'#$LCMTR_01_01.I16])" office:value-type="string" office:string-value="MMFTP84" calcext:value-type="string">
            <text:p>MMFTP84</text:p>
          </table:table-cell>
          <table:table-cell table:formula="of:=IF(['file:///G:/Other%20computers/My%20Laptop/Hobby/mmtr/PCBs/LCMTR_01_01/LCMTR_01_01.csv'#$LCMTR_01_01.J16] = &quot;&quot;;&quot;&quot;;['file:///G:/Other%20computers/My%20Laptop/Hobby/mmtr/PCBs/LCMTR_01_01/LCMTR_01_01.csv'#$LCMTR_01_01.J16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6] = &quot;&quot;;&quot;&quot;;['file:///G:/Other%20computers/My%20Laptop/Hobby/mmtr/PCBs/LCMTR_01_01/LCMTR_01_01.csv'#$LCMTR_01_01.K16])" office:value-type="string" office:string-value="https://www.digikey.com/en/products/detail/diotec-semiconductor/MMFTP84/13154778" calcext:value-type="string">
            <text:p>https://www.digikey.com/en/products/detail/diotec-semiconductor/MMFTP84/13154778</text:p>
          </table:table-cell>
          <table:table-cell table:style-name="ce2" table:formula="of:=IF(['file:///G:/Other%20computers/My%20Laptop/Hobby/mmtr/PCBs/LCMTR_01_01/LCMTR_01_01.csv'#$LCMTR_01_01.L16] = &quot;&quot;;&quot;&quot;;['file:///G:/Other%20computers/My%20Laptop/Hobby/mmtr/PCBs/LCMTR_01_01/LCMTR_01_01.csv'#$LCMTR_01_01.L16])" office:value-type="string" office:string-value="4878-MMFTP84CT-ND" calcext:value-type="string">
            <text:p>4878-MMFTP84CT-ND</text:p>
          </table:table-cell>
          <table:table-cell table:formula="of:=IF(['file:///G:/Other%20computers/My%20Laptop/Hobby/mmtr/PCBs/LCMTR_01_01/LCMTR_01_01.csv'#$LCMTR_01_01.M16] = &quot;&quot;;&quot;&quot;;['file:///G:/Other%20computers/My%20Laptop/Hobby/mmtr/PCBs/LCMTR_01_01/LCMTR_01_01.csv'#$LCMTR_01_01.M1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7] = &quot;&quot;;&quot;&quot;;['file:///G:/Other%20computers/My%20Laptop/Hobby/mmtr/PCBs/LCMTR_01_01/LCMTR_01_01.csv'#$LCMTR_01_01.A17])" office:value-type="string" office:string-value="Q16,Q19,Q21,Q23" calcext:value-type="string">
            <text:p>Q16,Q19,Q21,Q23</text:p>
          </table:table-cell>
          <table:table-cell table:formula="of:=IF(['file:///G:/Other%20computers/My%20Laptop/Hobby/mmtr/PCBs/LCMTR_01_01/LCMTR_01_01.csv'#$LCMTR_01_01.B17] = &quot;&quot;;&quot;&quot;;['file:///G:/Other%20computers/My%20Laptop/Hobby/mmtr/PCBs/LCMTR_01_01/LCMTR_01_01.csv'#$LCMTR_01_01.B17])">
            <text:p/>
          </table:table-cell>
          <table:table-cell table:formula="of:=IF(['file:///G:/Other%20computers/My%20Laptop/Hobby/mmtr/PCBs/LCMTR_01_01/LCMTR_01_01.csv'#$LCMTR_01_01.C17] = &quot;&quot;;&quot;&quot;;['file:///G:/Other%20computers/My%20Laptop/Hobby/mmtr/PCBs/LCMTR_01_01/LCMTR_01_01.csv'#$LCMTR_01_01.C17])" office:value-type="string" office:string-value="https://www.diodes.com/assets/Datasheets/DMN65D8L.pdf" calcext:value-type="string">
            <text:p>https://www.diodes.com/assets/Datasheets/DMN65D8L.pdf</text:p>
          </table:table-cell>
          <table:table-cell table:formula="of:=IF(['file:///G:/Other%20computers/My%20Laptop/Hobby/mmtr/PCBs/LCMTR_01_01/LCMTR_01_01.csv'#$LCMTR_01_01.D17] = &quot;&quot;;&quot;&quot;;['file:///G:/Other%20computers/My%20Laptop/Hobby/mmtr/PCBs/LCMTR_01_01/LCMTR_01_01.csv'#$LCMTR_01_01.D17])" office:value-type="string" office:string-value="AADuffy:DMN65D8L-7" calcext:value-type="string">
            <text:p>AADuffy:DMN65D8L-7</text:p>
          </table:table-cell>
          <table:table-cell table:formula="of:=IF(['file:///G:/Other%20computers/My%20Laptop/Hobby/mmtr/PCBs/LCMTR_01_01/LCMTR_01_01.csv'#$LCMTR_01_01.E17] = &quot;&quot;;&quot;&quot;;['file:///G:/Other%20computers/My%20Laptop/Hobby/mmtr/PCBs/LCMTR_01_01/LCMTR_01_01.csv'#$LCMTR_01_01.E17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17] = &quot;&quot;;&quot;&quot;;['file:///G:/Other%20computers/My%20Laptop/Hobby/mmtr/PCBs/LCMTR_01_01/LCMTR_01_01.csv'#$LCMTR_01_01.F17])">
            <text:p/>
          </table:table-cell>
          <table:table-cell table:formula="of:=IF(['file:///G:/Other%20computers/My%20Laptop/Hobby/mmtr/PCBs/LCMTR_01_01/LCMTR_01_01.csv'#$LCMTR_01_01.G17] = &quot;&quot;;&quot;&quot;;['file:///G:/Other%20computers/My%20Laptop/Hobby/mmtr/PCBs/LCMTR_01_01/LCMTR_01_01.csv'#$LCMTR_01_01.G17])" office:value-type="string" office:string-value="16" calcext:value-type="string">
            <text:p>16</text:p>
          </table:table-cell>
          <table:table-cell table:formula="of:=IF(['file:///G:/Other%20computers/My%20Laptop/Hobby/mmtr/PCBs/LCMTR_01_01/LCMTR_01_01.csv'#$LCMTR_01_01.H17] = &quot;&quot;;&quot;&quot;;['file:///G:/Other%20computers/My%20Laptop/Hobby/mmtr/PCBs/LCMTR_01_01/LCMTR_01_01.csv'#$LCMTR_01_01.H17])" office:value-type="string" office:string-value="Diodes Incorporated" calcext:value-type="string">
            <text:p>Diodes Incorporated</text:p>
          </table:table-cell>
          <table:table-cell table:style-name="ce2" table:formula="of:=IF(['file:///G:/Other%20computers/My%20Laptop/Hobby/mmtr/PCBs/LCMTR_01_01/LCMTR_01_01.csv'#$LCMTR_01_01.I17] = &quot;&quot;;&quot;&quot;;['file:///G:/Other%20computers/My%20Laptop/Hobby/mmtr/PCBs/LCMTR_01_01/LCMTR_01_01.csv'#$LCMTR_01_01.I17])" office:value-type="string" office:string-value="DMN65D8L-7" calcext:value-type="string">
            <text:p>DMN65D8L-7</text:p>
          </table:table-cell>
          <table:table-cell table:formula="of:=IF(['file:///G:/Other%20computers/My%20Laptop/Hobby/mmtr/PCBs/LCMTR_01_01/LCMTR_01_01.csv'#$LCMTR_01_01.J17] = &quot;&quot;;&quot;&quot;;['file:///G:/Other%20computers/My%20Laptop/Hobby/mmtr/PCBs/LCMTR_01_01/LCMTR_01_01.csv'#$LCMTR_01_01.J17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7] = &quot;&quot;;&quot;&quot;;['file:///G:/Other%20computers/My%20Laptop/Hobby/mmtr/PCBs/LCMTR_01_01/LCMTR_01_01.csv'#$LCMTR_01_01.K17])" office:value-type="string" office:string-value="https://www.digikey.com/en/products/detail/diodes-incorporated/DMN65D8L-7/3678136" calcext:value-type="string">
            <text:p>https://www.digikey.com/en/products/detail/diodes-incorporated/DMN65D8L-7/3678136</text:p>
          </table:table-cell>
          <table:table-cell table:style-name="ce2" table:formula="of:=IF(['file:///G:/Other%20computers/My%20Laptop/Hobby/mmtr/PCBs/LCMTR_01_01/LCMTR_01_01.csv'#$LCMTR_01_01.L17] = &quot;&quot;;&quot;&quot;;['file:///G:/Other%20computers/My%20Laptop/Hobby/mmtr/PCBs/LCMTR_01_01/LCMTR_01_01.csv'#$LCMTR_01_01.L17])" office:value-type="string" office:string-value="DMN65D8L-7DICT-ND" calcext:value-type="string">
            <text:p>DMN65D8L-7DICT-ND</text:p>
          </table:table-cell>
          <table:table-cell table:formula="of:=IF(['file:///G:/Other%20computers/My%20Laptop/Hobby/mmtr/PCBs/LCMTR_01_01/LCMTR_01_01.csv'#$LCMTR_01_01.M17] = &quot;&quot;;&quot;&quot;;['file:///G:/Other%20computers/My%20Laptop/Hobby/mmtr/PCBs/LCMTR_01_01/LCMTR_01_01.csv'#$LCMTR_01_01.M1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8] = &quot;&quot;;&quot;&quot;;['file:///G:/Other%20computers/My%20Laptop/Hobby/mmtr/PCBs/LCMTR_01_01/LCMTR_01_01.csv'#$LCMTR_01_01.A18])" office:value-type="string" office:string-value="R1,R11,R17,R26,R34,R39,R45,R49,R50,R52,R53,R71,R72,R95,R96,R97" calcext:value-type="string">
            <text:p>R1,R11,R17,R26,R34,R39,R45,R49,R50,R52,R53,R71,R72,R95,R96,R97</text:p>
          </table:table-cell>
          <table:table-cell table:formula="of:=IF(['file:///G:/Other%20computers/My%20Laptop/Hobby/mmtr/PCBs/LCMTR_01_01/LCMTR_01_01.csv'#$LCMTR_01_01.B18] = &quot;&quot;;&quot;&quot;;['file:///G:/Other%20computers/My%20Laptop/Hobby/mmtr/PCBs/LCMTR_01_01/LCMTR_01_01.csv'#$LCMTR_01_01.B18])" office:value-type="string" office:string-value="100K" calcext:value-type="string">
            <text:p>100K</text:p>
          </table:table-cell>
          <table:table-cell table:style-name="ce2" table:formula="of:=IF(['file:///G:/Other%20computers/My%20Laptop/Hobby/mmtr/PCBs/LCMTR_01_01/LCMTR_01_01.csv'#$LCMTR_01_01.C18] = &quot;&quot;;&quot;&quot;;['file:///G:/Other%20computers/My%20Laptop/Hobby/mmtr/PCBs/LCMTR_01_01/LCMTR_01_01.csv'#$LCMTR_01_01.C18])">
            <text:p/>
          </table:table-cell>
          <table:table-cell table:formula="of:=IF(['file:///G:/Other%20computers/My%20Laptop/Hobby/mmtr/PCBs/LCMTR_01_01/LCMTR_01_01.csv'#$LCMTR_01_01.D18] = &quot;&quot;;&quot;&quot;;['file:///G:/Other%20computers/My%20Laptop/Hobby/mmtr/PCBs/LCMTR_01_01/LCMTR_01_01.csv'#$LCMTR_01_01.D18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18] = &quot;&quot;;&quot;&quot;;['file:///G:/Other%20computers/My%20Laptop/Hobby/mmtr/PCBs/LCMTR_01_01/LCMTR_01_01.csv'#$LCMTR_01_01.E18])" office:value-type="string" office:string-value="16" calcext:value-type="string">
            <text:p>16</text:p>
          </table:table-cell>
          <table:table-cell table:formula="of:=IF(['file:///G:/Other%20computers/My%20Laptop/Hobby/mmtr/PCBs/LCMTR_01_01/LCMTR_01_01.csv'#$LCMTR_01_01.F18] = &quot;&quot;;&quot;&quot;;['file:///G:/Other%20computers/My%20Laptop/Hobby/mmtr/PCBs/LCMTR_01_01/LCMTR_01_01.csv'#$LCMTR_01_01.F18])">
            <text:p/>
          </table:table-cell>
          <table:table-cell table:formula="of:=IF(['file:///G:/Other%20computers/My%20Laptop/Hobby/mmtr/PCBs/LCMTR_01_01/LCMTR_01_01.csv'#$LCMTR_01_01.G18] = &quot;&quot;;&quot;&quot;;['file:///G:/Other%20computers/My%20Laptop/Hobby/mmtr/PCBs/LCMTR_01_01/LCMTR_01_01.csv'#$LCMTR_01_01.G18])" office:value-type="string" office:string-value="17" calcext:value-type="string">
            <text:p>17</text:p>
          </table:table-cell>
          <table:table-cell table:formula="of:=IF(['file:///G:/Other%20computers/My%20Laptop/Hobby/mmtr/PCBs/LCMTR_01_01/LCMTR_01_01.csv'#$LCMTR_01_01.H18] = &quot;&quot;;&quot;&quot;;['file:///G:/Other%20computers/My%20Laptop/Hobby/mmtr/PCBs/LCMTR_01_01/LCMTR_01_01.csv'#$LCMTR_01_01.H18])">
            <text:p/>
          </table:table-cell>
          <table:table-cell table:style-name="ce2" table:formula="of:=IF(['file:///G:/Other%20computers/My%20Laptop/Hobby/mmtr/PCBs/LCMTR_01_01/LCMTR_01_01.csv'#$LCMTR_01_01.I18] = &quot;&quot;;&quot;&quot;;['file:///G:/Other%20computers/My%20Laptop/Hobby/mmtr/PCBs/LCMTR_01_01/LCMTR_01_01.csv'#$LCMTR_01_01.I18])">
            <text:p/>
          </table:table-cell>
          <table:table-cell table:formula="of:=IF(['file:///G:/Other%20computers/My%20Laptop/Hobby/mmtr/PCBs/LCMTR_01_01/LCMTR_01_01.csv'#$LCMTR_01_01.J18] = &quot;&quot;;&quot;&quot;;['file:///G:/Other%20computers/My%20Laptop/Hobby/mmtr/PCBs/LCMTR_01_01/LCMTR_01_01.csv'#$LCMTR_01_01.J18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18] = &quot;&quot;;&quot;&quot;;['file:///G:/Other%20computers/My%20Laptop/Hobby/mmtr/PCBs/LCMTR_01_01/LCMTR_01_01.csv'#$LCMTR_01_01.K18])">
            <text:p/>
          </table:table-cell>
          <table:table-cell table:style-name="ce2" table:formula="of:=IF(['file:///G:/Other%20computers/My%20Laptop/Hobby/mmtr/PCBs/LCMTR_01_01/LCMTR_01_01.csv'#$LCMTR_01_01.L18] = &quot;&quot;;&quot;&quot;;['file:///G:/Other%20computers/My%20Laptop/Hobby/mmtr/PCBs/LCMTR_01_01/LCMTR_01_01.csv'#$LCMTR_01_01.L18])">
            <text:p/>
          </table:table-cell>
          <table:table-cell table:formula="of:=IF(['file:///G:/Other%20computers/My%20Laptop/Hobby/mmtr/PCBs/LCMTR_01_01/LCMTR_01_01.csv'#$LCMTR_01_01.M18] = &quot;&quot;;&quot;&quot;;['file:///G:/Other%20computers/My%20Laptop/Hobby/mmtr/PCBs/LCMTR_01_01/LCMTR_01_01.csv'#$LCMTR_01_01.M1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19] = &quot;&quot;;&quot;&quot;;['file:///G:/Other%20computers/My%20Laptop/Hobby/mmtr/PCBs/LCMTR_01_01/LCMTR_01_01.csv'#$LCMTR_01_01.A19])" office:value-type="string" office:string-value="R2,R13,R20,R27,R35,R36,R47,R54,R68,R69,R70,R73,R74" calcext:value-type="string">
            <text:p>R2,R13,R20,R27,R35,R36,R47,R54,R68,R69,R70,R73,R74</text:p>
          </table:table-cell>
          <table:table-cell table:formula="of:=IF(['file:///G:/Other%20computers/My%20Laptop/Hobby/mmtr/PCBs/LCMTR_01_01/LCMTR_01_01.csv'#$LCMTR_01_01.B19] = &quot;&quot;;&quot;&quot;;['file:///G:/Other%20computers/My%20Laptop/Hobby/mmtr/PCBs/LCMTR_01_01/LCMTR_01_01.csv'#$LCMTR_01_01.B19])" office:value-type="string" office:string-value="330K" calcext:value-type="string">
            <text:p>330K</text:p>
          </table:table-cell>
          <table:table-cell table:formula="of:=IF(['file:///G:/Other%20computers/My%20Laptop/Hobby/mmtr/PCBs/LCMTR_01_01/LCMTR_01_01.csv'#$LCMTR_01_01.C19] = &quot;&quot;;&quot;&quot;;['file:///G:/Other%20computers/My%20Laptop/Hobby/mmtr/PCBs/LCMTR_01_01/LCMTR_01_01.csv'#$LCMTR_01_01.C19])">
            <text:p/>
          </table:table-cell>
          <table:table-cell table:formula="of:=IF(['file:///G:/Other%20computers/My%20Laptop/Hobby/mmtr/PCBs/LCMTR_01_01/LCMTR_01_01.csv'#$LCMTR_01_01.D19] = &quot;&quot;;&quot;&quot;;['file:///G:/Other%20computers/My%20Laptop/Hobby/mmtr/PCBs/LCMTR_01_01/LCMTR_01_01.csv'#$LCMTR_01_01.D19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19] = &quot;&quot;;&quot;&quot;;['file:///G:/Other%20computers/My%20Laptop/Hobby/mmtr/PCBs/LCMTR_01_01/LCMTR_01_01.csv'#$LCMTR_01_01.E19])" office:value-type="string" office:string-value="13" calcext:value-type="string">
            <text:p>13</text:p>
          </table:table-cell>
          <table:table-cell table:formula="of:=IF(['file:///G:/Other%20computers/My%20Laptop/Hobby/mmtr/PCBs/LCMTR_01_01/LCMTR_01_01.csv'#$LCMTR_01_01.F19] = &quot;&quot;;&quot;&quot;;['file:///G:/Other%20computers/My%20Laptop/Hobby/mmtr/PCBs/LCMTR_01_01/LCMTR_01_01.csv'#$LCMTR_01_01.F19])">
            <text:p/>
          </table:table-cell>
          <table:table-cell table:formula="of:=IF(['file:///G:/Other%20computers/My%20Laptop/Hobby/mmtr/PCBs/LCMTR_01_01/LCMTR_01_01.csv'#$LCMTR_01_01.G19] = &quot;&quot;;&quot;&quot;;['file:///G:/Other%20computers/My%20Laptop/Hobby/mmtr/PCBs/LCMTR_01_01/LCMTR_01_01.csv'#$LCMTR_01_01.G19])" office:value-type="string" office:string-value="18" calcext:value-type="string">
            <text:p>18</text:p>
          </table:table-cell>
          <table:table-cell table:formula="of:=IF(['file:///G:/Other%20computers/My%20Laptop/Hobby/mmtr/PCBs/LCMTR_01_01/LCMTR_01_01.csv'#$LCMTR_01_01.H19] = &quot;&quot;;&quot;&quot;;['file:///G:/Other%20computers/My%20Laptop/Hobby/mmtr/PCBs/LCMTR_01_01/LCMTR_01_01.csv'#$LCMTR_01_01.H19])">
            <text:p/>
          </table:table-cell>
          <table:table-cell table:formula="of:=IF(['file:///G:/Other%20computers/My%20Laptop/Hobby/mmtr/PCBs/LCMTR_01_01/LCMTR_01_01.csv'#$LCMTR_01_01.I19] = &quot;&quot;;&quot;&quot;;['file:///G:/Other%20computers/My%20Laptop/Hobby/mmtr/PCBs/LCMTR_01_01/LCMTR_01_01.csv'#$LCMTR_01_01.I19])">
            <text:p/>
          </table:table-cell>
          <table:table-cell table:formula="of:=IF(['file:///G:/Other%20computers/My%20Laptop/Hobby/mmtr/PCBs/LCMTR_01_01/LCMTR_01_01.csv'#$LCMTR_01_01.J19] = &quot;&quot;;&quot;&quot;;['file:///G:/Other%20computers/My%20Laptop/Hobby/mmtr/PCBs/LCMTR_01_01/LCMTR_01_01.csv'#$LCMTR_01_01.J19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19] = &quot;&quot;;&quot;&quot;;['file:///G:/Other%20computers/My%20Laptop/Hobby/mmtr/PCBs/LCMTR_01_01/LCMTR_01_01.csv'#$LCMTR_01_01.K19])">
            <text:p/>
          </table:table-cell>
          <table:table-cell table:formula="of:=IF(['file:///G:/Other%20computers/My%20Laptop/Hobby/mmtr/PCBs/LCMTR_01_01/LCMTR_01_01.csv'#$LCMTR_01_01.L19] = &quot;&quot;;&quot;&quot;;['file:///G:/Other%20computers/My%20Laptop/Hobby/mmtr/PCBs/LCMTR_01_01/LCMTR_01_01.csv'#$LCMTR_01_01.L19])">
            <text:p/>
          </table:table-cell>
          <table:table-cell table:formula="of:=IF(['file:///G:/Other%20computers/My%20Laptop/Hobby/mmtr/PCBs/LCMTR_01_01/LCMTR_01_01.csv'#$LCMTR_01_01.M19] = &quot;&quot;;&quot;&quot;;['file:///G:/Other%20computers/My%20Laptop/Hobby/mmtr/PCBs/LCMTR_01_01/LCMTR_01_01.csv'#$LCMTR_01_01.M19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0] = &quot;&quot;;&quot;&quot;;['file:///G:/Other%20computers/My%20Laptop/Hobby/mmtr/PCBs/LCMTR_01_01/LCMTR_01_01.csv'#$LCMTR_01_01.A20])" office:value-type="string" office:string-value="R14,R33,R42,R55,R80,R83,R86,R88,R109" calcext:value-type="string">
            <text:p>R14,R33,R42,R55,R80,R83,R86,R88,R109</text:p>
          </table:table-cell>
          <table:table-cell table:formula="of:=IF(['file:///G:/Other%20computers/My%20Laptop/Hobby/mmtr/PCBs/LCMTR_01_01/LCMTR_01_01.csv'#$LCMTR_01_01.B20] = &quot;&quot;;&quot;&quot;;['file:///G:/Other%20computers/My%20Laptop/Hobby/mmtr/PCBs/LCMTR_01_01/LCMTR_01_01.csv'#$LCMTR_01_01.B20])" office:value-type="string" office:string-value="1K" calcext:value-type="string">
            <text:p>1K</text:p>
          </table:table-cell>
          <table:table-cell table:formula="of:=IF(['file:///G:/Other%20computers/My%20Laptop/Hobby/mmtr/PCBs/LCMTR_01_01/LCMTR_01_01.csv'#$LCMTR_01_01.C20] = &quot;&quot;;&quot;&quot;;['file:///G:/Other%20computers/My%20Laptop/Hobby/mmtr/PCBs/LCMTR_01_01/LCMTR_01_01.csv'#$LCMTR_01_01.C20])">
            <text:p/>
          </table:table-cell>
          <table:table-cell table:formula="of:=IF(['file:///G:/Other%20computers/My%20Laptop/Hobby/mmtr/PCBs/LCMTR_01_01/LCMTR_01_01.csv'#$LCMTR_01_01.D20] = &quot;&quot;;&quot;&quot;;['file:///G:/Other%20computers/My%20Laptop/Hobby/mmtr/PCBs/LCMTR_01_01/LCMTR_01_01.csv'#$LCMTR_01_01.D20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0] = &quot;&quot;;&quot;&quot;;['file:///G:/Other%20computers/My%20Laptop/Hobby/mmtr/PCBs/LCMTR_01_01/LCMTR_01_01.csv'#$LCMTR_01_01.E20])" office:value-type="string" office:string-value="9" calcext:value-type="string">
            <text:p>9</text:p>
          </table:table-cell>
          <table:table-cell table:formula="of:=IF(['file:///G:/Other%20computers/My%20Laptop/Hobby/mmtr/PCBs/LCMTR_01_01/LCMTR_01_01.csv'#$LCMTR_01_01.F20] = &quot;&quot;;&quot;&quot;;['file:///G:/Other%20computers/My%20Laptop/Hobby/mmtr/PCBs/LCMTR_01_01/LCMTR_01_01.csv'#$LCMTR_01_01.F20])">
            <text:p/>
          </table:table-cell>
          <table:table-cell table:formula="of:=IF(['file:///G:/Other%20computers/My%20Laptop/Hobby/mmtr/PCBs/LCMTR_01_01/LCMTR_01_01.csv'#$LCMTR_01_01.G20] = &quot;&quot;;&quot;&quot;;['file:///G:/Other%20computers/My%20Laptop/Hobby/mmtr/PCBs/LCMTR_01_01/LCMTR_01_01.csv'#$LCMTR_01_01.G20])" office:value-type="string" office:string-value="19" calcext:value-type="string">
            <text:p>19</text:p>
          </table:table-cell>
          <table:table-cell table:formula="of:=IF(['file:///G:/Other%20computers/My%20Laptop/Hobby/mmtr/PCBs/LCMTR_01_01/LCMTR_01_01.csv'#$LCMTR_01_01.H20] = &quot;&quot;;&quot;&quot;;['file:///G:/Other%20computers/My%20Laptop/Hobby/mmtr/PCBs/LCMTR_01_01/LCMTR_01_01.csv'#$LCMTR_01_01.H20])">
            <text:p/>
          </table:table-cell>
          <table:table-cell table:style-name="ce2" table:formula="of:=IF(['file:///G:/Other%20computers/My%20Laptop/Hobby/mmtr/PCBs/LCMTR_01_01/LCMTR_01_01.csv'#$LCMTR_01_01.I20] = &quot;&quot;;&quot;&quot;;['file:///G:/Other%20computers/My%20Laptop/Hobby/mmtr/PCBs/LCMTR_01_01/LCMTR_01_01.csv'#$LCMTR_01_01.I20])">
            <text:p/>
          </table:table-cell>
          <table:table-cell table:formula="of:=IF(['file:///G:/Other%20computers/My%20Laptop/Hobby/mmtr/PCBs/LCMTR_01_01/LCMTR_01_01.csv'#$LCMTR_01_01.J20] = &quot;&quot;;&quot;&quot;;['file:///G:/Other%20computers/My%20Laptop/Hobby/mmtr/PCBs/LCMTR_01_01/LCMTR_01_01.csv'#$LCMTR_01_01.J20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0] = &quot;&quot;;&quot;&quot;;['file:///G:/Other%20computers/My%20Laptop/Hobby/mmtr/PCBs/LCMTR_01_01/LCMTR_01_01.csv'#$LCMTR_01_01.K20])">
            <text:p/>
          </table:table-cell>
          <table:table-cell table:formula="of:=IF(['file:///G:/Other%20computers/My%20Laptop/Hobby/mmtr/PCBs/LCMTR_01_01/LCMTR_01_01.csv'#$LCMTR_01_01.L20] = &quot;&quot;;&quot;&quot;;['file:///G:/Other%20computers/My%20Laptop/Hobby/mmtr/PCBs/LCMTR_01_01/LCMTR_01_01.csv'#$LCMTR_01_01.L20])">
            <text:p/>
          </table:table-cell>
          <table:table-cell table:formula="of:=IF(['file:///G:/Other%20computers/My%20Laptop/Hobby/mmtr/PCBs/LCMTR_01_01/LCMTR_01_01.csv'#$LCMTR_01_01.M20] = &quot;&quot;;&quot;&quot;;['file:///G:/Other%20computers/My%20Laptop/Hobby/mmtr/PCBs/LCMTR_01_01/LCMTR_01_01.csv'#$LCMTR_01_01.M20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1] = &quot;&quot;;&quot;&quot;;['file:///G:/Other%20computers/My%20Laptop/Hobby/mmtr/PCBs/LCMTR_01_01/LCMTR_01_01.csv'#$LCMTR_01_01.A21])" office:value-type="string" office:string-value="R16" calcext:value-type="string">
            <text:p>R16</text:p>
          </table:table-cell>
          <table:table-cell table:formula="of:=IF(['file:///G:/Other%20computers/My%20Laptop/Hobby/mmtr/PCBs/LCMTR_01_01/LCMTR_01_01.csv'#$LCMTR_01_01.B21] = &quot;&quot;;&quot;&quot;;['file:///G:/Other%20computers/My%20Laptop/Hobby/mmtr/PCBs/LCMTR_01_01/LCMTR_01_01.csv'#$LCMTR_01_01.B21])" office:value-type="string" office:string-value="100K" calcext:value-type="string">
            <text:p>100K</text:p>
          </table:table-cell>
          <table:table-cell table:formula="of:=IF(['file:///G:/Other%20computers/My%20Laptop/Hobby/mmtr/PCBs/LCMTR_01_01/LCMTR_01_01.csv'#$LCMTR_01_01.C21] = &quot;&quot;;&quot;&quot;;['file:///G:/Other%20computers/My%20Laptop/Hobby/mmtr/PCBs/LCMTR_01_01/LCMTR_01_01.csv'#$LCMTR_01_01.C21])">
            <text:p/>
          </table:table-cell>
          <table:table-cell table:formula="of:=IF(['file:///G:/Other%20computers/My%20Laptop/Hobby/mmtr/PCBs/LCMTR_01_01/LCMTR_01_01.csv'#$LCMTR_01_01.D21] = &quot;&quot;;&quot;&quot;;['file:///G:/Other%20computers/My%20Laptop/Hobby/mmtr/PCBs/LCMTR_01_01/LCMTR_01_01.csv'#$LCMTR_01_01.D21])" office:value-type="string" office:string-value="AADuffy:Resistor_1206_ThinEnds" calcext:value-type="string">
            <text:p>AADuffy:Resistor_1206_ThinEnds</text:p>
          </table:table-cell>
          <table:table-cell table:formula="of:=IF(['file:///G:/Other%20computers/My%20Laptop/Hobby/mmtr/PCBs/LCMTR_01_01/LCMTR_01_01.csv'#$LCMTR_01_01.E21] = &quot;&quot;;&quot;&quot;;['file:///G:/Other%20computers/My%20Laptop/Hobby/mmtr/PCBs/LCMTR_01_01/LCMTR_01_01.csv'#$LCMTR_01_01.E21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21] = &quot;&quot;;&quot;&quot;;['file:///G:/Other%20computers/My%20Laptop/Hobby/mmtr/PCBs/LCMTR_01_01/LCMTR_01_01.csv'#$LCMTR_01_01.F21])">
            <text:p/>
          </table:table-cell>
          <table:table-cell table:formula="of:=IF(['file:///G:/Other%20computers/My%20Laptop/Hobby/mmtr/PCBs/LCMTR_01_01/LCMTR_01_01.csv'#$LCMTR_01_01.G21] = &quot;&quot;;&quot;&quot;;['file:///G:/Other%20computers/My%20Laptop/Hobby/mmtr/PCBs/LCMTR_01_01/LCMTR_01_01.csv'#$LCMTR_01_01.G21])" office:value-type="string" office:string-value="20" calcext:value-type="string">
            <text:p>20</text:p>
          </table:table-cell>
          <table:table-cell table:formula="of:=IF(['file:///G:/Other%20computers/My%20Laptop/Hobby/mmtr/PCBs/LCMTR_01_01/LCMTR_01_01.csv'#$LCMTR_01_01.H21] = &quot;&quot;;&quot;&quot;;['file:///G:/Other%20computers/My%20Laptop/Hobby/mmtr/PCBs/LCMTR_01_01/LCMTR_01_01.csv'#$LCMTR_01_01.H21])">
            <text:p/>
          </table:table-cell>
          <table:table-cell table:formula="of:=IF(['file:///G:/Other%20computers/My%20Laptop/Hobby/mmtr/PCBs/LCMTR_01_01/LCMTR_01_01.csv'#$LCMTR_01_01.I21] = &quot;&quot;;&quot;&quot;;['file:///G:/Other%20computers/My%20Laptop/Hobby/mmtr/PCBs/LCMTR_01_01/LCMTR_01_01.csv'#$LCMTR_01_01.I21])">
            <text:p/>
          </table:table-cell>
          <table:table-cell table:formula="of:=IF(['file:///G:/Other%20computers/My%20Laptop/Hobby/mmtr/PCBs/LCMTR_01_01/LCMTR_01_01.csv'#$LCMTR_01_01.J21] = &quot;&quot;;&quot;&quot;;['file:///G:/Other%20computers/My%20Laptop/Hobby/mmtr/PCBs/LCMTR_01_01/LCMTR_01_01.csv'#$LCMTR_01_01.J21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1] = &quot;&quot;;&quot;&quot;;['file:///G:/Other%20computers/My%20Laptop/Hobby/mmtr/PCBs/LCMTR_01_01/LCMTR_01_01.csv'#$LCMTR_01_01.K21])">
            <text:p/>
          </table:table-cell>
          <table:table-cell table:formula="of:=IF(['file:///G:/Other%20computers/My%20Laptop/Hobby/mmtr/PCBs/LCMTR_01_01/LCMTR_01_01.csv'#$LCMTR_01_01.L21] = &quot;&quot;;&quot;&quot;;['file:///G:/Other%20computers/My%20Laptop/Hobby/mmtr/PCBs/LCMTR_01_01/LCMTR_01_01.csv'#$LCMTR_01_01.L21])">
            <text:p/>
          </table:table-cell>
          <table:table-cell table:formula="of:=IF(['file:///G:/Other%20computers/My%20Laptop/Hobby/mmtr/PCBs/LCMTR_01_01/LCMTR_01_01.csv'#$LCMTR_01_01.M21] = &quot;&quot;;&quot;&quot;;['file:///G:/Other%20computers/My%20Laptop/Hobby/mmtr/PCBs/LCMTR_01_01/LCMTR_01_01.csv'#$LCMTR_01_01.M21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2] = &quot;&quot;;&quot;&quot;;['file:///G:/Other%20computers/My%20Laptop/Hobby/mmtr/PCBs/LCMTR_01_01/LCMTR_01_01.csv'#$LCMTR_01_01.A22])" office:value-type="string" office:string-value="R18" calcext:value-type="string">
            <text:p>R18</text:p>
          </table:table-cell>
          <table:table-cell table:formula="of:=IF(['file:///G:/Other%20computers/My%20Laptop/Hobby/mmtr/PCBs/LCMTR_01_01/LCMTR_01_01.csv'#$LCMTR_01_01.B22] = &quot;&quot;;&quot;&quot;;['file:///G:/Other%20computers/My%20Laptop/Hobby/mmtr/PCBs/LCMTR_01_01/LCMTR_01_01.csv'#$LCMTR_01_01.B22])" office:value-type="string" office:string-value="470" calcext:value-type="string">
            <text:p>470</text:p>
          </table:table-cell>
          <table:table-cell table:formula="of:=IF(['file:///G:/Other%20computers/My%20Laptop/Hobby/mmtr/PCBs/LCMTR_01_01/LCMTR_01_01.csv'#$LCMTR_01_01.C22] = &quot;&quot;;&quot;&quot;;['file:///G:/Other%20computers/My%20Laptop/Hobby/mmtr/PCBs/LCMTR_01_01/LCMTR_01_01.csv'#$LCMTR_01_01.C22])">
            <text:p/>
          </table:table-cell>
          <table:table-cell table:formula="of:=IF(['file:///G:/Other%20computers/My%20Laptop/Hobby/mmtr/PCBs/LCMTR_01_01/LCMTR_01_01.csv'#$LCMTR_01_01.D22] = &quot;&quot;;&quot;&quot;;['file:///G:/Other%20computers/My%20Laptop/Hobby/mmtr/PCBs/LCMTR_01_01/LCMTR_01_01.csv'#$LCMTR_01_01.D22])" office:value-type="string" office:string-value="AADuffy:Resistor_1206" calcext:value-type="string">
            <text:p>AADuffy:Resistor_1206</text:p>
          </table:table-cell>
          <table:table-cell table:formula="of:=IF(['file:///G:/Other%20computers/My%20Laptop/Hobby/mmtr/PCBs/LCMTR_01_01/LCMTR_01_01.csv'#$LCMTR_01_01.E22] = &quot;&quot;;&quot;&quot;;['file:///G:/Other%20computers/My%20Laptop/Hobby/mmtr/PCBs/LCMTR_01_01/LCMTR_01_01.csv'#$LCMTR_01_01.E22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22] = &quot;&quot;;&quot;&quot;;['file:///G:/Other%20computers/My%20Laptop/Hobby/mmtr/PCBs/LCMTR_01_01/LCMTR_01_01.csv'#$LCMTR_01_01.F22])">
            <text:p/>
          </table:table-cell>
          <table:table-cell table:formula="of:=IF(['file:///G:/Other%20computers/My%20Laptop/Hobby/mmtr/PCBs/LCMTR_01_01/LCMTR_01_01.csv'#$LCMTR_01_01.G22] = &quot;&quot;;&quot;&quot;;['file:///G:/Other%20computers/My%20Laptop/Hobby/mmtr/PCBs/LCMTR_01_01/LCMTR_01_01.csv'#$LCMTR_01_01.G22])" office:value-type="string" office:string-value="21" calcext:value-type="string">
            <text:p>21</text:p>
          </table:table-cell>
          <table:table-cell table:formula="of:=IF(['file:///G:/Other%20computers/My%20Laptop/Hobby/mmtr/PCBs/LCMTR_01_01/LCMTR_01_01.csv'#$LCMTR_01_01.H22] = &quot;&quot;;&quot;&quot;;['file:///G:/Other%20computers/My%20Laptop/Hobby/mmtr/PCBs/LCMTR_01_01/LCMTR_01_01.csv'#$LCMTR_01_01.H22])">
            <text:p/>
          </table:table-cell>
          <table:table-cell table:style-name="ce2" table:formula="of:=IF(['file:///G:/Other%20computers/My%20Laptop/Hobby/mmtr/PCBs/LCMTR_01_01/LCMTR_01_01.csv'#$LCMTR_01_01.I22] = &quot;&quot;;&quot;&quot;;['file:///G:/Other%20computers/My%20Laptop/Hobby/mmtr/PCBs/LCMTR_01_01/LCMTR_01_01.csv'#$LCMTR_01_01.I22])">
            <text:p/>
          </table:table-cell>
          <table:table-cell table:formula="of:=IF(['file:///G:/Other%20computers/My%20Laptop/Hobby/mmtr/PCBs/LCMTR_01_01/LCMTR_01_01.csv'#$LCMTR_01_01.J22] = &quot;&quot;;&quot;&quot;;['file:///G:/Other%20computers/My%20Laptop/Hobby/mmtr/PCBs/LCMTR_01_01/LCMTR_01_01.csv'#$LCMTR_01_01.J22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2] = &quot;&quot;;&quot;&quot;;['file:///G:/Other%20computers/My%20Laptop/Hobby/mmtr/PCBs/LCMTR_01_01/LCMTR_01_01.csv'#$LCMTR_01_01.K22])">
            <text:p/>
          </table:table-cell>
          <table:table-cell table:formula="of:=IF(['file:///G:/Other%20computers/My%20Laptop/Hobby/mmtr/PCBs/LCMTR_01_01/LCMTR_01_01.csv'#$LCMTR_01_01.L22] = &quot;&quot;;&quot;&quot;;['file:///G:/Other%20computers/My%20Laptop/Hobby/mmtr/PCBs/LCMTR_01_01/LCMTR_01_01.csv'#$LCMTR_01_01.L22])">
            <text:p/>
          </table:table-cell>
          <table:table-cell table:formula="of:=IF(['file:///G:/Other%20computers/My%20Laptop/Hobby/mmtr/PCBs/LCMTR_01_01/LCMTR_01_01.csv'#$LCMTR_01_01.M22] = &quot;&quot;;&quot;&quot;;['file:///G:/Other%20computers/My%20Laptop/Hobby/mmtr/PCBs/LCMTR_01_01/LCMTR_01_01.csv'#$LCMTR_01_01.M2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3] = &quot;&quot;;&quot;&quot;;['file:///G:/Other%20computers/My%20Laptop/Hobby/mmtr/PCBs/LCMTR_01_01/LCMTR_01_01.csv'#$LCMTR_01_01.A23])" office:value-type="string" office:string-value="R21,R22" calcext:value-type="string">
            <text:p>R21,R22</text:p>
          </table:table-cell>
          <table:table-cell table:formula="of:=IF(['file:///G:/Other%20computers/My%20Laptop/Hobby/mmtr/PCBs/LCMTR_01_01/LCMTR_01_01.csv'#$LCMTR_01_01.B23] = &quot;&quot;;&quot;&quot;;['file:///G:/Other%20computers/My%20Laptop/Hobby/mmtr/PCBs/LCMTR_01_01/LCMTR_01_01.csv'#$LCMTR_01_01.B23])" office:value-type="string" office:string-value="1M" calcext:value-type="string">
            <text:p>1M</text:p>
          </table:table-cell>
          <table:table-cell table:formula="of:=IF(['file:///G:/Other%20computers/My%20Laptop/Hobby/mmtr/PCBs/LCMTR_01_01/LCMTR_01_01.csv'#$LCMTR_01_01.C23] = &quot;&quot;;&quot;&quot;;['file:///G:/Other%20computers/My%20Laptop/Hobby/mmtr/PCBs/LCMTR_01_01/LCMTR_01_01.csv'#$LCMTR_01_01.C23])">
            <text:p/>
          </table:table-cell>
          <table:table-cell table:formula="of:=IF(['file:///G:/Other%20computers/My%20Laptop/Hobby/mmtr/PCBs/LCMTR_01_01/LCMTR_01_01.csv'#$LCMTR_01_01.D23] = &quot;&quot;;&quot;&quot;;['file:///G:/Other%20computers/My%20Laptop/Hobby/mmtr/PCBs/LCMTR_01_01/LCMTR_01_01.csv'#$LCMTR_01_01.D23])" office:value-type="string" office:string-value="AADuffy:Resistor_1206_ThinEnds" calcext:value-type="string">
            <text:p>AADuffy:Resistor_1206_ThinEnds</text:p>
          </table:table-cell>
          <table:table-cell table:formula="of:=IF(['file:///G:/Other%20computers/My%20Laptop/Hobby/mmtr/PCBs/LCMTR_01_01/LCMTR_01_01.csv'#$LCMTR_01_01.E23] = &quot;&quot;;&quot;&quot;;['file:///G:/Other%20computers/My%20Laptop/Hobby/mmtr/PCBs/LCMTR_01_01/LCMTR_01_01.csv'#$LCMTR_01_01.E23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23] = &quot;&quot;;&quot;&quot;;['file:///G:/Other%20computers/My%20Laptop/Hobby/mmtr/PCBs/LCMTR_01_01/LCMTR_01_01.csv'#$LCMTR_01_01.F23])">
            <text:p/>
          </table:table-cell>
          <table:table-cell table:formula="of:=IF(['file:///G:/Other%20computers/My%20Laptop/Hobby/mmtr/PCBs/LCMTR_01_01/LCMTR_01_01.csv'#$LCMTR_01_01.G23] = &quot;&quot;;&quot;&quot;;['file:///G:/Other%20computers/My%20Laptop/Hobby/mmtr/PCBs/LCMTR_01_01/LCMTR_01_01.csv'#$LCMTR_01_01.G23])" office:value-type="string" office:string-value="22" calcext:value-type="string">
            <text:p>22</text:p>
          </table:table-cell>
          <table:table-cell table:formula="of:=IF(['file:///G:/Other%20computers/My%20Laptop/Hobby/mmtr/PCBs/LCMTR_01_01/LCMTR_01_01.csv'#$LCMTR_01_01.H23] = &quot;&quot;;&quot;&quot;;['file:///G:/Other%20computers/My%20Laptop/Hobby/mmtr/PCBs/LCMTR_01_01/LCMTR_01_01.csv'#$LCMTR_01_01.H23])">
            <text:p/>
          </table:table-cell>
          <table:table-cell table:formula="of:=IF(['file:///G:/Other%20computers/My%20Laptop/Hobby/mmtr/PCBs/LCMTR_01_01/LCMTR_01_01.csv'#$LCMTR_01_01.I23] = &quot;&quot;;&quot;&quot;;['file:///G:/Other%20computers/My%20Laptop/Hobby/mmtr/PCBs/LCMTR_01_01/LCMTR_01_01.csv'#$LCMTR_01_01.I23])">
            <text:p/>
          </table:table-cell>
          <table:table-cell table:formula="of:=IF(['file:///G:/Other%20computers/My%20Laptop/Hobby/mmtr/PCBs/LCMTR_01_01/LCMTR_01_01.csv'#$LCMTR_01_01.J23] = &quot;&quot;;&quot;&quot;;['file:///G:/Other%20computers/My%20Laptop/Hobby/mmtr/PCBs/LCMTR_01_01/LCMTR_01_01.csv'#$LCMTR_01_01.J23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3] = &quot;&quot;;&quot;&quot;;['file:///G:/Other%20computers/My%20Laptop/Hobby/mmtr/PCBs/LCMTR_01_01/LCMTR_01_01.csv'#$LCMTR_01_01.K23])">
            <text:p/>
          </table:table-cell>
          <table:table-cell table:formula="of:=IF(['file:///G:/Other%20computers/My%20Laptop/Hobby/mmtr/PCBs/LCMTR_01_01/LCMTR_01_01.csv'#$LCMTR_01_01.L23] = &quot;&quot;;&quot;&quot;;['file:///G:/Other%20computers/My%20Laptop/Hobby/mmtr/PCBs/LCMTR_01_01/LCMTR_01_01.csv'#$LCMTR_01_01.L23])">
            <text:p/>
          </table:table-cell>
          <table:table-cell table:formula="of:=IF(['file:///G:/Other%20computers/My%20Laptop/Hobby/mmtr/PCBs/LCMTR_01_01/LCMTR_01_01.csv'#$LCMTR_01_01.M23] = &quot;&quot;;&quot;&quot;;['file:///G:/Other%20computers/My%20Laptop/Hobby/mmtr/PCBs/LCMTR_01_01/LCMTR_01_01.csv'#$LCMTR_01_01.M2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4] = &quot;&quot;;&quot;&quot;;['file:///G:/Other%20computers/My%20Laptop/Hobby/mmtr/PCBs/LCMTR_01_01/LCMTR_01_01.csv'#$LCMTR_01_01.A24])" office:value-type="string" office:string-value="R41,R48,R66,R67,R76,R77,R82,R87" calcext:value-type="string">
            <text:p>R41,R48,R66,R67,R76,R77,R82,R87</text:p>
          </table:table-cell>
          <table:table-cell table:formula="of:=IF(['file:///G:/Other%20computers/My%20Laptop/Hobby/mmtr/PCBs/LCMTR_01_01/LCMTR_01_01.csv'#$LCMTR_01_01.B24] = &quot;&quot;;&quot;&quot;;['file:///G:/Other%20computers/My%20Laptop/Hobby/mmtr/PCBs/LCMTR_01_01/LCMTR_01_01.csv'#$LCMTR_01_01.B24])" office:value-type="string" office:string-value="10K" calcext:value-type="string">
            <text:p>10K</text:p>
          </table:table-cell>
          <table:table-cell table:formula="of:=IF(['file:///G:/Other%20computers/My%20Laptop/Hobby/mmtr/PCBs/LCMTR_01_01/LCMTR_01_01.csv'#$LCMTR_01_01.C24] = &quot;&quot;;&quot;&quot;;['file:///G:/Other%20computers/My%20Laptop/Hobby/mmtr/PCBs/LCMTR_01_01/LCMTR_01_01.csv'#$LCMTR_01_01.C24])">
            <text:p/>
          </table:table-cell>
          <table:table-cell table:formula="of:=IF(['file:///G:/Other%20computers/My%20Laptop/Hobby/mmtr/PCBs/LCMTR_01_01/LCMTR_01_01.csv'#$LCMTR_01_01.D24] = &quot;&quot;;&quot;&quot;;['file:///G:/Other%20computers/My%20Laptop/Hobby/mmtr/PCBs/LCMTR_01_01/LCMTR_01_01.csv'#$LCMTR_01_01.D24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4] = &quot;&quot;;&quot;&quot;;['file:///G:/Other%20computers/My%20Laptop/Hobby/mmtr/PCBs/LCMTR_01_01/LCMTR_01_01.csv'#$LCMTR_01_01.E24])" office:value-type="string" office:string-value="8" calcext:value-type="string">
            <text:p>8</text:p>
          </table:table-cell>
          <table:table-cell table:formula="of:=IF(['file:///G:/Other%20computers/My%20Laptop/Hobby/mmtr/PCBs/LCMTR_01_01/LCMTR_01_01.csv'#$LCMTR_01_01.F24] = &quot;&quot;;&quot;&quot;;['file:///G:/Other%20computers/My%20Laptop/Hobby/mmtr/PCBs/LCMTR_01_01/LCMTR_01_01.csv'#$LCMTR_01_01.F24])">
            <text:p/>
          </table:table-cell>
          <table:table-cell table:formula="of:=IF(['file:///G:/Other%20computers/My%20Laptop/Hobby/mmtr/PCBs/LCMTR_01_01/LCMTR_01_01.csv'#$LCMTR_01_01.G24] = &quot;&quot;;&quot;&quot;;['file:///G:/Other%20computers/My%20Laptop/Hobby/mmtr/PCBs/LCMTR_01_01/LCMTR_01_01.csv'#$LCMTR_01_01.G24])" office:value-type="string" office:string-value="23" calcext:value-type="string">
            <text:p>23</text:p>
          </table:table-cell>
          <table:table-cell table:formula="of:=IF(['file:///G:/Other%20computers/My%20Laptop/Hobby/mmtr/PCBs/LCMTR_01_01/LCMTR_01_01.csv'#$LCMTR_01_01.H24] = &quot;&quot;;&quot;&quot;;['file:///G:/Other%20computers/My%20Laptop/Hobby/mmtr/PCBs/LCMTR_01_01/LCMTR_01_01.csv'#$LCMTR_01_01.H24])">
            <text:p/>
          </table:table-cell>
          <table:table-cell table:formula="of:=IF(['file:///G:/Other%20computers/My%20Laptop/Hobby/mmtr/PCBs/LCMTR_01_01/LCMTR_01_01.csv'#$LCMTR_01_01.I24] = &quot;&quot;;&quot;&quot;;['file:///G:/Other%20computers/My%20Laptop/Hobby/mmtr/PCBs/LCMTR_01_01/LCMTR_01_01.csv'#$LCMTR_01_01.I24])">
            <text:p/>
          </table:table-cell>
          <table:table-cell table:formula="of:=IF(['file:///G:/Other%20computers/My%20Laptop/Hobby/mmtr/PCBs/LCMTR_01_01/LCMTR_01_01.csv'#$LCMTR_01_01.J24] = &quot;&quot;;&quot;&quot;;['file:///G:/Other%20computers/My%20Laptop/Hobby/mmtr/PCBs/LCMTR_01_01/LCMTR_01_01.csv'#$LCMTR_01_01.J24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4] = &quot;&quot;;&quot;&quot;;['file:///G:/Other%20computers/My%20Laptop/Hobby/mmtr/PCBs/LCMTR_01_01/LCMTR_01_01.csv'#$LCMTR_01_01.K24])">
            <text:p/>
          </table:table-cell>
          <table:table-cell table:formula="of:=IF(['file:///G:/Other%20computers/My%20Laptop/Hobby/mmtr/PCBs/LCMTR_01_01/LCMTR_01_01.csv'#$LCMTR_01_01.L24] = &quot;&quot;;&quot;&quot;;['file:///G:/Other%20computers/My%20Laptop/Hobby/mmtr/PCBs/LCMTR_01_01/LCMTR_01_01.csv'#$LCMTR_01_01.L24])">
            <text:p/>
          </table:table-cell>
          <table:table-cell table:formula="of:=IF(['file:///G:/Other%20computers/My%20Laptop/Hobby/mmtr/PCBs/LCMTR_01_01/LCMTR_01_01.csv'#$LCMTR_01_01.M24] = &quot;&quot;;&quot;&quot;;['file:///G:/Other%20computers/My%20Laptop/Hobby/mmtr/PCBs/LCMTR_01_01/LCMTR_01_01.csv'#$LCMTR_01_01.M2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5] = &quot;&quot;;&quot;&quot;;['file:///G:/Other%20computers/My%20Laptop/Hobby/mmtr/PCBs/LCMTR_01_01/LCMTR_01_01.csv'#$LCMTR_01_01.A25])" office:value-type="string" office:string-value="R43,R44" calcext:value-type="string">
            <text:p>R43,R44</text:p>
          </table:table-cell>
          <table:table-cell table:formula="of:=IF(['file:///G:/Other%20computers/My%20Laptop/Hobby/mmtr/PCBs/LCMTR_01_01/LCMTR_01_01.csv'#$LCMTR_01_01.B25] = &quot;&quot;;&quot;&quot;;['file:///G:/Other%20computers/My%20Laptop/Hobby/mmtr/PCBs/LCMTR_01_01/LCMTR_01_01.csv'#$LCMTR_01_01.B25])" office:value-type="string" office:string-value="3.3K" calcext:value-type="string">
            <text:p>3.3K</text:p>
          </table:table-cell>
          <table:table-cell table:formula="of:=IF(['file:///G:/Other%20computers/My%20Laptop/Hobby/mmtr/PCBs/LCMTR_01_01/LCMTR_01_01.csv'#$LCMTR_01_01.C25] = &quot;&quot;;&quot;&quot;;['file:///G:/Other%20computers/My%20Laptop/Hobby/mmtr/PCBs/LCMTR_01_01/LCMTR_01_01.csv'#$LCMTR_01_01.C25])">
            <text:p/>
          </table:table-cell>
          <table:table-cell table:formula="of:=IF(['file:///G:/Other%20computers/My%20Laptop/Hobby/mmtr/PCBs/LCMTR_01_01/LCMTR_01_01.csv'#$LCMTR_01_01.D25] = &quot;&quot;;&quot;&quot;;['file:///G:/Other%20computers/My%20Laptop/Hobby/mmtr/PCBs/LCMTR_01_01/LCMTR_01_01.csv'#$LCMTR_01_01.D25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5] = &quot;&quot;;&quot;&quot;;['file:///G:/Other%20computers/My%20Laptop/Hobby/mmtr/PCBs/LCMTR_01_01/LCMTR_01_01.csv'#$LCMTR_01_01.E25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25] = &quot;&quot;;&quot;&quot;;['file:///G:/Other%20computers/My%20Laptop/Hobby/mmtr/PCBs/LCMTR_01_01/LCMTR_01_01.csv'#$LCMTR_01_01.F25])">
            <text:p/>
          </table:table-cell>
          <table:table-cell table:formula="of:=IF(['file:///G:/Other%20computers/My%20Laptop/Hobby/mmtr/PCBs/LCMTR_01_01/LCMTR_01_01.csv'#$LCMTR_01_01.G25] = &quot;&quot;;&quot;&quot;;['file:///G:/Other%20computers/My%20Laptop/Hobby/mmtr/PCBs/LCMTR_01_01/LCMTR_01_01.csv'#$LCMTR_01_01.G25])" office:value-type="string" office:string-value="24" calcext:value-type="string">
            <text:p>24</text:p>
          </table:table-cell>
          <table:table-cell table:formula="of:=IF(['file:///G:/Other%20computers/My%20Laptop/Hobby/mmtr/PCBs/LCMTR_01_01/LCMTR_01_01.csv'#$LCMTR_01_01.H25] = &quot;&quot;;&quot;&quot;;['file:///G:/Other%20computers/My%20Laptop/Hobby/mmtr/PCBs/LCMTR_01_01/LCMTR_01_01.csv'#$LCMTR_01_01.H25])">
            <text:p/>
          </table:table-cell>
          <table:table-cell table:formula="of:=IF(['file:///G:/Other%20computers/My%20Laptop/Hobby/mmtr/PCBs/LCMTR_01_01/LCMTR_01_01.csv'#$LCMTR_01_01.I25] = &quot;&quot;;&quot;&quot;;['file:///G:/Other%20computers/My%20Laptop/Hobby/mmtr/PCBs/LCMTR_01_01/LCMTR_01_01.csv'#$LCMTR_01_01.I25])" office:value-type="string" office:string-value="CRIT" calcext:value-type="string">
            <text:p>CRIT</text:p>
          </table:table-cell>
          <table:table-cell table:formula="of:=IF(['file:///G:/Other%20computers/My%20Laptop/Hobby/mmtr/PCBs/LCMTR_01_01/LCMTR_01_01.csv'#$LCMTR_01_01.J25] = &quot;&quot;;&quot;&quot;;['file:///G:/Other%20computers/My%20Laptop/Hobby/mmtr/PCBs/LCMTR_01_01/LCMTR_01_01.csv'#$LCMTR_01_01.J25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5] = &quot;&quot;;&quot;&quot;;['file:///G:/Other%20computers/My%20Laptop/Hobby/mmtr/PCBs/LCMTR_01_01/LCMTR_01_01.csv'#$LCMTR_01_01.K25])">
            <text:p/>
          </table:table-cell>
          <table:table-cell table:formula="of:=IF(['file:///G:/Other%20computers/My%20Laptop/Hobby/mmtr/PCBs/LCMTR_01_01/LCMTR_01_01.csv'#$LCMTR_01_01.L25] = &quot;&quot;;&quot;&quot;;['file:///G:/Other%20computers/My%20Laptop/Hobby/mmtr/PCBs/LCMTR_01_01/LCMTR_01_01.csv'#$LCMTR_01_01.L25])">
            <text:p/>
          </table:table-cell>
          <table:table-cell table:formula="of:=IF(['file:///G:/Other%20computers/My%20Laptop/Hobby/mmtr/PCBs/LCMTR_01_01/LCMTR_01_01.csv'#$LCMTR_01_01.M25] = &quot;&quot;;&quot;&quot;;['file:///G:/Other%20computers/My%20Laptop/Hobby/mmtr/PCBs/LCMTR_01_01/LCMTR_01_01.csv'#$LCMTR_01_01.M2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6] = &quot;&quot;;&quot;&quot;;['file:///G:/Other%20computers/My%20Laptop/Hobby/mmtr/PCBs/LCMTR_01_01/LCMTR_01_01.csv'#$LCMTR_01_01.A26])" office:value-type="string" office:string-value="R46,R51,R94,R98,R99,R100,R101,R102" calcext:value-type="string">
            <text:p>R46,R51,R94,R98,R99,R100,R101,R102</text:p>
          </table:table-cell>
          <table:table-cell table:formula="of:=IF(['file:///G:/Other%20computers/My%20Laptop/Hobby/mmtr/PCBs/LCMTR_01_01/LCMTR_01_01.csv'#$LCMTR_01_01.B26] = &quot;&quot;;&quot;&quot;;['file:///G:/Other%20computers/My%20Laptop/Hobby/mmtr/PCBs/LCMTR_01_01/LCMTR_01_01.csv'#$LCMTR_01_01.B26])" office:value-type="string" office:string-value="33K" calcext:value-type="string">
            <text:p>33K</text:p>
          </table:table-cell>
          <table:table-cell table:formula="of:=IF(['file:///G:/Other%20computers/My%20Laptop/Hobby/mmtr/PCBs/LCMTR_01_01/LCMTR_01_01.csv'#$LCMTR_01_01.C26] = &quot;&quot;;&quot;&quot;;['file:///G:/Other%20computers/My%20Laptop/Hobby/mmtr/PCBs/LCMTR_01_01/LCMTR_01_01.csv'#$LCMTR_01_01.C26])">
            <text:p/>
          </table:table-cell>
          <table:table-cell table:formula="of:=IF(['file:///G:/Other%20computers/My%20Laptop/Hobby/mmtr/PCBs/LCMTR_01_01/LCMTR_01_01.csv'#$LCMTR_01_01.D26] = &quot;&quot;;&quot;&quot;;['file:///G:/Other%20computers/My%20Laptop/Hobby/mmtr/PCBs/LCMTR_01_01/LCMTR_01_01.csv'#$LCMTR_01_01.D26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6] = &quot;&quot;;&quot;&quot;;['file:///G:/Other%20computers/My%20Laptop/Hobby/mmtr/PCBs/LCMTR_01_01/LCMTR_01_01.csv'#$LCMTR_01_01.E26])" office:value-type="string" office:string-value="8" calcext:value-type="string">
            <text:p>8</text:p>
          </table:table-cell>
          <table:table-cell table:formula="of:=IF(['file:///G:/Other%20computers/My%20Laptop/Hobby/mmtr/PCBs/LCMTR_01_01/LCMTR_01_01.csv'#$LCMTR_01_01.F26] = &quot;&quot;;&quot;&quot;;['file:///G:/Other%20computers/My%20Laptop/Hobby/mmtr/PCBs/LCMTR_01_01/LCMTR_01_01.csv'#$LCMTR_01_01.F26])">
            <text:p/>
          </table:table-cell>
          <table:table-cell table:formula="of:=IF(['file:///G:/Other%20computers/My%20Laptop/Hobby/mmtr/PCBs/LCMTR_01_01/LCMTR_01_01.csv'#$LCMTR_01_01.G26] = &quot;&quot;;&quot;&quot;;['file:///G:/Other%20computers/My%20Laptop/Hobby/mmtr/PCBs/LCMTR_01_01/LCMTR_01_01.csv'#$LCMTR_01_01.G26])" office:value-type="string" office:string-value="25" calcext:value-type="string">
            <text:p>25</text:p>
          </table:table-cell>
          <table:table-cell table:formula="of:=IF(['file:///G:/Other%20computers/My%20Laptop/Hobby/mmtr/PCBs/LCMTR_01_01/LCMTR_01_01.csv'#$LCMTR_01_01.H26] = &quot;&quot;;&quot;&quot;;['file:///G:/Other%20computers/My%20Laptop/Hobby/mmtr/PCBs/LCMTR_01_01/LCMTR_01_01.csv'#$LCMTR_01_01.H26])">
            <text:p/>
          </table:table-cell>
          <table:table-cell table:style-name="ce2" table:formula="of:=IF(['file:///G:/Other%20computers/My%20Laptop/Hobby/mmtr/PCBs/LCMTR_01_01/LCMTR_01_01.csv'#$LCMTR_01_01.I26] = &quot;&quot;;&quot;&quot;;['file:///G:/Other%20computers/My%20Laptop/Hobby/mmtr/PCBs/LCMTR_01_01/LCMTR_01_01.csv'#$LCMTR_01_01.I26])">
            <text:p/>
          </table:table-cell>
          <table:table-cell table:formula="of:=IF(['file:///G:/Other%20computers/My%20Laptop/Hobby/mmtr/PCBs/LCMTR_01_01/LCMTR_01_01.csv'#$LCMTR_01_01.J26] = &quot;&quot;;&quot;&quot;;['file:///G:/Other%20computers/My%20Laptop/Hobby/mmtr/PCBs/LCMTR_01_01/LCMTR_01_01.csv'#$LCMTR_01_01.J26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6] = &quot;&quot;;&quot;&quot;;['file:///G:/Other%20computers/My%20Laptop/Hobby/mmtr/PCBs/LCMTR_01_01/LCMTR_01_01.csv'#$LCMTR_01_01.K26])">
            <text:p/>
          </table:table-cell>
          <table:table-cell table:formula="of:=IF(['file:///G:/Other%20computers/My%20Laptop/Hobby/mmtr/PCBs/LCMTR_01_01/LCMTR_01_01.csv'#$LCMTR_01_01.L26] = &quot;&quot;;&quot;&quot;;['file:///G:/Other%20computers/My%20Laptop/Hobby/mmtr/PCBs/LCMTR_01_01/LCMTR_01_01.csv'#$LCMTR_01_01.L26])">
            <text:p/>
          </table:table-cell>
          <table:table-cell table:formula="of:=IF(['file:///G:/Other%20computers/My%20Laptop/Hobby/mmtr/PCBs/LCMTR_01_01/LCMTR_01_01.csv'#$LCMTR_01_01.M26] = &quot;&quot;;&quot;&quot;;['file:///G:/Other%20computers/My%20Laptop/Hobby/mmtr/PCBs/LCMTR_01_01/LCMTR_01_01.csv'#$LCMTR_01_01.M2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7] = &quot;&quot;;&quot;&quot;;['file:///G:/Other%20computers/My%20Laptop/Hobby/mmtr/PCBs/LCMTR_01_01/LCMTR_01_01.csv'#$LCMTR_01_01.A27])" office:value-type="string" office:string-value="R56" calcext:value-type="string">
            <text:p>R56</text:p>
          </table:table-cell>
          <table:table-cell table:formula="of:=IF(['file:///G:/Other%20computers/My%20Laptop/Hobby/mmtr/PCBs/LCMTR_01_01/LCMTR_01_01.csv'#$LCMTR_01_01.B27] = &quot;&quot;;&quot;&quot;;['file:///G:/Other%20computers/My%20Laptop/Hobby/mmtr/PCBs/LCMTR_01_01/LCMTR_01_01.csv'#$LCMTR_01_01.B27])" office:value-type="string" office:string-value="100" calcext:value-type="string">
            <text:p>100</text:p>
          </table:table-cell>
          <table:table-cell table:formula="of:=IF(['file:///G:/Other%20computers/My%20Laptop/Hobby/mmtr/PCBs/LCMTR_01_01/LCMTR_01_01.csv'#$LCMTR_01_01.C27] = &quot;&quot;;&quot;&quot;;['file:///G:/Other%20computers/My%20Laptop/Hobby/mmtr/PCBs/LCMTR_01_01/LCMTR_01_01.csv'#$LCMTR_01_01.C27])">
            <text:p/>
          </table:table-cell>
          <table:table-cell table:formula="of:=IF(['file:///G:/Other%20computers/My%20Laptop/Hobby/mmtr/PCBs/LCMTR_01_01/LCMTR_01_01.csv'#$LCMTR_01_01.D27] = &quot;&quot;;&quot;&quot;;['file:///G:/Other%20computers/My%20Laptop/Hobby/mmtr/PCBs/LCMTR_01_01/LCMTR_01_01.csv'#$LCMTR_01_01.D27])" office:value-type="string" office:string-value="AADuffy:Resistor_1206" calcext:value-type="string">
            <text:p>AADuffy:Resistor_1206</text:p>
          </table:table-cell>
          <table:table-cell table:formula="of:=IF(['file:///G:/Other%20computers/My%20Laptop/Hobby/mmtr/PCBs/LCMTR_01_01/LCMTR_01_01.csv'#$LCMTR_01_01.E27] = &quot;&quot;;&quot;&quot;;['file:///G:/Other%20computers/My%20Laptop/Hobby/mmtr/PCBs/LCMTR_01_01/LCMTR_01_01.csv'#$LCMTR_01_01.E27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27] = &quot;&quot;;&quot;&quot;;['file:///G:/Other%20computers/My%20Laptop/Hobby/mmtr/PCBs/LCMTR_01_01/LCMTR_01_01.csv'#$LCMTR_01_01.F27])">
            <text:p/>
          </table:table-cell>
          <table:table-cell table:formula="of:=IF(['file:///G:/Other%20computers/My%20Laptop/Hobby/mmtr/PCBs/LCMTR_01_01/LCMTR_01_01.csv'#$LCMTR_01_01.G27] = &quot;&quot;;&quot;&quot;;['file:///G:/Other%20computers/My%20Laptop/Hobby/mmtr/PCBs/LCMTR_01_01/LCMTR_01_01.csv'#$LCMTR_01_01.G27])" office:value-type="string" office:string-value="26" calcext:value-type="string">
            <text:p>26</text:p>
          </table:table-cell>
          <table:table-cell table:formula="of:=IF(['file:///G:/Other%20computers/My%20Laptop/Hobby/mmtr/PCBs/LCMTR_01_01/LCMTR_01_01.csv'#$LCMTR_01_01.H27] = &quot;&quot;;&quot;&quot;;['file:///G:/Other%20computers/My%20Laptop/Hobby/mmtr/PCBs/LCMTR_01_01/LCMTR_01_01.csv'#$LCMTR_01_01.H27])">
            <text:p/>
          </table:table-cell>
          <table:table-cell table:style-name="ce2" table:formula="of:=IF(['file:///G:/Other%20computers/My%20Laptop/Hobby/mmtr/PCBs/LCMTR_01_01/LCMTR_01_01.csv'#$LCMTR_01_01.I27] = &quot;&quot;;&quot;&quot;;['file:///G:/Other%20computers/My%20Laptop/Hobby/mmtr/PCBs/LCMTR_01_01/LCMTR_01_01.csv'#$LCMTR_01_01.I27])">
            <text:p/>
          </table:table-cell>
          <table:table-cell table:formula="of:=IF(['file:///G:/Other%20computers/My%20Laptop/Hobby/mmtr/PCBs/LCMTR_01_01/LCMTR_01_01.csv'#$LCMTR_01_01.J27] = &quot;&quot;;&quot;&quot;;['file:///G:/Other%20computers/My%20Laptop/Hobby/mmtr/PCBs/LCMTR_01_01/LCMTR_01_01.csv'#$LCMTR_01_01.J27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7] = &quot;&quot;;&quot;&quot;;['file:///G:/Other%20computers/My%20Laptop/Hobby/mmtr/PCBs/LCMTR_01_01/LCMTR_01_01.csv'#$LCMTR_01_01.K27])">
            <text:p/>
          </table:table-cell>
          <table:table-cell table:formula="of:=IF(['file:///G:/Other%20computers/My%20Laptop/Hobby/mmtr/PCBs/LCMTR_01_01/LCMTR_01_01.csv'#$LCMTR_01_01.L27] = &quot;&quot;;&quot;&quot;;['file:///G:/Other%20computers/My%20Laptop/Hobby/mmtr/PCBs/LCMTR_01_01/LCMTR_01_01.csv'#$LCMTR_01_01.L27])">
            <text:p/>
          </table:table-cell>
          <table:table-cell table:formula="of:=IF(['file:///G:/Other%20computers/My%20Laptop/Hobby/mmtr/PCBs/LCMTR_01_01/LCMTR_01_01.csv'#$LCMTR_01_01.M27] = &quot;&quot;;&quot;&quot;;['file:///G:/Other%20computers/My%20Laptop/Hobby/mmtr/PCBs/LCMTR_01_01/LCMTR_01_01.csv'#$LCMTR_01_01.M2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8] = &quot;&quot;;&quot;&quot;;['file:///G:/Other%20computers/My%20Laptop/Hobby/mmtr/PCBs/LCMTR_01_01/LCMTR_01_01.csv'#$LCMTR_01_01.A28])" office:value-type="string" office:string-value="R59,R60,R61,R62,R63,R64,R65,R106,R107" calcext:value-type="string">
            <text:p>R59,R60,R61,R62,R63,R64,R65,R106,R107</text:p>
          </table:table-cell>
          <table:table-cell table:formula="of:=IF(['file:///G:/Other%20computers/My%20Laptop/Hobby/mmtr/PCBs/LCMTR_01_01/LCMTR_01_01.csv'#$LCMTR_01_01.B28] = &quot;&quot;;&quot;&quot;;['file:///G:/Other%20computers/My%20Laptop/Hobby/mmtr/PCBs/LCMTR_01_01/LCMTR_01_01.csv'#$LCMTR_01_01.B28])" office:value-type="string" office:string-value="220" calcext:value-type="string">
            <text:p>220</text:p>
          </table:table-cell>
          <table:table-cell table:formula="of:=IF(['file:///G:/Other%20computers/My%20Laptop/Hobby/mmtr/PCBs/LCMTR_01_01/LCMTR_01_01.csv'#$LCMTR_01_01.C28] = &quot;&quot;;&quot;&quot;;['file:///G:/Other%20computers/My%20Laptop/Hobby/mmtr/PCBs/LCMTR_01_01/LCMTR_01_01.csv'#$LCMTR_01_01.C28])">
            <text:p/>
          </table:table-cell>
          <table:table-cell table:formula="of:=IF(['file:///G:/Other%20computers/My%20Laptop/Hobby/mmtr/PCBs/LCMTR_01_01/LCMTR_01_01.csv'#$LCMTR_01_01.D28] = &quot;&quot;;&quot;&quot;;['file:///G:/Other%20computers/My%20Laptop/Hobby/mmtr/PCBs/LCMTR_01_01/LCMTR_01_01.csv'#$LCMTR_01_01.D28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8] = &quot;&quot;;&quot;&quot;;['file:///G:/Other%20computers/My%20Laptop/Hobby/mmtr/PCBs/LCMTR_01_01/LCMTR_01_01.csv'#$LCMTR_01_01.E28])" office:value-type="string" office:string-value="9" calcext:value-type="string">
            <text:p>9</text:p>
          </table:table-cell>
          <table:table-cell table:formula="of:=IF(['file:///G:/Other%20computers/My%20Laptop/Hobby/mmtr/PCBs/LCMTR_01_01/LCMTR_01_01.csv'#$LCMTR_01_01.F28] = &quot;&quot;;&quot;&quot;;['file:///G:/Other%20computers/My%20Laptop/Hobby/mmtr/PCBs/LCMTR_01_01/LCMTR_01_01.csv'#$LCMTR_01_01.F28])">
            <text:p/>
          </table:table-cell>
          <table:table-cell table:formula="of:=IF(['file:///G:/Other%20computers/My%20Laptop/Hobby/mmtr/PCBs/LCMTR_01_01/LCMTR_01_01.csv'#$LCMTR_01_01.G28] = &quot;&quot;;&quot;&quot;;['file:///G:/Other%20computers/My%20Laptop/Hobby/mmtr/PCBs/LCMTR_01_01/LCMTR_01_01.csv'#$LCMTR_01_01.G28])" office:value-type="string" office:string-value="27" calcext:value-type="string">
            <text:p>27</text:p>
          </table:table-cell>
          <table:table-cell table:formula="of:=IF(['file:///G:/Other%20computers/My%20Laptop/Hobby/mmtr/PCBs/LCMTR_01_01/LCMTR_01_01.csv'#$LCMTR_01_01.H28] = &quot;&quot;;&quot;&quot;;['file:///G:/Other%20computers/My%20Laptop/Hobby/mmtr/PCBs/LCMTR_01_01/LCMTR_01_01.csv'#$LCMTR_01_01.H28])">
            <text:p/>
          </table:table-cell>
          <table:table-cell table:style-name="ce2" table:formula="of:=IF(['file:///G:/Other%20computers/My%20Laptop/Hobby/mmtr/PCBs/LCMTR_01_01/LCMTR_01_01.csv'#$LCMTR_01_01.I28] = &quot;&quot;;&quot;&quot;;['file:///G:/Other%20computers/My%20Laptop/Hobby/mmtr/PCBs/LCMTR_01_01/LCMTR_01_01.csv'#$LCMTR_01_01.I28])">
            <text:p/>
          </table:table-cell>
          <table:table-cell table:formula="of:=IF(['file:///G:/Other%20computers/My%20Laptop/Hobby/mmtr/PCBs/LCMTR_01_01/LCMTR_01_01.csv'#$LCMTR_01_01.J28] = &quot;&quot;;&quot;&quot;;['file:///G:/Other%20computers/My%20Laptop/Hobby/mmtr/PCBs/LCMTR_01_01/LCMTR_01_01.csv'#$LCMTR_01_01.J28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8] = &quot;&quot;;&quot;&quot;;['file:///G:/Other%20computers/My%20Laptop/Hobby/mmtr/PCBs/LCMTR_01_01/LCMTR_01_01.csv'#$LCMTR_01_01.K28])">
            <text:p/>
          </table:table-cell>
          <table:table-cell table:formula="of:=IF(['file:///G:/Other%20computers/My%20Laptop/Hobby/mmtr/PCBs/LCMTR_01_01/LCMTR_01_01.csv'#$LCMTR_01_01.L28] = &quot;&quot;;&quot;&quot;;['file:///G:/Other%20computers/My%20Laptop/Hobby/mmtr/PCBs/LCMTR_01_01/LCMTR_01_01.csv'#$LCMTR_01_01.L28])">
            <text:p/>
          </table:table-cell>
          <table:table-cell table:formula="of:=IF(['file:///G:/Other%20computers/My%20Laptop/Hobby/mmtr/PCBs/LCMTR_01_01/LCMTR_01_01.csv'#$LCMTR_01_01.M28] = &quot;&quot;;&quot;&quot;;['file:///G:/Other%20computers/My%20Laptop/Hobby/mmtr/PCBs/LCMTR_01_01/LCMTR_01_01.csv'#$LCMTR_01_01.M2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29] = &quot;&quot;;&quot;&quot;;['file:///G:/Other%20computers/My%20Laptop/Hobby/mmtr/PCBs/LCMTR_01_01/LCMTR_01_01.csv'#$LCMTR_01_01.A29])" office:value-type="string" office:string-value="R75,R78,R79,R81,R84,R85,R103,R104,R105" calcext:value-type="string">
            <text:p>R75,R78,R79,R81,R84,R85,R103,R104,R105</text:p>
          </table:table-cell>
          <table:table-cell table:formula="of:=IF(['file:///G:/Other%20computers/My%20Laptop/Hobby/mmtr/PCBs/LCMTR_01_01/LCMTR_01_01.csv'#$LCMTR_01_01.B29] = &quot;&quot;;&quot;&quot;;['file:///G:/Other%20computers/My%20Laptop/Hobby/mmtr/PCBs/LCMTR_01_01/LCMTR_01_01.csv'#$LCMTR_01_01.B29])" office:value-type="string" office:string-value="27" calcext:value-type="string">
            <text:p>27</text:p>
          </table:table-cell>
          <table:table-cell table:formula="of:=IF(['file:///G:/Other%20computers/My%20Laptop/Hobby/mmtr/PCBs/LCMTR_01_01/LCMTR_01_01.csv'#$LCMTR_01_01.C29] = &quot;&quot;;&quot;&quot;;['file:///G:/Other%20computers/My%20Laptop/Hobby/mmtr/PCBs/LCMTR_01_01/LCMTR_01_01.csv'#$LCMTR_01_01.C29])">
            <text:p/>
          </table:table-cell>
          <table:table-cell table:formula="of:=IF(['file:///G:/Other%20computers/My%20Laptop/Hobby/mmtr/PCBs/LCMTR_01_01/LCMTR_01_01.csv'#$LCMTR_01_01.D29] = &quot;&quot;;&quot;&quot;;['file:///G:/Other%20computers/My%20Laptop/Hobby/mmtr/PCBs/LCMTR_01_01/LCMTR_01_01.csv'#$LCMTR_01_01.D29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29] = &quot;&quot;;&quot;&quot;;['file:///G:/Other%20computers/My%20Laptop/Hobby/mmtr/PCBs/LCMTR_01_01/LCMTR_01_01.csv'#$LCMTR_01_01.E29])" office:value-type="string" office:string-value="9" calcext:value-type="string">
            <text:p>9</text:p>
          </table:table-cell>
          <table:table-cell table:formula="of:=IF(['file:///G:/Other%20computers/My%20Laptop/Hobby/mmtr/PCBs/LCMTR_01_01/LCMTR_01_01.csv'#$LCMTR_01_01.F29] = &quot;&quot;;&quot;&quot;;['file:///G:/Other%20computers/My%20Laptop/Hobby/mmtr/PCBs/LCMTR_01_01/LCMTR_01_01.csv'#$LCMTR_01_01.F29])">
            <text:p/>
          </table:table-cell>
          <table:table-cell table:formula="of:=IF(['file:///G:/Other%20computers/My%20Laptop/Hobby/mmtr/PCBs/LCMTR_01_01/LCMTR_01_01.csv'#$LCMTR_01_01.G29] = &quot;&quot;;&quot;&quot;;['file:///G:/Other%20computers/My%20Laptop/Hobby/mmtr/PCBs/LCMTR_01_01/LCMTR_01_01.csv'#$LCMTR_01_01.G29])" office:value-type="string" office:string-value="28" calcext:value-type="string">
            <text:p>28</text:p>
          </table:table-cell>
          <table:table-cell table:formula="of:=IF(['file:///G:/Other%20computers/My%20Laptop/Hobby/mmtr/PCBs/LCMTR_01_01/LCMTR_01_01.csv'#$LCMTR_01_01.H29] = &quot;&quot;;&quot;&quot;;['file:///G:/Other%20computers/My%20Laptop/Hobby/mmtr/PCBs/LCMTR_01_01/LCMTR_01_01.csv'#$LCMTR_01_01.H29])">
            <text:p/>
          </table:table-cell>
          <table:table-cell table:style-name="ce2" table:formula="of:=IF(['file:///G:/Other%20computers/My%20Laptop/Hobby/mmtr/PCBs/LCMTR_01_01/LCMTR_01_01.csv'#$LCMTR_01_01.I29] = &quot;&quot;;&quot;&quot;;['file:///G:/Other%20computers/My%20Laptop/Hobby/mmtr/PCBs/LCMTR_01_01/LCMTR_01_01.csv'#$LCMTR_01_01.I29])">
            <text:p/>
          </table:table-cell>
          <table:table-cell table:formula="of:=IF(['file:///G:/Other%20computers/My%20Laptop/Hobby/mmtr/PCBs/LCMTR_01_01/LCMTR_01_01.csv'#$LCMTR_01_01.J29] = &quot;&quot;;&quot;&quot;;['file:///G:/Other%20computers/My%20Laptop/Hobby/mmtr/PCBs/LCMTR_01_01/LCMTR_01_01.csv'#$LCMTR_01_01.J29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29] = &quot;&quot;;&quot;&quot;;['file:///G:/Other%20computers/My%20Laptop/Hobby/mmtr/PCBs/LCMTR_01_01/LCMTR_01_01.csv'#$LCMTR_01_01.K29])">
            <text:p/>
          </table:table-cell>
          <table:table-cell table:formula="of:=IF(['file:///G:/Other%20computers/My%20Laptop/Hobby/mmtr/PCBs/LCMTR_01_01/LCMTR_01_01.csv'#$LCMTR_01_01.L29] = &quot;&quot;;&quot;&quot;;['file:///G:/Other%20computers/My%20Laptop/Hobby/mmtr/PCBs/LCMTR_01_01/LCMTR_01_01.csv'#$LCMTR_01_01.L29])">
            <text:p/>
          </table:table-cell>
          <table:table-cell table:formula="of:=IF(['file:///G:/Other%20computers/My%20Laptop/Hobby/mmtr/PCBs/LCMTR_01_01/LCMTR_01_01.csv'#$LCMTR_01_01.M29] = &quot;&quot;;&quot;&quot;;['file:///G:/Other%20computers/My%20Laptop/Hobby/mmtr/PCBs/LCMTR_01_01/LCMTR_01_01.csv'#$LCMTR_01_01.M29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0] = &quot;&quot;;&quot;&quot;;['file:///G:/Other%20computers/My%20Laptop/Hobby/mmtr/PCBs/LCMTR_01_01/LCMTR_01_01.csv'#$LCMTR_01_01.A30])" office:value-type="string" office:string-value="R89,R90,R91,R92" calcext:value-type="string">
            <text:p>R89,R90,R91,R92</text:p>
          </table:table-cell>
          <table:table-cell table:formula="of:=IF(['file:///G:/Other%20computers/My%20Laptop/Hobby/mmtr/PCBs/LCMTR_01_01/LCMTR_01_01.csv'#$LCMTR_01_01.B30] = &quot;&quot;;&quot;&quot;;['file:///G:/Other%20computers/My%20Laptop/Hobby/mmtr/PCBs/LCMTR_01_01/LCMTR_01_01.csv'#$LCMTR_01_01.B30])" office:value-type="string" office:string-value="5.1K" calcext:value-type="string">
            <text:p>5.1K</text:p>
          </table:table-cell>
          <table:table-cell table:formula="of:=IF(['file:///G:/Other%20computers/My%20Laptop/Hobby/mmtr/PCBs/LCMTR_01_01/LCMTR_01_01.csv'#$LCMTR_01_01.C30] = &quot;&quot;;&quot;&quot;;['file:///G:/Other%20computers/My%20Laptop/Hobby/mmtr/PCBs/LCMTR_01_01/LCMTR_01_01.csv'#$LCMTR_01_01.C30])">
            <text:p/>
          </table:table-cell>
          <table:table-cell table:formula="of:=IF(['file:///G:/Other%20computers/My%20Laptop/Hobby/mmtr/PCBs/LCMTR_01_01/LCMTR_01_01.csv'#$LCMTR_01_01.D30] = &quot;&quot;;&quot;&quot;;['file:///G:/Other%20computers/My%20Laptop/Hobby/mmtr/PCBs/LCMTR_01_01/LCMTR_01_01.csv'#$LCMTR_01_01.D30])" office:value-type="string" office:string-value="AADuffy:Resistor_0603" calcext:value-type="string">
            <text:p>AADuffy:Resistor_0603</text:p>
          </table:table-cell>
          <table:table-cell table:formula="of:=IF(['file:///G:/Other%20computers/My%20Laptop/Hobby/mmtr/PCBs/LCMTR_01_01/LCMTR_01_01.csv'#$LCMTR_01_01.E30] = &quot;&quot;;&quot;&quot;;['file:///G:/Other%20computers/My%20Laptop/Hobby/mmtr/PCBs/LCMTR_01_01/LCMTR_01_01.csv'#$LCMTR_01_01.E30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30] = &quot;&quot;;&quot;&quot;;['file:///G:/Other%20computers/My%20Laptop/Hobby/mmtr/PCBs/LCMTR_01_01/LCMTR_01_01.csv'#$LCMTR_01_01.F30])">
            <text:p/>
          </table:table-cell>
          <table:table-cell table:formula="of:=IF(['file:///G:/Other%20computers/My%20Laptop/Hobby/mmtr/PCBs/LCMTR_01_01/LCMTR_01_01.csv'#$LCMTR_01_01.G30] = &quot;&quot;;&quot;&quot;;['file:///G:/Other%20computers/My%20Laptop/Hobby/mmtr/PCBs/LCMTR_01_01/LCMTR_01_01.csv'#$LCMTR_01_01.G30])" office:value-type="string" office:string-value="29" calcext:value-type="string">
            <text:p>29</text:p>
          </table:table-cell>
          <table:table-cell table:formula="of:=IF(['file:///G:/Other%20computers/My%20Laptop/Hobby/mmtr/PCBs/LCMTR_01_01/LCMTR_01_01.csv'#$LCMTR_01_01.H30] = &quot;&quot;;&quot;&quot;;['file:///G:/Other%20computers/My%20Laptop/Hobby/mmtr/PCBs/LCMTR_01_01/LCMTR_01_01.csv'#$LCMTR_01_01.H30])">
            <text:p/>
          </table:table-cell>
          <table:table-cell table:style-name="ce2" table:formula="of:=IF(['file:///G:/Other%20computers/My%20Laptop/Hobby/mmtr/PCBs/LCMTR_01_01/LCMTR_01_01.csv'#$LCMTR_01_01.I30] = &quot;&quot;;&quot;&quot;;['file:///G:/Other%20computers/My%20Laptop/Hobby/mmtr/PCBs/LCMTR_01_01/LCMTR_01_01.csv'#$LCMTR_01_01.I30])">
            <text:p/>
          </table:table-cell>
          <table:table-cell table:formula="of:=IF(['file:///G:/Other%20computers/My%20Laptop/Hobby/mmtr/PCBs/LCMTR_01_01/LCMTR_01_01.csv'#$LCMTR_01_01.J30] = &quot;&quot;;&quot;&quot;;['file:///G:/Other%20computers/My%20Laptop/Hobby/mmtr/PCBs/LCMTR_01_01/LCMTR_01_01.csv'#$LCMTR_01_01.J30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30] = &quot;&quot;;&quot;&quot;;['file:///G:/Other%20computers/My%20Laptop/Hobby/mmtr/PCBs/LCMTR_01_01/LCMTR_01_01.csv'#$LCMTR_01_01.K30])">
            <text:p/>
          </table:table-cell>
          <table:table-cell table:formula="of:=IF(['file:///G:/Other%20computers/My%20Laptop/Hobby/mmtr/PCBs/LCMTR_01_01/LCMTR_01_01.csv'#$LCMTR_01_01.L30] = &quot;&quot;;&quot;&quot;;['file:///G:/Other%20computers/My%20Laptop/Hobby/mmtr/PCBs/LCMTR_01_01/LCMTR_01_01.csv'#$LCMTR_01_01.L30])">
            <text:p/>
          </table:table-cell>
          <table:table-cell table:formula="of:=IF(['file:///G:/Other%20computers/My%20Laptop/Hobby/mmtr/PCBs/LCMTR_01_01/LCMTR_01_01.csv'#$LCMTR_01_01.M30] = &quot;&quot;;&quot;&quot;;['file:///G:/Other%20computers/My%20Laptop/Hobby/mmtr/PCBs/LCMTR_01_01/LCMTR_01_01.csv'#$LCMTR_01_01.M30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1] = &quot;&quot;;&quot;&quot;;['file:///G:/Other%20computers/My%20Laptop/Hobby/mmtr/PCBs/LCMTR_01_01/LCMTR_01_01.csv'#$LCMTR_01_01.A31])" office:value-type="string" office:string-value="U1" calcext:value-type="string">
            <text:p>U1</text:p>
          </table:table-cell>
          <table:table-cell table:formula="of:=IF(['file:///G:/Other%20computers/My%20Laptop/Hobby/mmtr/PCBs/LCMTR_01_01/LCMTR_01_01.csv'#$LCMTR_01_01.B31] = &quot;&quot;;&quot;&quot;;['file:///G:/Other%20computers/My%20Laptop/Hobby/mmtr/PCBs/LCMTR_01_01/LCMTR_01_01.csv'#$LCMTR_01_01.B31])" office:value-type="string" office:string-value="0.2pA 5uV" calcext:value-type="string">
            <text:p>0.2pA 5uV</text:p>
          </table:table-cell>
          <table:table-cell table:style-name="ce2" table:formula="of:=IF(['file:///G:/Other%20computers/My%20Laptop/Hobby/mmtr/PCBs/LCMTR_01_01/LCMTR_01_01.csv'#$LCMTR_01_01.C31] = &quot;&quot;;&quot;&quot;;['file:///G:/Other%20computers/My%20Laptop/Hobby/mmtr/PCBs/LCMTR_01_01/LCMTR_01_01.csv'#$LCMTR_01_01.C31])" office:value-type="string" office:string-value="https://www.diodes.com/assets/Datasheets/AS2376.pdf" calcext:value-type="string">
            <text:p>https://www.diodes.com/assets/Datasheets/AS2376.pdf</text:p>
          </table:table-cell>
          <table:table-cell table:formula="of:=IF(['file:///G:/Other%20computers/My%20Laptop/Hobby/mmtr/PCBs/LCMTR_01_01/LCMTR_01_01.csv'#$LCMTR_01_01.D31] = &quot;&quot;;&quot;&quot;;['file:///G:/Other%20computers/My%20Laptop/Hobby/mmtr/PCBs/LCMTR_01_01/LCMTR_01_01.csv'#$LCMTR_01_01.D31])" office:value-type="string" office:string-value="AADuffy:SOIC-8_AS2376S-13" calcext:value-type="string">
            <text:p>AADuffy:SOIC-8_AS2376S-13</text:p>
          </table:table-cell>
          <table:table-cell table:formula="of:=IF(['file:///G:/Other%20computers/My%20Laptop/Hobby/mmtr/PCBs/LCMTR_01_01/LCMTR_01_01.csv'#$LCMTR_01_01.E31] = &quot;&quot;;&quot;&quot;;['file:///G:/Other%20computers/My%20Laptop/Hobby/mmtr/PCBs/LCMTR_01_01/LCMTR_01_01.csv'#$LCMTR_01_01.E31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31] = &quot;&quot;;&quot;&quot;;['file:///G:/Other%20computers/My%20Laptop/Hobby/mmtr/PCBs/LCMTR_01_01/LCMTR_01_01.csv'#$LCMTR_01_01.F31])">
            <text:p/>
          </table:table-cell>
          <table:table-cell table:formula="of:=IF(['file:///G:/Other%20computers/My%20Laptop/Hobby/mmtr/PCBs/LCMTR_01_01/LCMTR_01_01.csv'#$LCMTR_01_01.G31] = &quot;&quot;;&quot;&quot;;['file:///G:/Other%20computers/My%20Laptop/Hobby/mmtr/PCBs/LCMTR_01_01/LCMTR_01_01.csv'#$LCMTR_01_01.G31])" office:value-type="string" office:string-value="30" calcext:value-type="string">
            <text:p>30</text:p>
          </table:table-cell>
          <table:table-cell table:style-name="ce2" table:formula="of:=IF(['file:///G:/Other%20computers/My%20Laptop/Hobby/mmtr/PCBs/LCMTR_01_01/LCMTR_01_01.csv'#$LCMTR_01_01.H31] = &quot;&quot;;&quot;&quot;;['file:///G:/Other%20computers/My%20Laptop/Hobby/mmtr/PCBs/LCMTR_01_01/LCMTR_01_01.csv'#$LCMTR_01_01.H31])" office:value-type="string" office:string-value="Diodes Inc" calcext:value-type="string">
            <text:p>Diodes Inc</text:p>
          </table:table-cell>
          <table:table-cell table:style-name="ce2" table:formula="of:=IF(['file:///G:/Other%20computers/My%20Laptop/Hobby/mmtr/PCBs/LCMTR_01_01/LCMTR_01_01.csv'#$LCMTR_01_01.I31] = &quot;&quot;;&quot;&quot;;['file:///G:/Other%20computers/My%20Laptop/Hobby/mmtr/PCBs/LCMTR_01_01/LCMTR_01_01.csv'#$LCMTR_01_01.I31])" office:value-type="string" office:string-value="AS2376S-13" calcext:value-type="string">
            <text:p>AS2376S-13</text:p>
          </table:table-cell>
          <table:table-cell table:formula="of:=IF(['file:///G:/Other%20computers/My%20Laptop/Hobby/mmtr/PCBs/LCMTR_01_01/LCMTR_01_01.csv'#$LCMTR_01_01.J31] = &quot;&quot;;&quot;&quot;;['file:///G:/Other%20computers/My%20Laptop/Hobby/mmtr/PCBs/LCMTR_01_01/LCMTR_01_01.csv'#$LCMTR_01_01.J31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1] = &quot;&quot;;&quot;&quot;;['file:///G:/Other%20computers/My%20Laptop/Hobby/mmtr/PCBs/LCMTR_01_01/LCMTR_01_01.csv'#$LCMTR_01_01.K31])" office:value-type="string" office:string-value="https://www.digikey.com/en/products/detail/diodes-incorporated/AS2376S-13/20371292" calcext:value-type="string">
            <text:p>https://www.digikey.com/en/products/detail/diodes-incorporated/AS2376S-13/20371292</text:p>
          </table:table-cell>
          <table:table-cell table:style-name="ce2" table:formula="of:=IF(['file:///G:/Other%20computers/My%20Laptop/Hobby/mmtr/PCBs/LCMTR_01_01/LCMTR_01_01.csv'#$LCMTR_01_01.L31] = &quot;&quot;;&quot;&quot;;['file:///G:/Other%20computers/My%20Laptop/Hobby/mmtr/PCBs/LCMTR_01_01/LCMTR_01_01.csv'#$LCMTR_01_01.L31])" office:value-type="string" office:string-value="31-AS2376S-13CT-ND" calcext:value-type="string">
            <text:p>31-AS2376S-13CT-ND</text:p>
          </table:table-cell>
          <table:table-cell table:formula="of:=IF(['file:///G:/Other%20computers/My%20Laptop/Hobby/mmtr/PCBs/LCMTR_01_01/LCMTR_01_01.csv'#$LCMTR_01_01.M31] = &quot;&quot;;&quot;&quot;;['file:///G:/Other%20computers/My%20Laptop/Hobby/mmtr/PCBs/LCMTR_01_01/LCMTR_01_01.csv'#$LCMTR_01_01.M31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2] = &quot;&quot;;&quot;&quot;;['file:///G:/Other%20computers/My%20Laptop/Hobby/mmtr/PCBs/LCMTR_01_01/LCMTR_01_01.csv'#$LCMTR_01_01.A32])" office:value-type="string" office:string-value="U2,U3,U4,U5" calcext:value-type="string">
            <text:p>U2,U3,U4,U5</text:p>
          </table:table-cell>
          <table:table-cell table:formula="of:=IF(['file:///G:/Other%20computers/My%20Laptop/Hobby/mmtr/PCBs/LCMTR_01_01/LCMTR_01_01.csv'#$LCMTR_01_01.B32] = &quot;&quot;;&quot;&quot;;['file:///G:/Other%20computers/My%20Laptop/Hobby/mmtr/PCBs/LCMTR_01_01/LCMTR_01_01.csv'#$LCMTR_01_01.B32])" office:value-type="string" office:string-value="TS5A3159DCKR" calcext:value-type="string">
            <text:p>TS5A3159DCKR</text:p>
          </table:table-cell>
          <table:table-cell table:style-name="ce2" table:formula="of:=IF(['file:///G:/Other%20computers/My%20Laptop/Hobby/mmtr/PCBs/LCMTR_01_01/LCMTR_01_01.csv'#$LCMTR_01_01.C32] = &quot;&quot;;&quot;&quot;;['file:///G:/Other%20computers/My%20Laptop/Hobby/mmtr/PCBs/LCMTR_01_01/LCMTR_01_01.csv'#$LCMTR_01_01.C32])" office:value-type="string" office:string-value="https://www.ti.com/lit/ds/symlink/ts5a3159.pdf?HQS=dis-dk-null-digikeymode-dsf-pf-null-wwe&amp;ts=1735579328072" calcext:value-type="string">
            <text:p>https://www.ti.com/lit/ds/symlink/ts5a3159.pdf?HQS=dis-dk-null-digikeymode-dsf-pf-null-wwe&amp;ts=1735579328072</text:p>
          </table:table-cell>
          <table:table-cell table:formula="of:=IF(['file:///G:/Other%20computers/My%20Laptop/Hobby/mmtr/PCBs/LCMTR_01_01/LCMTR_01_01.csv'#$LCMTR_01_01.D32] = &quot;&quot;;&quot;&quot;;['file:///G:/Other%20computers/My%20Laptop/Hobby/mmtr/PCBs/LCMTR_01_01/LCMTR_01_01.csv'#$LCMTR_01_01.D32])" office:value-type="string" office:string-value="AADuffy:SC-70_TS5A3159DCKR" calcext:value-type="string">
            <text:p>AADuffy:SC-70_TS5A3159DCKR</text:p>
          </table:table-cell>
          <table:table-cell table:formula="of:=IF(['file:///G:/Other%20computers/My%20Laptop/Hobby/mmtr/PCBs/LCMTR_01_01/LCMTR_01_01.csv'#$LCMTR_01_01.E32] = &quot;&quot;;&quot;&quot;;['file:///G:/Other%20computers/My%20Laptop/Hobby/mmtr/PCBs/LCMTR_01_01/LCMTR_01_01.csv'#$LCMTR_01_01.E32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32] = &quot;&quot;;&quot;&quot;;['file:///G:/Other%20computers/My%20Laptop/Hobby/mmtr/PCBs/LCMTR_01_01/LCMTR_01_01.csv'#$LCMTR_01_01.F32])">
            <text:p/>
          </table:table-cell>
          <table:table-cell table:formula="of:=IF(['file:///G:/Other%20computers/My%20Laptop/Hobby/mmtr/PCBs/LCMTR_01_01/LCMTR_01_01.csv'#$LCMTR_01_01.G32] = &quot;&quot;;&quot;&quot;;['file:///G:/Other%20computers/My%20Laptop/Hobby/mmtr/PCBs/LCMTR_01_01/LCMTR_01_01.csv'#$LCMTR_01_01.G32])" office:value-type="string" office:string-value="31" calcext:value-type="string">
            <text:p>31</text:p>
          </table:table-cell>
          <table:table-cell table:style-name="ce2" table:formula="of:=IF(['file:///G:/Other%20computers/My%20Laptop/Hobby/mmtr/PCBs/LCMTR_01_01/LCMTR_01_01.csv'#$LCMTR_01_01.H32] = &quot;&quot;;&quot;&quot;;['file:///G:/Other%20computers/My%20Laptop/Hobby/mmtr/PCBs/LCMTR_01_01/LCMTR_01_01.csv'#$LCMTR_01_01.H32])" office:value-type="string" office:string-value="TI" calcext:value-type="string">
            <text:p>TI</text:p>
          </table:table-cell>
          <table:table-cell table:formula="of:=IF(['file:///G:/Other%20computers/My%20Laptop/Hobby/mmtr/PCBs/LCMTR_01_01/LCMTR_01_01.csv'#$LCMTR_01_01.I32] = &quot;&quot;;&quot;&quot;;['file:///G:/Other%20computers/My%20Laptop/Hobby/mmtr/PCBs/LCMTR_01_01/LCMTR_01_01.csv'#$LCMTR_01_01.I32])" office:value-type="string" office:string-value="TS5A3159DCKR" calcext:value-type="string">
            <text:p>TS5A3159DCKR</text:p>
          </table:table-cell>
          <table:table-cell table:formula="of:=IF(['file:///G:/Other%20computers/My%20Laptop/Hobby/mmtr/PCBs/LCMTR_01_01/LCMTR_01_01.csv'#$LCMTR_01_01.J32] = &quot;&quot;;&quot;&quot;;['file:///G:/Other%20computers/My%20Laptop/Hobby/mmtr/PCBs/LCMTR_01_01/LCMTR_01_01.csv'#$LCMTR_01_01.J32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2] = &quot;&quot;;&quot;&quot;;['file:///G:/Other%20computers/My%20Laptop/Hobby/mmtr/PCBs/LCMTR_01_01/LCMTR_01_01.csv'#$LCMTR_01_01.K32])" office:value-type="string" office:string-value="https://www.digikey.com/en/products/detail/texas-instruments/TS5A3159DCKR/684802" calcext:value-type="string">
            <text:p>https://www.digikey.com/en/products/detail/texas-instruments/TS5A3159DCKR/684802</text:p>
          </table:table-cell>
          <table:table-cell table:style-name="ce2" table:formula="of:=IF(['file:///G:/Other%20computers/My%20Laptop/Hobby/mmtr/PCBs/LCMTR_01_01/LCMTR_01_01.csv'#$LCMTR_01_01.L32] = &quot;&quot;;&quot;&quot;;['file:///G:/Other%20computers/My%20Laptop/Hobby/mmtr/PCBs/LCMTR_01_01/LCMTR_01_01.csv'#$LCMTR_01_01.L32])" office:value-type="string" office:string-value="296-17303-1-ND" calcext:value-type="string">
            <text:p>296-17303-1-ND</text:p>
          </table:table-cell>
          <table:table-cell table:formula="of:=IF(['file:///G:/Other%20computers/My%20Laptop/Hobby/mmtr/PCBs/LCMTR_01_01/LCMTR_01_01.csv'#$LCMTR_01_01.M32] = &quot;&quot;;&quot;&quot;;['file:///G:/Other%20computers/My%20Laptop/Hobby/mmtr/PCBs/LCMTR_01_01/LCMTR_01_01.csv'#$LCMTR_01_01.M3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3] = &quot;&quot;;&quot;&quot;;['file:///G:/Other%20computers/My%20Laptop/Hobby/mmtr/PCBs/LCMTR_01_01/LCMTR_01_01.csv'#$LCMTR_01_01.A33])" office:value-type="string" office:string-value="U6,U7,U8,U12,U13,U16" calcext:value-type="string">
            <text:p>U6,U7,U8,U12,U13,U16</text:p>
          </table:table-cell>
          <table:table-cell table:formula="of:=IF(['file:///G:/Other%20computers/My%20Laptop/Hobby/mmtr/PCBs/LCMTR_01_01/LCMTR_01_01.csv'#$LCMTR_01_01.B33] = &quot;&quot;;&quot;&quot;;['file:///G:/Other%20computers/My%20Laptop/Hobby/mmtr/PCBs/LCMTR_01_01/LCMTR_01_01.csv'#$LCMTR_01_01.B33])" office:value-type="string" office:string-value="70pA 8uV" calcext:value-type="string">
            <text:p>70pA 8uV</text:p>
          </table:table-cell>
          <table:table-cell table:style-name="ce2" table:formula="of:=IF(['file:///G:/Other%20computers/My%20Laptop/Hobby/mmtr/PCBs/LCMTR_01_01/LCMTR_01_01.csv'#$LCMTR_01_01.C33] = &quot;&quot;;&quot;&quot;;['file:///G:/Other%20computers/My%20Laptop/Hobby/mmtr/PCBs/LCMTR_01_01/LCMTR_01_01.csv'#$LCMTR_01_01.C33])" office:value-type="string" office:string-value="kicad-embed://AS333.pdf" calcext:value-type="string">
            <text:p>kicad-embed://AS333.pdf</text:p>
          </table:table-cell>
          <table:table-cell table:formula="of:=IF(['file:///G:/Other%20computers/My%20Laptop/Hobby/mmtr/PCBs/LCMTR_01_01/LCMTR_01_01.csv'#$LCMTR_01_01.D33] = &quot;&quot;;&quot;&quot;;['file:///G:/Other%20computers/My%20Laptop/Hobby/mmtr/PCBs/LCMTR_01_01/LCMTR_01_01.csv'#$LCMTR_01_01.D33])" office:value-type="string" office:string-value="AADuffy:SC-70-5_AS333SE-7" calcext:value-type="string">
            <text:p>AADuffy:SC-70-5_AS333SE-7</text:p>
          </table:table-cell>
          <table:table-cell table:formula="of:=IF(['file:///G:/Other%20computers/My%20Laptop/Hobby/mmtr/PCBs/LCMTR_01_01/LCMTR_01_01.csv'#$LCMTR_01_01.E33] = &quot;&quot;;&quot;&quot;;['file:///G:/Other%20computers/My%20Laptop/Hobby/mmtr/PCBs/LCMTR_01_01/LCMTR_01_01.csv'#$LCMTR_01_01.E33])" office:value-type="string" office:string-value="6" calcext:value-type="string">
            <text:p>6</text:p>
          </table:table-cell>
          <table:table-cell table:formula="of:=IF(['file:///G:/Other%20computers/My%20Laptop/Hobby/mmtr/PCBs/LCMTR_01_01/LCMTR_01_01.csv'#$LCMTR_01_01.F33] = &quot;&quot;;&quot;&quot;;['file:///G:/Other%20computers/My%20Laptop/Hobby/mmtr/PCBs/LCMTR_01_01/LCMTR_01_01.csv'#$LCMTR_01_01.F33])">
            <text:p/>
          </table:table-cell>
          <table:table-cell table:formula="of:=IF(['file:///G:/Other%20computers/My%20Laptop/Hobby/mmtr/PCBs/LCMTR_01_01/LCMTR_01_01.csv'#$LCMTR_01_01.G33] = &quot;&quot;;&quot;&quot;;['file:///G:/Other%20computers/My%20Laptop/Hobby/mmtr/PCBs/LCMTR_01_01/LCMTR_01_01.csv'#$LCMTR_01_01.G33])" office:value-type="string" office:string-value="32" calcext:value-type="string">
            <text:p>32</text:p>
          </table:table-cell>
          <table:table-cell table:style-name="ce2" table:formula="of:=IF(['file:///G:/Other%20computers/My%20Laptop/Hobby/mmtr/PCBs/LCMTR_01_01/LCMTR_01_01.csv'#$LCMTR_01_01.H33] = &quot;&quot;;&quot;&quot;;['file:///G:/Other%20computers/My%20Laptop/Hobby/mmtr/PCBs/LCMTR_01_01/LCMTR_01_01.csv'#$LCMTR_01_01.H33])" office:value-type="string" office:string-value="Diodes Inc" calcext:value-type="string">
            <text:p>Diodes Inc</text:p>
          </table:table-cell>
          <table:table-cell table:style-name="ce2" table:formula="of:=IF(['file:///G:/Other%20computers/My%20Laptop/Hobby/mmtr/PCBs/LCMTR_01_01/LCMTR_01_01.csv'#$LCMTR_01_01.I33] = &quot;&quot;;&quot;&quot;;['file:///G:/Other%20computers/My%20Laptop/Hobby/mmtr/PCBs/LCMTR_01_01/LCMTR_01_01.csv'#$LCMTR_01_01.I33])" office:value-type="string" office:string-value="AS333SE-7" calcext:value-type="string">
            <text:p>AS333SE-7</text:p>
          </table:table-cell>
          <table:table-cell table:formula="of:=IF(['file:///G:/Other%20computers/My%20Laptop/Hobby/mmtr/PCBs/LCMTR_01_01/LCMTR_01_01.csv'#$LCMTR_01_01.J33] = &quot;&quot;;&quot;&quot;;['file:///G:/Other%20computers/My%20Laptop/Hobby/mmtr/PCBs/LCMTR_01_01/LCMTR_01_01.csv'#$LCMTR_01_01.J33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3] = &quot;&quot;;&quot;&quot;;['file:///G:/Other%20computers/My%20Laptop/Hobby/mmtr/PCBs/LCMTR_01_01/LCMTR_01_01.csv'#$LCMTR_01_01.K33])" office:value-type="string" office:string-value="https://www.digikey.com/en/products/detail/diodes-incorporated/AS333SE-7/18784660" calcext:value-type="string">
            <text:p>https://www.digikey.com/en/products/detail/diodes-incorporated/AS333SE-7/18784660</text:p>
          </table:table-cell>
          <table:table-cell table:style-name="ce2" table:formula="of:=IF(['file:///G:/Other%20computers/My%20Laptop/Hobby/mmtr/PCBs/LCMTR_01_01/LCMTR_01_01.csv'#$LCMTR_01_01.L33] = &quot;&quot;;&quot;&quot;;['file:///G:/Other%20computers/My%20Laptop/Hobby/mmtr/PCBs/LCMTR_01_01/LCMTR_01_01.csv'#$LCMTR_01_01.L33])" office:value-type="string" office:string-value="31-AS333SE-7CT-ND" calcext:value-type="string">
            <text:p>31-AS333SE-7CT-ND</text:p>
          </table:table-cell>
          <table:table-cell table:formula="of:=IF(['file:///G:/Other%20computers/My%20Laptop/Hobby/mmtr/PCBs/LCMTR_01_01/LCMTR_01_01.csv'#$LCMTR_01_01.M33] = &quot;&quot;;&quot;&quot;;['file:///G:/Other%20computers/My%20Laptop/Hobby/mmtr/PCBs/LCMTR_01_01/LCMTR_01_01.csv'#$LCMTR_01_01.M3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4] = &quot;&quot;;&quot;&quot;;['file:///G:/Other%20computers/My%20Laptop/Hobby/mmtr/PCBs/LCMTR_01_01/LCMTR_01_01.csv'#$LCMTR_01_01.A34])" office:value-type="string" office:string-value="U9,U10" calcext:value-type="string">
            <text:p>U9,U10</text:p>
          </table:table-cell>
          <table:table-cell table:formula="of:=IF(['file:///G:/Other%20computers/My%20Laptop/Hobby/mmtr/PCBs/LCMTR_01_01/LCMTR_01_01.csv'#$LCMTR_01_01.B34] = &quot;&quot;;&quot;&quot;;['file:///G:/Other%20computers/My%20Laptop/Hobby/mmtr/PCBs/LCMTR_01_01/LCMTR_01_01.csv'#$LCMTR_01_01.B34])" office:value-type="string" office:string-value="5V" calcext:value-type="string">
            <text:p>5V</text:p>
          </table:table-cell>
          <table:table-cell table:style-name="ce2" table:formula="of:=IF(['file:///G:/Other%20computers/My%20Laptop/Hobby/mmtr/PCBs/LCMTR_01_01/LCMTR_01_01.csv'#$LCMTR_01_01.C34] = &quot;&quot;;&quot;&quot;;['file:///G:/Other%20computers/My%20Laptop/Hobby/mmtr/PCBs/LCMTR_01_01/LCMTR_01_01.csv'#$LCMTR_01_01.C34])" office:value-type="string" office:string-value="https://www.diodes.com/assets/Datasheets/AP2210.pdf" calcext:value-type="string">
            <text:p>https://www.diodes.com/assets/Datasheets/AP2210.pdf</text:p>
          </table:table-cell>
          <table:table-cell table:formula="of:=IF(['file:///G:/Other%20computers/My%20Laptop/Hobby/mmtr/PCBs/LCMTR_01_01/LCMTR_01_01.csv'#$LCMTR_01_01.D34] = &quot;&quot;;&quot;&quot;;['file:///G:/Other%20computers/My%20Laptop/Hobby/mmtr/PCBs/LCMTR_01_01/LCMTR_01_01.csv'#$LCMTR_01_01.D34])" office:value-type="string" office:string-value="AADuffy:SOT23-5" calcext:value-type="string">
            <text:p>AADuffy:SOT23-5</text:p>
          </table:table-cell>
          <table:table-cell table:formula="of:=IF(['file:///G:/Other%20computers/My%20Laptop/Hobby/mmtr/PCBs/LCMTR_01_01/LCMTR_01_01.csv'#$LCMTR_01_01.E34] = &quot;&quot;;&quot;&quot;;['file:///G:/Other%20computers/My%20Laptop/Hobby/mmtr/PCBs/LCMTR_01_01/LCMTR_01_01.csv'#$LCMTR_01_01.E34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34] = &quot;&quot;;&quot;&quot;;['file:///G:/Other%20computers/My%20Laptop/Hobby/mmtr/PCBs/LCMTR_01_01/LCMTR_01_01.csv'#$LCMTR_01_01.F34])">
            <text:p/>
          </table:table-cell>
          <table:table-cell table:formula="of:=IF(['file:///G:/Other%20computers/My%20Laptop/Hobby/mmtr/PCBs/LCMTR_01_01/LCMTR_01_01.csv'#$LCMTR_01_01.G34] = &quot;&quot;;&quot;&quot;;['file:///G:/Other%20computers/My%20Laptop/Hobby/mmtr/PCBs/LCMTR_01_01/LCMTR_01_01.csv'#$LCMTR_01_01.G34])" office:value-type="string" office:string-value="33" calcext:value-type="string">
            <text:p>33</text:p>
          </table:table-cell>
          <table:table-cell table:style-name="ce2" table:formula="of:=IF(['file:///G:/Other%20computers/My%20Laptop/Hobby/mmtr/PCBs/LCMTR_01_01/LCMTR_01_01.csv'#$LCMTR_01_01.H34] = &quot;&quot;;&quot;&quot;;['file:///G:/Other%20computers/My%20Laptop/Hobby/mmtr/PCBs/LCMTR_01_01/LCMTR_01_01.csv'#$LCMTR_01_01.H34])" office:value-type="string" office:string-value="Diodes Incorporated" calcext:value-type="string">
            <text:p>Diodes Incorporated</text:p>
          </table:table-cell>
          <table:table-cell table:style-name="ce2" table:formula="of:=IF(['file:///G:/Other%20computers/My%20Laptop/Hobby/mmtr/PCBs/LCMTR_01_01/LCMTR_01_01.csv'#$LCMTR_01_01.I34] = &quot;&quot;;&quot;&quot;;['file:///G:/Other%20computers/My%20Laptop/Hobby/mmtr/PCBs/LCMTR_01_01/LCMTR_01_01.csv'#$LCMTR_01_01.I34])" office:value-type="string" office:string-value="AP2210K-5.0TRG1" calcext:value-type="string">
            <text:p>AP2210K-5.0TRG1</text:p>
          </table:table-cell>
          <table:table-cell table:formula="of:=IF(['file:///G:/Other%20computers/My%20Laptop/Hobby/mmtr/PCBs/LCMTR_01_01/LCMTR_01_01.csv'#$LCMTR_01_01.J34] = &quot;&quot;;&quot;&quot;;['file:///G:/Other%20computers/My%20Laptop/Hobby/mmtr/PCBs/LCMTR_01_01/LCMTR_01_01.csv'#$LCMTR_01_01.J34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4] = &quot;&quot;;&quot;&quot;;['file:///G:/Other%20computers/My%20Laptop/Hobby/mmtr/PCBs/LCMTR_01_01/LCMTR_01_01.csv'#$LCMTR_01_01.K34])" office:value-type="string" office:string-value="https://www.digikey.com/en/products/detail/diodes-incorporated/AP2210K-5-0TRG1/4470820" calcext:value-type="string">
            <text:p>https://www.digikey.com/en/products/detail/diodes-incorporated/AP2210K-5-0TRG1/4470820</text:p>
          </table:table-cell>
          <table:table-cell table:style-name="ce2" table:formula="of:=IF(['file:///G:/Other%20computers/My%20Laptop/Hobby/mmtr/PCBs/LCMTR_01_01/LCMTR_01_01.csv'#$LCMTR_01_01.L34] = &quot;&quot;;&quot;&quot;;['file:///G:/Other%20computers/My%20Laptop/Hobby/mmtr/PCBs/LCMTR_01_01/LCMTR_01_01.csv'#$LCMTR_01_01.L34])" office:value-type="string" office:string-value="AP2210K-5.0TRG1DICT-ND" calcext:value-type="string">
            <text:p>AP2210K-5.0TRG1DICT-ND</text:p>
          </table:table-cell>
          <table:table-cell table:formula="of:=IF(['file:///G:/Other%20computers/My%20Laptop/Hobby/mmtr/PCBs/LCMTR_01_01/LCMTR_01_01.csv'#$LCMTR_01_01.M34] = &quot;&quot;;&quot;&quot;;['file:///G:/Other%20computers/My%20Laptop/Hobby/mmtr/PCBs/LCMTR_01_01/LCMTR_01_01.csv'#$LCMTR_01_01.M3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5] = &quot;&quot;;&quot;&quot;;['file:///G:/Other%20computers/My%20Laptop/Hobby/mmtr/PCBs/LCMTR_01_01/LCMTR_01_01.csv'#$LCMTR_01_01.A35])" office:value-type="string" office:string-value="U11,U15,U27" calcext:value-type="string">
            <text:p>U11,U15,U27</text:p>
          </table:table-cell>
          <table:table-cell table:formula="of:=IF(['file:///G:/Other%20computers/My%20Laptop/Hobby/mmtr/PCBs/LCMTR_01_01/LCMTR_01_01.csv'#$LCMTR_01_01.B35] = &quot;&quot;;&quot;&quot;;['file:///G:/Other%20computers/My%20Laptop/Hobby/mmtr/PCBs/LCMTR_01_01/LCMTR_01_01.csv'#$LCMTR_01_01.B35])" office:value-type="string" office:string-value="3.3V" calcext:value-type="string">
            <text:p>3.3V</text:p>
          </table:table-cell>
          <table:table-cell table:formula="of:=IF(['file:///G:/Other%20computers/My%20Laptop/Hobby/mmtr/PCBs/LCMTR_01_01/LCMTR_01_01.csv'#$LCMTR_01_01.C35] = &quot;&quot;;&quot;&quot;;['file:///G:/Other%20computers/My%20Laptop/Hobby/mmtr/PCBs/LCMTR_01_01/LCMTR_01_01.csv'#$LCMTR_01_01.C35])" office:value-type="string" office:string-value="https://www.diodes.com/assets/Datasheets/AP7375.pdf" calcext:value-type="string">
            <text:p>https://www.diodes.com/assets/Datasheets/AP7375.pdf</text:p>
          </table:table-cell>
          <table:table-cell table:formula="of:=IF(['file:///G:/Other%20computers/My%20Laptop/Hobby/mmtr/PCBs/LCMTR_01_01/LCMTR_01_01.csv'#$LCMTR_01_01.D35] = &quot;&quot;;&quot;&quot;;['file:///G:/Other%20computers/My%20Laptop/Hobby/mmtr/PCBs/LCMTR_01_01/LCMTR_01_01.csv'#$LCMTR_01_01.D35])" office:value-type="string" office:string-value="AADuffy:SC-74A_standard" calcext:value-type="string">
            <text:p>AADuffy:SC-74A_standard</text:p>
          </table:table-cell>
          <table:table-cell table:formula="of:=IF(['file:///G:/Other%20computers/My%20Laptop/Hobby/mmtr/PCBs/LCMTR_01_01/LCMTR_01_01.csv'#$LCMTR_01_01.E35] = &quot;&quot;;&quot;&quot;;['file:///G:/Other%20computers/My%20Laptop/Hobby/mmtr/PCBs/LCMTR_01_01/LCMTR_01_01.csv'#$LCMTR_01_01.E35])" office:value-type="string" office:string-value="3" calcext:value-type="string">
            <text:p>3</text:p>
          </table:table-cell>
          <table:table-cell table:formula="of:=IF(['file:///G:/Other%20computers/My%20Laptop/Hobby/mmtr/PCBs/LCMTR_01_01/LCMTR_01_01.csv'#$LCMTR_01_01.F35] = &quot;&quot;;&quot;&quot;;['file:///G:/Other%20computers/My%20Laptop/Hobby/mmtr/PCBs/LCMTR_01_01/LCMTR_01_01.csv'#$LCMTR_01_01.F35])">
            <text:p/>
          </table:table-cell>
          <table:table-cell table:formula="of:=IF(['file:///G:/Other%20computers/My%20Laptop/Hobby/mmtr/PCBs/LCMTR_01_01/LCMTR_01_01.csv'#$LCMTR_01_01.G35] = &quot;&quot;;&quot;&quot;;['file:///G:/Other%20computers/My%20Laptop/Hobby/mmtr/PCBs/LCMTR_01_01/LCMTR_01_01.csv'#$LCMTR_01_01.G35])" office:value-type="string" office:string-value="34" calcext:value-type="string">
            <text:p>34</text:p>
          </table:table-cell>
          <table:table-cell table:formula="of:=IF(['file:///G:/Other%20computers/My%20Laptop/Hobby/mmtr/PCBs/LCMTR_01_01/LCMTR_01_01.csv'#$LCMTR_01_01.H35] = &quot;&quot;;&quot;&quot;;['file:///G:/Other%20computers/My%20Laptop/Hobby/mmtr/PCBs/LCMTR_01_01/LCMTR_01_01.csv'#$LCMTR_01_01.H35])" office:value-type="string" office:string-value="Toshiba" calcext:value-type="string">
            <text:p>Toshiba</text:p>
          </table:table-cell>
          <table:table-cell table:style-name="ce2" table:formula="of:=IF(['file:///G:/Other%20computers/My%20Laptop/Hobby/mmtr/PCBs/LCMTR_01_01/LCMTR_01_01.csv'#$LCMTR_01_01.I35] = &quot;&quot;;&quot;&quot;;['file:///G:/Other%20computers/My%20Laptop/Hobby/mmtr/PCBs/LCMTR_01_01/LCMTR_01_01.csv'#$LCMTR_01_01.I35])" office:value-type="string" office:string-value="TCR2EF33" calcext:value-type="string">
            <text:p>TCR2EF33</text:p>
          </table:table-cell>
          <table:table-cell table:formula="of:=IF(['file:///G:/Other%20computers/My%20Laptop/Hobby/mmtr/PCBs/LCMTR_01_01/LCMTR_01_01.csv'#$LCMTR_01_01.J35] = &quot;&quot;;&quot;&quot;;['file:///G:/Other%20computers/My%20Laptop/Hobby/mmtr/PCBs/LCMTR_01_01/LCMTR_01_01.csv'#$LCMTR_01_01.J35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5] = &quot;&quot;;&quot;&quot;;['file:///G:/Other%20computers/My%20Laptop/Hobby/mmtr/PCBs/LCMTR_01_01/LCMTR_01_01.csv'#$LCMTR_01_01.K35])" office:value-type="string" office:string-value="https://www.digikey.com/en/products/detail/toshiba-semiconductor-and-storage/TCR2EF33-LM-CT/4503183" calcext:value-type="string">
            <text:p>https://www.digikey.com/en/products/detail/toshiba-semiconductor-and-storage/TCR2EF33-LM-CT/4503183</text:p>
          </table:table-cell>
          <table:table-cell table:style-name="ce2" table:formula="of:=IF(['file:///G:/Other%20computers/My%20Laptop/Hobby/mmtr/PCBs/LCMTR_01_01/LCMTR_01_01.csv'#$LCMTR_01_01.L35] = &quot;&quot;;&quot;&quot;;['file:///G:/Other%20computers/My%20Laptop/Hobby/mmtr/PCBs/LCMTR_01_01/LCMTR_01_01.csv'#$LCMTR_01_01.L35])" office:value-type="string" office:string-value="TCR2EF33LM(CTCT-ND" calcext:value-type="string">
            <text:p>TCR2EF33LM(CTCT-ND</text:p>
          </table:table-cell>
          <table:table-cell table:formula="of:=IF(['file:///G:/Other%20computers/My%20Laptop/Hobby/mmtr/PCBs/LCMTR_01_01/LCMTR_01_01.csv'#$LCMTR_01_01.M35] = &quot;&quot;;&quot;&quot;;['file:///G:/Other%20computers/My%20Laptop/Hobby/mmtr/PCBs/LCMTR_01_01/LCMTR_01_01.csv'#$LCMTR_01_01.M3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6] = &quot;&quot;;&quot;&quot;;['file:///G:/Other%20computers/My%20Laptop/Hobby/mmtr/PCBs/LCMTR_01_01/LCMTR_01_01.csv'#$LCMTR_01_01.A36])" office:value-type="string" office:string-value="U14" calcext:value-type="string">
            <text:p>U14</text:p>
          </table:table-cell>
          <table:table-cell table:formula="of:=IF(['file:///G:/Other%20computers/My%20Laptop/Hobby/mmtr/PCBs/LCMTR_01_01/LCMTR_01_01.csv'#$LCMTR_01_01.B36] = &quot;&quot;;&quot;&quot;;['file:///G:/Other%20computers/My%20Laptop/Hobby/mmtr/PCBs/LCMTR_01_01/LCMTR_01_01.csv'#$LCMTR_01_01.B36])" office:value-type="string" office:string-value="NMUX1308" calcext:value-type="string">
            <text:p>NMUX1308</text:p>
          </table:table-cell>
          <table:table-cell table:style-name="ce2" table:formula="of:=IF(['file:///G:/Other%20computers/My%20Laptop/Hobby/mmtr/PCBs/LCMTR_01_01/LCMTR_01_01.csv'#$LCMTR_01_01.C36] = &quot;&quot;;&quot;&quot;;['file:///G:/Other%20computers/My%20Laptop/Hobby/mmtr/PCBs/LCMTR_01_01/LCMTR_01_01.csv'#$LCMTR_01_01.C36])" office:value-type="string" office:string-value="https://assets.nexperia.com/documents/data-sheet/NMUX1308.pdf" calcext:value-type="string">
            <text:p>https://assets.nexperia.com/documents/data-sheet/NMUX1308.pdf</text:p>
          </table:table-cell>
          <table:table-cell table:formula="of:=IF(['file:///G:/Other%20computers/My%20Laptop/Hobby/mmtr/PCBs/LCMTR_01_01/LCMTR_01_01.csv'#$LCMTR_01_01.D36] = &quot;&quot;;&quot;&quot;;['file:///G:/Other%20computers/My%20Laptop/Hobby/mmtr/PCBs/LCMTR_01_01/LCMTR_01_01.csv'#$LCMTR_01_01.D36])" office:value-type="string" office:string-value="AADuffy:16-DHVQFN_NMUX1308" calcext:value-type="string">
            <text:p>AADuffy:16-DHVQFN_NMUX1308</text:p>
          </table:table-cell>
          <table:table-cell table:formula="of:=IF(['file:///G:/Other%20computers/My%20Laptop/Hobby/mmtr/PCBs/LCMTR_01_01/LCMTR_01_01.csv'#$LCMTR_01_01.E36] = &quot;&quot;;&quot;&quot;;['file:///G:/Other%20computers/My%20Laptop/Hobby/mmtr/PCBs/LCMTR_01_01/LCMTR_01_01.csv'#$LCMTR_01_01.E36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36] = &quot;&quot;;&quot;&quot;;['file:///G:/Other%20computers/My%20Laptop/Hobby/mmtr/PCBs/LCMTR_01_01/LCMTR_01_01.csv'#$LCMTR_01_01.F36])">
            <text:p/>
          </table:table-cell>
          <table:table-cell table:formula="of:=IF(['file:///G:/Other%20computers/My%20Laptop/Hobby/mmtr/PCBs/LCMTR_01_01/LCMTR_01_01.csv'#$LCMTR_01_01.G36] = &quot;&quot;;&quot;&quot;;['file:///G:/Other%20computers/My%20Laptop/Hobby/mmtr/PCBs/LCMTR_01_01/LCMTR_01_01.csv'#$LCMTR_01_01.G36])" office:value-type="string" office:string-value="35" calcext:value-type="string">
            <text:p>35</text:p>
          </table:table-cell>
          <table:table-cell table:formula="of:=IF(['file:///G:/Other%20computers/My%20Laptop/Hobby/mmtr/PCBs/LCMTR_01_01/LCMTR_01_01.csv'#$LCMTR_01_01.H36] = &quot;&quot;;&quot;&quot;;['file:///G:/Other%20computers/My%20Laptop/Hobby/mmtr/PCBs/LCMTR_01_01/LCMTR_01_01.csv'#$LCMTR_01_01.H36])" office:value-type="string" office:string-value="NXP" calcext:value-type="string">
            <text:p>NXP</text:p>
          </table:table-cell>
          <table:table-cell table:formula="of:=IF(['file:///G:/Other%20computers/My%20Laptop/Hobby/mmtr/PCBs/LCMTR_01_01/LCMTR_01_01.csv'#$LCMTR_01_01.I36] = &quot;&quot;;&quot;&quot;;['file:///G:/Other%20computers/My%20Laptop/Hobby/mmtr/PCBs/LCMTR_01_01/LCMTR_01_01.csv'#$LCMTR_01_01.I36])" office:value-type="string" office:string-value="NMUX1308BQX" calcext:value-type="string">
            <text:p>NMUX1308BQX</text:p>
          </table:table-cell>
          <table:table-cell table:formula="of:=IF(['file:///G:/Other%20computers/My%20Laptop/Hobby/mmtr/PCBs/LCMTR_01_01/LCMTR_01_01.csv'#$LCMTR_01_01.J36] = &quot;&quot;;&quot;&quot;;['file:///G:/Other%20computers/My%20Laptop/Hobby/mmtr/PCBs/LCMTR_01_01/LCMTR_01_01.csv'#$LCMTR_01_01.J36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36] = &quot;&quot;;&quot;&quot;;['file:///G:/Other%20computers/My%20Laptop/Hobby/mmtr/PCBs/LCMTR_01_01/LCMTR_01_01.csv'#$LCMTR_01_01.K36])" office:value-type="string" office:string-value="https://www.digikey.com/en/products/detail/nexperia-usa-inc/NMUX1308BQX/22050149" calcext:value-type="string">
            <text:p>https://www.digikey.com/en/products/detail/nexperia-usa-inc/NMUX1308BQX/22050149</text:p>
          </table:table-cell>
          <table:table-cell table:formula="of:=IF(['file:///G:/Other%20computers/My%20Laptop/Hobby/mmtr/PCBs/LCMTR_01_01/LCMTR_01_01.csv'#$LCMTR_01_01.L36] = &quot;&quot;;&quot;&quot;;['file:///G:/Other%20computers/My%20Laptop/Hobby/mmtr/PCBs/LCMTR_01_01/LCMTR_01_01.csv'#$LCMTR_01_01.L36])" office:value-type="string" office:string-value="1727-NMUX1308BQXCT-ND" calcext:value-type="string">
            <text:p>1727-NMUX1308BQXCT-ND</text:p>
          </table:table-cell>
          <table:table-cell table:formula="of:=IF(['file:///G:/Other%20computers/My%20Laptop/Hobby/mmtr/PCBs/LCMTR_01_01/LCMTR_01_01.csv'#$LCMTR_01_01.M36] = &quot;&quot;;&quot;&quot;;['file:///G:/Other%20computers/My%20Laptop/Hobby/mmtr/PCBs/LCMTR_01_01/LCMTR_01_01.csv'#$LCMTR_01_01.M3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7] = &quot;&quot;;&quot;&quot;;['file:///G:/Other%20computers/My%20Laptop/Hobby/mmtr/PCBs/LCMTR_01_01/LCMTR_01_01.csv'#$LCMTR_01_01.A37])" office:value-type="string" office:string-value="U17" calcext:value-type="string">
            <text:p>U17</text:p>
          </table:table-cell>
          <table:table-cell table:formula="of:=IF(['file:///G:/Other%20computers/My%20Laptop/Hobby/mmtr/PCBs/LCMTR_01_01/LCMTR_01_01.csv'#$LCMTR_01_01.B37] = &quot;&quot;;&quot;&quot;;['file:///G:/Other%20computers/My%20Laptop/Hobby/mmtr/PCBs/LCMTR_01_01/LCMTR_01_01.csv'#$LCMTR_01_01.B37])" office:value-type="string" office:string-value="MCP3460RT" calcext:value-type="string">
            <text:p>MCP3460RT</text:p>
          </table:table-cell>
          <table:table-cell table:formula="of:=IF(['file:///G:/Other%20computers/My%20Laptop/Hobby/mmtr/PCBs/LCMTR_01_01/LCMTR_01_01.csv'#$LCMTR_01_01.C37] = &quot;&quot;;&quot;&quot;;['file:///G:/Other%20computers/My%20Laptop/Hobby/mmtr/PCBs/LCMTR_01_01/LCMTR_01_01.csv'#$LCMTR_01_01.C37])" office:value-type="string" office:string-value="kicad-embed://MCP3460R-Data-Sheet-DS20006975.pdf" calcext:value-type="string">
            <text:p>kicad-embed://MCP3460R-Data-Sheet-DS20006975.pdf</text:p>
          </table:table-cell>
          <table:table-cell table:formula="of:=IF(['file:///G:/Other%20computers/My%20Laptop/Hobby/mmtr/PCBs/LCMTR_01_01/LCMTR_01_01.csv'#$LCMTR_01_01.D37] = &quot;&quot;;&quot;&quot;;['file:///G:/Other%20computers/My%20Laptop/Hobby/mmtr/PCBs/LCMTR_01_01/LCMTR_01_01.csv'#$LCMTR_01_01.D37])" office:value-type="string" office:string-value="AADuffy:MCP3460R_VQFN-20_3x3mm_EP" calcext:value-type="string">
            <text:p>AADuffy:MCP3460R_VQFN-20_3x3mm_EP</text:p>
          </table:table-cell>
          <table:table-cell table:formula="of:=IF(['file:///G:/Other%20computers/My%20Laptop/Hobby/mmtr/PCBs/LCMTR_01_01/LCMTR_01_01.csv'#$LCMTR_01_01.E37] = &quot;&quot;;&quot;&quot;;['file:///G:/Other%20computers/My%20Laptop/Hobby/mmtr/PCBs/LCMTR_01_01/LCMTR_01_01.csv'#$LCMTR_01_01.E37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37] = &quot;&quot;;&quot;&quot;;['file:///G:/Other%20computers/My%20Laptop/Hobby/mmtr/PCBs/LCMTR_01_01/LCMTR_01_01.csv'#$LCMTR_01_01.F37])">
            <text:p/>
          </table:table-cell>
          <table:table-cell table:formula="of:=IF(['file:///G:/Other%20computers/My%20Laptop/Hobby/mmtr/PCBs/LCMTR_01_01/LCMTR_01_01.csv'#$LCMTR_01_01.G37] = &quot;&quot;;&quot;&quot;;['file:///G:/Other%20computers/My%20Laptop/Hobby/mmtr/PCBs/LCMTR_01_01/LCMTR_01_01.csv'#$LCMTR_01_01.G37])" office:value-type="string" office:string-value="36" calcext:value-type="string">
            <text:p>36</text:p>
          </table:table-cell>
          <table:table-cell table:formula="of:=IF(['file:///G:/Other%20computers/My%20Laptop/Hobby/mmtr/PCBs/LCMTR_01_01/LCMTR_01_01.csv'#$LCMTR_01_01.H37] = &quot;&quot;;&quot;&quot;;['file:///G:/Other%20computers/My%20Laptop/Hobby/mmtr/PCBs/LCMTR_01_01/LCMTR_01_01.csv'#$LCMTR_01_01.H37])" office:value-type="string" office:string-value="Microchip" calcext:value-type="string">
            <text:p>Microchip</text:p>
          </table:table-cell>
          <table:table-cell table:style-name="ce2" table:formula="of:=IF(['file:///G:/Other%20computers/My%20Laptop/Hobby/mmtr/PCBs/LCMTR_01_01/LCMTR_01_01.csv'#$LCMTR_01_01.I37] = &quot;&quot;;&quot;&quot;;['file:///G:/Other%20computers/My%20Laptop/Hobby/mmtr/PCBs/LCMTR_01_01/LCMTR_01_01.csv'#$LCMTR_01_01.I37])" office:value-type="string" office:string-value="MCP3460R" calcext:value-type="string">
            <text:p>MCP3460R</text:p>
          </table:table-cell>
          <table:table-cell table:formula="of:=IF(['file:///G:/Other%20computers/My%20Laptop/Hobby/mmtr/PCBs/LCMTR_01_01/LCMTR_01_01.csv'#$LCMTR_01_01.J37] = &quot;&quot;;&quot;&quot;;['file:///G:/Other%20computers/My%20Laptop/Hobby/mmtr/PCBs/LCMTR_01_01/LCMTR_01_01.csv'#$LCMTR_01_01.J37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7] = &quot;&quot;;&quot;&quot;;['file:///G:/Other%20computers/My%20Laptop/Hobby/mmtr/PCBs/LCMTR_01_01/LCMTR_01_01.csv'#$LCMTR_01_01.K37])" office:value-type="string" office:string-value="https://www.digikey.com/en/products/detail/microchip-technology/MCP3460RT-E-2LX/26653549" calcext:value-type="string">
            <text:p>https://www.digikey.com/en/products/detail/microchip-technology/MCP3460RT-E-2LX/26653549</text:p>
          </table:table-cell>
          <table:table-cell table:style-name="ce2" table:formula="of:=IF(['file:///G:/Other%20computers/My%20Laptop/Hobby/mmtr/PCBs/LCMTR_01_01/LCMTR_01_01.csv'#$LCMTR_01_01.L37] = &quot;&quot;;&quot;&quot;;['file:///G:/Other%20computers/My%20Laptop/Hobby/mmtr/PCBs/LCMTR_01_01/LCMTR_01_01.csv'#$LCMTR_01_01.L37])" office:value-type="string" office:string-value="MCP3460RT-E/2LX" calcext:value-type="string">
            <text:p>MCP3460RT-E/2LX</text:p>
          </table:table-cell>
          <table:table-cell table:formula="of:=IF(['file:///G:/Other%20computers/My%20Laptop/Hobby/mmtr/PCBs/LCMTR_01_01/LCMTR_01_01.csv'#$LCMTR_01_01.M37] = &quot;&quot;;&quot;&quot;;['file:///G:/Other%20computers/My%20Laptop/Hobby/mmtr/PCBs/LCMTR_01_01/LCMTR_01_01.csv'#$LCMTR_01_01.M3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8] = &quot;&quot;;&quot;&quot;;['file:///G:/Other%20computers/My%20Laptop/Hobby/mmtr/PCBs/LCMTR_01_01/LCMTR_01_01.csv'#$LCMTR_01_01.A38])" office:value-type="string" office:string-value="U18,U19,U20,U31" calcext:value-type="string">
            <text:p>U18,U19,U20,U31</text:p>
          </table:table-cell>
          <table:table-cell table:formula="of:=IF(['file:///G:/Other%20computers/My%20Laptop/Hobby/mmtr/PCBs/LCMTR_01_01/LCMTR_01_01.csv'#$LCMTR_01_01.B38] = &quot;&quot;;&quot;&quot;;['file:///G:/Other%20computers/My%20Laptop/Hobby/mmtr/PCBs/LCMTR_01_01/LCMTR_01_01.csv'#$LCMTR_01_01.B38])" office:value-type="string" office:string-value="74HC595BQ,115" calcext:value-type="string">
            <text:p>74HC595BQ,115</text:p>
          </table:table-cell>
          <table:table-cell table:formula="of:=IF(['file:///G:/Other%20computers/My%20Laptop/Hobby/mmtr/PCBs/LCMTR_01_01/LCMTR_01_01.csv'#$LCMTR_01_01.C38] = &quot;&quot;;&quot;&quot;;['file:///G:/Other%20computers/My%20Laptop/Hobby/mmtr/PCBs/LCMTR_01_01/LCMTR_01_01.csv'#$LCMTR_01_01.C38])" office:value-type="string" office:string-value="https://rocelec.widen.net/view/pdf/umsr6rbkih/PHGL-S-A0000283114-1.pdf?t.download=true&amp;u=5oefqw" calcext:value-type="string">
            <text:p>https://rocelec.widen.net/view/pdf/umsr6rbkih/PHGL-S-A0000283114-1.pdf?t.download=true&amp;u=5oefqw</text:p>
          </table:table-cell>
          <table:table-cell table:formula="of:=IF(['file:///G:/Other%20computers/My%20Laptop/Hobby/mmtr/PCBs/LCMTR_01_01/LCMTR_01_01.csv'#$LCMTR_01_01.D38] = &quot;&quot;;&quot;&quot;;['file:///G:/Other%20computers/My%20Laptop/Hobby/mmtr/PCBs/LCMTR_01_01/LCMTR_01_01.csv'#$LCMTR_01_01.D38])" office:value-type="string" office:string-value="AADuffy:16-DHVQFN_74HC595BQ" calcext:value-type="string">
            <text:p>AADuffy:16-DHVQFN_74HC595BQ</text:p>
          </table:table-cell>
          <table:table-cell table:formula="of:=IF(['file:///G:/Other%20computers/My%20Laptop/Hobby/mmtr/PCBs/LCMTR_01_01/LCMTR_01_01.csv'#$LCMTR_01_01.E38] = &quot;&quot;;&quot;&quot;;['file:///G:/Other%20computers/My%20Laptop/Hobby/mmtr/PCBs/LCMTR_01_01/LCMTR_01_01.csv'#$LCMTR_01_01.E38])" office:value-type="string" office:string-value="4" calcext:value-type="string">
            <text:p>4</text:p>
          </table:table-cell>
          <table:table-cell table:formula="of:=IF(['file:///G:/Other%20computers/My%20Laptop/Hobby/mmtr/PCBs/LCMTR_01_01/LCMTR_01_01.csv'#$LCMTR_01_01.F38] = &quot;&quot;;&quot;&quot;;['file:///G:/Other%20computers/My%20Laptop/Hobby/mmtr/PCBs/LCMTR_01_01/LCMTR_01_01.csv'#$LCMTR_01_01.F38])">
            <text:p/>
          </table:table-cell>
          <table:table-cell table:formula="of:=IF(['file:///G:/Other%20computers/My%20Laptop/Hobby/mmtr/PCBs/LCMTR_01_01/LCMTR_01_01.csv'#$LCMTR_01_01.G38] = &quot;&quot;;&quot;&quot;;['file:///G:/Other%20computers/My%20Laptop/Hobby/mmtr/PCBs/LCMTR_01_01/LCMTR_01_01.csv'#$LCMTR_01_01.G38])" office:value-type="string" office:string-value="37" calcext:value-type="string">
            <text:p>37</text:p>
          </table:table-cell>
          <table:table-cell table:formula="of:=IF(['file:///G:/Other%20computers/My%20Laptop/Hobby/mmtr/PCBs/LCMTR_01_01/LCMTR_01_01.csv'#$LCMTR_01_01.H38] = &quot;&quot;;&quot;&quot;;['file:///G:/Other%20computers/My%20Laptop/Hobby/mmtr/PCBs/LCMTR_01_01/LCMTR_01_01.csv'#$LCMTR_01_01.H38])" office:value-type="string" office:string-value="Nexperia" calcext:value-type="string">
            <text:p>Nexperia</text:p>
          </table:table-cell>
          <table:table-cell table:style-name="ce2" table:formula="of:=IF(['file:///G:/Other%20computers/My%20Laptop/Hobby/mmtr/PCBs/LCMTR_01_01/LCMTR_01_01.csv'#$LCMTR_01_01.I38] = &quot;&quot;;&quot;&quot;;['file:///G:/Other%20computers/My%20Laptop/Hobby/mmtr/PCBs/LCMTR_01_01/LCMTR_01_01.csv'#$LCMTR_01_01.I38])" office:value-type="string" office:string-value="74HC595BQ,115" calcext:value-type="string">
            <text:p>74HC595BQ,115</text:p>
          </table:table-cell>
          <table:table-cell table:formula="of:=IF(['file:///G:/Other%20computers/My%20Laptop/Hobby/mmtr/PCBs/LCMTR_01_01/LCMTR_01_01.csv'#$LCMTR_01_01.J38] = &quot;&quot;;&quot;&quot;;['file:///G:/Other%20computers/My%20Laptop/Hobby/mmtr/PCBs/LCMTR_01_01/LCMTR_01_01.csv'#$LCMTR_01_01.J38])" office:value-type="string" office:string-value="Digikey" calcext:value-type="string">
            <text:p>Digikey</text:p>
          </table:table-cell>
          <table:table-cell table:style-name="ce2" table:formula="of:=IF(['file:///G:/Other%20computers/My%20Laptop/Hobby/mmtr/PCBs/LCMTR_01_01/LCMTR_01_01.csv'#$LCMTR_01_01.K38] = &quot;&quot;;&quot;&quot;;['file:///G:/Other%20computers/My%20Laptop/Hobby/mmtr/PCBs/LCMTR_01_01/LCMTR_01_01.csv'#$LCMTR_01_01.K38])" office:value-type="string" office:string-value="https://www.digikey.com/en/products/detail/nexperia-usa-inc/74HC595BQ-115/1022994" calcext:value-type="string">
            <text:p>https://www.digikey.com/en/products/detail/nexperia-usa-inc/74HC595BQ-115/1022994</text:p>
          </table:table-cell>
          <table:table-cell table:style-name="ce2" table:formula="of:=IF(['file:///G:/Other%20computers/My%20Laptop/Hobby/mmtr/PCBs/LCMTR_01_01/LCMTR_01_01.csv'#$LCMTR_01_01.L38] = &quot;&quot;;&quot;&quot;;['file:///G:/Other%20computers/My%20Laptop/Hobby/mmtr/PCBs/LCMTR_01_01/LCMTR_01_01.csv'#$LCMTR_01_01.L38])" office:value-type="string" office:string-value="1727-3327-1-ND" calcext:value-type="string">
            <text:p>1727-3327-1-ND</text:p>
          </table:table-cell>
          <table:table-cell table:formula="of:=IF(['file:///G:/Other%20computers/My%20Laptop/Hobby/mmtr/PCBs/LCMTR_01_01/LCMTR_01_01.csv'#$LCMTR_01_01.M38] = &quot;&quot;;&quot;&quot;;['file:///G:/Other%20computers/My%20Laptop/Hobby/mmtr/PCBs/LCMTR_01_01/LCMTR_01_01.csv'#$LCMTR_01_01.M3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39] = &quot;&quot;;&quot;&quot;;['file:///G:/Other%20computers/My%20Laptop/Hobby/mmtr/PCBs/LCMTR_01_01/LCMTR_01_01.csv'#$LCMTR_01_01.A39])" office:value-type="string" office:string-value="U21" calcext:value-type="string">
            <text:p>U21</text:p>
          </table:table-cell>
          <table:table-cell table:formula="of:=IF(['file:///G:/Other%20computers/My%20Laptop/Hobby/mmtr/PCBs/LCMTR_01_01/LCMTR_01_01.csv'#$LCMTR_01_01.B39] = &quot;&quot;;&quot;&quot;;['file:///G:/Other%20computers/My%20Laptop/Hobby/mmtr/PCBs/LCMTR_01_01/LCMTR_01_01.csv'#$LCMTR_01_01.B39])" office:value-type="string" office:string-value="8kbit" calcext:value-type="string">
            <text:p>8kbit</text:p>
          </table:table-cell>
          <table:table-cell table:formula="of:=IF(['file:///G:/Other%20computers/My%20Laptop/Hobby/mmtr/PCBs/LCMTR_01_01/LCMTR_01_01.csv'#$LCMTR_01_01.C39] = &quot;&quot;;&quot;&quot;;['file:///G:/Other%20computers/My%20Laptop/Hobby/mmtr/PCBs/LCMTR_01_01/LCMTR_01_01.csv'#$LCMTR_01_01.C39])" office:value-type="string" office:string-value="https://ww1.microchip.com/downloads/en/DeviceDoc/22067J.pdf" calcext:value-type="string">
            <text:p>https://ww1.microchip.com/downloads/en/DeviceDoc/22067J.pdf</text:p>
          </table:table-cell>
          <table:table-cell table:formula="of:=IF(['file:///G:/Other%20computers/My%20Laptop/Hobby/mmtr/PCBs/LCMTR_01_01/LCMTR_01_01.csv'#$LCMTR_01_01.D39] = &quot;&quot;;&quot;&quot;;['file:///G:/Other%20computers/My%20Laptop/Hobby/mmtr/PCBs/LCMTR_01_01/LCMTR_01_01.csv'#$LCMTR_01_01.D39])" office:value-type="string" office:string-value="AADuffy:SOT23-3" calcext:value-type="string">
            <text:p>AADuffy:SOT23-3</text:p>
          </table:table-cell>
          <table:table-cell table:formula="of:=IF(['file:///G:/Other%20computers/My%20Laptop/Hobby/mmtr/PCBs/LCMTR_01_01/LCMTR_01_01.csv'#$LCMTR_01_01.E39] = &quot;&quot;;&quot;&quot;;['file:///G:/Other%20computers/My%20Laptop/Hobby/mmtr/PCBs/LCMTR_01_01/LCMTR_01_01.csv'#$LCMTR_01_01.E39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39] = &quot;&quot;;&quot;&quot;;['file:///G:/Other%20computers/My%20Laptop/Hobby/mmtr/PCBs/LCMTR_01_01/LCMTR_01_01.csv'#$LCMTR_01_01.F39])">
            <text:p/>
          </table:table-cell>
          <table:table-cell table:style-name="Default" table:formula="of:=IF(['file:///G:/Other%20computers/My%20Laptop/Hobby/mmtr/PCBs/LCMTR_01_01/LCMTR_01_01.csv'#$LCMTR_01_01.G39] = &quot;&quot;;&quot;&quot;;['file:///G:/Other%20computers/My%20Laptop/Hobby/mmtr/PCBs/LCMTR_01_01/LCMTR_01_01.csv'#$LCMTR_01_01.G39])" office:value-type="string" office:string-value="38" calcext:value-type="string">
            <text:p>38</text:p>
          </table:table-cell>
          <table:table-cell table:formula="of:=IF(['file:///G:/Other%20computers/My%20Laptop/Hobby/mmtr/PCBs/LCMTR_01_01/LCMTR_01_01.csv'#$LCMTR_01_01.H39] = &quot;&quot;;&quot;&quot;;['file:///G:/Other%20computers/My%20Laptop/Hobby/mmtr/PCBs/LCMTR_01_01/LCMTR_01_01.csv'#$LCMTR_01_01.H39])" office:value-type="string" office:string-value="Microchip" calcext:value-type="string">
            <text:p>Microchip</text:p>
          </table:table-cell>
          <table:table-cell table:formula="of:=IF(['file:///G:/Other%20computers/My%20Laptop/Hobby/mmtr/PCBs/LCMTR_01_01/LCMTR_01_01.csv'#$LCMTR_01_01.I39] = &quot;&quot;;&quot;&quot;;['file:///G:/Other%20computers/My%20Laptop/Hobby/mmtr/PCBs/LCMTR_01_01/LCMTR_01_01.csv'#$LCMTR_01_01.I39])" office:value-type="string" office:string-value="11AA080T-I/TT" calcext:value-type="string">
            <text:p>11AA080T-I/TT</text:p>
          </table:table-cell>
          <table:table-cell table:style-name="Default" table:formula="of:=IF(['file:///G:/Other%20computers/My%20Laptop/Hobby/mmtr/PCBs/LCMTR_01_01/LCMTR_01_01.csv'#$LCMTR_01_01.J39] = &quot;&quot;;&quot;&quot;;['file:///G:/Other%20computers/My%20Laptop/Hobby/mmtr/PCBs/LCMTR_01_01/LCMTR_01_01.csv'#$LCMTR_01_01.J39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39] = &quot;&quot;;&quot;&quot;;['file:///G:/Other%20computers/My%20Laptop/Hobby/mmtr/PCBs/LCMTR_01_01/LCMTR_01_01.csv'#$LCMTR_01_01.K39])" office:value-type="string" office:string-value="https://www.digikey.com/en/products/detail/microchip-technology/11AA080T-I-TT/1939121" calcext:value-type="string">
            <text:p>https://www.digikey.com/en/products/detail/microchip-technology/11AA080T-I-TT/1939121</text:p>
          </table:table-cell>
          <table:table-cell table:formula="of:=IF(['file:///G:/Other%20computers/My%20Laptop/Hobby/mmtr/PCBs/LCMTR_01_01/LCMTR_01_01.csv'#$LCMTR_01_01.L39] = &quot;&quot;;&quot;&quot;;['file:///G:/Other%20computers/My%20Laptop/Hobby/mmtr/PCBs/LCMTR_01_01/LCMTR_01_01.csv'#$LCMTR_01_01.L39])" office:value-type="string" office:string-value="11AA080T-I/TTCT-ND" calcext:value-type="string">
            <text:p>11AA080T-I/TTCT-ND</text:p>
          </table:table-cell>
          <table:table-cell table:formula="of:=IF(['file:///G:/Other%20computers/My%20Laptop/Hobby/mmtr/PCBs/LCMTR_01_01/LCMTR_01_01.csv'#$LCMTR_01_01.M39] = &quot;&quot;;&quot;&quot;;['file:///G:/Other%20computers/My%20Laptop/Hobby/mmtr/PCBs/LCMTR_01_01/LCMTR_01_01.csv'#$LCMTR_01_01.M39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0] = &quot;&quot;;&quot;&quot;;['file:///G:/Other%20computers/My%20Laptop/Hobby/mmtr/PCBs/LCMTR_01_01/LCMTR_01_01.csv'#$LCMTR_01_01.A40])" office:value-type="string" office:string-value="U23" calcext:value-type="string">
            <text:p>U23</text:p>
          </table:table-cell>
          <table:table-cell table:formula="of:=IF(['file:///G:/Other%20computers/My%20Laptop/Hobby/mmtr/PCBs/LCMTR_01_01/LCMTR_01_01.csv'#$LCMTR_01_01.B40] = &quot;&quot;;&quot;&quot;;['file:///G:/Other%20computers/My%20Laptop/Hobby/mmtr/PCBs/LCMTR_01_01/LCMTR_01_01.csv'#$LCMTR_01_01.B40])" office:value-type="string" office:string-value="18012115421H" calcext:value-type="string">
            <text:p>18012115421H</text:p>
          </table:table-cell>
          <table:table-cell table:formula="of:=IF(['file:///G:/Other%20computers/My%20Laptop/Hobby/mmtr/PCBs/LCMTR_01_01/LCMTR_01_01.csv'#$LCMTR_01_01.C40] = &quot;&quot;;&quot;&quot;;['file:///G:/Other%20computers/My%20Laptop/Hobby/mmtr/PCBs/LCMTR_01_01/LCMTR_01_01.csv'#$LCMTR_01_01.C40])" office:value-type="string" office:string-value="https://www.we-online.com/components/products/datasheet/18012115421H.pdf" calcext:value-type="string">
            <text:p>https://www.we-online.com/components/products/datasheet/18012115421H.pdf</text:p>
          </table:table-cell>
          <table:table-cell table:formula="of:=IF(['file:///G:/Other%20computers/My%20Laptop/Hobby/mmtr/PCBs/LCMTR_01_01/LCMTR_01_01.csv'#$LCMTR_01_01.D40] = &quot;&quot;;&quot;&quot;;['file:///G:/Other%20computers/My%20Laptop/Hobby/mmtr/PCBs/LCMTR_01_01/LCMTR_01_01.csv'#$LCMTR_01_01.D40])" office:value-type="string" office:string-value="AADuffy:SOIC-8_STISO621TR" calcext:value-type="string">
            <text:p>AADuffy:SOIC-8_STISO621TR</text:p>
          </table:table-cell>
          <table:table-cell table:formula="of:=IF(['file:///G:/Other%20computers/My%20Laptop/Hobby/mmtr/PCBs/LCMTR_01_01/LCMTR_01_01.csv'#$LCMTR_01_01.E40] = &quot;&quot;;&quot;&quot;;['file:///G:/Other%20computers/My%20Laptop/Hobby/mmtr/PCBs/LCMTR_01_01/LCMTR_01_01.csv'#$LCMTR_01_01.E40])" office:value-type="string" office:string-value="1" calcext:value-type="string">
            <text:p>1</text:p>
          </table:table-cell>
          <table:table-cell table:formula="of:=IF(['file:///G:/Other%20computers/My%20Laptop/Hobby/mmtr/PCBs/LCMTR_01_01/LCMTR_01_01.csv'#$LCMTR_01_01.F40] = &quot;&quot;;&quot;&quot;;['file:///G:/Other%20computers/My%20Laptop/Hobby/mmtr/PCBs/LCMTR_01_01/LCMTR_01_01.csv'#$LCMTR_01_01.F40])">
            <text:p/>
          </table:table-cell>
          <table:table-cell table:style-name="Default" table:formula="of:=IF(['file:///G:/Other%20computers/My%20Laptop/Hobby/mmtr/PCBs/LCMTR_01_01/LCMTR_01_01.csv'#$LCMTR_01_01.G40] = &quot;&quot;;&quot;&quot;;['file:///G:/Other%20computers/My%20Laptop/Hobby/mmtr/PCBs/LCMTR_01_01/LCMTR_01_01.csv'#$LCMTR_01_01.G40])" office:value-type="string" office:string-value="39" calcext:value-type="string">
            <text:p>39</text:p>
          </table:table-cell>
          <table:table-cell table:formula="of:=IF(['file:///G:/Other%20computers/My%20Laptop/Hobby/mmtr/PCBs/LCMTR_01_01/LCMTR_01_01.csv'#$LCMTR_01_01.H40] = &quot;&quot;;&quot;&quot;;['file:///G:/Other%20computers/My%20Laptop/Hobby/mmtr/PCBs/LCMTR_01_01/LCMTR_01_01.csv'#$LCMTR_01_01.H40])" office:value-type="string" office:string-value="Wurth" calcext:value-type="string">
            <text:p>Wurth</text:p>
          </table:table-cell>
          <table:table-cell table:formula="of:=IF(['file:///G:/Other%20computers/My%20Laptop/Hobby/mmtr/PCBs/LCMTR_01_01/LCMTR_01_01.csv'#$LCMTR_01_01.I40] = &quot;&quot;;&quot;&quot;;['file:///G:/Other%20computers/My%20Laptop/Hobby/mmtr/PCBs/LCMTR_01_01/LCMTR_01_01.csv'#$LCMTR_01_01.I40])" office:value-type="string" office:string-value="18012115421H" calcext:value-type="string">
            <text:p>18012115421H</text:p>
          </table:table-cell>
          <table:table-cell table:style-name="Default" table:formula="of:=IF(['file:///G:/Other%20computers/My%20Laptop/Hobby/mmtr/PCBs/LCMTR_01_01/LCMTR_01_01.csv'#$LCMTR_01_01.J40] = &quot;&quot;;&quot;&quot;;['file:///G:/Other%20computers/My%20Laptop/Hobby/mmtr/PCBs/LCMTR_01_01/LCMTR_01_01.csv'#$LCMTR_01_01.J40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40] = &quot;&quot;;&quot;&quot;;['file:///G:/Other%20computers/My%20Laptop/Hobby/mmtr/PCBs/LCMTR_01_01/LCMTR_01_01.csv'#$LCMTR_01_01.K40])" office:value-type="string" office:string-value="https://www.digikey.com/en/products/detail/w%C3%BCrth-elektronik/18012115421H/26766176" calcext:value-type="string">
            <text:p>https://www.digikey.com/en/products/detail/w%C3%BCrth-elektronik/18012115421H/26766176</text:p>
          </table:table-cell>
          <table:table-cell table:formula="of:=IF(['file:///G:/Other%20computers/My%20Laptop/Hobby/mmtr/PCBs/LCMTR_01_01/LCMTR_01_01.csv'#$LCMTR_01_01.L40] = &quot;&quot;;&quot;&quot;;['file:///G:/Other%20computers/My%20Laptop/Hobby/mmtr/PCBs/LCMTR_01_01/LCMTR_01_01.csv'#$LCMTR_01_01.L40])" office:value-type="string" office:string-value="732-18012115421HCT-ND" calcext:value-type="string">
            <text:p>732-18012115421HCT-ND</text:p>
          </table:table-cell>
          <table:table-cell table:formula="of:=IF(['file:///G:/Other%20computers/My%20Laptop/Hobby/mmtr/PCBs/LCMTR_01_01/LCMTR_01_01.csv'#$LCMTR_01_01.M40] = &quot;&quot;;&quot;&quot;;['file:///G:/Other%20computers/My%20Laptop/Hobby/mmtr/PCBs/LCMTR_01_01/LCMTR_01_01.csv'#$LCMTR_01_01.M40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1] = &quot;&quot;;&quot;&quot;;['file:///G:/Other%20computers/My%20Laptop/Hobby/mmtr/PCBs/LCMTR_01_01/LCMTR_01_01.csv'#$LCMTR_01_01.A41])" office:value-type="string" office:string-value="U25,U26" calcext:value-type="string">
            <text:p>U25,U26</text:p>
          </table:table-cell>
          <table:table-cell table:formula="of:=IF(['file:///G:/Other%20computers/My%20Laptop/Hobby/mmtr/PCBs/LCMTR_01_01/LCMTR_01_01.csv'#$LCMTR_01_01.B41] = &quot;&quot;;&quot;&quot;;['file:///G:/Other%20computers/My%20Laptop/Hobby/mmtr/PCBs/LCMTR_01_01/LCMTR_01_01.csv'#$LCMTR_01_01.B41])" office:value-type="string" office:string-value="RP2040" calcext:value-type="string">
            <text:p>RP2040</text:p>
          </table:table-cell>
          <table:table-cell table:formula="of:=IF(['file:///G:/Other%20computers/My%20Laptop/Hobby/mmtr/PCBs/LCMTR_01_01/LCMTR_01_01.csv'#$LCMTR_01_01.C41] = &quot;&quot;;&quot;&quot;;['file:///G:/Other%20computers/My%20Laptop/Hobby/mmtr/PCBs/LCMTR_01_01/LCMTR_01_01.csv'#$LCMTR_01_01.C41])" office:value-type="string" office:string-value="https://datasheets.raspberrypi.com/rp2040/rp2040-datasheet.pdf" calcext:value-type="string">
            <text:p>https://datasheets.raspberrypi.com/rp2040/rp2040-datasheet.pdf</text:p>
          </table:table-cell>
          <table:table-cell table:formula="of:=IF(['file:///G:/Other%20computers/My%20Laptop/Hobby/mmtr/PCBs/LCMTR_01_01/LCMTR_01_01.csv'#$LCMTR_01_01.D41] = &quot;&quot;;&quot;&quot;;['file:///G:/Other%20computers/My%20Laptop/Hobby/mmtr/PCBs/LCMTR_01_01/LCMTR_01_01.csv'#$LCMTR_01_01.D41])" office:value-type="string" office:string-value="Package_DFN_QFN:QFN-56-1EP_7x7mm_P0.4mm_EP3.2x3.2mm" calcext:value-type="string">
            <text:p>Package_DFN_QFN:QFN-56-1EP_7x7mm_P0.4mm_EP3.2x3.2mm</text:p>
          </table:table-cell>
          <table:table-cell table:formula="of:=IF(['file:///G:/Other%20computers/My%20Laptop/Hobby/mmtr/PCBs/LCMTR_01_01/LCMTR_01_01.csv'#$LCMTR_01_01.E41] = &quot;&quot;;&quot;&quot;;['file:///G:/Other%20computers/My%20Laptop/Hobby/mmtr/PCBs/LCMTR_01_01/LCMTR_01_01.csv'#$LCMTR_01_01.E41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41] = &quot;&quot;;&quot;&quot;;['file:///G:/Other%20computers/My%20Laptop/Hobby/mmtr/PCBs/LCMTR_01_01/LCMTR_01_01.csv'#$LCMTR_01_01.F41])">
            <text:p/>
          </table:table-cell>
          <table:table-cell table:style-name="Default" table:formula="of:=IF(['file:///G:/Other%20computers/My%20Laptop/Hobby/mmtr/PCBs/LCMTR_01_01/LCMTR_01_01.csv'#$LCMTR_01_01.G41] = &quot;&quot;;&quot;&quot;;['file:///G:/Other%20computers/My%20Laptop/Hobby/mmtr/PCBs/LCMTR_01_01/LCMTR_01_01.csv'#$LCMTR_01_01.G41])" office:value-type="string" office:string-value="40" calcext:value-type="string">
            <text:p>40</text:p>
          </table:table-cell>
          <table:table-cell table:formula="of:=IF(['file:///G:/Other%20computers/My%20Laptop/Hobby/mmtr/PCBs/LCMTR_01_01/LCMTR_01_01.csv'#$LCMTR_01_01.H41] = &quot;&quot;;&quot;&quot;;['file:///G:/Other%20computers/My%20Laptop/Hobby/mmtr/PCBs/LCMTR_01_01/LCMTR_01_01.csv'#$LCMTR_01_01.H41])">
            <text:p/>
          </table:table-cell>
          <table:table-cell table:formula="of:=IF(['file:///G:/Other%20computers/My%20Laptop/Hobby/mmtr/PCBs/LCMTR_01_01/LCMTR_01_01.csv'#$LCMTR_01_01.I41] = &quot;&quot;;&quot;&quot;;['file:///G:/Other%20computers/My%20Laptop/Hobby/mmtr/PCBs/LCMTR_01_01/LCMTR_01_01.csv'#$LCMTR_01_01.I41])">
            <text:p/>
          </table:table-cell>
          <table:table-cell table:style-name="Default" table:formula="of:=IF(['file:///G:/Other%20computers/My%20Laptop/Hobby/mmtr/PCBs/LCMTR_01_01/LCMTR_01_01.csv'#$LCMTR_01_01.J41] = &quot;&quot;;&quot;&quot;;['file:///G:/Other%20computers/My%20Laptop/Hobby/mmtr/PCBs/LCMTR_01_01/LCMTR_01_01.csv'#$LCMTR_01_01.J41])">
            <text:p/>
          </table:table-cell>
          <table:table-cell table:formula="of:=IF(['file:///G:/Other%20computers/My%20Laptop/Hobby/mmtr/PCBs/LCMTR_01_01/LCMTR_01_01.csv'#$LCMTR_01_01.K41] = &quot;&quot;;&quot;&quot;;['file:///G:/Other%20computers/My%20Laptop/Hobby/mmtr/PCBs/LCMTR_01_01/LCMTR_01_01.csv'#$LCMTR_01_01.K41])">
            <text:p/>
          </table:table-cell>
          <table:table-cell table:formula="of:=IF(['file:///G:/Other%20computers/My%20Laptop/Hobby/mmtr/PCBs/LCMTR_01_01/LCMTR_01_01.csv'#$LCMTR_01_01.L41] = &quot;&quot;;&quot;&quot;;['file:///G:/Other%20computers/My%20Laptop/Hobby/mmtr/PCBs/LCMTR_01_01/LCMTR_01_01.csv'#$LCMTR_01_01.L41])">
            <text:p/>
          </table:table-cell>
          <table:table-cell table:formula="of:=IF(['file:///G:/Other%20computers/My%20Laptop/Hobby/mmtr/PCBs/LCMTR_01_01/LCMTR_01_01.csv'#$LCMTR_01_01.M41] = &quot;&quot;;&quot;&quot;;['file:///G:/Other%20computers/My%20Laptop/Hobby/mmtr/PCBs/LCMTR_01_01/LCMTR_01_01.csv'#$LCMTR_01_01.M41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2] = &quot;&quot;;&quot;&quot;;['file:///G:/Other%20computers/My%20Laptop/Hobby/mmtr/PCBs/LCMTR_01_01/LCMTR_01_01.csv'#$LCMTR_01_01.A42])" office:value-type="string" office:string-value="U28,U29" calcext:value-type="string">
            <text:p>U28,U29</text:p>
          </table:table-cell>
          <table:table-cell table:formula="of:=IF(['file:///G:/Other%20computers/My%20Laptop/Hobby/mmtr/PCBs/LCMTR_01_01/LCMTR_01_01.csv'#$LCMTR_01_01.B42] = &quot;&quot;;&quot;&quot;;['file:///G:/Other%20computers/My%20Laptop/Hobby/mmtr/PCBs/LCMTR_01_01/LCMTR_01_01.csv'#$LCMTR_01_01.B42])" office:value-type="string" office:string-value="W25Q16JVSS" calcext:value-type="string">
            <text:p>W25Q16JVSS</text:p>
          </table:table-cell>
          <table:table-cell table:formula="of:=IF(['file:///G:/Other%20computers/My%20Laptop/Hobby/mmtr/PCBs/LCMTR_01_01/LCMTR_01_01.csv'#$LCMTR_01_01.C42] = &quot;&quot;;&quot;&quot;;['file:///G:/Other%20computers/My%20Laptop/Hobby/mmtr/PCBs/LCMTR_01_01/LCMTR_01_01.csv'#$LCMTR_01_01.C42])" office:value-type="string" office:string-value="https://www.winbond.com/hq/support/documentation/levelOne.jsp?__locale=en&amp;DocNo=DA00-W25Q16JV.1" calcext:value-type="string">
            <text:p>https://www.winbond.com/hq/support/documentation/levelOne.jsp?__locale=en&amp;DocNo=DA00-W25Q16JV.1</text:p>
          </table:table-cell>
          <table:table-cell table:formula="of:=IF(['file:///G:/Other%20computers/My%20Laptop/Hobby/mmtr/PCBs/LCMTR_01_01/LCMTR_01_01.csv'#$LCMTR_01_01.D42] = &quot;&quot;;&quot;&quot;;['file:///G:/Other%20computers/My%20Laptop/Hobby/mmtr/PCBs/LCMTR_01_01/LCMTR_01_01.csv'#$LCMTR_01_01.D42])" office:value-type="string" office:string-value="Package_SO:SOIC-8_5.3x5.3mm_P1.27mm" calcext:value-type="string">
            <text:p>Package_SO:SOIC-8_5.3x5.3mm_P1.27mm</text:p>
          </table:table-cell>
          <table:table-cell table:formula="of:=IF(['file:///G:/Other%20computers/My%20Laptop/Hobby/mmtr/PCBs/LCMTR_01_01/LCMTR_01_01.csv'#$LCMTR_01_01.E42] = &quot;&quot;;&quot;&quot;;['file:///G:/Other%20computers/My%20Laptop/Hobby/mmtr/PCBs/LCMTR_01_01/LCMTR_01_01.csv'#$LCMTR_01_01.E42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42] = &quot;&quot;;&quot;&quot;;['file:///G:/Other%20computers/My%20Laptop/Hobby/mmtr/PCBs/LCMTR_01_01/LCMTR_01_01.csv'#$LCMTR_01_01.F42])">
            <text:p/>
          </table:table-cell>
          <table:table-cell table:style-name="Default" table:formula="of:=IF(['file:///G:/Other%20computers/My%20Laptop/Hobby/mmtr/PCBs/LCMTR_01_01/LCMTR_01_01.csv'#$LCMTR_01_01.G42] = &quot;&quot;;&quot;&quot;;['file:///G:/Other%20computers/My%20Laptop/Hobby/mmtr/PCBs/LCMTR_01_01/LCMTR_01_01.csv'#$LCMTR_01_01.G42])" office:value-type="string" office:string-value="41" calcext:value-type="string">
            <text:p>41</text:p>
          </table:table-cell>
          <table:table-cell table:formula="of:=IF(['file:///G:/Other%20computers/My%20Laptop/Hobby/mmtr/PCBs/LCMTR_01_01/LCMTR_01_01.csv'#$LCMTR_01_01.H42] = &quot;&quot;;&quot;&quot;;['file:///G:/Other%20computers/My%20Laptop/Hobby/mmtr/PCBs/LCMTR_01_01/LCMTR_01_01.csv'#$LCMTR_01_01.H42])">
            <text:p/>
          </table:table-cell>
          <table:table-cell table:formula="of:=IF(['file:///G:/Other%20computers/My%20Laptop/Hobby/mmtr/PCBs/LCMTR_01_01/LCMTR_01_01.csv'#$LCMTR_01_01.I42] = &quot;&quot;;&quot;&quot;;['file:///G:/Other%20computers/My%20Laptop/Hobby/mmtr/PCBs/LCMTR_01_01/LCMTR_01_01.csv'#$LCMTR_01_01.I42])">
            <text:p/>
          </table:table-cell>
          <table:table-cell table:style-name="Default" table:formula="of:=IF(['file:///G:/Other%20computers/My%20Laptop/Hobby/mmtr/PCBs/LCMTR_01_01/LCMTR_01_01.csv'#$LCMTR_01_01.J42] = &quot;&quot;;&quot;&quot;;['file:///G:/Other%20computers/My%20Laptop/Hobby/mmtr/PCBs/LCMTR_01_01/LCMTR_01_01.csv'#$LCMTR_01_01.J42])">
            <text:p/>
          </table:table-cell>
          <table:table-cell table:formula="of:=IF(['file:///G:/Other%20computers/My%20Laptop/Hobby/mmtr/PCBs/LCMTR_01_01/LCMTR_01_01.csv'#$LCMTR_01_01.K42] = &quot;&quot;;&quot;&quot;;['file:///G:/Other%20computers/My%20Laptop/Hobby/mmtr/PCBs/LCMTR_01_01/LCMTR_01_01.csv'#$LCMTR_01_01.K42])">
            <text:p/>
          </table:table-cell>
          <table:table-cell table:formula="of:=IF(['file:///G:/Other%20computers/My%20Laptop/Hobby/mmtr/PCBs/LCMTR_01_01/LCMTR_01_01.csv'#$LCMTR_01_01.L42] = &quot;&quot;;&quot;&quot;;['file:///G:/Other%20computers/My%20Laptop/Hobby/mmtr/PCBs/LCMTR_01_01/LCMTR_01_01.csv'#$LCMTR_01_01.L42])">
            <text:p/>
          </table:table-cell>
          <table:table-cell table:formula="of:=IF(['file:///G:/Other%20computers/My%20Laptop/Hobby/mmtr/PCBs/LCMTR_01_01/LCMTR_01_01.csv'#$LCMTR_01_01.M42] = &quot;&quot;;&quot;&quot;;['file:///G:/Other%20computers/My%20Laptop/Hobby/mmtr/PCBs/LCMTR_01_01/LCMTR_01_01.csv'#$LCMTR_01_01.M4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3] = &quot;&quot;;&quot;&quot;;['file:///G:/Other%20computers/My%20Laptop/Hobby/mmtr/PCBs/LCMTR_01_01/LCMTR_01_01.csv'#$LCMTR_01_01.A43])" office:value-type="string" office:string-value="U30,U32,U33,U34,U35,U36,U37" calcext:value-type="string">
            <text:p>U30,U32,U33,U34,U35,U36,U37</text:p>
          </table:table-cell>
          <table:table-cell table:formula="of:=IF(['file:///G:/Other%20computers/My%20Laptop/Hobby/mmtr/PCBs/LCMTR_01_01/LCMTR_01_01.csv'#$LCMTR_01_01.B43] = &quot;&quot;;&quot;&quot;;['file:///G:/Other%20computers/My%20Laptop/Hobby/mmtr/PCBs/LCMTR_01_01/LCMTR_01_01.csv'#$LCMTR_01_01.B43])" office:value-type="string" office:string-value="NST3904DP6T5G" calcext:value-type="string">
            <text:p>NST3904DP6T5G</text:p>
          </table:table-cell>
          <table:table-cell table:formula="of:=IF(['file:///G:/Other%20computers/My%20Laptop/Hobby/mmtr/PCBs/LCMTR_01_01/LCMTR_01_01.csv'#$LCMTR_01_01.C43] = &quot;&quot;;&quot;&quot;;['file:///G:/Other%20computers/My%20Laptop/Hobby/mmtr/PCBs/LCMTR_01_01/LCMTR_01_01.csv'#$LCMTR_01_01.C43])" office:value-type="string" office:string-value="kicad-embed://NST3904DP6-D.PDF" calcext:value-type="string">
            <text:p>kicad-embed://NST3904DP6-D.PDF</text:p>
          </table:table-cell>
          <table:table-cell table:formula="of:=IF(['file:///G:/Other%20computers/My%20Laptop/Hobby/mmtr/PCBs/LCMTR_01_01/LCMTR_01_01.csv'#$LCMTR_01_01.D43] = &quot;&quot;;&quot;&quot;;['file:///G:/Other%20computers/My%20Laptop/Hobby/mmtr/PCBs/LCMTR_01_01/LCMTR_01_01.csv'#$LCMTR_01_01.D43])" office:value-type="string" office:string-value="AADuffy:SOT-963_NST3904DP6T5G" calcext:value-type="string">
            <text:p>AADuffy:SOT-963_NST3904DP6T5G</text:p>
          </table:table-cell>
          <table:table-cell table:formula="of:=IF(['file:///G:/Other%20computers/My%20Laptop/Hobby/mmtr/PCBs/LCMTR_01_01/LCMTR_01_01.csv'#$LCMTR_01_01.E43] = &quot;&quot;;&quot;&quot;;['file:///G:/Other%20computers/My%20Laptop/Hobby/mmtr/PCBs/LCMTR_01_01/LCMTR_01_01.csv'#$LCMTR_01_01.E43])" office:value-type="string" office:string-value="7" calcext:value-type="string">
            <text:p>7</text:p>
          </table:table-cell>
          <table:table-cell table:formula="of:=IF(['file:///G:/Other%20computers/My%20Laptop/Hobby/mmtr/PCBs/LCMTR_01_01/LCMTR_01_01.csv'#$LCMTR_01_01.F43] = &quot;&quot;;&quot;&quot;;['file:///G:/Other%20computers/My%20Laptop/Hobby/mmtr/PCBs/LCMTR_01_01/LCMTR_01_01.csv'#$LCMTR_01_01.F43])">
            <text:p/>
          </table:table-cell>
          <table:table-cell table:style-name="Default" table:formula="of:=IF(['file:///G:/Other%20computers/My%20Laptop/Hobby/mmtr/PCBs/LCMTR_01_01/LCMTR_01_01.csv'#$LCMTR_01_01.G43] = &quot;&quot;;&quot;&quot;;['file:///G:/Other%20computers/My%20Laptop/Hobby/mmtr/PCBs/LCMTR_01_01/LCMTR_01_01.csv'#$LCMTR_01_01.G43])" office:value-type="string" office:string-value="42" calcext:value-type="string">
            <text:p>42</text:p>
          </table:table-cell>
          <table:table-cell table:formula="of:=IF(['file:///G:/Other%20computers/My%20Laptop/Hobby/mmtr/PCBs/LCMTR_01_01/LCMTR_01_01.csv'#$LCMTR_01_01.H43] = &quot;&quot;;&quot;&quot;;['file:///G:/Other%20computers/My%20Laptop/Hobby/mmtr/PCBs/LCMTR_01_01/LCMTR_01_01.csv'#$LCMTR_01_01.H43])" office:value-type="string" office:string-value="onsemi" calcext:value-type="string">
            <text:p>onsemi</text:p>
          </table:table-cell>
          <table:table-cell table:formula="of:=IF(['file:///G:/Other%20computers/My%20Laptop/Hobby/mmtr/PCBs/LCMTR_01_01/LCMTR_01_01.csv'#$LCMTR_01_01.I43] = &quot;&quot;;&quot;&quot;;['file:///G:/Other%20computers/My%20Laptop/Hobby/mmtr/PCBs/LCMTR_01_01/LCMTR_01_01.csv'#$LCMTR_01_01.I43])" office:value-type="string" office:string-value="NST3904DP6T5G" calcext:value-type="string">
            <text:p>NST3904DP6T5G</text:p>
          </table:table-cell>
          <table:table-cell table:style-name="Default" table:formula="of:=IF(['file:///G:/Other%20computers/My%20Laptop/Hobby/mmtr/PCBs/LCMTR_01_01/LCMTR_01_01.csv'#$LCMTR_01_01.J43] = &quot;&quot;;&quot;&quot;;['file:///G:/Other%20computers/My%20Laptop/Hobby/mmtr/PCBs/LCMTR_01_01/LCMTR_01_01.csv'#$LCMTR_01_01.J43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43] = &quot;&quot;;&quot;&quot;;['file:///G:/Other%20computers/My%20Laptop/Hobby/mmtr/PCBs/LCMTR_01_01/LCMTR_01_01.csv'#$LCMTR_01_01.K43])" office:value-type="string" office:string-value="https://www.digikey.com/en/products/detail/onsemi/NST3904DP6T5G/1961252" calcext:value-type="string">
            <text:p>https://www.digikey.com/en/products/detail/onsemi/NST3904DP6T5G/1961252</text:p>
          </table:table-cell>
          <table:table-cell table:formula="of:=IF(['file:///G:/Other%20computers/My%20Laptop/Hobby/mmtr/PCBs/LCMTR_01_01/LCMTR_01_01.csv'#$LCMTR_01_01.L43] = &quot;&quot;;&quot;&quot;;['file:///G:/Other%20computers/My%20Laptop/Hobby/mmtr/PCBs/LCMTR_01_01/LCMTR_01_01.csv'#$LCMTR_01_01.L43])" office:value-type="string" office:string-value="NST3904DP6T5GOSCT-ND" calcext:value-type="string">
            <text:p>NST3904DP6T5GOSCT-ND</text:p>
          </table:table-cell>
          <table:table-cell table:formula="of:=IF(['file:///G:/Other%20computers/My%20Laptop/Hobby/mmtr/PCBs/LCMTR_01_01/LCMTR_01_01.csv'#$LCMTR_01_01.M43] = &quot;&quot;;&quot;&quot;;['file:///G:/Other%20computers/My%20Laptop/Hobby/mmtr/PCBs/LCMTR_01_01/LCMTR_01_01.csv'#$LCMTR_01_01.M4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4] = &quot;&quot;;&quot;&quot;;['file:///G:/Other%20computers/My%20Laptop/Hobby/mmtr/PCBs/LCMTR_01_01/LCMTR_01_01.csv'#$LCMTR_01_01.A44])" office:value-type="string" office:string-value="Y1,Y2" calcext:value-type="string">
            <text:p>Y1,Y2</text:p>
          </table:table-cell>
          <table:table-cell table:formula="of:=IF(['file:///G:/Other%20computers/My%20Laptop/Hobby/mmtr/PCBs/LCMTR_01_01/LCMTR_01_01.csv'#$LCMTR_01_01.B44] = &quot;&quot;;&quot;&quot;;['file:///G:/Other%20computers/My%20Laptop/Hobby/mmtr/PCBs/LCMTR_01_01/LCMTR_01_01.csv'#$LCMTR_01_01.B44])" office:value-type="string" office:string-value="ABM8-272-T3" calcext:value-type="string">
            <text:p>ABM8-272-T3</text:p>
          </table:table-cell>
          <table:table-cell table:formula="of:=IF(['file:///G:/Other%20computers/My%20Laptop/Hobby/mmtr/PCBs/LCMTR_01_01/LCMTR_01_01.csv'#$LCMTR_01_01.C44] = &quot;&quot;;&quot;&quot;;['file:///G:/Other%20computers/My%20Laptop/Hobby/mmtr/PCBs/LCMTR_01_01/LCMTR_01_01.csv'#$LCMTR_01_01.C44])">
            <text:p/>
          </table:table-cell>
          <table:table-cell table:formula="of:=IF(['file:///G:/Other%20computers/My%20Laptop/Hobby/mmtr/PCBs/LCMTR_01_01/LCMTR_01_01.csv'#$LCMTR_01_01.D44] = &quot;&quot;;&quot;&quot;;['file:///G:/Other%20computers/My%20Laptop/Hobby/mmtr/PCBs/LCMTR_01_01/LCMTR_01_01.csv'#$LCMTR_01_01.D44])" office:value-type="string" office:string-value="AADuffy:XTAL_3225-4Pin_3.2x2.5mm" calcext:value-type="string">
            <text:p>AADuffy:XTAL_3225-4Pin_3.2x2.5mm</text:p>
          </table:table-cell>
          <table:table-cell table:formula="of:=IF(['file:///G:/Other%20computers/My%20Laptop/Hobby/mmtr/PCBs/LCMTR_01_01/LCMTR_01_01.csv'#$LCMTR_01_01.E44] = &quot;&quot;;&quot;&quot;;['file:///G:/Other%20computers/My%20Laptop/Hobby/mmtr/PCBs/LCMTR_01_01/LCMTR_01_01.csv'#$LCMTR_01_01.E44])" office:value-type="string" office:string-value="2" calcext:value-type="string">
            <text:p>2</text:p>
          </table:table-cell>
          <table:table-cell table:formula="of:=IF(['file:///G:/Other%20computers/My%20Laptop/Hobby/mmtr/PCBs/LCMTR_01_01/LCMTR_01_01.csv'#$LCMTR_01_01.F44] = &quot;&quot;;&quot;&quot;;['file:///G:/Other%20computers/My%20Laptop/Hobby/mmtr/PCBs/LCMTR_01_01/LCMTR_01_01.csv'#$LCMTR_01_01.F44])">
            <text:p/>
          </table:table-cell>
          <table:table-cell table:style-name="Default" table:formula="of:=IF(['file:///G:/Other%20computers/My%20Laptop/Hobby/mmtr/PCBs/LCMTR_01_01/LCMTR_01_01.csv'#$LCMTR_01_01.G44] = &quot;&quot;;&quot;&quot;;['file:///G:/Other%20computers/My%20Laptop/Hobby/mmtr/PCBs/LCMTR_01_01/LCMTR_01_01.csv'#$LCMTR_01_01.G44])" office:value-type="string" office:string-value="43" calcext:value-type="string">
            <text:p>43</text:p>
          </table:table-cell>
          <table:table-cell table:formula="of:=IF(['file:///G:/Other%20computers/My%20Laptop/Hobby/mmtr/PCBs/LCMTR_01_01/LCMTR_01_01.csv'#$LCMTR_01_01.H44] = &quot;&quot;;&quot;&quot;;['file:///G:/Other%20computers/My%20Laptop/Hobby/mmtr/PCBs/LCMTR_01_01/LCMTR_01_01.csv'#$LCMTR_01_01.H44])" office:value-type="string" office:string-value="Abracon" calcext:value-type="string">
            <text:p>Abracon</text:p>
          </table:table-cell>
          <table:table-cell table:formula="of:=IF(['file:///G:/Other%20computers/My%20Laptop/Hobby/mmtr/PCBs/LCMTR_01_01/LCMTR_01_01.csv'#$LCMTR_01_01.I44] = &quot;&quot;;&quot;&quot;;['file:///G:/Other%20computers/My%20Laptop/Hobby/mmtr/PCBs/LCMTR_01_01/LCMTR_01_01.csv'#$LCMTR_01_01.I44])" office:value-type="string" office:string-value="ABM8-272-T3" calcext:value-type="string">
            <text:p>ABM8-272-T3</text:p>
          </table:table-cell>
          <table:table-cell table:style-name="Default" table:formula="of:=IF(['file:///G:/Other%20computers/My%20Laptop/Hobby/mmtr/PCBs/LCMTR_01_01/LCMTR_01_01.csv'#$LCMTR_01_01.J44] = &quot;&quot;;&quot;&quot;;['file:///G:/Other%20computers/My%20Laptop/Hobby/mmtr/PCBs/LCMTR_01_01/LCMTR_01_01.csv'#$LCMTR_01_01.J44])" office:value-type="string" office:string-value="Digikey" calcext:value-type="string">
            <text:p>Digikey</text:p>
          </table:table-cell>
          <table:table-cell table:formula="of:=IF(['file:///G:/Other%20computers/My%20Laptop/Hobby/mmtr/PCBs/LCMTR_01_01/LCMTR_01_01.csv'#$LCMTR_01_01.K44] = &quot;&quot;;&quot;&quot;;['file:///G:/Other%20computers/My%20Laptop/Hobby/mmtr/PCBs/LCMTR_01_01/LCMTR_01_01.csv'#$LCMTR_01_01.K44])" office:value-type="string" office:string-value="https://www.digikey.com/en/products/detail/abracon-llc/ABM8-272-T3/22472366" calcext:value-type="string">
            <text:p>https://www.digikey.com/en/products/detail/abracon-llc/ABM8-272-T3/22472366</text:p>
          </table:table-cell>
          <table:table-cell table:formula="of:=IF(['file:///G:/Other%20computers/My%20Laptop/Hobby/mmtr/PCBs/LCMTR_01_01/LCMTR_01_01.csv'#$LCMTR_01_01.L44] = &quot;&quot;;&quot;&quot;;['file:///G:/Other%20computers/My%20Laptop/Hobby/mmtr/PCBs/LCMTR_01_01/LCMTR_01_01.csv'#$LCMTR_01_01.L44])" office:value-type="string" office:string-value="535-ABM8-272-T3CT-ND" calcext:value-type="string">
            <text:p>535-ABM8-272-T3CT-ND</text:p>
          </table:table-cell>
          <table:table-cell table:formula="of:=IF(['file:///G:/Other%20computers/My%20Laptop/Hobby/mmtr/PCBs/LCMTR_01_01/LCMTR_01_01.csv'#$LCMTR_01_01.M44] = &quot;&quot;;&quot;&quot;;['file:///G:/Other%20computers/My%20Laptop/Hobby/mmtr/PCBs/LCMTR_01_01/LCMTR_01_01.csv'#$LCMTR_01_01.M4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5] = &quot;&quot;;&quot;&quot;;['file:///G:/Other%20computers/My%20Laptop/Hobby/mmtr/PCBs/LCMTR_01_01/LCMTR_01_01.csv'#$LCMTR_01_01.A45])">
            <text:p/>
          </table:table-cell>
          <table:table-cell table:formula="of:=IF(['file:///G:/Other%20computers/My%20Laptop/Hobby/mmtr/PCBs/LCMTR_01_01/LCMTR_01_01.csv'#$LCMTR_01_01.B45] = &quot;&quot;;&quot;&quot;;['file:///G:/Other%20computers/My%20Laptop/Hobby/mmtr/PCBs/LCMTR_01_01/LCMTR_01_01.csv'#$LCMTR_01_01.B45])">
            <text:p/>
          </table:table-cell>
          <table:table-cell table:formula="of:=IF(['file:///G:/Other%20computers/My%20Laptop/Hobby/mmtr/PCBs/LCMTR_01_01/LCMTR_01_01.csv'#$LCMTR_01_01.C45] = &quot;&quot;;&quot;&quot;;['file:///G:/Other%20computers/My%20Laptop/Hobby/mmtr/PCBs/LCMTR_01_01/LCMTR_01_01.csv'#$LCMTR_01_01.C45])">
            <text:p/>
          </table:table-cell>
          <table:table-cell table:formula="of:=IF(['file:///G:/Other%20computers/My%20Laptop/Hobby/mmtr/PCBs/LCMTR_01_01/LCMTR_01_01.csv'#$LCMTR_01_01.D45] = &quot;&quot;;&quot;&quot;;['file:///G:/Other%20computers/My%20Laptop/Hobby/mmtr/PCBs/LCMTR_01_01/LCMTR_01_01.csv'#$LCMTR_01_01.D45])">
            <text:p/>
          </table:table-cell>
          <table:table-cell table:formula="of:=IF(['file:///G:/Other%20computers/My%20Laptop/Hobby/mmtr/PCBs/LCMTR_01_01/LCMTR_01_01.csv'#$LCMTR_01_01.E45] = &quot;&quot;;&quot;&quot;;['file:///G:/Other%20computers/My%20Laptop/Hobby/mmtr/PCBs/LCMTR_01_01/LCMTR_01_01.csv'#$LCMTR_01_01.E45])">
            <text:p/>
          </table:table-cell>
          <table:table-cell table:formula="of:=IF(['file:///G:/Other%20computers/My%20Laptop/Hobby/mmtr/PCBs/LCMTR_01_01/LCMTR_01_01.csv'#$LCMTR_01_01.F45] = &quot;&quot;;&quot;&quot;;['file:///G:/Other%20computers/My%20Laptop/Hobby/mmtr/PCBs/LCMTR_01_01/LCMTR_01_01.csv'#$LCMTR_01_01.F45])">
            <text:p/>
          </table:table-cell>
          <table:table-cell table:style-name="Default" table:formula="of:=IF(['file:///G:/Other%20computers/My%20Laptop/Hobby/mmtr/PCBs/LCMTR_01_01/LCMTR_01_01.csv'#$LCMTR_01_01.G45] = &quot;&quot;;&quot;&quot;;['file:///G:/Other%20computers/My%20Laptop/Hobby/mmtr/PCBs/LCMTR_01_01/LCMTR_01_01.csv'#$LCMTR_01_01.G45])">
            <text:p/>
          </table:table-cell>
          <table:table-cell table:formula="of:=IF(['file:///G:/Other%20computers/My%20Laptop/Hobby/mmtr/PCBs/LCMTR_01_01/LCMTR_01_01.csv'#$LCMTR_01_01.H45] = &quot;&quot;;&quot;&quot;;['file:///G:/Other%20computers/My%20Laptop/Hobby/mmtr/PCBs/LCMTR_01_01/LCMTR_01_01.csv'#$LCMTR_01_01.H45])">
            <text:p/>
          </table:table-cell>
          <table:table-cell table:formula="of:=IF(['file:///G:/Other%20computers/My%20Laptop/Hobby/mmtr/PCBs/LCMTR_01_01/LCMTR_01_01.csv'#$LCMTR_01_01.I45] = &quot;&quot;;&quot;&quot;;['file:///G:/Other%20computers/My%20Laptop/Hobby/mmtr/PCBs/LCMTR_01_01/LCMTR_01_01.csv'#$LCMTR_01_01.I45])">
            <text:p/>
          </table:table-cell>
          <table:table-cell table:style-name="Default" table:formula="of:=IF(['file:///G:/Other%20computers/My%20Laptop/Hobby/mmtr/PCBs/LCMTR_01_01/LCMTR_01_01.csv'#$LCMTR_01_01.J45] = &quot;&quot;;&quot;&quot;;['file:///G:/Other%20computers/My%20Laptop/Hobby/mmtr/PCBs/LCMTR_01_01/LCMTR_01_01.csv'#$LCMTR_01_01.J45])">
            <text:p/>
          </table:table-cell>
          <table:table-cell table:formula="of:=IF(['file:///G:/Other%20computers/My%20Laptop/Hobby/mmtr/PCBs/LCMTR_01_01/LCMTR_01_01.csv'#$LCMTR_01_01.K45] = &quot;&quot;;&quot;&quot;;['file:///G:/Other%20computers/My%20Laptop/Hobby/mmtr/PCBs/LCMTR_01_01/LCMTR_01_01.csv'#$LCMTR_01_01.K45])">
            <text:p/>
          </table:table-cell>
          <table:table-cell table:formula="of:=IF(['file:///G:/Other%20computers/My%20Laptop/Hobby/mmtr/PCBs/LCMTR_01_01/LCMTR_01_01.csv'#$LCMTR_01_01.L45] = &quot;&quot;;&quot;&quot;;['file:///G:/Other%20computers/My%20Laptop/Hobby/mmtr/PCBs/LCMTR_01_01/LCMTR_01_01.csv'#$LCMTR_01_01.L45])">
            <text:p/>
          </table:table-cell>
          <table:table-cell table:formula="of:=IF(['file:///G:/Other%20computers/My%20Laptop/Hobby/mmtr/PCBs/LCMTR_01_01/LCMTR_01_01.csv'#$LCMTR_01_01.M45] = &quot;&quot;;&quot;&quot;;['file:///G:/Other%20computers/My%20Laptop/Hobby/mmtr/PCBs/LCMTR_01_01/LCMTR_01_01.csv'#$LCMTR_01_01.M4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6] = &quot;&quot;;&quot;&quot;;['file:///G:/Other%20computers/My%20Laptop/Hobby/mmtr/PCBs/LCMTR_01_01/LCMTR_01_01.csv'#$LCMTR_01_01.A46])">
            <text:p/>
          </table:table-cell>
          <table:table-cell table:formula="of:=IF(['file:///G:/Other%20computers/My%20Laptop/Hobby/mmtr/PCBs/LCMTR_01_01/LCMTR_01_01.csv'#$LCMTR_01_01.B46] = &quot;&quot;;&quot;&quot;;['file:///G:/Other%20computers/My%20Laptop/Hobby/mmtr/PCBs/LCMTR_01_01/LCMTR_01_01.csv'#$LCMTR_01_01.B46])">
            <text:p/>
          </table:table-cell>
          <table:table-cell table:formula="of:=IF(['file:///G:/Other%20computers/My%20Laptop/Hobby/mmtr/PCBs/LCMTR_01_01/LCMTR_01_01.csv'#$LCMTR_01_01.C46] = &quot;&quot;;&quot;&quot;;['file:///G:/Other%20computers/My%20Laptop/Hobby/mmtr/PCBs/LCMTR_01_01/LCMTR_01_01.csv'#$LCMTR_01_01.C46])">
            <text:p/>
          </table:table-cell>
          <table:table-cell table:formula="of:=IF(['file:///G:/Other%20computers/My%20Laptop/Hobby/mmtr/PCBs/LCMTR_01_01/LCMTR_01_01.csv'#$LCMTR_01_01.D46] = &quot;&quot;;&quot;&quot;;['file:///G:/Other%20computers/My%20Laptop/Hobby/mmtr/PCBs/LCMTR_01_01/LCMTR_01_01.csv'#$LCMTR_01_01.D46])">
            <text:p/>
          </table:table-cell>
          <table:table-cell table:formula="of:=IF(['file:///G:/Other%20computers/My%20Laptop/Hobby/mmtr/PCBs/LCMTR_01_01/LCMTR_01_01.csv'#$LCMTR_01_01.E46] = &quot;&quot;;&quot;&quot;;['file:///G:/Other%20computers/My%20Laptop/Hobby/mmtr/PCBs/LCMTR_01_01/LCMTR_01_01.csv'#$LCMTR_01_01.E46])">
            <text:p/>
          </table:table-cell>
          <table:table-cell table:formula="of:=IF(['file:///G:/Other%20computers/My%20Laptop/Hobby/mmtr/PCBs/LCMTR_01_01/LCMTR_01_01.csv'#$LCMTR_01_01.F46] = &quot;&quot;;&quot;&quot;;['file:///G:/Other%20computers/My%20Laptop/Hobby/mmtr/PCBs/LCMTR_01_01/LCMTR_01_01.csv'#$LCMTR_01_01.F46])">
            <text:p/>
          </table:table-cell>
          <table:table-cell table:style-name="Default" table:formula="of:=IF(['file:///G:/Other%20computers/My%20Laptop/Hobby/mmtr/PCBs/LCMTR_01_01/LCMTR_01_01.csv'#$LCMTR_01_01.G46] = &quot;&quot;;&quot;&quot;;['file:///G:/Other%20computers/My%20Laptop/Hobby/mmtr/PCBs/LCMTR_01_01/LCMTR_01_01.csv'#$LCMTR_01_01.G46])">
            <text:p/>
          </table:table-cell>
          <table:table-cell table:formula="of:=IF(['file:///G:/Other%20computers/My%20Laptop/Hobby/mmtr/PCBs/LCMTR_01_01/LCMTR_01_01.csv'#$LCMTR_01_01.H46] = &quot;&quot;;&quot;&quot;;['file:///G:/Other%20computers/My%20Laptop/Hobby/mmtr/PCBs/LCMTR_01_01/LCMTR_01_01.csv'#$LCMTR_01_01.H46])">
            <text:p/>
          </table:table-cell>
          <table:table-cell table:formula="of:=IF(['file:///G:/Other%20computers/My%20Laptop/Hobby/mmtr/PCBs/LCMTR_01_01/LCMTR_01_01.csv'#$LCMTR_01_01.I46] = &quot;&quot;;&quot;&quot;;['file:///G:/Other%20computers/My%20Laptop/Hobby/mmtr/PCBs/LCMTR_01_01/LCMTR_01_01.csv'#$LCMTR_01_01.I46])">
            <text:p/>
          </table:table-cell>
          <table:table-cell table:style-name="Default" table:formula="of:=IF(['file:///G:/Other%20computers/My%20Laptop/Hobby/mmtr/PCBs/LCMTR_01_01/LCMTR_01_01.csv'#$LCMTR_01_01.J46] = &quot;&quot;;&quot;&quot;;['file:///G:/Other%20computers/My%20Laptop/Hobby/mmtr/PCBs/LCMTR_01_01/LCMTR_01_01.csv'#$LCMTR_01_01.J46])">
            <text:p/>
          </table:table-cell>
          <table:table-cell table:formula="of:=IF(['file:///G:/Other%20computers/My%20Laptop/Hobby/mmtr/PCBs/LCMTR_01_01/LCMTR_01_01.csv'#$LCMTR_01_01.K46] = &quot;&quot;;&quot;&quot;;['file:///G:/Other%20computers/My%20Laptop/Hobby/mmtr/PCBs/LCMTR_01_01/LCMTR_01_01.csv'#$LCMTR_01_01.K46])">
            <text:p/>
          </table:table-cell>
          <table:table-cell table:formula="of:=IF(['file:///G:/Other%20computers/My%20Laptop/Hobby/mmtr/PCBs/LCMTR_01_01/LCMTR_01_01.csv'#$LCMTR_01_01.L46] = &quot;&quot;;&quot;&quot;;['file:///G:/Other%20computers/My%20Laptop/Hobby/mmtr/PCBs/LCMTR_01_01/LCMTR_01_01.csv'#$LCMTR_01_01.L46])">
            <text:p/>
          </table:table-cell>
          <table:table-cell table:formula="of:=IF(['file:///G:/Other%20computers/My%20Laptop/Hobby/mmtr/PCBs/LCMTR_01_01/LCMTR_01_01.csv'#$LCMTR_01_01.M46] = &quot;&quot;;&quot;&quot;;['file:///G:/Other%20computers/My%20Laptop/Hobby/mmtr/PCBs/LCMTR_01_01/LCMTR_01_01.csv'#$LCMTR_01_01.M4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7] = &quot;&quot;;&quot;&quot;;['file:///G:/Other%20computers/My%20Laptop/Hobby/mmtr/PCBs/LCMTR_01_01/LCMTR_01_01.csv'#$LCMTR_01_01.A47])">
            <text:p/>
          </table:table-cell>
          <table:table-cell table:formula="of:=IF(['file:///G:/Other%20computers/My%20Laptop/Hobby/mmtr/PCBs/LCMTR_01_01/LCMTR_01_01.csv'#$LCMTR_01_01.B47] = &quot;&quot;;&quot;&quot;;['file:///G:/Other%20computers/My%20Laptop/Hobby/mmtr/PCBs/LCMTR_01_01/LCMTR_01_01.csv'#$LCMTR_01_01.B47])">
            <text:p/>
          </table:table-cell>
          <table:table-cell table:formula="of:=IF(['file:///G:/Other%20computers/My%20Laptop/Hobby/mmtr/PCBs/LCMTR_01_01/LCMTR_01_01.csv'#$LCMTR_01_01.C47] = &quot;&quot;;&quot;&quot;;['file:///G:/Other%20computers/My%20Laptop/Hobby/mmtr/PCBs/LCMTR_01_01/LCMTR_01_01.csv'#$LCMTR_01_01.C47])">
            <text:p/>
          </table:table-cell>
          <table:table-cell table:formula="of:=IF(['file:///G:/Other%20computers/My%20Laptop/Hobby/mmtr/PCBs/LCMTR_01_01/LCMTR_01_01.csv'#$LCMTR_01_01.D47] = &quot;&quot;;&quot;&quot;;['file:///G:/Other%20computers/My%20Laptop/Hobby/mmtr/PCBs/LCMTR_01_01/LCMTR_01_01.csv'#$LCMTR_01_01.D47])">
            <text:p/>
          </table:table-cell>
          <table:table-cell table:formula="of:=IF(['file:///G:/Other%20computers/My%20Laptop/Hobby/mmtr/PCBs/LCMTR_01_01/LCMTR_01_01.csv'#$LCMTR_01_01.E47] = &quot;&quot;;&quot;&quot;;['file:///G:/Other%20computers/My%20Laptop/Hobby/mmtr/PCBs/LCMTR_01_01/LCMTR_01_01.csv'#$LCMTR_01_01.E47])">
            <text:p/>
          </table:table-cell>
          <table:table-cell table:formula="of:=IF(['file:///G:/Other%20computers/My%20Laptop/Hobby/mmtr/PCBs/LCMTR_01_01/LCMTR_01_01.csv'#$LCMTR_01_01.F47] = &quot;&quot;;&quot;&quot;;['file:///G:/Other%20computers/My%20Laptop/Hobby/mmtr/PCBs/LCMTR_01_01/LCMTR_01_01.csv'#$LCMTR_01_01.F47])">
            <text:p/>
          </table:table-cell>
          <table:table-cell table:style-name="Default" table:formula="of:=IF(['file:///G:/Other%20computers/My%20Laptop/Hobby/mmtr/PCBs/LCMTR_01_01/LCMTR_01_01.csv'#$LCMTR_01_01.G47] = &quot;&quot;;&quot;&quot;;['file:///G:/Other%20computers/My%20Laptop/Hobby/mmtr/PCBs/LCMTR_01_01/LCMTR_01_01.csv'#$LCMTR_01_01.G47])">
            <text:p/>
          </table:table-cell>
          <table:table-cell table:formula="of:=IF(['file:///G:/Other%20computers/My%20Laptop/Hobby/mmtr/PCBs/LCMTR_01_01/LCMTR_01_01.csv'#$LCMTR_01_01.H47] = &quot;&quot;;&quot;&quot;;['file:///G:/Other%20computers/My%20Laptop/Hobby/mmtr/PCBs/LCMTR_01_01/LCMTR_01_01.csv'#$LCMTR_01_01.H47])">
            <text:p/>
          </table:table-cell>
          <table:table-cell table:style-name="ce2" table:formula="of:=IF(['file:///G:/Other%20computers/My%20Laptop/Hobby/mmtr/PCBs/LCMTR_01_01/LCMTR_01_01.csv'#$LCMTR_01_01.I47] = &quot;&quot;;&quot;&quot;;['file:///G:/Other%20computers/My%20Laptop/Hobby/mmtr/PCBs/LCMTR_01_01/LCMTR_01_01.csv'#$LCMTR_01_01.I47])">
            <text:p/>
          </table:table-cell>
          <table:table-cell table:formula="of:=IF(['file:///G:/Other%20computers/My%20Laptop/Hobby/mmtr/PCBs/LCMTR_01_01/LCMTR_01_01.csv'#$LCMTR_01_01.J47] = &quot;&quot;;&quot;&quot;;['file:///G:/Other%20computers/My%20Laptop/Hobby/mmtr/PCBs/LCMTR_01_01/LCMTR_01_01.csv'#$LCMTR_01_01.J47])">
            <text:p/>
          </table:table-cell>
          <table:table-cell table:style-name="ce2" table:formula="of:=IF(['file:///G:/Other%20computers/My%20Laptop/Hobby/mmtr/PCBs/LCMTR_01_01/LCMTR_01_01.csv'#$LCMTR_01_01.K47] = &quot;&quot;;&quot;&quot;;['file:///G:/Other%20computers/My%20Laptop/Hobby/mmtr/PCBs/LCMTR_01_01/LCMTR_01_01.csv'#$LCMTR_01_01.K47])">
            <text:p/>
          </table:table-cell>
          <table:table-cell table:style-name="ce2" table:formula="of:=IF(['file:///G:/Other%20computers/My%20Laptop/Hobby/mmtr/PCBs/LCMTR_01_01/LCMTR_01_01.csv'#$LCMTR_01_01.L47] = &quot;&quot;;&quot;&quot;;['file:///G:/Other%20computers/My%20Laptop/Hobby/mmtr/PCBs/LCMTR_01_01/LCMTR_01_01.csv'#$LCMTR_01_01.L47])">
            <text:p/>
          </table:table-cell>
          <table:table-cell table:formula="of:=IF(['file:///G:/Other%20computers/My%20Laptop/Hobby/mmtr/PCBs/LCMTR_01_01/LCMTR_01_01.csv'#$LCMTR_01_01.M47] = &quot;&quot;;&quot;&quot;;['file:///G:/Other%20computers/My%20Laptop/Hobby/mmtr/PCBs/LCMTR_01_01/LCMTR_01_01.csv'#$LCMTR_01_01.M4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8] = &quot;&quot;;&quot;&quot;;['file:///G:/Other%20computers/My%20Laptop/Hobby/mmtr/PCBs/LCMTR_01_01/LCMTR_01_01.csv'#$LCMTR_01_01.A48])">
            <text:p/>
          </table:table-cell>
          <table:table-cell table:formula="of:=IF(['file:///G:/Other%20computers/My%20Laptop/Hobby/mmtr/PCBs/LCMTR_01_01/LCMTR_01_01.csv'#$LCMTR_01_01.B48] = &quot;&quot;;&quot;&quot;;['file:///G:/Other%20computers/My%20Laptop/Hobby/mmtr/PCBs/LCMTR_01_01/LCMTR_01_01.csv'#$LCMTR_01_01.B48])">
            <text:p/>
          </table:table-cell>
          <table:table-cell table:formula="of:=IF(['file:///G:/Other%20computers/My%20Laptop/Hobby/mmtr/PCBs/LCMTR_01_01/LCMTR_01_01.csv'#$LCMTR_01_01.C48] = &quot;&quot;;&quot;&quot;;['file:///G:/Other%20computers/My%20Laptop/Hobby/mmtr/PCBs/LCMTR_01_01/LCMTR_01_01.csv'#$LCMTR_01_01.C48])">
            <text:p/>
          </table:table-cell>
          <table:table-cell table:formula="of:=IF(['file:///G:/Other%20computers/My%20Laptop/Hobby/mmtr/PCBs/LCMTR_01_01/LCMTR_01_01.csv'#$LCMTR_01_01.D48] = &quot;&quot;;&quot;&quot;;['file:///G:/Other%20computers/My%20Laptop/Hobby/mmtr/PCBs/LCMTR_01_01/LCMTR_01_01.csv'#$LCMTR_01_01.D48])">
            <text:p/>
          </table:table-cell>
          <table:table-cell table:formula="of:=IF(['file:///G:/Other%20computers/My%20Laptop/Hobby/mmtr/PCBs/LCMTR_01_01/LCMTR_01_01.csv'#$LCMTR_01_01.E48] = &quot;&quot;;&quot;&quot;;['file:///G:/Other%20computers/My%20Laptop/Hobby/mmtr/PCBs/LCMTR_01_01/LCMTR_01_01.csv'#$LCMTR_01_01.E48])">
            <text:p/>
          </table:table-cell>
          <table:table-cell table:formula="of:=IF(['file:///G:/Other%20computers/My%20Laptop/Hobby/mmtr/PCBs/LCMTR_01_01/LCMTR_01_01.csv'#$LCMTR_01_01.F48] = &quot;&quot;;&quot;&quot;;['file:///G:/Other%20computers/My%20Laptop/Hobby/mmtr/PCBs/LCMTR_01_01/LCMTR_01_01.csv'#$LCMTR_01_01.F48])">
            <text:p/>
          </table:table-cell>
          <table:table-cell table:style-name="Default" table:formula="of:=IF(['file:///G:/Other%20computers/My%20Laptop/Hobby/mmtr/PCBs/LCMTR_01_01/LCMTR_01_01.csv'#$LCMTR_01_01.G48] = &quot;&quot;;&quot;&quot;;['file:///G:/Other%20computers/My%20Laptop/Hobby/mmtr/PCBs/LCMTR_01_01/LCMTR_01_01.csv'#$LCMTR_01_01.G48])">
            <text:p/>
          </table:table-cell>
          <table:table-cell table:formula="of:=IF(['file:///G:/Other%20computers/My%20Laptop/Hobby/mmtr/PCBs/LCMTR_01_01/LCMTR_01_01.csv'#$LCMTR_01_01.H48] = &quot;&quot;;&quot;&quot;;['file:///G:/Other%20computers/My%20Laptop/Hobby/mmtr/PCBs/LCMTR_01_01/LCMTR_01_01.csv'#$LCMTR_01_01.H48])">
            <text:p/>
          </table:table-cell>
          <table:table-cell table:style-name="ce2" table:formula="of:=IF(['file:///G:/Other%20computers/My%20Laptop/Hobby/mmtr/PCBs/LCMTR_01_01/LCMTR_01_01.csv'#$LCMTR_01_01.I48] = &quot;&quot;;&quot;&quot;;['file:///G:/Other%20computers/My%20Laptop/Hobby/mmtr/PCBs/LCMTR_01_01/LCMTR_01_01.csv'#$LCMTR_01_01.I48])">
            <text:p/>
          </table:table-cell>
          <table:table-cell table:style-name="Default" table:formula="of:=IF(['file:///G:/Other%20computers/My%20Laptop/Hobby/mmtr/PCBs/LCMTR_01_01/LCMTR_01_01.csv'#$LCMTR_01_01.J48] = &quot;&quot;;&quot;&quot;;['file:///G:/Other%20computers/My%20Laptop/Hobby/mmtr/PCBs/LCMTR_01_01/LCMTR_01_01.csv'#$LCMTR_01_01.J48])">
            <text:p/>
          </table:table-cell>
          <table:table-cell table:formula="of:=IF(['file:///G:/Other%20computers/My%20Laptop/Hobby/mmtr/PCBs/LCMTR_01_01/LCMTR_01_01.csv'#$LCMTR_01_01.K48] = &quot;&quot;;&quot;&quot;;['file:///G:/Other%20computers/My%20Laptop/Hobby/mmtr/PCBs/LCMTR_01_01/LCMTR_01_01.csv'#$LCMTR_01_01.K48])">
            <text:p/>
          </table:table-cell>
          <table:table-cell table:formula="of:=IF(['file:///G:/Other%20computers/My%20Laptop/Hobby/mmtr/PCBs/LCMTR_01_01/LCMTR_01_01.csv'#$LCMTR_01_01.L48] = &quot;&quot;;&quot;&quot;;['file:///G:/Other%20computers/My%20Laptop/Hobby/mmtr/PCBs/LCMTR_01_01/LCMTR_01_01.csv'#$LCMTR_01_01.L48])">
            <text:p/>
          </table:table-cell>
          <table:table-cell table:formula="of:=IF(['file:///G:/Other%20computers/My%20Laptop/Hobby/mmtr/PCBs/LCMTR_01_01/LCMTR_01_01.csv'#$LCMTR_01_01.M48] = &quot;&quot;;&quot;&quot;;['file:///G:/Other%20computers/My%20Laptop/Hobby/mmtr/PCBs/LCMTR_01_01/LCMTR_01_01.csv'#$LCMTR_01_01.M4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49] = &quot;&quot;;&quot;&quot;;['file:///G:/Other%20computers/My%20Laptop/Hobby/mmtr/PCBs/LCMTR_01_01/LCMTR_01_01.csv'#$LCMTR_01_01.A49])">
            <text:p/>
          </table:table-cell>
          <table:table-cell table:formula="of:=IF(['file:///G:/Other%20computers/My%20Laptop/Hobby/mmtr/PCBs/LCMTR_01_01/LCMTR_01_01.csv'#$LCMTR_01_01.B49] = &quot;&quot;;&quot;&quot;;['file:///G:/Other%20computers/My%20Laptop/Hobby/mmtr/PCBs/LCMTR_01_01/LCMTR_01_01.csv'#$LCMTR_01_01.B49])">
            <text:p/>
          </table:table-cell>
          <table:table-cell table:formula="of:=IF(['file:///G:/Other%20computers/My%20Laptop/Hobby/mmtr/PCBs/LCMTR_01_01/LCMTR_01_01.csv'#$LCMTR_01_01.C49] = &quot;&quot;;&quot;&quot;;['file:///G:/Other%20computers/My%20Laptop/Hobby/mmtr/PCBs/LCMTR_01_01/LCMTR_01_01.csv'#$LCMTR_01_01.C49])">
            <text:p/>
          </table:table-cell>
          <table:table-cell table:formula="of:=IF(['file:///G:/Other%20computers/My%20Laptop/Hobby/mmtr/PCBs/LCMTR_01_01/LCMTR_01_01.csv'#$LCMTR_01_01.D49] = &quot;&quot;;&quot;&quot;;['file:///G:/Other%20computers/My%20Laptop/Hobby/mmtr/PCBs/LCMTR_01_01/LCMTR_01_01.csv'#$LCMTR_01_01.D49])">
            <text:p/>
          </table:table-cell>
          <table:table-cell table:formula="of:=IF(['file:///G:/Other%20computers/My%20Laptop/Hobby/mmtr/PCBs/LCMTR_01_01/LCMTR_01_01.csv'#$LCMTR_01_01.E49] = &quot;&quot;;&quot;&quot;;['file:///G:/Other%20computers/My%20Laptop/Hobby/mmtr/PCBs/LCMTR_01_01/LCMTR_01_01.csv'#$LCMTR_01_01.E49])">
            <text:p/>
          </table:table-cell>
          <table:table-cell table:formula="of:=IF(['file:///G:/Other%20computers/My%20Laptop/Hobby/mmtr/PCBs/LCMTR_01_01/LCMTR_01_01.csv'#$LCMTR_01_01.F49] = &quot;&quot;;&quot;&quot;;['file:///G:/Other%20computers/My%20Laptop/Hobby/mmtr/PCBs/LCMTR_01_01/LCMTR_01_01.csv'#$LCMTR_01_01.F49])">
            <text:p/>
          </table:table-cell>
          <table:table-cell table:style-name="Default" table:formula="of:=IF(['file:///G:/Other%20computers/My%20Laptop/Hobby/mmtr/PCBs/LCMTR_01_01/LCMTR_01_01.csv'#$LCMTR_01_01.G49] = &quot;&quot;;&quot;&quot;;['file:///G:/Other%20computers/My%20Laptop/Hobby/mmtr/PCBs/LCMTR_01_01/LCMTR_01_01.csv'#$LCMTR_01_01.G49])">
            <text:p/>
          </table:table-cell>
          <table:table-cell table:formula="of:=IF(['file:///G:/Other%20computers/My%20Laptop/Hobby/mmtr/PCBs/LCMTR_01_01/LCMTR_01_01.csv'#$LCMTR_01_01.H49] = &quot;&quot;;&quot;&quot;;['file:///G:/Other%20computers/My%20Laptop/Hobby/mmtr/PCBs/LCMTR_01_01/LCMTR_01_01.csv'#$LCMTR_01_01.H49])">
            <text:p/>
          </table:table-cell>
          <table:table-cell table:formula="of:=IF(['file:///G:/Other%20computers/My%20Laptop/Hobby/mmtr/PCBs/LCMTR_01_01/LCMTR_01_01.csv'#$LCMTR_01_01.I49] = &quot;&quot;;&quot;&quot;;['file:///G:/Other%20computers/My%20Laptop/Hobby/mmtr/PCBs/LCMTR_01_01/LCMTR_01_01.csv'#$LCMTR_01_01.I49])">
            <text:p/>
          </table:table-cell>
          <table:table-cell table:style-name="Default" table:formula="of:=IF(['file:///G:/Other%20computers/My%20Laptop/Hobby/mmtr/PCBs/LCMTR_01_01/LCMTR_01_01.csv'#$LCMTR_01_01.J49] = &quot;&quot;;&quot;&quot;;['file:///G:/Other%20computers/My%20Laptop/Hobby/mmtr/PCBs/LCMTR_01_01/LCMTR_01_01.csv'#$LCMTR_01_01.J49])">
            <text:p/>
          </table:table-cell>
          <table:table-cell table:formula="of:=IF(['file:///G:/Other%20computers/My%20Laptop/Hobby/mmtr/PCBs/LCMTR_01_01/LCMTR_01_01.csv'#$LCMTR_01_01.K49] = &quot;&quot;;&quot;&quot;;['file:///G:/Other%20computers/My%20Laptop/Hobby/mmtr/PCBs/LCMTR_01_01/LCMTR_01_01.csv'#$LCMTR_01_01.K49])">
            <text:p/>
          </table:table-cell>
          <table:table-cell table:formula="of:=IF(['file:///G:/Other%20computers/My%20Laptop/Hobby/mmtr/PCBs/LCMTR_01_01/LCMTR_01_01.csv'#$LCMTR_01_01.L49] = &quot;&quot;;&quot;&quot;;['file:///G:/Other%20computers/My%20Laptop/Hobby/mmtr/PCBs/LCMTR_01_01/LCMTR_01_01.csv'#$LCMTR_01_01.L49])">
            <text:p/>
          </table:table-cell>
          <table:table-cell table:formula="of:=IF(['file:///G:/Other%20computers/My%20Laptop/Hobby/mmtr/PCBs/LCMTR_01_01/LCMTR_01_01.csv'#$LCMTR_01_01.M49] = &quot;&quot;;&quot;&quot;;['file:///G:/Other%20computers/My%20Laptop/Hobby/mmtr/PCBs/LCMTR_01_01/LCMTR_01_01.csv'#$LCMTR_01_01.M49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0] = &quot;&quot;;&quot;&quot;;['file:///G:/Other%20computers/My%20Laptop/Hobby/mmtr/PCBs/LCMTR_01_01/LCMTR_01_01.csv'#$LCMTR_01_01.A50])">
            <text:p/>
          </table:table-cell>
          <table:table-cell table:formula="of:=IF(['file:///G:/Other%20computers/My%20Laptop/Hobby/mmtr/PCBs/LCMTR_01_01/LCMTR_01_01.csv'#$LCMTR_01_01.B50] = &quot;&quot;;&quot;&quot;;['file:///G:/Other%20computers/My%20Laptop/Hobby/mmtr/PCBs/LCMTR_01_01/LCMTR_01_01.csv'#$LCMTR_01_01.B50])">
            <text:p/>
          </table:table-cell>
          <table:table-cell table:formula="of:=IF(['file:///G:/Other%20computers/My%20Laptop/Hobby/mmtr/PCBs/LCMTR_01_01/LCMTR_01_01.csv'#$LCMTR_01_01.C50] = &quot;&quot;;&quot;&quot;;['file:///G:/Other%20computers/My%20Laptop/Hobby/mmtr/PCBs/LCMTR_01_01/LCMTR_01_01.csv'#$LCMTR_01_01.C50])">
            <text:p/>
          </table:table-cell>
          <table:table-cell table:formula="of:=IF(['file:///G:/Other%20computers/My%20Laptop/Hobby/mmtr/PCBs/LCMTR_01_01/LCMTR_01_01.csv'#$LCMTR_01_01.D50] = &quot;&quot;;&quot;&quot;;['file:///G:/Other%20computers/My%20Laptop/Hobby/mmtr/PCBs/LCMTR_01_01/LCMTR_01_01.csv'#$LCMTR_01_01.D50])">
            <text:p/>
          </table:table-cell>
          <table:table-cell table:formula="of:=IF(['file:///G:/Other%20computers/My%20Laptop/Hobby/mmtr/PCBs/LCMTR_01_01/LCMTR_01_01.csv'#$LCMTR_01_01.E50] = &quot;&quot;;&quot;&quot;;['file:///G:/Other%20computers/My%20Laptop/Hobby/mmtr/PCBs/LCMTR_01_01/LCMTR_01_01.csv'#$LCMTR_01_01.E50])">
            <text:p/>
          </table:table-cell>
          <table:table-cell table:formula="of:=IF(['file:///G:/Other%20computers/My%20Laptop/Hobby/mmtr/PCBs/LCMTR_01_01/LCMTR_01_01.csv'#$LCMTR_01_01.F50] = &quot;&quot;;&quot;&quot;;['file:///G:/Other%20computers/My%20Laptop/Hobby/mmtr/PCBs/LCMTR_01_01/LCMTR_01_01.csv'#$LCMTR_01_01.F50])">
            <text:p/>
          </table:table-cell>
          <table:table-cell table:style-name="Default" table:formula="of:=IF(['file:///G:/Other%20computers/My%20Laptop/Hobby/mmtr/PCBs/LCMTR_01_01/LCMTR_01_01.csv'#$LCMTR_01_01.G50] = &quot;&quot;;&quot;&quot;;['file:///G:/Other%20computers/My%20Laptop/Hobby/mmtr/PCBs/LCMTR_01_01/LCMTR_01_01.csv'#$LCMTR_01_01.G50])">
            <text:p/>
          </table:table-cell>
          <table:table-cell table:formula="of:=IF(['file:///G:/Other%20computers/My%20Laptop/Hobby/mmtr/PCBs/LCMTR_01_01/LCMTR_01_01.csv'#$LCMTR_01_01.H50] = &quot;&quot;;&quot;&quot;;['file:///G:/Other%20computers/My%20Laptop/Hobby/mmtr/PCBs/LCMTR_01_01/LCMTR_01_01.csv'#$LCMTR_01_01.H50])">
            <text:p/>
          </table:table-cell>
          <table:table-cell table:formula="of:=IF(['file:///G:/Other%20computers/My%20Laptop/Hobby/mmtr/PCBs/LCMTR_01_01/LCMTR_01_01.csv'#$LCMTR_01_01.I50] = &quot;&quot;;&quot;&quot;;['file:///G:/Other%20computers/My%20Laptop/Hobby/mmtr/PCBs/LCMTR_01_01/LCMTR_01_01.csv'#$LCMTR_01_01.I50])">
            <text:p/>
          </table:table-cell>
          <table:table-cell table:style-name="Default" table:formula="of:=IF(['file:///G:/Other%20computers/My%20Laptop/Hobby/mmtr/PCBs/LCMTR_01_01/LCMTR_01_01.csv'#$LCMTR_01_01.J50] = &quot;&quot;;&quot;&quot;;['file:///G:/Other%20computers/My%20Laptop/Hobby/mmtr/PCBs/LCMTR_01_01/LCMTR_01_01.csv'#$LCMTR_01_01.J50])">
            <text:p/>
          </table:table-cell>
          <table:table-cell table:formula="of:=IF(['file:///G:/Other%20computers/My%20Laptop/Hobby/mmtr/PCBs/LCMTR_01_01/LCMTR_01_01.csv'#$LCMTR_01_01.K50] = &quot;&quot;;&quot;&quot;;['file:///G:/Other%20computers/My%20Laptop/Hobby/mmtr/PCBs/LCMTR_01_01/LCMTR_01_01.csv'#$LCMTR_01_01.K50])">
            <text:p/>
          </table:table-cell>
          <table:table-cell table:formula="of:=IF(['file:///G:/Other%20computers/My%20Laptop/Hobby/mmtr/PCBs/LCMTR_01_01/LCMTR_01_01.csv'#$LCMTR_01_01.L50] = &quot;&quot;;&quot;&quot;;['file:///G:/Other%20computers/My%20Laptop/Hobby/mmtr/PCBs/LCMTR_01_01/LCMTR_01_01.csv'#$LCMTR_01_01.L50])">
            <text:p/>
          </table:table-cell>
          <table:table-cell table:formula="of:=IF(['file:///G:/Other%20computers/My%20Laptop/Hobby/mmtr/PCBs/LCMTR_01_01/LCMTR_01_01.csv'#$LCMTR_01_01.M50] = &quot;&quot;;&quot;&quot;;['file:///G:/Other%20computers/My%20Laptop/Hobby/mmtr/PCBs/LCMTR_01_01/LCMTR_01_01.csv'#$LCMTR_01_01.M50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1] = &quot;&quot;;&quot;&quot;;['file:///G:/Other%20computers/My%20Laptop/Hobby/mmtr/PCBs/LCMTR_01_01/LCMTR_01_01.csv'#$LCMTR_01_01.A51])">
            <text:p/>
          </table:table-cell>
          <table:table-cell table:formula="of:=IF(['file:///G:/Other%20computers/My%20Laptop/Hobby/mmtr/PCBs/LCMTR_01_01/LCMTR_01_01.csv'#$LCMTR_01_01.B51] = &quot;&quot;;&quot;&quot;;['file:///G:/Other%20computers/My%20Laptop/Hobby/mmtr/PCBs/LCMTR_01_01/LCMTR_01_01.csv'#$LCMTR_01_01.B51])">
            <text:p/>
          </table:table-cell>
          <table:table-cell table:formula="of:=IF(['file:///G:/Other%20computers/My%20Laptop/Hobby/mmtr/PCBs/LCMTR_01_01/LCMTR_01_01.csv'#$LCMTR_01_01.C51] = &quot;&quot;;&quot;&quot;;['file:///G:/Other%20computers/My%20Laptop/Hobby/mmtr/PCBs/LCMTR_01_01/LCMTR_01_01.csv'#$LCMTR_01_01.C51])">
            <text:p/>
          </table:table-cell>
          <table:table-cell table:formula="of:=IF(['file:///G:/Other%20computers/My%20Laptop/Hobby/mmtr/PCBs/LCMTR_01_01/LCMTR_01_01.csv'#$LCMTR_01_01.D51] = &quot;&quot;;&quot;&quot;;['file:///G:/Other%20computers/My%20Laptop/Hobby/mmtr/PCBs/LCMTR_01_01/LCMTR_01_01.csv'#$LCMTR_01_01.D51])">
            <text:p/>
          </table:table-cell>
          <table:table-cell table:formula="of:=IF(['file:///G:/Other%20computers/My%20Laptop/Hobby/mmtr/PCBs/LCMTR_01_01/LCMTR_01_01.csv'#$LCMTR_01_01.E51] = &quot;&quot;;&quot;&quot;;['file:///G:/Other%20computers/My%20Laptop/Hobby/mmtr/PCBs/LCMTR_01_01/LCMTR_01_01.csv'#$LCMTR_01_01.E51])">
            <text:p/>
          </table:table-cell>
          <table:table-cell table:formula="of:=IF(['file:///G:/Other%20computers/My%20Laptop/Hobby/mmtr/PCBs/LCMTR_01_01/LCMTR_01_01.csv'#$LCMTR_01_01.F51] = &quot;&quot;;&quot;&quot;;['file:///G:/Other%20computers/My%20Laptop/Hobby/mmtr/PCBs/LCMTR_01_01/LCMTR_01_01.csv'#$LCMTR_01_01.F51])">
            <text:p/>
          </table:table-cell>
          <table:table-cell table:style-name="Default" table:formula="of:=IF(['file:///G:/Other%20computers/My%20Laptop/Hobby/mmtr/PCBs/LCMTR_01_01/LCMTR_01_01.csv'#$LCMTR_01_01.G51] = &quot;&quot;;&quot;&quot;;['file:///G:/Other%20computers/My%20Laptop/Hobby/mmtr/PCBs/LCMTR_01_01/LCMTR_01_01.csv'#$LCMTR_01_01.G51])">
            <text:p/>
          </table:table-cell>
          <table:table-cell table:formula="of:=IF(['file:///G:/Other%20computers/My%20Laptop/Hobby/mmtr/PCBs/LCMTR_01_01/LCMTR_01_01.csv'#$LCMTR_01_01.H51] = &quot;&quot;;&quot;&quot;;['file:///G:/Other%20computers/My%20Laptop/Hobby/mmtr/PCBs/LCMTR_01_01/LCMTR_01_01.csv'#$LCMTR_01_01.H51])">
            <text:p/>
          </table:table-cell>
          <table:table-cell table:formula="of:=IF(['file:///G:/Other%20computers/My%20Laptop/Hobby/mmtr/PCBs/LCMTR_01_01/LCMTR_01_01.csv'#$LCMTR_01_01.I51] = &quot;&quot;;&quot;&quot;;['file:///G:/Other%20computers/My%20Laptop/Hobby/mmtr/PCBs/LCMTR_01_01/LCMTR_01_01.csv'#$LCMTR_01_01.I51])">
            <text:p/>
          </table:table-cell>
          <table:table-cell table:style-name="Default" table:formula="of:=IF(['file:///G:/Other%20computers/My%20Laptop/Hobby/mmtr/PCBs/LCMTR_01_01/LCMTR_01_01.csv'#$LCMTR_01_01.J51] = &quot;&quot;;&quot;&quot;;['file:///G:/Other%20computers/My%20Laptop/Hobby/mmtr/PCBs/LCMTR_01_01/LCMTR_01_01.csv'#$LCMTR_01_01.J51])">
            <text:p/>
          </table:table-cell>
          <table:table-cell table:formula="of:=IF(['file:///G:/Other%20computers/My%20Laptop/Hobby/mmtr/PCBs/LCMTR_01_01/LCMTR_01_01.csv'#$LCMTR_01_01.K51] = &quot;&quot;;&quot;&quot;;['file:///G:/Other%20computers/My%20Laptop/Hobby/mmtr/PCBs/LCMTR_01_01/LCMTR_01_01.csv'#$LCMTR_01_01.K51])">
            <text:p/>
          </table:table-cell>
          <table:table-cell table:formula="of:=IF(['file:///G:/Other%20computers/My%20Laptop/Hobby/mmtr/PCBs/LCMTR_01_01/LCMTR_01_01.csv'#$LCMTR_01_01.L51] = &quot;&quot;;&quot;&quot;;['file:///G:/Other%20computers/My%20Laptop/Hobby/mmtr/PCBs/LCMTR_01_01/LCMTR_01_01.csv'#$LCMTR_01_01.L51])">
            <text:p/>
          </table:table-cell>
          <table:table-cell table:formula="of:=IF(['file:///G:/Other%20computers/My%20Laptop/Hobby/mmtr/PCBs/LCMTR_01_01/LCMTR_01_01.csv'#$LCMTR_01_01.M51] = &quot;&quot;;&quot;&quot;;['file:///G:/Other%20computers/My%20Laptop/Hobby/mmtr/PCBs/LCMTR_01_01/LCMTR_01_01.csv'#$LCMTR_01_01.M51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2] = &quot;&quot;;&quot;&quot;;['file:///G:/Other%20computers/My%20Laptop/Hobby/mmtr/PCBs/LCMTR_01_01/LCMTR_01_01.csv'#$LCMTR_01_01.A52])">
            <text:p/>
          </table:table-cell>
          <table:table-cell table:formula="of:=IF(['file:///G:/Other%20computers/My%20Laptop/Hobby/mmtr/PCBs/LCMTR_01_01/LCMTR_01_01.csv'#$LCMTR_01_01.B52] = &quot;&quot;;&quot;&quot;;['file:///G:/Other%20computers/My%20Laptop/Hobby/mmtr/PCBs/LCMTR_01_01/LCMTR_01_01.csv'#$LCMTR_01_01.B52])">
            <text:p/>
          </table:table-cell>
          <table:table-cell table:formula="of:=IF(['file:///G:/Other%20computers/My%20Laptop/Hobby/mmtr/PCBs/LCMTR_01_01/LCMTR_01_01.csv'#$LCMTR_01_01.C52] = &quot;&quot;;&quot;&quot;;['file:///G:/Other%20computers/My%20Laptop/Hobby/mmtr/PCBs/LCMTR_01_01/LCMTR_01_01.csv'#$LCMTR_01_01.C52])">
            <text:p/>
          </table:table-cell>
          <table:table-cell table:formula="of:=IF(['file:///G:/Other%20computers/My%20Laptop/Hobby/mmtr/PCBs/LCMTR_01_01/LCMTR_01_01.csv'#$LCMTR_01_01.D52] = &quot;&quot;;&quot;&quot;;['file:///G:/Other%20computers/My%20Laptop/Hobby/mmtr/PCBs/LCMTR_01_01/LCMTR_01_01.csv'#$LCMTR_01_01.D52])">
            <text:p/>
          </table:table-cell>
          <table:table-cell table:formula="of:=IF(['file:///G:/Other%20computers/My%20Laptop/Hobby/mmtr/PCBs/LCMTR_01_01/LCMTR_01_01.csv'#$LCMTR_01_01.E52] = &quot;&quot;;&quot;&quot;;['file:///G:/Other%20computers/My%20Laptop/Hobby/mmtr/PCBs/LCMTR_01_01/LCMTR_01_01.csv'#$LCMTR_01_01.E52])">
            <text:p/>
          </table:table-cell>
          <table:table-cell table:formula="of:=IF(['file:///G:/Other%20computers/My%20Laptop/Hobby/mmtr/PCBs/LCMTR_01_01/LCMTR_01_01.csv'#$LCMTR_01_01.F52] = &quot;&quot;;&quot;&quot;;['file:///G:/Other%20computers/My%20Laptop/Hobby/mmtr/PCBs/LCMTR_01_01/LCMTR_01_01.csv'#$LCMTR_01_01.F52])">
            <text:p/>
          </table:table-cell>
          <table:table-cell table:style-name="Default" table:formula="of:=IF(['file:///G:/Other%20computers/My%20Laptop/Hobby/mmtr/PCBs/LCMTR_01_01/LCMTR_01_01.csv'#$LCMTR_01_01.G52] = &quot;&quot;;&quot;&quot;;['file:///G:/Other%20computers/My%20Laptop/Hobby/mmtr/PCBs/LCMTR_01_01/LCMTR_01_01.csv'#$LCMTR_01_01.G52])">
            <text:p/>
          </table:table-cell>
          <table:table-cell table:style-name="ce2" table:formula="of:=IF(['file:///G:/Other%20computers/My%20Laptop/Hobby/mmtr/PCBs/LCMTR_01_01/LCMTR_01_01.csv'#$LCMTR_01_01.H52] = &quot;&quot;;&quot;&quot;;['file:///G:/Other%20computers/My%20Laptop/Hobby/mmtr/PCBs/LCMTR_01_01/LCMTR_01_01.csv'#$LCMTR_01_01.H52])">
            <text:p/>
          </table:table-cell>
          <table:table-cell table:style-name="ce2" table:formula="of:=IF(['file:///G:/Other%20computers/My%20Laptop/Hobby/mmtr/PCBs/LCMTR_01_01/LCMTR_01_01.csv'#$LCMTR_01_01.I52] = &quot;&quot;;&quot;&quot;;['file:///G:/Other%20computers/My%20Laptop/Hobby/mmtr/PCBs/LCMTR_01_01/LCMTR_01_01.csv'#$LCMTR_01_01.I52])">
            <text:p/>
          </table:table-cell>
          <table:table-cell table:formula="of:=IF(['file:///G:/Other%20computers/My%20Laptop/Hobby/mmtr/PCBs/LCMTR_01_01/LCMTR_01_01.csv'#$LCMTR_01_01.J52] = &quot;&quot;;&quot;&quot;;['file:///G:/Other%20computers/My%20Laptop/Hobby/mmtr/PCBs/LCMTR_01_01/LCMTR_01_01.csv'#$LCMTR_01_01.J52])">
            <text:p/>
          </table:table-cell>
          <table:table-cell table:style-name="ce2" table:formula="of:=IF(['file:///G:/Other%20computers/My%20Laptop/Hobby/mmtr/PCBs/LCMTR_01_01/LCMTR_01_01.csv'#$LCMTR_01_01.K52] = &quot;&quot;;&quot;&quot;;['file:///G:/Other%20computers/My%20Laptop/Hobby/mmtr/PCBs/LCMTR_01_01/LCMTR_01_01.csv'#$LCMTR_01_01.K52])">
            <text:p/>
          </table:table-cell>
          <table:table-cell table:style-name="ce2" table:formula="of:=IF(['file:///G:/Other%20computers/My%20Laptop/Hobby/mmtr/PCBs/LCMTR_01_01/LCMTR_01_01.csv'#$LCMTR_01_01.L52] = &quot;&quot;;&quot;&quot;;['file:///G:/Other%20computers/My%20Laptop/Hobby/mmtr/PCBs/LCMTR_01_01/LCMTR_01_01.csv'#$LCMTR_01_01.L52])">
            <text:p/>
          </table:table-cell>
          <table:table-cell table:formula="of:=IF(['file:///G:/Other%20computers/My%20Laptop/Hobby/mmtr/PCBs/LCMTR_01_01/LCMTR_01_01.csv'#$LCMTR_01_01.M52] = &quot;&quot;;&quot;&quot;;['file:///G:/Other%20computers/My%20Laptop/Hobby/mmtr/PCBs/LCMTR_01_01/LCMTR_01_01.csv'#$LCMTR_01_01.M52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3] = &quot;&quot;;&quot;&quot;;['file:///G:/Other%20computers/My%20Laptop/Hobby/mmtr/PCBs/LCMTR_01_01/LCMTR_01_01.csv'#$LCMTR_01_01.A53])">
            <text:p/>
          </table:table-cell>
          <table:table-cell table:formula="of:=IF(['file:///G:/Other%20computers/My%20Laptop/Hobby/mmtr/PCBs/LCMTR_01_01/LCMTR_01_01.csv'#$LCMTR_01_01.B53] = &quot;&quot;;&quot;&quot;;['file:///G:/Other%20computers/My%20Laptop/Hobby/mmtr/PCBs/LCMTR_01_01/LCMTR_01_01.csv'#$LCMTR_01_01.B53])">
            <text:p/>
          </table:table-cell>
          <table:table-cell table:formula="of:=IF(['file:///G:/Other%20computers/My%20Laptop/Hobby/mmtr/PCBs/LCMTR_01_01/LCMTR_01_01.csv'#$LCMTR_01_01.C53] = &quot;&quot;;&quot;&quot;;['file:///G:/Other%20computers/My%20Laptop/Hobby/mmtr/PCBs/LCMTR_01_01/LCMTR_01_01.csv'#$LCMTR_01_01.C53])">
            <text:p/>
          </table:table-cell>
          <table:table-cell table:formula="of:=IF(['file:///G:/Other%20computers/My%20Laptop/Hobby/mmtr/PCBs/LCMTR_01_01/LCMTR_01_01.csv'#$LCMTR_01_01.D53] = &quot;&quot;;&quot;&quot;;['file:///G:/Other%20computers/My%20Laptop/Hobby/mmtr/PCBs/LCMTR_01_01/LCMTR_01_01.csv'#$LCMTR_01_01.D53])">
            <text:p/>
          </table:table-cell>
          <table:table-cell table:formula="of:=IF(['file:///G:/Other%20computers/My%20Laptop/Hobby/mmtr/PCBs/LCMTR_01_01/LCMTR_01_01.csv'#$LCMTR_01_01.E53] = &quot;&quot;;&quot;&quot;;['file:///G:/Other%20computers/My%20Laptop/Hobby/mmtr/PCBs/LCMTR_01_01/LCMTR_01_01.csv'#$LCMTR_01_01.E53])">
            <text:p/>
          </table:table-cell>
          <table:table-cell table:formula="of:=IF(['file:///G:/Other%20computers/My%20Laptop/Hobby/mmtr/PCBs/LCMTR_01_01/LCMTR_01_01.csv'#$LCMTR_01_01.F53] = &quot;&quot;;&quot;&quot;;['file:///G:/Other%20computers/My%20Laptop/Hobby/mmtr/PCBs/LCMTR_01_01/LCMTR_01_01.csv'#$LCMTR_01_01.F53])">
            <text:p/>
          </table:table-cell>
          <table:table-cell table:style-name="Default" table:formula="of:=IF(['file:///G:/Other%20computers/My%20Laptop/Hobby/mmtr/PCBs/LCMTR_01_01/LCMTR_01_01.csv'#$LCMTR_01_01.G53] = &quot;&quot;;&quot;&quot;;['file:///G:/Other%20computers/My%20Laptop/Hobby/mmtr/PCBs/LCMTR_01_01/LCMTR_01_01.csv'#$LCMTR_01_01.G53])">
            <text:p/>
          </table:table-cell>
          <table:table-cell table:formula="of:=IF(['file:///G:/Other%20computers/My%20Laptop/Hobby/mmtr/PCBs/LCMTR_01_01/LCMTR_01_01.csv'#$LCMTR_01_01.H53] = &quot;&quot;;&quot;&quot;;['file:///G:/Other%20computers/My%20Laptop/Hobby/mmtr/PCBs/LCMTR_01_01/LCMTR_01_01.csv'#$LCMTR_01_01.H53])">
            <text:p/>
          </table:table-cell>
          <table:table-cell table:formula="of:=IF(['file:///G:/Other%20computers/My%20Laptop/Hobby/mmtr/PCBs/LCMTR_01_01/LCMTR_01_01.csv'#$LCMTR_01_01.I53] = &quot;&quot;;&quot;&quot;;['file:///G:/Other%20computers/My%20Laptop/Hobby/mmtr/PCBs/LCMTR_01_01/LCMTR_01_01.csv'#$LCMTR_01_01.I53])">
            <text:p/>
          </table:table-cell>
          <table:table-cell table:style-name="Default" table:formula="of:=IF(['file:///G:/Other%20computers/My%20Laptop/Hobby/mmtr/PCBs/LCMTR_01_01/LCMTR_01_01.csv'#$LCMTR_01_01.J53] = &quot;&quot;;&quot;&quot;;['file:///G:/Other%20computers/My%20Laptop/Hobby/mmtr/PCBs/LCMTR_01_01/LCMTR_01_01.csv'#$LCMTR_01_01.J53])">
            <text:p/>
          </table:table-cell>
          <table:table-cell table:formula="of:=IF(['file:///G:/Other%20computers/My%20Laptop/Hobby/mmtr/PCBs/LCMTR_01_01/LCMTR_01_01.csv'#$LCMTR_01_01.K53] = &quot;&quot;;&quot;&quot;;['file:///G:/Other%20computers/My%20Laptop/Hobby/mmtr/PCBs/LCMTR_01_01/LCMTR_01_01.csv'#$LCMTR_01_01.K53])">
            <text:p/>
          </table:table-cell>
          <table:table-cell table:formula="of:=IF(['file:///G:/Other%20computers/My%20Laptop/Hobby/mmtr/PCBs/LCMTR_01_01/LCMTR_01_01.csv'#$LCMTR_01_01.L53] = &quot;&quot;;&quot;&quot;;['file:///G:/Other%20computers/My%20Laptop/Hobby/mmtr/PCBs/LCMTR_01_01/LCMTR_01_01.csv'#$LCMTR_01_01.L53])">
            <text:p/>
          </table:table-cell>
          <table:table-cell table:formula="of:=IF(['file:///G:/Other%20computers/My%20Laptop/Hobby/mmtr/PCBs/LCMTR_01_01/LCMTR_01_01.csv'#$LCMTR_01_01.M53] = &quot;&quot;;&quot;&quot;;['file:///G:/Other%20computers/My%20Laptop/Hobby/mmtr/PCBs/LCMTR_01_01/LCMTR_01_01.csv'#$LCMTR_01_01.M53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4] = &quot;&quot;;&quot;&quot;;['file:///G:/Other%20computers/My%20Laptop/Hobby/mmtr/PCBs/LCMTR_01_01/LCMTR_01_01.csv'#$LCMTR_01_01.A54])">
            <text:p/>
          </table:table-cell>
          <table:table-cell table:formula="of:=IF(['file:///G:/Other%20computers/My%20Laptop/Hobby/mmtr/PCBs/LCMTR_01_01/LCMTR_01_01.csv'#$LCMTR_01_01.B54] = &quot;&quot;;&quot;&quot;;['file:///G:/Other%20computers/My%20Laptop/Hobby/mmtr/PCBs/LCMTR_01_01/LCMTR_01_01.csv'#$LCMTR_01_01.B54])">
            <text:p/>
          </table:table-cell>
          <table:table-cell table:formula="of:=IF(['file:///G:/Other%20computers/My%20Laptop/Hobby/mmtr/PCBs/LCMTR_01_01/LCMTR_01_01.csv'#$LCMTR_01_01.C54] = &quot;&quot;;&quot;&quot;;['file:///G:/Other%20computers/My%20Laptop/Hobby/mmtr/PCBs/LCMTR_01_01/LCMTR_01_01.csv'#$LCMTR_01_01.C54])">
            <text:p/>
          </table:table-cell>
          <table:table-cell table:formula="of:=IF(['file:///G:/Other%20computers/My%20Laptop/Hobby/mmtr/PCBs/LCMTR_01_01/LCMTR_01_01.csv'#$LCMTR_01_01.D54] = &quot;&quot;;&quot;&quot;;['file:///G:/Other%20computers/My%20Laptop/Hobby/mmtr/PCBs/LCMTR_01_01/LCMTR_01_01.csv'#$LCMTR_01_01.D54])">
            <text:p/>
          </table:table-cell>
          <table:table-cell table:formula="of:=IF(['file:///G:/Other%20computers/My%20Laptop/Hobby/mmtr/PCBs/LCMTR_01_01/LCMTR_01_01.csv'#$LCMTR_01_01.E54] = &quot;&quot;;&quot;&quot;;['file:///G:/Other%20computers/My%20Laptop/Hobby/mmtr/PCBs/LCMTR_01_01/LCMTR_01_01.csv'#$LCMTR_01_01.E54])">
            <text:p/>
          </table:table-cell>
          <table:table-cell table:formula="of:=IF(['file:///G:/Other%20computers/My%20Laptop/Hobby/mmtr/PCBs/LCMTR_01_01/LCMTR_01_01.csv'#$LCMTR_01_01.F54] = &quot;&quot;;&quot;&quot;;['file:///G:/Other%20computers/My%20Laptop/Hobby/mmtr/PCBs/LCMTR_01_01/LCMTR_01_01.csv'#$LCMTR_01_01.F54])">
            <text:p/>
          </table:table-cell>
          <table:table-cell table:style-name="Default" table:formula="of:=IF(['file:///G:/Other%20computers/My%20Laptop/Hobby/mmtr/PCBs/LCMTR_01_01/LCMTR_01_01.csv'#$LCMTR_01_01.G54] = &quot;&quot;;&quot;&quot;;['file:///G:/Other%20computers/My%20Laptop/Hobby/mmtr/PCBs/LCMTR_01_01/LCMTR_01_01.csv'#$LCMTR_01_01.G54])">
            <text:p/>
          </table:table-cell>
          <table:table-cell table:formula="of:=IF(['file:///G:/Other%20computers/My%20Laptop/Hobby/mmtr/PCBs/LCMTR_01_01/LCMTR_01_01.csv'#$LCMTR_01_01.H54] = &quot;&quot;;&quot;&quot;;['file:///G:/Other%20computers/My%20Laptop/Hobby/mmtr/PCBs/LCMTR_01_01/LCMTR_01_01.csv'#$LCMTR_01_01.H54])">
            <text:p/>
          </table:table-cell>
          <table:table-cell table:formula="of:=IF(['file:///G:/Other%20computers/My%20Laptop/Hobby/mmtr/PCBs/LCMTR_01_01/LCMTR_01_01.csv'#$LCMTR_01_01.I54] = &quot;&quot;;&quot;&quot;;['file:///G:/Other%20computers/My%20Laptop/Hobby/mmtr/PCBs/LCMTR_01_01/LCMTR_01_01.csv'#$LCMTR_01_01.I54])">
            <text:p/>
          </table:table-cell>
          <table:table-cell table:style-name="Default" table:formula="of:=IF(['file:///G:/Other%20computers/My%20Laptop/Hobby/mmtr/PCBs/LCMTR_01_01/LCMTR_01_01.csv'#$LCMTR_01_01.J54] = &quot;&quot;;&quot;&quot;;['file:///G:/Other%20computers/My%20Laptop/Hobby/mmtr/PCBs/LCMTR_01_01/LCMTR_01_01.csv'#$LCMTR_01_01.J54])">
            <text:p/>
          </table:table-cell>
          <table:table-cell table:formula="of:=IF(['file:///G:/Other%20computers/My%20Laptop/Hobby/mmtr/PCBs/LCMTR_01_01/LCMTR_01_01.csv'#$LCMTR_01_01.K54] = &quot;&quot;;&quot;&quot;;['file:///G:/Other%20computers/My%20Laptop/Hobby/mmtr/PCBs/LCMTR_01_01/LCMTR_01_01.csv'#$LCMTR_01_01.K54])">
            <text:p/>
          </table:table-cell>
          <table:table-cell table:formula="of:=IF(['file:///G:/Other%20computers/My%20Laptop/Hobby/mmtr/PCBs/LCMTR_01_01/LCMTR_01_01.csv'#$LCMTR_01_01.L54] = &quot;&quot;;&quot;&quot;;['file:///G:/Other%20computers/My%20Laptop/Hobby/mmtr/PCBs/LCMTR_01_01/LCMTR_01_01.csv'#$LCMTR_01_01.L54])">
            <text:p/>
          </table:table-cell>
          <table:table-cell table:formula="of:=IF(['file:///G:/Other%20computers/My%20Laptop/Hobby/mmtr/PCBs/LCMTR_01_01/LCMTR_01_01.csv'#$LCMTR_01_01.M54] = &quot;&quot;;&quot;&quot;;['file:///G:/Other%20computers/My%20Laptop/Hobby/mmtr/PCBs/LCMTR_01_01/LCMTR_01_01.csv'#$LCMTR_01_01.M54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5] = &quot;&quot;;&quot;&quot;;['file:///G:/Other%20computers/My%20Laptop/Hobby/mmtr/PCBs/LCMTR_01_01/LCMTR_01_01.csv'#$LCMTR_01_01.A55])">
            <text:p/>
          </table:table-cell>
          <table:table-cell table:formula="of:=IF(['file:///G:/Other%20computers/My%20Laptop/Hobby/mmtr/PCBs/LCMTR_01_01/LCMTR_01_01.csv'#$LCMTR_01_01.B55] = &quot;&quot;;&quot;&quot;;['file:///G:/Other%20computers/My%20Laptop/Hobby/mmtr/PCBs/LCMTR_01_01/LCMTR_01_01.csv'#$LCMTR_01_01.B55])">
            <text:p/>
          </table:table-cell>
          <table:table-cell table:formula="of:=IF(['file:///G:/Other%20computers/My%20Laptop/Hobby/mmtr/PCBs/LCMTR_01_01/LCMTR_01_01.csv'#$LCMTR_01_01.C55] = &quot;&quot;;&quot;&quot;;['file:///G:/Other%20computers/My%20Laptop/Hobby/mmtr/PCBs/LCMTR_01_01/LCMTR_01_01.csv'#$LCMTR_01_01.C55])">
            <text:p/>
          </table:table-cell>
          <table:table-cell table:formula="of:=IF(['file:///G:/Other%20computers/My%20Laptop/Hobby/mmtr/PCBs/LCMTR_01_01/LCMTR_01_01.csv'#$LCMTR_01_01.D55] = &quot;&quot;;&quot;&quot;;['file:///G:/Other%20computers/My%20Laptop/Hobby/mmtr/PCBs/LCMTR_01_01/LCMTR_01_01.csv'#$LCMTR_01_01.D55])">
            <text:p/>
          </table:table-cell>
          <table:table-cell table:formula="of:=IF(['file:///G:/Other%20computers/My%20Laptop/Hobby/mmtr/PCBs/LCMTR_01_01/LCMTR_01_01.csv'#$LCMTR_01_01.E55] = &quot;&quot;;&quot;&quot;;['file:///G:/Other%20computers/My%20Laptop/Hobby/mmtr/PCBs/LCMTR_01_01/LCMTR_01_01.csv'#$LCMTR_01_01.E55])">
            <text:p/>
          </table:table-cell>
          <table:table-cell table:formula="of:=IF(['file:///G:/Other%20computers/My%20Laptop/Hobby/mmtr/PCBs/LCMTR_01_01/LCMTR_01_01.csv'#$LCMTR_01_01.F55] = &quot;&quot;;&quot;&quot;;['file:///G:/Other%20computers/My%20Laptop/Hobby/mmtr/PCBs/LCMTR_01_01/LCMTR_01_01.csv'#$LCMTR_01_01.F55])">
            <text:p/>
          </table:table-cell>
          <table:table-cell table:style-name="Default" table:formula="of:=IF(['file:///G:/Other%20computers/My%20Laptop/Hobby/mmtr/PCBs/LCMTR_01_01/LCMTR_01_01.csv'#$LCMTR_01_01.G55] = &quot;&quot;;&quot;&quot;;['file:///G:/Other%20computers/My%20Laptop/Hobby/mmtr/PCBs/LCMTR_01_01/LCMTR_01_01.csv'#$LCMTR_01_01.G55])">
            <text:p/>
          </table:table-cell>
          <table:table-cell table:formula="of:=IF(['file:///G:/Other%20computers/My%20Laptop/Hobby/mmtr/PCBs/LCMTR_01_01/LCMTR_01_01.csv'#$LCMTR_01_01.H55] = &quot;&quot;;&quot;&quot;;['file:///G:/Other%20computers/My%20Laptop/Hobby/mmtr/PCBs/LCMTR_01_01/LCMTR_01_01.csv'#$LCMTR_01_01.H55])">
            <text:p/>
          </table:table-cell>
          <table:table-cell table:formula="of:=IF(['file:///G:/Other%20computers/My%20Laptop/Hobby/mmtr/PCBs/LCMTR_01_01/LCMTR_01_01.csv'#$LCMTR_01_01.I55] = &quot;&quot;;&quot;&quot;;['file:///G:/Other%20computers/My%20Laptop/Hobby/mmtr/PCBs/LCMTR_01_01/LCMTR_01_01.csv'#$LCMTR_01_01.I55])">
            <text:p/>
          </table:table-cell>
          <table:table-cell table:style-name="Default" table:formula="of:=IF(['file:///G:/Other%20computers/My%20Laptop/Hobby/mmtr/PCBs/LCMTR_01_01/LCMTR_01_01.csv'#$LCMTR_01_01.J55] = &quot;&quot;;&quot;&quot;;['file:///G:/Other%20computers/My%20Laptop/Hobby/mmtr/PCBs/LCMTR_01_01/LCMTR_01_01.csv'#$LCMTR_01_01.J55])">
            <text:p/>
          </table:table-cell>
          <table:table-cell table:formula="of:=IF(['file:///G:/Other%20computers/My%20Laptop/Hobby/mmtr/PCBs/LCMTR_01_01/LCMTR_01_01.csv'#$LCMTR_01_01.K55] = &quot;&quot;;&quot;&quot;;['file:///G:/Other%20computers/My%20Laptop/Hobby/mmtr/PCBs/LCMTR_01_01/LCMTR_01_01.csv'#$LCMTR_01_01.K55])">
            <text:p/>
          </table:table-cell>
          <table:table-cell table:formula="of:=IF(['file:///G:/Other%20computers/My%20Laptop/Hobby/mmtr/PCBs/LCMTR_01_01/LCMTR_01_01.csv'#$LCMTR_01_01.L55] = &quot;&quot;;&quot;&quot;;['file:///G:/Other%20computers/My%20Laptop/Hobby/mmtr/PCBs/LCMTR_01_01/LCMTR_01_01.csv'#$LCMTR_01_01.L55])">
            <text:p/>
          </table:table-cell>
          <table:table-cell table:formula="of:=IF(['file:///G:/Other%20computers/My%20Laptop/Hobby/mmtr/PCBs/LCMTR_01_01/LCMTR_01_01.csv'#$LCMTR_01_01.M55] = &quot;&quot;;&quot;&quot;;['file:///G:/Other%20computers/My%20Laptop/Hobby/mmtr/PCBs/LCMTR_01_01/LCMTR_01_01.csv'#$LCMTR_01_01.M55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6] = &quot;&quot;;&quot;&quot;;['file:///G:/Other%20computers/My%20Laptop/Hobby/mmtr/PCBs/LCMTR_01_01/LCMTR_01_01.csv'#$LCMTR_01_01.A56])">
            <text:p/>
          </table:table-cell>
          <table:table-cell table:formula="of:=IF(['file:///G:/Other%20computers/My%20Laptop/Hobby/mmtr/PCBs/LCMTR_01_01/LCMTR_01_01.csv'#$LCMTR_01_01.B56] = &quot;&quot;;&quot;&quot;;['file:///G:/Other%20computers/My%20Laptop/Hobby/mmtr/PCBs/LCMTR_01_01/LCMTR_01_01.csv'#$LCMTR_01_01.B56])">
            <text:p/>
          </table:table-cell>
          <table:table-cell table:formula="of:=IF(['file:///G:/Other%20computers/My%20Laptop/Hobby/mmtr/PCBs/LCMTR_01_01/LCMTR_01_01.csv'#$LCMTR_01_01.C56] = &quot;&quot;;&quot;&quot;;['file:///G:/Other%20computers/My%20Laptop/Hobby/mmtr/PCBs/LCMTR_01_01/LCMTR_01_01.csv'#$LCMTR_01_01.C56])">
            <text:p/>
          </table:table-cell>
          <table:table-cell table:formula="of:=IF(['file:///G:/Other%20computers/My%20Laptop/Hobby/mmtr/PCBs/LCMTR_01_01/LCMTR_01_01.csv'#$LCMTR_01_01.D56] = &quot;&quot;;&quot;&quot;;['file:///G:/Other%20computers/My%20Laptop/Hobby/mmtr/PCBs/LCMTR_01_01/LCMTR_01_01.csv'#$LCMTR_01_01.D56])">
            <text:p/>
          </table:table-cell>
          <table:table-cell table:formula="of:=IF(['file:///G:/Other%20computers/My%20Laptop/Hobby/mmtr/PCBs/LCMTR_01_01/LCMTR_01_01.csv'#$LCMTR_01_01.E56] = &quot;&quot;;&quot;&quot;;['file:///G:/Other%20computers/My%20Laptop/Hobby/mmtr/PCBs/LCMTR_01_01/LCMTR_01_01.csv'#$LCMTR_01_01.E56])">
            <text:p/>
          </table:table-cell>
          <table:table-cell table:formula="of:=IF(['file:///G:/Other%20computers/My%20Laptop/Hobby/mmtr/PCBs/LCMTR_01_01/LCMTR_01_01.csv'#$LCMTR_01_01.F56] = &quot;&quot;;&quot;&quot;;['file:///G:/Other%20computers/My%20Laptop/Hobby/mmtr/PCBs/LCMTR_01_01/LCMTR_01_01.csv'#$LCMTR_01_01.F56])">
            <text:p/>
          </table:table-cell>
          <table:table-cell table:style-name="Default" table:formula="of:=IF(['file:///G:/Other%20computers/My%20Laptop/Hobby/mmtr/PCBs/LCMTR_01_01/LCMTR_01_01.csv'#$LCMTR_01_01.G56] = &quot;&quot;;&quot;&quot;;['file:///G:/Other%20computers/My%20Laptop/Hobby/mmtr/PCBs/LCMTR_01_01/LCMTR_01_01.csv'#$LCMTR_01_01.G56])">
            <text:p/>
          </table:table-cell>
          <table:table-cell table:formula="of:=IF(['file:///G:/Other%20computers/My%20Laptop/Hobby/mmtr/PCBs/LCMTR_01_01/LCMTR_01_01.csv'#$LCMTR_01_01.H56] = &quot;&quot;;&quot;&quot;;['file:///G:/Other%20computers/My%20Laptop/Hobby/mmtr/PCBs/LCMTR_01_01/LCMTR_01_01.csv'#$LCMTR_01_01.H56])">
            <text:p/>
          </table:table-cell>
          <table:table-cell table:formula="of:=IF(['file:///G:/Other%20computers/My%20Laptop/Hobby/mmtr/PCBs/LCMTR_01_01/LCMTR_01_01.csv'#$LCMTR_01_01.I56] = &quot;&quot;;&quot;&quot;;['file:///G:/Other%20computers/My%20Laptop/Hobby/mmtr/PCBs/LCMTR_01_01/LCMTR_01_01.csv'#$LCMTR_01_01.I56])">
            <text:p/>
          </table:table-cell>
          <table:table-cell table:style-name="Default" table:formula="of:=IF(['file:///G:/Other%20computers/My%20Laptop/Hobby/mmtr/PCBs/LCMTR_01_01/LCMTR_01_01.csv'#$LCMTR_01_01.J56] = &quot;&quot;;&quot;&quot;;['file:///G:/Other%20computers/My%20Laptop/Hobby/mmtr/PCBs/LCMTR_01_01/LCMTR_01_01.csv'#$LCMTR_01_01.J56])">
            <text:p/>
          </table:table-cell>
          <table:table-cell table:formula="of:=IF(['file:///G:/Other%20computers/My%20Laptop/Hobby/mmtr/PCBs/LCMTR_01_01/LCMTR_01_01.csv'#$LCMTR_01_01.K56] = &quot;&quot;;&quot;&quot;;['file:///G:/Other%20computers/My%20Laptop/Hobby/mmtr/PCBs/LCMTR_01_01/LCMTR_01_01.csv'#$LCMTR_01_01.K56])">
            <text:p/>
          </table:table-cell>
          <table:table-cell table:formula="of:=IF(['file:///G:/Other%20computers/My%20Laptop/Hobby/mmtr/PCBs/LCMTR_01_01/LCMTR_01_01.csv'#$LCMTR_01_01.L56] = &quot;&quot;;&quot;&quot;;['file:///G:/Other%20computers/My%20Laptop/Hobby/mmtr/PCBs/LCMTR_01_01/LCMTR_01_01.csv'#$LCMTR_01_01.L56])">
            <text:p/>
          </table:table-cell>
          <table:table-cell table:formula="of:=IF(['file:///G:/Other%20computers/My%20Laptop/Hobby/mmtr/PCBs/LCMTR_01_01/LCMTR_01_01.csv'#$LCMTR_01_01.M56] = &quot;&quot;;&quot;&quot;;['file:///G:/Other%20computers/My%20Laptop/Hobby/mmtr/PCBs/LCMTR_01_01/LCMTR_01_01.csv'#$LCMTR_01_01.M56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7] = &quot;&quot;;&quot;&quot;;['file:///G:/Other%20computers/My%20Laptop/Hobby/mmtr/PCBs/LCMTR_01_01/LCMTR_01_01.csv'#$LCMTR_01_01.A57])">
            <text:p/>
          </table:table-cell>
          <table:table-cell table:formula="of:=IF(['file:///G:/Other%20computers/My%20Laptop/Hobby/mmtr/PCBs/LCMTR_01_01/LCMTR_01_01.csv'#$LCMTR_01_01.B57] = &quot;&quot;;&quot;&quot;;['file:///G:/Other%20computers/My%20Laptop/Hobby/mmtr/PCBs/LCMTR_01_01/LCMTR_01_01.csv'#$LCMTR_01_01.B57])">
            <text:p/>
          </table:table-cell>
          <table:table-cell table:formula="of:=IF(['file:///G:/Other%20computers/My%20Laptop/Hobby/mmtr/PCBs/LCMTR_01_01/LCMTR_01_01.csv'#$LCMTR_01_01.C57] = &quot;&quot;;&quot;&quot;;['file:///G:/Other%20computers/My%20Laptop/Hobby/mmtr/PCBs/LCMTR_01_01/LCMTR_01_01.csv'#$LCMTR_01_01.C57])">
            <text:p/>
          </table:table-cell>
          <table:table-cell table:formula="of:=IF(['file:///G:/Other%20computers/My%20Laptop/Hobby/mmtr/PCBs/LCMTR_01_01/LCMTR_01_01.csv'#$LCMTR_01_01.D57] = &quot;&quot;;&quot;&quot;;['file:///G:/Other%20computers/My%20Laptop/Hobby/mmtr/PCBs/LCMTR_01_01/LCMTR_01_01.csv'#$LCMTR_01_01.D57])">
            <text:p/>
          </table:table-cell>
          <table:table-cell table:formula="of:=IF(['file:///G:/Other%20computers/My%20Laptop/Hobby/mmtr/PCBs/LCMTR_01_01/LCMTR_01_01.csv'#$LCMTR_01_01.E57] = &quot;&quot;;&quot;&quot;;['file:///G:/Other%20computers/My%20Laptop/Hobby/mmtr/PCBs/LCMTR_01_01/LCMTR_01_01.csv'#$LCMTR_01_01.E57])">
            <text:p/>
          </table:table-cell>
          <table:table-cell table:formula="of:=IF(['file:///G:/Other%20computers/My%20Laptop/Hobby/mmtr/PCBs/LCMTR_01_01/LCMTR_01_01.csv'#$LCMTR_01_01.F57] = &quot;&quot;;&quot;&quot;;['file:///G:/Other%20computers/My%20Laptop/Hobby/mmtr/PCBs/LCMTR_01_01/LCMTR_01_01.csv'#$LCMTR_01_01.F57])">
            <text:p/>
          </table:table-cell>
          <table:table-cell table:style-name="Default" table:formula="of:=IF(['file:///G:/Other%20computers/My%20Laptop/Hobby/mmtr/PCBs/LCMTR_01_01/LCMTR_01_01.csv'#$LCMTR_01_01.G57] = &quot;&quot;;&quot;&quot;;['file:///G:/Other%20computers/My%20Laptop/Hobby/mmtr/PCBs/LCMTR_01_01/LCMTR_01_01.csv'#$LCMTR_01_01.G57])">
            <text:p/>
          </table:table-cell>
          <table:table-cell table:formula="of:=IF(['file:///G:/Other%20computers/My%20Laptop/Hobby/mmtr/PCBs/LCMTR_01_01/LCMTR_01_01.csv'#$LCMTR_01_01.H57] = &quot;&quot;;&quot;&quot;;['file:///G:/Other%20computers/My%20Laptop/Hobby/mmtr/PCBs/LCMTR_01_01/LCMTR_01_01.csv'#$LCMTR_01_01.H57])">
            <text:p/>
          </table:table-cell>
          <table:table-cell table:formula="of:=IF(['file:///G:/Other%20computers/My%20Laptop/Hobby/mmtr/PCBs/LCMTR_01_01/LCMTR_01_01.csv'#$LCMTR_01_01.I57] = &quot;&quot;;&quot;&quot;;['file:///G:/Other%20computers/My%20Laptop/Hobby/mmtr/PCBs/LCMTR_01_01/LCMTR_01_01.csv'#$LCMTR_01_01.I57])">
            <text:p/>
          </table:table-cell>
          <table:table-cell table:style-name="Default" table:formula="of:=IF(['file:///G:/Other%20computers/My%20Laptop/Hobby/mmtr/PCBs/LCMTR_01_01/LCMTR_01_01.csv'#$LCMTR_01_01.J57] = &quot;&quot;;&quot;&quot;;['file:///G:/Other%20computers/My%20Laptop/Hobby/mmtr/PCBs/LCMTR_01_01/LCMTR_01_01.csv'#$LCMTR_01_01.J57])">
            <text:p/>
          </table:table-cell>
          <table:table-cell table:formula="of:=IF(['file:///G:/Other%20computers/My%20Laptop/Hobby/mmtr/PCBs/LCMTR_01_01/LCMTR_01_01.csv'#$LCMTR_01_01.K57] = &quot;&quot;;&quot;&quot;;['file:///G:/Other%20computers/My%20Laptop/Hobby/mmtr/PCBs/LCMTR_01_01/LCMTR_01_01.csv'#$LCMTR_01_01.K57])">
            <text:p/>
          </table:table-cell>
          <table:table-cell table:formula="of:=IF(['file:///G:/Other%20computers/My%20Laptop/Hobby/mmtr/PCBs/LCMTR_01_01/LCMTR_01_01.csv'#$LCMTR_01_01.L57] = &quot;&quot;;&quot;&quot;;['file:///G:/Other%20computers/My%20Laptop/Hobby/mmtr/PCBs/LCMTR_01_01/LCMTR_01_01.csv'#$LCMTR_01_01.L57])">
            <text:p/>
          </table:table-cell>
          <table:table-cell table:formula="of:=IF(['file:///G:/Other%20computers/My%20Laptop/Hobby/mmtr/PCBs/LCMTR_01_01/LCMTR_01_01.csv'#$LCMTR_01_01.M57] = &quot;&quot;;&quot;&quot;;['file:///G:/Other%20computers/My%20Laptop/Hobby/mmtr/PCBs/LCMTR_01_01/LCMTR_01_01.csv'#$LCMTR_01_01.M57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8] = &quot;&quot;;&quot;&quot;;['file:///G:/Other%20computers/My%20Laptop/Hobby/mmtr/PCBs/LCMTR_01_01/LCMTR_01_01.csv'#$LCMTR_01_01.A58])">
            <text:p/>
          </table:table-cell>
          <table:table-cell table:formula="of:=IF(['file:///G:/Other%20computers/My%20Laptop/Hobby/mmtr/PCBs/LCMTR_01_01/LCMTR_01_01.csv'#$LCMTR_01_01.B58] = &quot;&quot;;&quot;&quot;;['file:///G:/Other%20computers/My%20Laptop/Hobby/mmtr/PCBs/LCMTR_01_01/LCMTR_01_01.csv'#$LCMTR_01_01.B58])">
            <text:p/>
          </table:table-cell>
          <table:table-cell table:formula="of:=IF(['file:///G:/Other%20computers/My%20Laptop/Hobby/mmtr/PCBs/LCMTR_01_01/LCMTR_01_01.csv'#$LCMTR_01_01.C58] = &quot;&quot;;&quot;&quot;;['file:///G:/Other%20computers/My%20Laptop/Hobby/mmtr/PCBs/LCMTR_01_01/LCMTR_01_01.csv'#$LCMTR_01_01.C58])">
            <text:p/>
          </table:table-cell>
          <table:table-cell table:formula="of:=IF(['file:///G:/Other%20computers/My%20Laptop/Hobby/mmtr/PCBs/LCMTR_01_01/LCMTR_01_01.csv'#$LCMTR_01_01.D58] = &quot;&quot;;&quot;&quot;;['file:///G:/Other%20computers/My%20Laptop/Hobby/mmtr/PCBs/LCMTR_01_01/LCMTR_01_01.csv'#$LCMTR_01_01.D58])">
            <text:p/>
          </table:table-cell>
          <table:table-cell table:formula="of:=IF(['file:///G:/Other%20computers/My%20Laptop/Hobby/mmtr/PCBs/LCMTR_01_01/LCMTR_01_01.csv'#$LCMTR_01_01.E58] = &quot;&quot;;&quot;&quot;;['file:///G:/Other%20computers/My%20Laptop/Hobby/mmtr/PCBs/LCMTR_01_01/LCMTR_01_01.csv'#$LCMTR_01_01.E58])">
            <text:p/>
          </table:table-cell>
          <table:table-cell table:formula="of:=IF(['file:///G:/Other%20computers/My%20Laptop/Hobby/mmtr/PCBs/LCMTR_01_01/LCMTR_01_01.csv'#$LCMTR_01_01.F58] = &quot;&quot;;&quot;&quot;;['file:///G:/Other%20computers/My%20Laptop/Hobby/mmtr/PCBs/LCMTR_01_01/LCMTR_01_01.csv'#$LCMTR_01_01.F58])">
            <text:p/>
          </table:table-cell>
          <table:table-cell table:style-name="Default" table:formula="of:=IF(['file:///G:/Other%20computers/My%20Laptop/Hobby/mmtr/PCBs/LCMTR_01_01/LCMTR_01_01.csv'#$LCMTR_01_01.G58] = &quot;&quot;;&quot;&quot;;['file:///G:/Other%20computers/My%20Laptop/Hobby/mmtr/PCBs/LCMTR_01_01/LCMTR_01_01.csv'#$LCMTR_01_01.G58])">
            <text:p/>
          </table:table-cell>
          <table:table-cell table:formula="of:=IF(['file:///G:/Other%20computers/My%20Laptop/Hobby/mmtr/PCBs/LCMTR_01_01/LCMTR_01_01.csv'#$LCMTR_01_01.H58] = &quot;&quot;;&quot;&quot;;['file:///G:/Other%20computers/My%20Laptop/Hobby/mmtr/PCBs/LCMTR_01_01/LCMTR_01_01.csv'#$LCMTR_01_01.H58])">
            <text:p/>
          </table:table-cell>
          <table:table-cell table:formula="of:=IF(['file:///G:/Other%20computers/My%20Laptop/Hobby/mmtr/PCBs/LCMTR_01_01/LCMTR_01_01.csv'#$LCMTR_01_01.I58] = &quot;&quot;;&quot;&quot;;['file:///G:/Other%20computers/My%20Laptop/Hobby/mmtr/PCBs/LCMTR_01_01/LCMTR_01_01.csv'#$LCMTR_01_01.I58])">
            <text:p/>
          </table:table-cell>
          <table:table-cell table:style-name="Default" table:formula="of:=IF(['file:///G:/Other%20computers/My%20Laptop/Hobby/mmtr/PCBs/LCMTR_01_01/LCMTR_01_01.csv'#$LCMTR_01_01.J58] = &quot;&quot;;&quot;&quot;;['file:///G:/Other%20computers/My%20Laptop/Hobby/mmtr/PCBs/LCMTR_01_01/LCMTR_01_01.csv'#$LCMTR_01_01.J58])">
            <text:p/>
          </table:table-cell>
          <table:table-cell table:formula="of:=IF(['file:///G:/Other%20computers/My%20Laptop/Hobby/mmtr/PCBs/LCMTR_01_01/LCMTR_01_01.csv'#$LCMTR_01_01.K58] = &quot;&quot;;&quot;&quot;;['file:///G:/Other%20computers/My%20Laptop/Hobby/mmtr/PCBs/LCMTR_01_01/LCMTR_01_01.csv'#$LCMTR_01_01.K58])">
            <text:p/>
          </table:table-cell>
          <table:table-cell table:formula="of:=IF(['file:///G:/Other%20computers/My%20Laptop/Hobby/mmtr/PCBs/LCMTR_01_01/LCMTR_01_01.csv'#$LCMTR_01_01.L58] = &quot;&quot;;&quot;&quot;;['file:///G:/Other%20computers/My%20Laptop/Hobby/mmtr/PCBs/LCMTR_01_01/LCMTR_01_01.csv'#$LCMTR_01_01.L58])">
            <text:p/>
          </table:table-cell>
          <table:table-cell table:formula="of:=IF(['file:///G:/Other%20computers/My%20Laptop/Hobby/mmtr/PCBs/LCMTR_01_01/LCMTR_01_01.csv'#$LCMTR_01_01.M58] = &quot;&quot;;&quot;&quot;;['file:///G:/Other%20computers/My%20Laptop/Hobby/mmtr/PCBs/LCMTR_01_01/LCMTR_01_01.csv'#$LCMTR_01_01.M58])">
            <text:p/>
          </table:table-cell>
        </table:table-row>
        <table:table-row table:style-name="ro1">
          <table:table-cell table:formula="of:=IF(['file:///G:/Other%20computers/My%20Laptop/Hobby/mmtr/PCBs/LCMTR_01_01/LCMTR_01_01.csv'#$LCMTR_01_01.A59] = &quot;&quot;;&quot;&quot;;['file:///G:/Other%20computers/My%20Laptop/Hobby/mmtr/PCBs/LCMTR_01_01/LCMTR_01_01.csv'#$LCMTR_01_01.A59])">
            <text:p/>
          </table:table-cell>
          <table:table-cell table:formula="of:=IF(['file:///G:/Other%20computers/My%20Laptop/Hobby/mmtr/PCBs/LCMTR_01_01/LCMTR_01_01.csv'#$LCMTR_01_01.B59] = &quot;&quot;;&quot;&quot;;['file:///G:/Other%20computers/My%20Laptop/Hobby/mmtr/PCBs/LCMTR_01_01/LCMTR_01_01.csv'#$LCMTR_01_01.B59])">
            <text:p/>
          </table:table-cell>
          <table:table-cell table:formula="of:=IF(['file:///G:/Other%20computers/My%20Laptop/Hobby/mmtr/PCBs/LCMTR_01_01/LCMTR_01_01.csv'#$LCMTR_01_01.C59] = &quot;&quot;;&quot;&quot;;['file:///G:/Other%20computers/My%20Laptop/Hobby/mmtr/PCBs/LCMTR_01_01/LCMTR_01_01.csv'#$LCMTR_01_01.C59])">
            <text:p/>
          </table:table-cell>
          <table:table-cell table:formula="of:=IF(['file:///G:/Other%20computers/My%20Laptop/Hobby/mmtr/PCBs/LCMTR_01_01/LCMTR_01_01.csv'#$LCMTR_01_01.D59] = &quot;&quot;;&quot;&quot;;['file:///G:/Other%20computers/My%20Laptop/Hobby/mmtr/PCBs/LCMTR_01_01/LCMTR_01_01.csv'#$LCMTR_01_01.D59])">
            <text:p/>
          </table:table-cell>
          <table:table-cell table:formula="of:=IF(['file:///G:/Other%20computers/My%20Laptop/Hobby/mmtr/PCBs/LCMTR_01_01/LCMTR_01_01.csv'#$LCMTR_01_01.E59] = &quot;&quot;;&quot;&quot;;['file:///G:/Other%20computers/My%20Laptop/Hobby/mmtr/PCBs/LCMTR_01_01/LCMTR_01_01.csv'#$LCMTR_01_01.E59])">
            <text:p/>
          </table:table-cell>
          <table:table-cell table:formula="of:=IF(['file:///G:/Other%20computers/My%20Laptop/Hobby/mmtr/PCBs/LCMTR_01_01/LCMTR_01_01.csv'#$LCMTR_01_01.F59] = &quot;&quot;;&quot;&quot;;['file:///G:/Other%20computers/My%20Laptop/Hobby/mmtr/PCBs/LCMTR_01_01/LCMTR_01_01.csv'#$LCMTR_01_01.F59])">
            <text:p/>
          </table:table-cell>
          <table:table-cell table:style-name="Default" table:formula="of:=IF(['file:///G:/Other%20computers/My%20Laptop/Hobby/mmtr/PCBs/LCMTR_01_01/LCMTR_01_01.csv'#$LCMTR_01_01.G59] = &quot;&quot;;&quot;&quot;;['file:///G:/Other%20computers/My%20Laptop/Hobby/mmtr/PCBs/LCMTR_01_01/LCMTR_01_01.csv'#$LCMTR_01_01.G59])">
            <text:p/>
          </table:table-cell>
          <table:table-cell table:formula="of:=IF(['file:///G:/Other%20computers/My%20Laptop/Hobby/mmtr/PCBs/LCMTR_01_01/LCMTR_01_01.csv'#$LCMTR_01_01.H59] = &quot;&quot;;&quot;&quot;;['file:///G:/Other%20computers/My%20Laptop/Hobby/mmtr/PCBs/LCMTR_01_01/LCMTR_01_01.csv'#$LCMTR_01_01.H59])">
            <text:p/>
          </table:table-cell>
          <table:table-cell table:formula="of:=IF(['file:///G:/Other%20computers/My%20Laptop/Hobby/mmtr/PCBs/LCMTR_01_01/LCMTR_01_01.csv'#$LCMTR_01_01.I59] = &quot;&quot;;&quot;&quot;;['file:///G:/Other%20computers/My%20Laptop/Hobby/mmtr/PCBs/LCMTR_01_01/LCMTR_01_01.csv'#$LCMTR_01_01.I59])">
            <text:p/>
          </table:table-cell>
          <table:table-cell table:style-name="Default" table:formula="of:=IF(['file:///G:/Other%20computers/My%20Laptop/Hobby/mmtr/PCBs/LCMTR_01_01/LCMTR_01_01.csv'#$LCMTR_01_01.J59] = &quot;&quot;;&quot;&quot;;['file:///G:/Other%20computers/My%20Laptop/Hobby/mmtr/PCBs/LCMTR_01_01/LCMTR_01_01.csv'#$LCMTR_01_01.J59])">
            <text:p/>
          </table:table-cell>
          <table:table-cell table:formula="of:=IF(['file:///G:/Other%20computers/My%20Laptop/Hobby/mmtr/PCBs/LCMTR_01_01/LCMTR_01_01.csv'#$LCMTR_01_01.K59] = &quot;&quot;;&quot;&quot;;['file:///G:/Other%20computers/My%20Laptop/Hobby/mmtr/PCBs/LCMTR_01_01/LCMTR_01_01.csv'#$LCMTR_01_01.K59])">
            <text:p/>
          </table:table-cell>
          <table:table-cell table:formula="of:=IF(['file:///G:/Other%20computers/My%20Laptop/Hobby/mmtr/PCBs/LCMTR_01_01/LCMTR_01_01.csv'#$LCMTR_01_01.L59] = &quot;&quot;;&quot;&quot;;['file:///G:/Other%20computers/My%20Laptop/Hobby/mmtr/PCBs/LCMTR_01_01/LCMTR_01_01.csv'#$LCMTR_01_01.L59])">
            <text:p/>
          </table:table-cell>
          <table:table-cell table:formula="of:=IF(['file:///G:/Other%20computers/My%20Laptop/Hobby/mmtr/PCBs/LCMTR_01_01/LCMTR_01_01.csv'#$LCMTR_01_01.M59] = &quot;&quot;;&quot;&quot;;['file:///G:/Other%20computers/My%20Laptop/Hobby/mmtr/PCBs/LCMTR_01_01/LCMTR_01_01.csv'#$LCMTR_01_01.M59])">
            <text:p/>
          </table:table-cell>
        </table:table-row>
      </table:table>
      <table:table table:name="Supplier_Lookup" table:style-name="ta1">
        <table:table-column table:style-name="co1" table:number-columns-repeated="2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R/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put part #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Part # (supplier)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/ea</text:p>
          </table:table-cell>
          <table:table-cell office:value-type="string" calcext:value-type="string">
            <text:p>Override Part #/Value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(R/C)+Part+Value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1N4007FL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1N4007F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3190</text:p>
          </table:table-cell>
          <table:table-cell office:value-type="string" calcext:value-type="string">
            <text:p><text:a xlink:href="https://www.lcsc.com/product-detail/C493190.html" xlink:type="simple">https://www.lcsc.com/product-detail/C493190.html</text:a></text:p>
          </table:table-cell>
          <table:table-cell office:value-type="float" office:value="0.0217" calcext:value-type="float">
            <text:p>0.0217</text:p>
          </table:table-cell>
          <table:table-cell table:number-columns-repeated="3"/>
          <table:table-cell table:style-name="ce5" table:formula="of:=[.B7]&amp;[.C7]&amp;&quot;__&quot;&amp;[.D7]&amp;&quot;__&quot;&amp;[.E7]" office:value-type="string" office:string-value="__1N4007FL__1N4007FL" calcext:value-type="string">
            <text:p>__1N4007FL__1N4007FL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ThisTH?</text:p>
          </table:table-cell>
          <table:table-cell office:value-type="string" calcext:value-type="string">
            <text:p>1N4007FL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N4007-E3/5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643</text:p>
          </table:table-cell>
          <table:table-cell office:value-type="string" calcext:value-type="string">
            <text:p><text:a xlink:href="https://www.lcsc.com/product-detail/C84643.html" xlink:type="simple">https://www.lcsc.com/product-detail/C84643.html</text:a></text:p>
          </table:table-cell>
          <table:table-cell office:value-type="float" office:value="0.0703" calcext:value-type="float">
            <text:p>0.0703</text:p>
          </table:table-cell>
          <table:table-cell table:number-columns-repeated="3"/>
          <table:table-cell table:style-name="ce6" table:formula="of:=[.B8]&amp;[.C8]&amp;&quot;__&quot;&amp;[.D8]&amp;&quot;__&quot;&amp;[.E8]" office:value-type="string" office:string-value="__IsThisTH?__1N4007FL" calcext:value-type="string">
            <text:p>__IsThisTH?__1N4007FL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SZ5231B-7-F</text:p>
          </table:table-cell>
          <table:table-cell office:value-type="string" calcext:value-type="string">
            <text:p>6.1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91-E3-0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4691-E3-08GICT-ND</text:p>
          </table:table-cell>
          <table:table-cell office:value-type="string" calcext:value-type="string">
            <text:p><text:a xlink:href="https://www.digikey.com/en/products/detail/vishay-general-semiconductor-diodes-division/MMSZ4691-E3-08/4832264" xlink:type="simple">https://www.digikey.com/en/products/detail/vishay-general-semiconductor-diodes-division/MMSZ4691-E3-08/4832264</text:a>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style-name="ce6" table:formula="of:=[.B9]&amp;[.C9]&amp;&quot;__&quot;&amp;[.D9]&amp;&quot;__&quot;&amp;[.E9]" office:value-type="string" office:string-value="__MMSZ5231B-7-F__6.1V" calcext:value-type="string">
            <text:p>__MMSZ5231B-7-F__6.1V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SZ5231B-7-F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MMSZ5232B-7-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6265</text:p>
          </table:table-cell>
          <table:table-cell office:value-type="string" calcext:value-type="string">
            <text:p><text:a xlink:href="https://www.lcsc.com/product-detail/C156265.html" xlink:type="simple">https://www.lcsc.com/product-detail/C156265.html</text:a></text:p>
          </table:table-cell>
          <table:table-cell office:value-type="float" office:value="0.0475" calcext:value-type="float">
            <text:p>0.0475</text:p>
          </table:table-cell>
          <table:table-cell table:number-columns-repeated="3"/>
          <table:table-cell table:style-name="ce6" table:formula="of:=[.B10]&amp;[.C10]&amp;&quot;__&quot;&amp;[.D10]&amp;&quot;__&quot;&amp;[.E10]" office:value-type="string" office:string-value="__MMSZ5231B-7-F__5.6V" calcext:value-type="string">
            <text:p>__MMSZ5231B-7-F__5.6V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P2040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<text:a xlink:href="https://www.lcsc.com/product-detail/C2040.html" xlink:type="simple">https://www.lcsc.com/product-detail/C2040.html</text:a></text:p>
          </table:table-cell>
          <table:table-cell office:value-type="float" office:value="0.87" calcext:value-type="float">
            <text:p>0.87</text:p>
          </table:table-cell>
          <table:table-cell table:number-columns-repeated="3"/>
          <table:table-cell table:style-name="ce6" table:formula="of:=[.B11]&amp;[.C11]&amp;&quot;__&quot;&amp;[.D11]&amp;&quot;__&quot;&amp;[.E11]" office:value-type="string" office:string-value="____RP2040" calcext:value-type="string">
            <text:p>____RP204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25Q16JVSS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16JVS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2317</text:p>
          </table:table-cell>
          <table:table-cell office:value-type="string" calcext:value-type="string">
            <text:p><text:a xlink:href="https://www.lcsc.com/product-detail/C82317.html" xlink:type="simple">https://www.lcsc.com/product-detail/C82317.html</text:a>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style-name="ce6" table:formula="of:=[.B12]&amp;[.C12]&amp;&quot;__&quot;&amp;[.D12]&amp;&quot;__&quot;&amp;[.E12]" office:value-type="string" office:string-value="____W25Q16JVSS" calcext:value-type="string">
            <text:p>____W25Q16JVSS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KB8NQ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99872</text:p>
          </table:table-cell>
          <table:table-cell office:value-type="string" calcext:value-type="string">
            <text:p><text:a xlink:href="https://www.lcsc.com/product-detail/C5199872.html&amp;spm=wm.fly.bg.9.xh___wm.fly.tp.4.ml" xlink:type="simple">https://www.lcsc.com/product-detail/C5199872.html&amp;spm=wm.fly.bg.9.xh___wm.fly.tp.4.ml</text:a></text:p>
          </table:table-cell>
          <table:table-cell office:value-type="float" office:value="0.0082" calcext:value-type="float">
            <text:p>0.0082</text:p>
          </table:table-cell>
          <table:table-cell table:number-columns-repeated="3"/>
          <table:table-cell table:style-name="ce6" table:formula="of:=[.B13]&amp;[.C13]&amp;&quot;__&quot;&amp;[.D13]&amp;&quot;__&quot;&amp;[.E13]" office:value-type="string" office:string-value="C0603____1u" calcext:value-type="string">
            <text:p>C0603____1u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J20-C-H-G-SMT-1-P16-TR</text:p>
          </table:table-cell>
          <table:table-cell/>
          <table:table-cell office:value-type="string" calcext:value-type="string">
            <text:p>CUI</text:p>
          </table:table-cell>
          <table:table-cell office:value-type="string" calcext:value-type="string">
            <text:p>UJ20-C-H-G-SMT-1-P16-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082766</text:p>
          </table:table-cell>
          <table:table-cell office:value-type="string" calcext:value-type="string">
            <text:p>https://www.lcsc.com/product-detail/C45082766.html</text:p>
          </table:table-cell>
          <table:table-cell office:value-type="float" office:value="0.751" calcext:value-type="float">
            <text:p>0.751</text:p>
          </table:table-cell>
          <table:table-cell table:number-columns-repeated="3"/>
          <table:table-cell table:style-name="ce6" table:formula="of:=[.B14]&amp;[.C14]&amp;&quot;__&quot;&amp;[.D14]&amp;&quot;__&quot;&amp;[.E14]" office:value-type="string" office:string-value="__UJ20-C-H-G-SMT-1-P16-TR__" calcext:value-type="string">
            <text:p>__UJ20-C-H-G-SMT-1-P16-TR__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2376S-13</text:p>
          </table:table-cell>
          <table:table-cell office:value-type="string" calcext:value-type="string">
            <text:p>0.2pA 5uV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S2376QS-1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948478</text:p>
          </table:table-cell>
          <table:table-cell office:value-type="string" calcext:value-type="string">
            <text:p><text:a xlink:href="https://www.lcsc.com/product-detail/C19948478.html" xlink:type="simple">https://www.lcsc.com/product-detail/C19948478.html</text:a>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table:style-name="ce6" table:formula="of:=[.B15]&amp;[.C15]&amp;&quot;__&quot;&amp;[.D15]&amp;&quot;__&quot;&amp;[.E15]" office:value-type="string" office:string-value="__AS2376S-13__0.2pA 5uV" calcext:value-type="string">
            <text:p>__AS2376S-13__0.2pA 5uV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BT3904-TP</text:p>
          </table:table-cell>
          <table:table-cell/>
          <table:table-cell office:value-type="string" calcext:value-type="string">
            <text:p>onsemi</text:p>
          </table:table-cell>
          <table:table-cell office:value-type="string" calcext:value-type="string">
            <text:p>MMBT3904LT1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1464</text:p>
          </table:table-cell>
          <table:table-cell office:value-type="string" calcext:value-type="string">
            <text:p><text:a xlink:href="https://www.lcsc.com/product-detail/C81464.html" xlink:type="simple">https://www.lcsc.com/product-detail/C81464.html</text:a></text:p>
          </table:table-cell>
          <table:table-cell office:value-type="float" office:value="0.0141" calcext:value-type="float">
            <text:p>0.0141</text:p>
          </table:table-cell>
          <table:table-cell table:number-columns-repeated="3"/>
          <table:table-cell table:style-name="ce6" table:formula="of:=[.B16]&amp;[.C16]&amp;&quot;__&quot;&amp;[.D16]&amp;&quot;__&quot;&amp;[.E16]" office:value-type="string" office:string-value="__MMBT3904-TP__" calcext:value-type="string">
            <text:p>__MMBT3904-TP__</text:p>
          </table:table-cell>
          <table:table-cell table:style-name="ce9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MN65D8L-7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550</text:p>
          </table:table-cell>
          <table:table-cell office:value-type="string" calcext:value-type="string">
            <text:p><text:a xlink:href="https://www.lcsc.com/product-detail/C53550.html" xlink:type="simple">https://www.lcsc.com/product-detail/C53550.html</text:a></text:p>
          </table:table-cell>
          <table:table-cell office:value-type="float" office:value="0.1652" calcext:value-type="float">
            <text:p>0.1652</text:p>
          </table:table-cell>
          <table:table-cell table:number-columns-repeated="3"/>
          <table:table-cell table:style-name="ce6" table:formula="of:=[.B17]&amp;[.C17]&amp;&quot;__&quot;&amp;[.D17]&amp;&quot;__&quot;&amp;[.E17]" office:value-type="string" office:string-value="__DMN65D8L-7__" calcext:value-type="string">
            <text:p>__DMN65D8L-7__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FTP84</text:p>
          </table:table-cell>
          <table:table-cell/>
          <table:table-cell office:value-type="string" calcext:value-type="string">
            <text:p>Diotec</text:p>
          </table:table-cell>
          <table:table-cell office:value-type="string" calcext:value-type="string">
            <text:p>MMFTP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78-MMFTP84CT-ND</text:p>
          </table:table-cell>
          <table:table-cell office:value-type="string" calcext:value-type="string">
            <text:p><text:a xlink:href="https://www.digikey.com/en/products/detail/diotec-semiconductor/MMFTP84/13154778" xlink:type="simple">https://www.digikey.com/en/products/detail/diotec-semiconductor/MMFTP84/13154778</text:a></text:p>
          </table:table-cell>
          <table:table-cell office:value-type="float" office:value="0.0831" calcext:value-type="float">
            <text:p>0.0831</text:p>
          </table:table-cell>
          <table:table-cell table:number-columns-repeated="3"/>
          <table:table-cell table:style-name="ce6" table:formula="of:=[.B18]&amp;[.C18]&amp;&quot;__&quot;&amp;[.D18]&amp;&quot;__&quot;&amp;[.E18]" office:value-type="string" office:string-value="__MMFTP84__" calcext:value-type="string">
            <text:p>__MMFTP84__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office:value-type="string" calcext:value-type="string">
            <text:p>BR3FB10L0</text:p>
          </table:table-cell>
          <table:table-cell office:value-type="string" calcext:value-type="string">
            <text:p>BR3FB10L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BR3FB10L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3FB10L0-ND</text:p>
          </table:table-cell>
          <table:table-cell office:value-type="string" calcext:value-type="string">
            <text:p><text:a xlink:href="https://www.digikey.com/en/products/detail/stackpole-electronics-inc/BR3FB10L0/2075822" xlink:type="simple">https://www.digikey.com/en/products/detail/stackpole-electronics-inc/BR3FB10L0/2075822</text:a>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6" table:formula="of:=[.B19]&amp;[.C19]&amp;&quot;__&quot;&amp;[.D19]&amp;&quot;__&quot;&amp;[.E19]" office:value-type="string" office:string-value="RBR3FB10L0__BR3FB10L0__0.01" calcext:value-type="string">
            <text:p>RBR3FB10L0__BR3FB10L0__0.01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S5A3159DCK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S5A3159DCK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6388</text:p>
          </table:table-cell>
          <table:table-cell office:value-type="string" calcext:value-type="string">
            <text:p><text:a xlink:href="https://www.lcsc.com/product-detail/C46388.html" xlink:type="simple">https://www.lcsc.com/product-detail/C46388.html</text:a></text:p>
          </table:table-cell>
          <table:table-cell office:value-type="float" office:value="0.1724" calcext:value-type="float">
            <text:p>0.1724</text:p>
          </table:table-cell>
          <table:table-cell table:number-columns-repeated="3"/>
          <table:table-cell table:style-name="ce6" table:formula="of:=[.B20]&amp;[.C20]&amp;&quot;__&quot;&amp;[.D20]&amp;&quot;__&quot;&amp;[.E20]" office:value-type="string" office:string-value="__TS5A3159DCKR__TS5A3159DCKR" calcext:value-type="string">
            <text:p>__TS5A3159DCKR__TS5A3159DCKR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333SE-7</text:p>
          </table:table-cell>
          <table:table-cell office:value-type="string" calcext:value-type="string">
            <text:p>70pA 8uV_out_of_stock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S333SE-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948481</text:p>
          </table:table-cell>
          <table:table-cell office:value-type="string" calcext:value-type="string">
            <text:p><text:a xlink:href="https://www.lcsc.com/product-detail/C19948481.html" xlink:type="simple">https://www.lcsc.com/product-detail/C19948481.html</text:a></text:p>
          </table:table-cell>
          <table:table-cell office:value-type="float" office:value="0.2644" calcext:value-type="float">
            <text:p>0.2644</text:p>
          </table:table-cell>
          <table:table-cell table:number-columns-repeated="3"/>
          <table:table-cell table:style-name="ce6" table:formula="of:=[.B21]&amp;[.C21]&amp;&quot;__&quot;&amp;[.D21]&amp;&quot;__&quot;&amp;[.E21]" office:value-type="string" office:string-value="__AS333SE-7__70pA 8uV_out_of_stock" calcext:value-type="string">
            <text:p>__AS333SE-7__70pA 8uV_out_of_stock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333SE-7</text:p>
          </table:table-cell>
          <table:table-cell office:value-type="string" calcext:value-type="string">
            <text:p>70pA 8uV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333IDCK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1502</text:p>
          </table:table-cell>
          <table:table-cell office:value-type="string" calcext:value-type="string">
            <text:p><text:a xlink:href="https://www.lcsc.com/product-detail/C181502.html" xlink:type="simple">https://www.lcsc.com/product-detail/C181502.html</text:a></text:p>
          </table:table-cell>
          <table:table-cell office:value-type="float" office:value="0.2764" calcext:value-type="float">
            <text:p>0.2764</text:p>
          </table:table-cell>
          <table:table-cell table:number-columns-repeated="3"/>
          <table:table-cell table:style-name="ce6" table:formula="of:=[.B22]&amp;[.C22]&amp;&quot;__&quot;&amp;[.D22]&amp;&quot;__&quot;&amp;[.E22]" office:value-type="string" office:string-value="__AS333SE-7__70pA 8uV" calcext:value-type="string">
            <text:p>__AS333SE-7__70pA 8uV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2210K-5.0TRG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10K-5.0TRG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00758</text:p>
          </table:table-cell>
          <table:table-cell office:value-type="string" calcext:value-type="string">
            <text:p><text:a xlink:href="https://www.lcsc.com/product-detail/C500758.html" xlink:type="simple">https://www.lcsc.com/product-detail/C500758.html</text:a>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style-name="ce6" table:formula="of:=[.B23]&amp;[.C23]&amp;&quot;__&quot;&amp;[.D23]&amp;&quot;__&quot;&amp;[.E23]" office:value-type="string" office:string-value="__AP2210K-5.0TRG1__5V" calcext:value-type="string">
            <text:p>__AP2210K-5.0TRG1__5V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R2EF3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R2EF33,LM(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3273</text:p>
          </table:table-cell>
          <table:table-cell office:value-type="string" calcext:value-type="string">
            <text:p><text:a xlink:href="https://www.lcsc.com/product-detail/C843273.html" xlink:type="simple">https://www.lcsc.com/product-detail/C843273.html</text:a></text:p>
          </table:table-cell>
          <table:table-cell office:value-type="float" office:value="0.1047" calcext:value-type="float">
            <text:p>0.1047</text:p>
          </table:table-cell>
          <table:table-cell table:number-columns-repeated="3"/>
          <table:table-cell table:style-name="ce6" table:formula="of:=[.B24]&amp;[.C24]&amp;&quot;__&quot;&amp;[.D24]&amp;&quot;__&quot;&amp;[.E24]" office:value-type="string" office:string-value="__TCR2EF33__3.3V" calcext:value-type="string">
            <text:p>__TCR2EF33__3.3V</text:p>
          </table:table-cell>
          <table:table-cell table:style-name="ce9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MUX1308BQX</text:p>
          </table:table-cell>
          <table:table-cell office:value-type="string" calcext:value-type="string">
            <text:p>NMUX130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NMUX1308BQ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NMUX1308BQXCT-ND</text:p>
          </table:table-cell>
          <table:table-cell office:value-type="string" calcext:value-type="string">
            <text:p>https://www.digikey.com/en/products/detail/nexperia-usa-inc/NMUX1308BQX/22050149?s=N4IgTCBcDaIHIFkCqANAjAZgAwA4BCAiiiALoC%2BQA</text:p>
          </table:table-cell>
          <table:table-cell office:value-type="float" office:value="0.229" calcext:value-type="float">
            <text:p>0.229</text:p>
          </table:table-cell>
          <table:table-cell table:number-columns-repeated="3"/>
          <table:table-cell table:style-name="ce6" table:formula="of:=[.B25]&amp;[.C25]&amp;&quot;__&quot;&amp;[.D25]&amp;&quot;__&quot;&amp;[.E25]" office:value-type="string" office:string-value="__NMUX1308BQX__NMUX1308" calcext:value-type="string">
            <text:p>__NMUX1308BQX__NMUX1308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CP3460R</text:p>
          </table:table-cell>
          <table:table-cell table:style-name="ce4" office:value-type="string" calcext:value-type="string">
            <text:p>MCP3460R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60RT-E/2L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0-MCP3460RT-E/2LXCT-ND</text:p>
          </table:table-cell>
          <table:table-cell office:value-type="string" calcext:value-type="string">
            <text:p>https://www.digikey.com/en/products/detail/microchip-technology/MCP3460RT-E-2LX/26653549?s=N4IgjCBcpgnAHLKoDGUBmBDANgZwKYA0IA9lANogAMIAugL73EBMFIAsgMIAKAzACwA2KgCU69IA</text:p>
          </table:table-cell>
          <table:table-cell office:value-type="float" office:value="1.35" calcext:value-type="float">
            <text:p>1.35</text:p>
          </table:table-cell>
          <table:table-cell table:number-columns-repeated="3"/>
          <table:table-cell table:style-name="ce6" table:formula="of:=[.B26]&amp;[.C26]&amp;&quot;__&quot;&amp;[.D26]&amp;&quot;__&quot;&amp;[.E26]" office:value-type="string" office:string-value="__MCP3460R__MCP3460RT" calcext:value-type="string">
            <text:p>__MCP3460R__MCP3460RT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74HC595BQ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595BQ,11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0243</text:p>
          </table:table-cell>
          <table:table-cell office:value-type="string" calcext:value-type="string">
            <text:p>https://www.lcsc.com/product-detail/C730243.html?s_z=n_q_74HC595BQ%252C115&amp;spm=wm.ssy.bg.0.xh&amp;lcsc_vid=ElkMVlNXTgcPUgBXFgILUwdVEVRWUlEFQ1VXUgAHFFMxVlNRQFRdUVVUR1lXVjsOAxUeFF5JWBYZEEoKFBINSQcJGk4eFQsCAgIaSgADAwAHC0slQ1hdVl1WWQkaCgg%3D</text:p>
          </table:table-cell>
          <table:table-cell office:value-type="float" office:value="0.177" calcext:value-type="float">
            <text:p>0.177</text:p>
          </table:table-cell>
          <table:table-cell table:number-columns-repeated="3"/>
          <table:table-cell table:style-name="ce6" table:formula="of:=[.B27]&amp;[.C27]&amp;&quot;__&quot;&amp;[.D27]&amp;&quot;__&quot;&amp;[.E27]" office:value-type="string" office:string-value="__74HC595BQ,115__74HC595BQ,115" calcext:value-type="string">
            <text:p>__74HC595BQ,115__74HC595BQ,115</text:p>
          </table:table-cell>
          <table:table-cell table:style-name="ce9"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AA080T-I/TT</text:p>
          </table:table-cell>
          <table:table-cell office:value-type="string" calcext:value-type="string">
            <text:p>8kbi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11AA160T-I/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AA160T-I/TTCT-ND</text:p>
          </table:table-cell>
          <table:table-cell office:value-type="string" calcext:value-type="string">
            <text:p>https://www.digikey.com/en/products/detail/microchip-technology/11AA160T-I-TT/1851330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16Kbit</text:p>
          </table:table-cell>
          <table:table-cell table:number-columns-repeated="2"/>
          <table:table-cell table:style-name="ce6" table:formula="of:=[.B28]&amp;[.C28]&amp;&quot;__&quot;&amp;[.D28]&amp;&quot;__&quot;&amp;[.E28]" office:value-type="string" office:string-value="__11AA080T-I/TT__8kbit" calcext:value-type="string">
            <text:p>__11AA080T-I/TT__8kbit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table:number-columns-repeated="2" table:style-name="ce4" office:value-type="string" calcext:value-type="string">
            <text:p>18012115421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SO621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447162</text:p>
          </table:table-cell>
          <table:table-cell office:value-type="string" calcext:value-type="string">
            <text:p><text:a xlink:href="https://www.lcsc.com/product-detail/C5447162.html" xlink:type="simple">https://www.lcsc.com/product-detail/C5447162.html</text:a></text:p>
          </table:table-cell>
          <table:table-cell office:value-type="float" office:value="1.071" calcext:value-type="float">
            <text:p>1.071</text:p>
          </table:table-cell>
          <table:table-cell office:value-type="string" calcext:value-type="string">
            <text:p>STISO621TR</text:p>
          </table:table-cell>
          <table:table-cell table:number-columns-repeated="2"/>
          <table:table-cell table:style-name="ce6" table:formula="of:=[.B29]&amp;[.C29]&amp;&quot;__&quot;&amp;[.D29]&amp;&quot;__&quot;&amp;[.E29]" office:value-type="string" office:string-value="__18012115421H__18012115421H" calcext:value-type="string">
            <text:p>__18012115421H__18012115421H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ST3904DP6T5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ST3904DP6T5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62939</text:p>
          </table:table-cell>
          <table:table-cell office:value-type="string" calcext:value-type="string">
            <text:p><text:a xlink:href="https://www.lcsc.com/product-detail/C462939.html" xlink:type="simple">https://www.lcsc.com/product-detail/C462939.html</text:a></text:p>
          </table:table-cell>
          <table:table-cell office:value-type="float" office:value="0.0411" calcext:value-type="float">
            <text:p>0.0411</text:p>
          </table:table-cell>
          <table:table-cell table:number-columns-repeated="3"/>
          <table:table-cell table:style-name="ce6" table:formula="of:=[.B30]&amp;[.C30]&amp;&quot;__&quot;&amp;[.D30]&amp;&quot;__&quot;&amp;[.E30]" office:value-type="string" office:string-value="__NST3904DP6T5G__NST3904DP6T5G" calcext:value-type="string">
            <text:p>__NST3904DP6T5G__NST3904DP6T5G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BM8-272-T3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8-272-T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625731</text:p>
          </table:table-cell>
          <table:table-cell office:value-type="string" calcext:value-type="string">
            <text:p><text:a xlink:href="https://www.lcsc.com/product-detail/C20625731.html" xlink:type="simple">https://www.lcsc.com/product-detail/C20625731.html</text:a></text:p>
          </table:table-cell>
          <table:table-cell office:value-type="float" office:value="0.2936" calcext:value-type="float">
            <text:p>0.2936</text:p>
          </table:table-cell>
          <table:table-cell table:number-columns-repeated="3"/>
          <table:table-cell table:style-name="ce6" table:formula="of:=[.B31]&amp;[.C31]&amp;&quot;__&quot;&amp;[.D31]&amp;&quot;__&quot;&amp;[.E31]" office:value-type="string" office:string-value="__ABM8-272-T3__ABM8-272-T3" calcext:value-type="string">
            <text:p>__ABM8-272-T3__ABM8-272-T3</text:p>
          </table:table-cell>
          <table:table-cell table:style-name="ce9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5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150JB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L10C150JB8NNNC</text:p>
          </table:table-cell>
          <table:table-cell office:value-type="string" calcext:value-type="string">
            <text:p><text:a xlink:href="https://www.lcsc.com/product-detail/C1644.html" xlink:type="simple">https://www.lcsc.com/product-detail/C1644.html</text:a></text:p>
          </table:table-cell>
          <table:table-cell office:value-type="float" office:value="0.0054" calcext:value-type="float">
            <text:p>0.0054</text:p>
          </table:table-cell>
          <table:table-cell table:number-columns-repeated="3"/>
          <table:table-cell table:style-name="ce6" table:formula="of:=[.B32]&amp;[.C32]&amp;&quot;__&quot;&amp;[.D32]&amp;&quot;__&quot;&amp;[.E32]" office:value-type="string" office:string-value="C0603____15p" calcext:value-type="string">
            <text:p>C0603____15p</text:p>
          </table:table-cell>
          <table:table-cell table:style-name="ce9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548</text:p>
          </table:table-cell>
          <table:table-cell office:value-type="string" calcext:value-type="string">
            <text:p><text:a xlink:href="https://www.lcsc.com/product-detail/C22548.html" xlink:type="simple">https://www.lcsc.com/product-detail/C22548.html</text:a>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table:style-name="ce6" table:formula="of:=[.B33]&amp;[.C33]&amp;&quot;__&quot;&amp;[.D33]&amp;&quot;__&quot;&amp;[.E33]" office:value-type="string" office:string-value="R0603____1K" calcext:value-type="string">
            <text:p>R0603____1K</text:p>
          </table:table-cell>
          <table:table-cell table:style-name="ce9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75</text:p>
          </table:table-cell>
          <table:table-cell office:value-type="string" calcext:value-type="string">
            <text:p><text:a xlink:href="https://www.lcsc.com/product-detail/C14675.html" xlink:type="simple">https://www.lcsc.com/product-detail/C14675.html</text:a></text:p>
          </table:table-cell>
          <table:table-cell office:value-type="float" office:value="0.0014" calcext:value-type="float">
            <text:p>0.0014</text:p>
          </table:table-cell>
          <table:table-cell table:number-columns-repeated="3"/>
          <table:table-cell table:style-name="ce6" table:formula="of:=[.B34]&amp;[.C34]&amp;&quot;__&quot;&amp;[.D34]&amp;&quot;__&quot;&amp;[.E34]" office:value-type="string" office:string-value="R0603____100K" calcext:value-type="string">
            <text:p>R0603____100K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5.1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AC0603FR-075K1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5891</text:p>
          </table:table-cell>
          <table:table-cell office:value-type="string" calcext:value-type="string">
            <text:p><text:a xlink:href="https://www.lcsc.com/product-detail/C125891.html" xlink:type="simple">https://www.lcsc.com/product-detail/C125891.html</text:a></text:p>
          </table:table-cell>
          <table:table-cell office:value-type="float" office:value="0.0024" calcext:value-type="float">
            <text:p>0.0024</text:p>
          </table:table-cell>
          <table:table-cell table:number-columns-repeated="3"/>
          <table:table-cell table:style-name="ce6" table:formula="of:=[.B35]&amp;[.C35]&amp;&quot;__&quot;&amp;[.D35]&amp;&quot;__&quot;&amp;[.E35]" office:value-type="string" office:string-value="R0603____5.1K" calcext:value-type="string">
            <text:p>R0603____5.1K</text:p>
          </table:table-cell>
          <table:table-cell table:style-name="ce9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3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3K0FKE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4778</text:p>
          </table:table-cell>
          <table:table-cell office:value-type="string" calcext:value-type="string">
            <text:p><text:a xlink:href="https://www.lcsc.com/product-detail/C844778.html" xlink:type="simple">https://www.lcsc.com/product-detail/C844778.html</text:a></text:p>
          </table:table-cell>
          <table:table-cell office:value-type="float" office:value="0.0046" calcext:value-type="float">
            <text:p>0.0046</text:p>
          </table:table-cell>
          <table:table-cell table:number-columns-repeated="3"/>
          <table:table-cell table:style-name="ce6" table:formula="of:=[.B36]&amp;[.C36]&amp;&quot;__&quot;&amp;[.D36]&amp;&quot;__&quot;&amp;[.E36]" office:value-type="string" office:string-value="R0603____33K" calcext:value-type="string">
            <text:p>R0603____33K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3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T0603FRE0733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3745</text:p>
          </table:table-cell>
          <table:table-cell office:value-type="string" calcext:value-type="string">
            <text:p><text:a xlink:href="https://www.lcsc.com/product-detail/C863745.html" xlink:type="simple">https://www.lcsc.com/product-detail/C863745.html</text:a></text:p>
          </table:table-cell>
          <table:table-cell office:value-type="float" office:value="0.0105" calcext:value-type="float">
            <text:p>0.0105</text:p>
          </table:table-cell>
          <table:table-cell table:number-columns-repeated="3"/>
          <table:table-cell table:style-name="ce6" table:formula="of:=[.B37]&amp;[.C37]&amp;&quot;__&quot;&amp;[.D37]&amp;&quot;__&quot;&amp;[.E37]" office:value-type="string" office:string-value="R0603____330K" calcext:value-type="string">
            <text:p>R0603____330K</text:p>
          </table:table-cell>
          <table:table-cell table:style-name="ce9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4545</text:p>
          </table:table-cell>
          <table:table-cell office:value-type="string" calcext:value-type="string">
            <text:p><text:a xlink:href="https://www.lcsc.com/product-detail/C844545.html" xlink:type="simple">https://www.lcsc.com/product-detail/C844545.html</text:a>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table:style-name="ce6" table:formula="of:=[.B38]&amp;[.C38]&amp;&quot;__&quot;&amp;[.D38]&amp;&quot;__&quot;&amp;[.E38]" office:value-type="string" office:string-value="R0603____27" calcext:value-type="string">
            <text:p>R0603____27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ERJ3EKF2200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3073</text:p>
          </table:table-cell>
          <table:table-cell office:value-type="string" calcext:value-type="string">
            <text:p><text:a xlink:href="https://www.lcsc.com/product-detail/C403073.html" xlink:type="simple">https://www.lcsc.com/product-detail/C403073.html</text:a></text:p>
          </table:table-cell>
          <table:table-cell office:value-type="float" office:value="0.0053" calcext:value-type="float">
            <text:p>0.0053</text:p>
          </table:table-cell>
          <table:table-cell table:number-columns-repeated="3"/>
          <table:table-cell table:style-name="ce6" table:formula="of:=[.B39]&amp;[.C39]&amp;&quot;__&quot;&amp;[.D39]&amp;&quot;__&quot;&amp;[.E39]" office:value-type="string" office:string-value="R0603____220" calcext:value-type="string">
            <text:p>R0603____220</text:p>
          </table:table-cell>
          <table:table-cell table:style-name="ce9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8220</text:p>
          </table:table-cell>
          <table:table-cell office:value-type="string" calcext:value-type="string">
            <text:p><text:a xlink:href="https://www.lcsc.com/product-detail/C98220.html" xlink:type="simple">https://www.lcsc.com/product-detail/C98220.html</text:a>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table:style-name="ce6" table:formula="of:=[.B40]&amp;[.C40]&amp;&quot;__&quot;&amp;[.D40]&amp;&quot;__&quot;&amp;[.E40]" office:value-type="string" office:string-value="R0603____10K" calcext:value-type="string">
            <text:p>R0603____10K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.3M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603FR-073M3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1688</text:p>
          </table:table-cell>
          <table:table-cell office:value-type="string" calcext:value-type="string">
            <text:p><text:a xlink:href="https://www.lcsc.com/product-detail/C141688.html" xlink:type="simple">https://www.lcsc.com/product-detail/C141688.html</text:a></text:p>
          </table:table-cell>
          <table:table-cell office:value-type="float" office:value="0.0016" calcext:value-type="float">
            <text:p>0.0016</text:p>
          </table:table-cell>
          <table:table-cell table:number-columns-repeated="3"/>
          <table:table-cell table:style-name="ce6" table:formula="of:=[.B41]&amp;[.C41]&amp;&quot;__&quot;&amp;[.D41]&amp;&quot;__&quot;&amp;[.E41]" office:value-type="string" office:string-value="R0603____3.3M" calcext:value-type="string">
            <text:p>R0603____3.3M</text:p>
          </table:table-cell>
          <table:table-cell table:style-name="ce9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n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603FRNPO9BN10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9468</text:p>
          </table:table-cell>
          <table:table-cell office:value-type="string" calcext:value-type="string">
            <text:p><text:a xlink:href="https://www.lcsc.com/product-detail/C309468.html" xlink:type="simple">https://www.lcsc.com/product-detail/C309468.html</text:a>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6" table:formula="of:=[.B42]&amp;[.C42]&amp;&quot;__&quot;&amp;[.D42]&amp;&quot;__&quot;&amp;[.E42]" office:value-type="string" office:string-value="C0603____1n" calcext:value-type="string">
            <text:p>C0603____1n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0n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603JRNPO9BN10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9113</text:p>
          </table:table-cell>
          <table:table-cell office:value-type="string" calcext:value-type="string">
            <text:p><text:a xlink:href="https://www.lcsc.com/product-detail/C389113.html" xlink:type="simple">https://www.lcsc.com/product-detail/C389113.html</text:a></text:p>
          </table:table-cell>
          <table:table-cell office:value-type="float" office:value="0.0134" calcext:value-type="float">
            <text:p>0.0134</text:p>
          </table:table-cell>
          <table:table-cell table:number-columns-repeated="3"/>
          <table:table-cell table:style-name="ce6" table:formula="of:=[.B43]&amp;[.C43]&amp;&quot;__&quot;&amp;[.D43]&amp;&quot;__&quot;&amp;[.E43]" office:value-type="string" office:string-value="C0603____10n" calcext:value-type="string">
            <text:p>C0603____10n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00p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603FRNPO9BN1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3648</text:p>
          </table:table-cell>
          <table:table-cell office:value-type="string" calcext:value-type="string">
            <text:p><text:a xlink:href="https://www.lcsc.com/product-detail/C513648.html" xlink:type="simple">https://www.lcsc.com/product-detail/C513648.html</text:a></text:p>
          </table:table-cell>
          <table:table-cell office:value-type="float" office:value="0.0089" calcext:value-type="float">
            <text:p>0.0089</text:p>
          </table:table-cell>
          <table:table-cell table:number-columns-repeated="3"/>
          <table:table-cell table:style-name="ce6" table:formula="of:=[.B44]&amp;[.C44]&amp;&quot;__&quot;&amp;[.D44]&amp;&quot;__&quot;&amp;[.E44]" office:value-type="string" office:string-value="C0603____100p" calcext:value-type="string">
            <text:p>C0603____100p</text:p>
          </table:table-cell>
          <table:table-cell table:style-name="ce9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91</text:p>
          </table:table-cell>
          <table:table-cell office:value-type="string" calcext:value-type="string">
            <text:p><text:a xlink:href="https://www.lcsc.com/product-detail/C1591.html" xlink:type="simple">https://www.lcsc.com/product-detail/C1591.html</text:a></text:p>
          </table:table-cell>
          <table:table-cell office:value-type="float" office:value="0.0028" calcext:value-type="float">
            <text:p>0.0028</text:p>
          </table:table-cell>
          <table:table-cell table:number-columns-repeated="3"/>
          <table:table-cell table:style-name="ce6" table:formula="of:=[.B45]&amp;[.C45]&amp;&quot;__&quot;&amp;[.D45]&amp;&quot;__&quot;&amp;[.E45]" office:value-type="string" office:string-value="C0603____100n" calcext:value-type="string">
            <text:p>C0603____100n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30p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603JRNPO9BN33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2784</text:p>
          </table:table-cell>
          <table:table-cell office:value-type="string" calcext:value-type="string">
            <text:p><text:a xlink:href="https://www.lcsc.com/product-detail/C62784.html" xlink:type="simple">https://www.lcsc.com/product-detail/C62784.html</text:a>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table:style-name="ce6" table:formula="of:=[.B46]&amp;[.C46]&amp;&quot;__&quot;&amp;[.D46]&amp;&quot;__&quot;&amp;[.E46]" office:value-type="string" office:string-value="C0603____330p" calcext:value-type="string">
            <text:p>C0603____330p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.3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332JA01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7036</text:p>
          </table:table-cell>
          <table:table-cell office:value-type="string" calcext:value-type="string">
            <text:p><text:a xlink:href="https://www.lcsc.com/product-detail/C77036.html" xlink:type="simple">https://www.lcsc.com/product-detail/C77036.html</text:a></text:p>
          </table:table-cell>
          <table:table-cell office:value-type="float" office:value="0.0153" calcext:value-type="float">
            <text:p>0.0153</text:p>
          </table:table-cell>
          <table:table-cell table:number-columns-repeated="3"/>
          <table:table-cell table:style-name="ce6" table:formula="of:=[.B47]&amp;[.C47]&amp;&quot;__&quot;&amp;[.D47]&amp;&quot;__&quot;&amp;[.E47]" office:value-type="string" office:string-value="C0603____3.3n" calcext:value-type="string">
            <text:p>C0603____3.3n</text:p>
          </table:table-cell>
          <table:table-cell table:style-name="ce9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603JRX7R9BB33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7162</text:p>
          </table:table-cell>
          <table:table-cell office:value-type="string" calcext:value-type="string">
            <text:p><text:a xlink:href="https://www.lcsc.com/product-detail/C327162.html" xlink:type="simple">https://www.lcsc.com/product-detail/C327162.html</text:a>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style-name="ce6" table:formula="of:=[.B48]&amp;[.C48]&amp;&quot;__&quot;&amp;[.D48]&amp;&quot;__&quot;&amp;[.E48]" office:value-type="string" office:string-value="C0603__CHEAP__33n" calcext:value-type="string">
            <text:p>C0603__CHEAP__33n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3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7U1A303JA01J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GRM1887U1A303JA01JCT-ND</text:p>
          </table:table-cell>
          <table:table-cell office:value-type="string" calcext:value-type="string">
            <text:p>https://www.digikey.com/en/products/detail/murata-electronics/GRM1887U1A303JA01J/17862050</text:p>
          </table:table-cell>
          <table:table-cell office:value-type="float" office:value="0.137" calcext:value-type="float">
            <text:p>0.137</text:p>
          </table:table-cell>
          <table:table-cell table:number-columns-repeated="3"/>
          <table:table-cell table:style-name="ce6" table:formula="of:=[.B49]&amp;[.C49]&amp;&quot;__&quot;&amp;[.D49]&amp;&quot;__&quot;&amp;[.E49]" office:value-type="string" office:string-value="C0603____33n" calcext:value-type="string">
            <text:p>C0603____33n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V for Ohms pro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SR1206JR-7W470R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74087</text:p>
          </table:table-cell>
          <table:table-cell office:value-type="string" calcext:value-type="string">
            <text:p><text:a xlink:href="https://www.lcsc.com/product-detail/C874087.html" xlink:type="simple">https://www.lcsc.com/product-detail/C874087.html</text:a></text:p>
          </table:table-cell>
          <table:table-cell office:value-type="float" office:value="0.0253" calcext:value-type="float">
            <text:p>0.0253</text:p>
          </table:table-cell>
          <table:table-cell table:number-columns-repeated="3"/>
          <table:table-cell table:style-name="ce6" table:formula="of:=[.B50]&amp;[.C50]&amp;&quot;__&quot;&amp;[.D50]&amp;&quot;__&quot;&amp;[.E50]" office:value-type="string" office:string-value="R1206____470" calcext:value-type="string">
            <text:p>R1206____470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06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HV1206-FX-1003EL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78737</text:p>
          </table:table-cell>
          <table:table-cell office:value-type="string" calcext:value-type="string">
            <text:p><text:a xlink:href="https://www.lcsc.com/product-detail/C2078737.html" xlink:type="simple">https://www.lcsc.com/product-detail/C2078737.html</text:a></text:p>
          </table:table-cell>
          <table:table-cell office:value-type="float" office:value="0.1034" calcext:value-type="float">
            <text:p>0.1034</text:p>
          </table:table-cell>
          <table:table-cell table:number-columns-repeated="3"/>
          <table:table-cell table:style-name="ce6" table:formula="of:=[.B51]&amp;[.C51]&amp;&quot;__&quot;&amp;[.D51]&amp;&quot;__&quot;&amp;[.E51]" office:value-type="string" office:string-value="R1206____100K" calcext:value-type="string">
            <text:p>R1206____100K</text:p>
          </table:table-cell>
          <table:table-cell table:style-name="ce9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T0603BRD073K3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9653</text:p>
          </table:table-cell>
          <table:table-cell office:value-type="string" calcext:value-type="string">
            <text:p><text:a xlink:href="https://www.lcsc.com/product-detail/C309653.html" xlink:type="simple">https://www.lcsc.com/product-detail/C309653.html</text:a></text:p>
          </table:table-cell>
          <table:table-cell office:value-type="float" office:value="0.0271" calcext:value-type="float">
            <text:p>0.0271</text:p>
          </table:table-cell>
          <table:table-cell table:number-columns-repeated="3"/>
          <table:table-cell table:style-name="ce6" table:formula="of:=[.B52]&amp;[.C52]&amp;&quot;__&quot;&amp;[.D52]&amp;&quot;__&quot;&amp;[.E52]" office:value-type="string" office:string-value="R0603__CRIT__3.3K" calcext:value-type="string">
            <text:p>R0603__CRIT__3.3K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T0603BRB071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8580</text:p>
          </table:table-cell>
          <table:table-cell office:value-type="string" calcext:value-type="string">
            <text:p><text:a xlink:href="https://www.lcsc.com/product-detail/C728580.html" xlink:type="simple">https://www.lcsc.com/product-detail/C728580.html</text:a></text:p>
          </table:table-cell>
          <table:table-cell office:value-type="float" office:value="0.1475" calcext:value-type="float">
            <text:p>0.1475</text:p>
          </table:table-cell>
          <table:table-cell table:number-columns-repeated="3"/>
          <table:table-cell table:style-name="ce6" table:formula="of:=[.B53]&amp;[.C53]&amp;&quot;__&quot;&amp;[.D53]&amp;&quot;__&quot;&amp;[.E53]" office:value-type="string" office:string-value="R0603__CRIT__1K" calcext:value-type="string">
            <text:p>R0603__CRIT__1K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I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3AEB221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45625</text:p>
          </table:table-cell>
          <table:table-cell office:value-type="string" calcext:value-type="string">
            <text:p><text:a xlink:href="https://www.lcsc.com/product-detail/C445625.html" xlink:type="simple">https://www.lcsc.com/product-detail/C445625.html</text:a></text:p>
          </table:table-cell>
          <table:table-cell office:value-type="float" office:value="0.0845" calcext:value-type="float">
            <text:p>0.0845</text:p>
          </table:table-cell>
          <table:table-cell table:number-columns-repeated="3"/>
          <table:table-cell table:style-name="ce6" table:formula="of:=[.B54]&amp;[.C54]&amp;&quot;__&quot;&amp;[.D54]&amp;&quot;__&quot;&amp;[.E54]" office:value-type="string" office:string-value="R0603__CRIT__220" calcext:value-type="string">
            <text:p>R0603__CRIT__220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06</text:p>
          </table:table-cell>
          <table:table-cell/>
          <table:table-cell office:value-type="string" calcext:value-type="string">
            <text:p>330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5C3A331JWA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GRM31A5C3A331JWA1DCT-ND</text:p>
          </table:table-cell>
          <table:table-cell office:value-type="string" calcext:value-type="string">
            <text:p><text:a xlink:href="https://www.digikey.com/en/products/detail/murata-electronics/GRM31A5C3A331JWA1D/10692922" xlink:type="simple">https://www.digikey.com/en/products/detail/murata-electronics/GRM31A5C3A331JWA1D/10692922</text:a></text:p>
          </table:table-cell>
          <table:table-cell office:value-type="float" office:value="0.164" calcext:value-type="float">
            <text:p>0.164</text:p>
          </table:table-cell>
          <table:table-cell table:number-columns-repeated="3"/>
          <table:table-cell table:style-name="ce6" table:formula="of:=[.B55]&amp;[.C55]&amp;&quot;__&quot;&amp;[.D55]&amp;&quot;__&quot;&amp;[.E55]" office:value-type="string" office:string-value="C1206____330p" calcext:value-type="string">
            <text:p>C1206____330p</text:p>
          </table:table-cell>
          <table:table-cell table:style-name="ce9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T0603BRB071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0067</text:p>
          </table:table-cell>
          <table:table-cell office:value-type="string" calcext:value-type="string">
            <text:p><text:a xlink:href="https://www.lcsc.com/product-detail/C860067.html" xlink:type="simple">https://www.lcsc.com/product-detail/C860067.html</text:a></text:p>
          </table:table-cell>
          <table:table-cell office:value-type="float" office:value="0.1329" calcext:value-type="float">
            <text:p>0.1329</text:p>
          </table:table-cell>
          <table:table-cell/>
          <table:table-cell office:value-type="string" calcext:value-type="string">
            <text:p>DNP’d</text:p>
          </table:table-cell>
          <table:table-cell/>
          <table:table-cell table:style-name="ce6" table:formula="of:=[.B56]&amp;[.C56]&amp;&quot;__&quot;&amp;[.D56]&amp;&quot;__&quot;&amp;[.E56]" office:value-type="string" office:string-value="R0603__CRIT__10K" calcext:value-type="string">
            <text:p>R0603__CRIT__10K</text:p>
          </table:table-cell>
          <table:table-cell table:style-name="ce9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06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AH1206FR-071M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749042</text:p>
          </table:table-cell>
          <table:table-cell office:value-type="string" calcext:value-type="string">
            <text:p><text:a xlink:href="https://www.lcsc.com/product-detail/C43749042.html" xlink:type="simple">https://www.lcsc.com/product-detail/C43749042.html</text:a></text:p>
          </table:table-cell>
          <table:table-cell office:value-type="float" office:value="0.0275" calcext:value-type="float">
            <text:p>0.0275</text:p>
          </table:table-cell>
          <table:table-cell table:number-columns-repeated="3"/>
          <table:table-cell table:style-name="ce6" table:formula="of:=[.B57]&amp;[.C57]&amp;&quot;__&quot;&amp;[.D57]&amp;&quot;__&quot;&amp;[.E57]" office:value-type="string" office:string-value="R1206____1M" calcext:value-type="string">
            <text:p>R1206____1M</text:p>
          </table:table-cell>
          <table:table-cell table:style-name="ce9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T1206BRB07100R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9681</text:p>
          </table:table-cell>
          <table:table-cell office:value-type="string" calcext:value-type="string">
            <text:p><text:a xlink:href="https://www.lcsc.com/product-detail/C869681.html" xlink:type="simple">https://www.lcsc.com/product-detail/C869681.html</text:a></text:p>
          </table:table-cell>
          <table:table-cell office:value-type="float" office:value="0.0916" calcext:value-type="float">
            <text:p>0.0916</text:p>
          </table:table-cell>
          <table:table-cell table:number-columns-repeated="3"/>
          <table:table-cell table:style-name="ce6" table:formula="of:=[.B58]&amp;[.C58]&amp;&quot;__&quot;&amp;[.D58]&amp;&quot;__&quot;&amp;[.E58]" office:value-type="string" office:string-value="R1206____100" calcext:value-type="string">
            <text:p>R1206____100</text:p>
          </table:table-cell>
          <table:table-cell table:style-name="ce9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06</text:p>
          </table:table-cell>
          <table:table-cell/>
          <table:table-cell office:value-type="string" calcext:value-type="string">
            <text:p>220m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KDV12DR200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DV12DR200ET</text:p>
          </table:table-cell>
          <table:table-cell office:value-type="string" calcext:value-type="string">
            <text:p>https://www.digikey.com/en/products/detail/ohmite/KDV12DR200ET/10476552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DNP’d: 200mOhm part specified for 220m value is intentional and acceptable</text:p>
          </table:table-cell>
          <table:table-cell/>
          <table:table-cell table:style-name="ce6" table:formula="of:=[.B59]&amp;[.C59]&amp;&quot;__&quot;&amp;[.D59]&amp;&quot;__&quot;&amp;[.E59]" office:value-type="string" office:string-value="R1206____220m" calcext:value-type="string">
            <text:p>R1206____220m</text:p>
          </table:table-cell>
          <table:table-cell table:style-name="ce9" office:value-type="float" office:value="59" calcext:value-type="float">
            <text:p>59</text:p>
          </table:table-cell>
        </table:table-row>
        <table:table-row table:style-name="ro1">
          <table:table-cell table:number-columns-repeated="14"/>
          <table:table-cell table:style-name="ce6" table:formula="of:=[.B60]&amp;[.C60]&amp;&quot;__&quot;&amp;[.D60]&amp;&quot;__&quot;&amp;[.E60]" office:value-type="string" office:string-value="____" calcext:value-type="string">
            <text:p>____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table:style-name="ce6" table:formula="of:=[.B61]&amp;[.C61]&amp;&quot;__&quot;&amp;[.D61]&amp;&quot;__&quot;&amp;[.E61]" office:value-type="string" office:string-value="____" calcext:value-type="string">
            <text:p>____</text:p>
          </table:table-cell>
          <table:table-cell table:style-name="ce9" office:value-type="float" office:value="61" calcext:value-type="float">
            <text:p>61</text:p>
          </table:table-cell>
        </table:table-row>
        <table:table-row table:style-name="ro1">
          <table:table-cell table:number-columns-repeated="14"/>
          <table:table-cell table:style-name="ce6" table:formula="of:=[.B62]&amp;[.C62]&amp;&quot;__&quot;&amp;[.D62]&amp;&quot;__&quot;&amp;[.E62]" office:value-type="string" office:string-value="____" calcext:value-type="string">
            <text:p>____</text:p>
          </table:table-cell>
          <table:table-cell table:style-name="ce9" office:value-type="float" office:value="62" calcext:value-type="float">
            <text:p>62</text:p>
          </table:table-cell>
        </table:table-row>
        <table:table-row table:style-name="ro1">
          <table:table-cell table:number-columns-repeated="14"/>
          <table:table-cell table:style-name="ce6" table:formula="of:=[.B63]&amp;[.C63]&amp;&quot;__&quot;&amp;[.D63]&amp;&quot;__&quot;&amp;[.E63]" office:value-type="string" office:string-value="____" calcext:value-type="string">
            <text:p>____</text:p>
          </table:table-cell>
          <table:table-cell table:style-name="ce9" office:value-type="float" office:value="63" calcext:value-type="float">
            <text:p>63</text:p>
          </table:table-cell>
        </table:table-row>
        <table:table-row table:style-name="ro1">
          <table:table-cell table:number-columns-repeated="14"/>
          <table:table-cell table:style-name="ce6" table:formula="of:=[.B64]&amp;[.C64]&amp;&quot;__&quot;&amp;[.D64]&amp;&quot;__&quot;&amp;[.E64]" office:value-type="string" office:string-value="____" calcext:value-type="string">
            <text:p>____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number-columns-repeated="14"/>
          <table:table-cell table:style-name="ce6" table:formula="of:=[.B65]&amp;[.C65]&amp;&quot;__&quot;&amp;[.D65]&amp;&quot;__&quot;&amp;[.E65]" office:value-type="string" office:string-value="____" calcext:value-type="string">
            <text:p>____</text:p>
          </table:table-cell>
          <table:table-cell table:style-name="ce9"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table:style-name="ce6" table:formula="of:=[.B66]&amp;[.C66]&amp;&quot;__&quot;&amp;[.D66]&amp;&quot;__&quot;&amp;[.E66]" office:value-type="string" office:string-value="____" calcext:value-type="string">
            <text:p>____</text:p>
          </table:table-cell>
          <table:table-cell table:style-name="ce9" office:value-type="float" office:value="66" calcext:value-type="float">
            <text:p>66</text:p>
          </table:table-cell>
        </table:table-row>
        <table:table-row table:style-name="ro1">
          <table:table-cell table:number-columns-repeated="14"/>
          <table:table-cell table:style-name="ce6" table:formula="of:=[.B67]&amp;[.C67]&amp;&quot;__&quot;&amp;[.D67]&amp;&quot;__&quot;&amp;[.E67]" office:value-type="string" office:string-value="____" calcext:value-type="string">
            <text:p>____</text:p>
          </table:table-cell>
          <table:table-cell table:style-name="ce9" office:value-type="float" office:value="67" calcext:value-type="float">
            <text:p>67</text:p>
          </table:table-cell>
        </table:table-row>
        <table:table-row table:style-name="ro1">
          <table:table-cell table:number-columns-repeated="14"/>
          <table:table-cell table:style-name="ce6" table:formula="of:=[.B68]&amp;[.C68]&amp;&quot;__&quot;&amp;[.D68]&amp;&quot;__&quot;&amp;[.E68]" office:value-type="string" office:string-value="____" calcext:value-type="string">
            <text:p>____</text:p>
          </table:table-cell>
          <table:table-cell table:style-name="ce9" office:value-type="float" office:value="68" calcext:value-type="float">
            <text:p>68</text:p>
          </table:table-cell>
        </table:table-row>
        <table:table-row table:style-name="ro1">
          <table:table-cell table:number-columns-repeated="14"/>
          <table:table-cell table:style-name="ce6" table:formula="of:=[.B69]&amp;[.C69]&amp;&quot;__&quot;&amp;[.D69]&amp;&quot;__&quot;&amp;[.E69]" office:value-type="string" office:string-value="____" calcext:value-type="string">
            <text:p>____</text:p>
          </table:table-cell>
          <table:table-cell table:style-name="ce9" office:value-type="float" office:value="69" calcext:value-type="float">
            <text:p>69</text:p>
          </table:table-cell>
        </table:table-row>
        <table:table-row table:style-name="ro1">
          <table:table-cell table:number-columns-repeated="14"/>
          <table:table-cell table:style-name="ce6" table:formula="of:=[.B70]&amp;[.C70]&amp;&quot;__&quot;&amp;[.D70]&amp;&quot;__&quot;&amp;[.E70]" office:value-type="string" office:string-value="____" calcext:value-type="string">
            <text:p>____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table:style-name="ce6" table:formula="of:=[.B71]&amp;[.C71]&amp;&quot;__&quot;&amp;[.D71]&amp;&quot;__&quot;&amp;[.E71]" office:value-type="string" office:string-value="____" calcext:value-type="string">
            <text:p>____</text:p>
          </table:table-cell>
          <table:table-cell table:style-name="ce9"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table:style-name="ce6" table:formula="of:=[.B72]&amp;[.C72]&amp;&quot;__&quot;&amp;[.D72]&amp;&quot;__&quot;&amp;[.E72]" office:value-type="string" office:string-value="____" calcext:value-type="string">
            <text:p>____</text:p>
          </table:table-cell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style-name="ce6" table:formula="of:=[.B73]&amp;[.C73]&amp;&quot;__&quot;&amp;[.D73]&amp;&quot;__&quot;&amp;[.E73]" office:value-type="string" office:string-value="____" calcext:value-type="string">
            <text:p>____</text:p>
          </table:table-cell>
          <table:table-cell table:style-name="ce9" office:value-type="float" office:value="73" calcext:value-type="float">
            <text:p>73</text:p>
          </table:table-cell>
        </table:table-row>
        <table:table-row table:style-name="ro1">
          <table:table-cell table:number-columns-repeated="14"/>
          <table:table-cell table:style-name="ce6" table:formula="of:=[.B74]&amp;[.C74]&amp;&quot;__&quot;&amp;[.D74]&amp;&quot;__&quot;&amp;[.E74]" office:value-type="string" office:string-value="____" calcext:value-type="string">
            <text:p>____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1">
          <table:table-cell table:number-columns-repeated="14"/>
          <table:table-cell table:style-name="ce6" table:formula="of:=[.B75]&amp;[.C75]&amp;&quot;__&quot;&amp;[.D75]&amp;&quot;__&quot;&amp;[.E75]" office:value-type="string" office:string-value="____" calcext:value-type="string">
            <text:p>____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number-columns-repeated="14"/>
          <table:table-cell table:style-name="ce6" table:formula="of:=[.B76]&amp;[.C76]&amp;&quot;__&quot;&amp;[.D76]&amp;&quot;__&quot;&amp;[.E76]" office:value-type="string" office:string-value="____" calcext:value-type="string">
            <text:p>____</text:p>
          </table:table-cell>
          <table:table-cell table:style-name="ce9"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table:style-name="ce6" table:formula="of:=[.B77]&amp;[.C77]&amp;&quot;__&quot;&amp;[.D77]&amp;&quot;__&quot;&amp;[.E77]" office:value-type="string" office:string-value="____" calcext:value-type="string">
            <text:p>____</text:p>
          </table:table-cell>
          <table:table-cell table:style-name="ce9"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  <table:table-cell table:style-name="ce6" table:formula="of:=[.B78]&amp;[.C78]&amp;&quot;__&quot;&amp;[.D78]&amp;&quot;__&quot;&amp;[.E78]" office:value-type="string" office:string-value="____" calcext:value-type="string">
            <text:p>____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number-columns-repeated="14"/>
          <table:table-cell table:style-name="ce6" table:formula="of:=[.B79]&amp;[.C79]&amp;&quot;__&quot;&amp;[.D79]&amp;&quot;__&quot;&amp;[.E79]" office:value-type="string" office:string-value="____" calcext:value-type="string">
            <text:p>____</text:p>
          </table:table-cell>
          <table:table-cell table:style-name="ce9" office:value-type="float" office:value="79" calcext:value-type="float">
            <text:p>79</text:p>
          </table:table-cell>
        </table:table-row>
        <table:table-row table:style-name="ro1">
          <table:table-cell table:number-columns-repeated="14"/>
          <table:table-cell table:style-name="ce6" table:formula="of:=[.B80]&amp;[.C80]&amp;&quot;__&quot;&amp;[.D80]&amp;&quot;__&quot;&amp;[.E80]" office:value-type="string" office:string-value="____" calcext:value-type="string">
            <text:p>____</text:p>
          </table:table-cell>
          <table:table-cell table:style-name="ce9"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table:style-name="ce6" table:formula="of:=[.B81]&amp;[.C81]&amp;&quot;__&quot;&amp;[.D81]&amp;&quot;__&quot;&amp;[.E81]" office:value-type="string" office:string-value="____" calcext:value-type="string">
            <text:p>____</text:p>
          </table:table-cell>
          <table:table-cell table:style-name="ce9" office:value-type="float" office:value="81" calcext:value-type="float">
            <text:p>81</text:p>
          </table:table-cell>
        </table:table-row>
        <table:table-row table:style-name="ro1">
          <table:table-cell table:number-columns-repeated="14"/>
          <table:table-cell table:style-name="ce6" table:formula="of:=[.B82]&amp;[.C82]&amp;&quot;__&quot;&amp;[.D82]&amp;&quot;__&quot;&amp;[.E82]" office:value-type="string" office:string-value="____" calcext:value-type="string">
            <text:p>____</text:p>
          </table:table-cell>
          <table:table-cell table:style-name="ce9" office:value-type="float" office:value="82" calcext:value-type="float">
            <text:p>82</text:p>
          </table:table-cell>
        </table:table-row>
        <table:table-row table:style-name="ro1">
          <table:table-cell table:number-columns-repeated="14"/>
          <table:table-cell table:style-name="ce6" table:formula="of:=[.B83]&amp;[.C83]&amp;&quot;__&quot;&amp;[.D83]&amp;&quot;__&quot;&amp;[.E83]" office:value-type="string" office:string-value="____" calcext:value-type="string">
            <text:p>____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table:style-name="ce6" table:formula="of:=[.B84]&amp;[.C84]&amp;&quot;__&quot;&amp;[.D84]&amp;&quot;__&quot;&amp;[.E84]" office:value-type="string" office:string-value="____" calcext:value-type="string">
            <text:p>____</text:p>
          </table:table-cell>
          <table:table-cell table:style-name="ce9"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table:style-name="ce6" table:formula="of:=[.B85]&amp;[.C85]&amp;&quot;__&quot;&amp;[.D85]&amp;&quot;__&quot;&amp;[.E85]" office:value-type="string" office:string-value="____" calcext:value-type="string">
            <text:p>____</text:p>
          </table:table-cell>
          <table:table-cell table:style-name="ce9" office:value-type="float" office:value="85" calcext:value-type="float">
            <text:p>85</text:p>
          </table:table-cell>
        </table:table-row>
        <table:table-row table:style-name="ro1">
          <table:table-cell table:number-columns-repeated="14"/>
          <table:table-cell table:style-name="ce6" table:formula="of:=[.B86]&amp;[.C86]&amp;&quot;__&quot;&amp;[.D86]&amp;&quot;__&quot;&amp;[.E86]" office:value-type="string" office:string-value="____" calcext:value-type="string">
            <text:p>____</text:p>
          </table:table-cell>
          <table:table-cell table:style-name="ce9" office:value-type="float" office:value="86" calcext:value-type="float">
            <text:p>86</text:p>
          </table:table-cell>
        </table:table-row>
        <table:table-row table:style-name="ro1">
          <table:table-cell table:number-columns-repeated="14"/>
          <table:table-cell table:style-name="ce6" table:formula="of:=[.B87]&amp;[.C87]&amp;&quot;__&quot;&amp;[.D87]&amp;&quot;__&quot;&amp;[.E87]" office:value-type="string" office:string-value="____" calcext:value-type="string">
            <text:p>____</text:p>
          </table:table-cell>
          <table:table-cell table:style-name="ce9" office:value-type="float" office:value="87" calcext:value-type="float">
            <text:p>87</text:p>
          </table:table-cell>
        </table:table-row>
        <table:table-row table:style-name="ro1">
          <table:table-cell table:number-columns-repeated="14"/>
          <table:table-cell table:style-name="ce6" table:formula="of:=[.B88]&amp;[.C88]&amp;&quot;__&quot;&amp;[.D88]&amp;&quot;__&quot;&amp;[.E88]" office:value-type="string" office:string-value="____" calcext:value-type="string">
            <text:p>____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table:style-name="ce6" table:formula="of:=[.B89]&amp;[.C89]&amp;&quot;__&quot;&amp;[.D89]&amp;&quot;__&quot;&amp;[.E89]" office:value-type="string" office:string-value="____" calcext:value-type="string">
            <text:p>____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number-columns-repeated="14"/>
          <table:table-cell table:style-name="ce6" table:formula="of:=[.B90]&amp;[.C90]&amp;&quot;__&quot;&amp;[.D90]&amp;&quot;__&quot;&amp;[.E90]" office:value-type="string" office:string-value="____" calcext:value-type="string">
            <text:p>____</text:p>
          </table:table-cell>
          <table:table-cell table:style-name="ce9"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table:style-name="ce6" table:formula="of:=[.B91]&amp;[.C91]&amp;&quot;__&quot;&amp;[.D91]&amp;&quot;__&quot;&amp;[.E91]" office:value-type="string" office:string-value="____" calcext:value-type="string">
            <text:p>____</text:p>
          </table:table-cell>
          <table:table-cell table:style-name="ce9" office:value-type="float" office:value="91" calcext:value-type="float">
            <text:p>91</text:p>
          </table:table-cell>
        </table:table-row>
        <table:table-row table:style-name="ro1">
          <table:table-cell table:number-columns-repeated="14"/>
          <table:table-cell table:style-name="ce6" table:formula="of:=[.B92]&amp;[.C92]&amp;&quot;__&quot;&amp;[.D92]&amp;&quot;__&quot;&amp;[.E92]" office:value-type="string" office:string-value="____" calcext:value-type="string">
            <text:p>____</text:p>
          </table:table-cell>
          <table:table-cell table:style-name="ce9" office:value-type="float" office:value="92" calcext:value-type="float">
            <text:p>92</text:p>
          </table:table-cell>
        </table:table-row>
        <table:table-row table:style-name="ro1">
          <table:table-cell table:number-columns-repeated="14"/>
          <table:table-cell table:style-name="ce6" table:formula="of:=[.B93]&amp;[.C93]&amp;&quot;__&quot;&amp;[.D93]&amp;&quot;__&quot;&amp;[.E93]" office:value-type="string" office:string-value="____" calcext:value-type="string">
            <text:p>____</text:p>
          </table:table-cell>
          <table:table-cell table:style-name="ce9"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table:style-name="ce6" table:formula="of:=[.B94]&amp;[.C94]&amp;&quot;__&quot;&amp;[.D94]&amp;&quot;__&quot;&amp;[.E94]" office:value-type="string" office:string-value="____" calcext:value-type="string">
            <text:p>____</text:p>
          </table:table-cell>
          <table:table-cell table:style-name="ce9" office:value-type="float" office:value="94" calcext:value-type="float">
            <text:p>94</text:p>
          </table:table-cell>
        </table:table-row>
        <table:table-row table:style-name="ro1">
          <table:table-cell table:number-columns-repeated="14"/>
          <table:table-cell table:style-name="ce6" table:formula="of:=[.B95]&amp;[.C95]&amp;&quot;__&quot;&amp;[.D95]&amp;&quot;__&quot;&amp;[.E95]" office:value-type="string" office:string-value="____" calcext:value-type="string">
            <text:p>____</text:p>
          </table:table-cell>
          <table:table-cell table:style-name="ce9" office:value-type="float" office:value="95" calcext:value-type="float">
            <text:p>95</text:p>
          </table:table-cell>
        </table:table-row>
        <table:table-row table:style-name="ro1">
          <table:table-cell table:number-columns-repeated="14"/>
          <table:table-cell table:style-name="ce6" table:formula="of:=[.B96]&amp;[.C96]&amp;&quot;__&quot;&amp;[.D96]&amp;&quot;__&quot;&amp;[.E96]" office:value-type="string" office:string-value="____" calcext:value-type="string">
            <text:p>____</text:p>
          </table:table-cell>
          <table:table-cell table:style-name="ce9"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table:style-name="ce6" table:formula="of:=[.B97]&amp;[.C97]&amp;&quot;__&quot;&amp;[.D97]&amp;&quot;__&quot;&amp;[.E97]" office:value-type="string" office:string-value="____" calcext:value-type="string">
            <text:p>____</text:p>
          </table:table-cell>
          <table:table-cell table:style-name="ce9" office:value-type="float" office:value="97" calcext:value-type="float">
            <text:p>97</text:p>
          </table:table-cell>
        </table:table-row>
        <table:table-row table:style-name="ro1">
          <table:table-cell table:number-columns-repeated="14"/>
          <table:table-cell table:style-name="ce6" table:formula="of:=[.B98]&amp;[.C98]&amp;&quot;__&quot;&amp;[.D98]&amp;&quot;__&quot;&amp;[.E98]" office:value-type="string" office:string-value="____" calcext:value-type="string">
            <text:p>____</text:p>
          </table:table-cell>
          <table:table-cell table:style-name="ce10" office:value-type="float" office:value="98" calcext:value-type="float">
            <text:p>98</text:p>
          </table:table-cell>
        </table:table-row>
        <table:table-row table:style-name="ro1" table:number-rows-repeated="1048477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upplier_Lookup.D26:Supplier_Lookup.E26 Supplier_Lookup.D29:Supplier_Lookup.E29">
            <calcext:condition calcext:apply-style-name="Good" calcext:value="formula-is(ISNUMBER([$Linking.$P26]))" calcext:base-cell-address="Supplier_Lookup.D26"/>
          </calcext:conditional-format>
        </calcext:conditional-formats>
      </table:table>
      <table:table table:name="Linking" table:style-name="ta1">
        <table:table-column table:style-name="co1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6" table:default-cell-style-name="ce12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ce20"/>
        <table:table-column table:style-name="co1" table:number-columns-repeated="2" table:default-cell-style-name="ce21"/>
        <table:table-column table:style-name="co25" table:default-cell-style-name="ce20"/>
        <table:table-column table:style-name="co26" table:default-cell-style-name="ce20"/>
        <table:table-column table:style-name="co1" table:number-columns-repeated="5" table:default-cell-style-name="ce20"/>
        <table:table-column table:style-name="co1" table:number-columns-repeated="2" table:default-cell-style-name="Default"/>
        <table:table-column table:style-name="co27" table:default-cell-style-name="ce22"/>
        <table:table-column table:style-name="co28" table:default-cell-style-name="Default"/>
        <table:table-column table:style-name="co1" table:default-cell-style-name="Default"/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formula="of:=SUM([.AB6:.AB78])" office:value-type="float" office:value="15.625" calcext:value-type="float">
            <text:p>15.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 #</text:p>
          </table:table-cell>
          <table:table-cell office:value-type="string" calcext:value-type="string">
            <text:p>isR?</text:p>
          </table:table-cell>
          <table:table-cell office:value-type="string" calcext:value-type="string">
            <text:p>isC?</text:p>
          </table:table-cell>
          <table:table-cell office:value-type="string" calcext:value-type="string">
            <text:p>FP_If_RC</text:p>
          </table:table-cell>
          <table:table-cell office:value-type="string" calcext:value-type="string">
            <text:p>Input RC__Part#__Val</text:p>
          </table:table-cell>
          <table:table-cell office:value-type="string" calcext:value-type="string">
            <text:p>Footprint Raw</text:p>
          </table:table-cell>
          <table:table-cell office:value-type="string" calcext:value-type="string">
            <text:p>Find_</text:p>
          </table:table-cell>
          <table:table-cell office:value-type="string" calcext:value-type="string">
            <text:p>After_</text:p>
          </table:table-cell>
          <table:table-cell/>
          <table:table-cell office:value-type="string" calcext:value-type="string">
            <text:p>After: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put part #</text:p>
          </table:table-cell>
          <table:table-cell office:value-type="string" calcext:value-type="string">
            <text:p>Supplier Mfr</text:p>
          </table:table-cell>
          <table:table-cell office:value-type="string" calcext:value-type="string">
            <text:p>Mfr part # (supplier)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st (#)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Footprint compar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Line item</text:p>
          </table:table-cell>
        </table:table-row>
        <table:table-row table:style-name="ro1">
          <table:table-cell/>
          <table:table-cell table:formula="of:=[$CopyFromThing.I2]">
            <text:p/>
          </table:table-cell>
          <table:table-cell table:formula="of:=IF(ISNUMBER(SEARCH(&quot;R&quot;;[$CopyFromThing.A2]));&quot;R&quot;;&quot;&quot;)">
            <text:p/>
          </table:table-cell>
          <table:table-cell table:formula="of:=IF(ISNUMBER(SEARCH(&quot;C&quot;;[$CopyFromThing.A2]));&quot;C&quot;;&quot;&quot;)" office:value-type="string" office:string-value="C" calcext:value-type="string">
            <text:p>C</text:p>
          </table:table-cell>
          <table:table-cell table:formula="of:=IF([.D6]&amp;[.C6]&lt;&gt;&quot;&quot;;[.N6];&quot;&quot;)" office:value-type="string" office:string-value="1206" calcext:value-type="string">
            <text:p>1206</text:p>
          </table:table-cell>
          <table:table-cell table:style-name="ce13" table:formula="of:=[.C6]&amp;[.D6]&amp;[.E6]&amp;&quot;__&quot;&amp;[$CopyFromThing.I2]&amp;&quot;__&quot;&amp;[$CopyFromThing.B2]" office:value-type="string" office:string-value="C1206____330p" calcext:value-type="string">
            <text:p>C1206____330p</text:p>
          </table:table-cell>
          <table:table-cell table:formula="of:=[$CopyFromThing.D2]" office:value-type="string" office:string-value="AADuffy:Resistor_1206_ThinEnds" calcext:value-type="string">
            <text:p>AADuffy:Resistor_1206_ThinEnds</text:p>
          </table:table-cell>
          <table:table-cell table:formula="of:=FIND(&quot;_&quot;;[.G6])" office:value-type="float" office:value="17" calcext:value-type="float">
            <text:p>17</text:p>
          </table:table-cell>
          <table:table-cell table:formula="of:=IF(ISNUMBER([.H6]);RIGHT([.G6];LEN([.G6])-[.H6]);RIGHT([.G6];LEN([.G6])-FIND(&quot;:&quot;;[.G6])))" office:value-type="string" office:string-value="1206_ThinEnds" calcext:value-type="string">
            <text:p>1206_ThinEnds</text:p>
          </table:table-cell>
          <table:table-cell table:style-name="ce16" table:formula="of:=MATCH([.I6];{&quot;0603&quot;;&quot;1206&quot;};0)" office:value-type="string" office:string-value="" calcext:value-type="error">
            <text:p>#N/A</text:p>
          </table:table-cell>
          <table:table-cell table:style-name="ce16" table:formula="of:=RIGHT([.G6];LEN([.G6])-FIND(&quot;:&quot;;[.G6]))" office:value-type="string" office:string-value="Resistor_1206_ThinEnds" calcext:value-type="string">
            <text:p>Resistor_1206_ThinEnds</text:p>
          </table:table-cell>
          <table:table-cell table:formula="of:=SEARCH(&quot;0603&quot;;[.G6])" office:value-type="string" office:string-value="" calcext:value-type="error">
            <text:p>#VALUE!</text:p>
          </table:table-cell>
          <table:table-cell table:formula="of:=SEARCH(&quot;1206&quot;;[.G6])" office:value-type="float" office:value="18" calcext:value-type="float">
            <text:p>18</text:p>
          </table:table-cell>
          <table:table-cell table:formula="of:=IF(ISNUMBER([.M6]);&quot;1206&quot;;IF(ISNUMBER([.L6]);&quot;0603&quot;;[.K6]))" office:value-type="string" office:string-value="1206" calcext:value-type="string">
            <text:p>1206</text:p>
          </table:table-cell>
          <table:table-cell table:formula="of:=IF(ISNUMBER([$CopyFromThing.E2]*1);[$CopyFromThing.E2]*1;0)" office:value-type="float" office:value="3" calcext:value-type="float">
            <text:p>3</text:p>
          </table:table-cell>
          <table:table-cell table:formula="of:=VLOOKUP([.F6];[$Supplier_Lookup.$O$7:.$P$104];2;0)" office:value-type="float" office:value="55" calcext:value-type="float">
            <text:p>55</text:p>
          </table:table-cell>
          <table:table-cell table:formula="of:=IF(INDIRECT(&quot;Supplier_Lookup.&quot;&amp;[.Q$3]&amp;[.$P6])&lt;&gt;&quot;&quot;;INDIRECT(&quot;Supplier_Lookup.L&quot;&amp;[.$P6]);INDIRECT(&quot;Supplier_Lookup.&quot;&amp;[.Q$4]&amp;[.$P6]))" office:value-type="string" office:string-value="330p" calcext:value-type="string">
            <text:p>330p</text:p>
          </table:table-cell>
          <table:table-cell table:formula="of:=INDIRECT(&quot;Supplier_Lookup.&quot;&amp;[.R$4]&amp;[.$P6])" office:value-type="string" office:string-value="1206" calcext:value-type="string">
            <text:p>1206</text:p>
          </table:table-cell>
          <table:table-cell table:formula="of:=INDIRECT(&quot;Supplier_Lookup.&quot;&amp;[.S$4]&amp;[.$P6])" office:value-type="float" office:value="0" calcext:value-type="float">
            <text:p>0</text:p>
          </table:table-cell>
          <table:table-cell table:formula="of:=INDIRECT(&quot;Supplier_Lookup.&quot;&amp;[.T$4]&amp;[.$P6])" office:value-type="string" office:string-value="muRata" calcext:value-type="string">
            <text:p>muRata</text:p>
          </table:table-cell>
          <table:table-cell table:formula="of:=INDIRECT(&quot;Supplier_Lookup.&quot;&amp;[.U$4]&amp;[.$P6])" office:value-type="string" office:string-value="GRM31A5C3A331JWA1D" calcext:value-type="string">
            <text:p>GRM31A5C3A331JWA1D</text:p>
          </table:table-cell>
          <table:table-cell table:formula="of:=INDIRECT(&quot;Supplier_Lookup.&quot;&amp;[.V$4]&amp;[.$P6])" office:value-type="string" office:string-value="Digikey" calcext:value-type="string">
            <text:p>Digikey</text:p>
          </table:table-cell>
          <table:table-cell table:formula="of:=INDIRECT(&quot;Supplier_Lookup.&quot;&amp;[.W$4]&amp;[.$P6])" office:value-type="string" office:string-value="490-GRM31A5C3A331JWA1DCT-ND" calcext:value-type="string">
            <text:p>490-GRM31A5C3A331JWA1DCT-ND</text:p>
          </table:table-cell>
          <table:table-cell table:formula="of:=INDIRECT(&quot;Supplier_Lookup.&quot;&amp;[.X$4]&amp;[.$P6])" office:value-type="string" office:string-value="https://www.digikey.com/en/products/detail/murata-electronics/GRM31A5C3A331JWA1D/10692922" calcext:value-type="string">
            <text:p>https://www.digikey.com/en/products/detail/murata-electronics/GRM31A5C3A331JWA1D/10692922</text:p>
          </table:table-cell>
          <table:table-cell table:formula="of:=INDIRECT(&quot;Supplier_Lookup.&quot;&amp;[.Y$4]&amp;[.$P6])" office:value-type="float" office:value="0.164" calcext:value-type="float">
            <text:p>0.164</text:p>
          </table:table-cell>
          <table:table-cell table:formula="of:=IF(INDIRECT(&quot;Supplier_Lookup.&quot;&amp;[.Z$4]&amp;[.$P6])=&quot;&quot;;&quot;&quot;;INDIRECT(&quot;Supplier_Lookup.&quot;&amp;[.Z$4]&amp;[.$P6]))">
            <text:p/>
          </table:table-cell>
          <table:table-cell table:formula="of:=IF(ISNUMBER([.Y6]);[.Y6];0)" office:value-type="float" office:value="0.164" calcext:value-type="float">
            <text:p>0.164</text:p>
          </table:table-cell>
          <table:table-cell table:formula="of:=[.AA6]*[.O6]" office:value-type="float" office:value="0.492" calcext:value-type="float">
            <text:p>0.492</text:p>
          </table:table-cell>
          <table:table-cell table:formula="of:=[.N6]&amp;&quot;-&quot;&amp;[.R6]" office:value-type="string" office:string-value="1206-1206" calcext:value-type="string">
            <text:p>1206-1206</text:p>
          </table:table-cell>
          <table:table-cell table:formula="of:=[$CopyFromThing.A2]" office:value-type="string" office:string-value="C2,C3,C4" calcext:value-type="string">
            <text:p>C2,C3,C4</text:p>
          </table:table-cell>
          <table:table-cell table:formula="of:=[$CopyFromThing.G2]" office:value-type="string" office:string-value="1" calcext:value-type="string">
            <text:p>1</text:p>
          </table:table-cell>
        </table:table-row>
        <table:table-row table:style-name="ro1">
          <table:table-cell/>
          <table:table-cell table:formula="of:=[$CopyFromThing.I3]">
            <text:p/>
          </table:table-cell>
          <table:table-cell table:formula="of:=IF(ISNUMBER(SEARCH(&quot;R&quot;;[$CopyFromThing.A3]));&quot;R&quot;;&quot;&quot;)">
            <text:p/>
          </table:table-cell>
          <table:table-cell table:formula="of:=IF(ISNUMBER(SEARCH(&quot;C&quot;;[$CopyFromThing.A3]));&quot;C&quot;;&quot;&quot;)" office:value-type="string" office:string-value="C" calcext:value-type="string">
            <text:p>C</text:p>
          </table:table-cell>
          <table:table-cell table:formula="of:=IF([.D7]&amp;[.C7]&lt;&gt;&quot;&quot;;[.N7];&quot;&quot;)" office:value-type="string" office:string-value="0603" calcext:value-type="string">
            <text:p>0603</text:p>
          </table:table-cell>
          <table:table-cell table:style-name="ce13" table:formula="of:=[.C7]&amp;[.D7]&amp;[.E7]&amp;&quot;__&quot;&amp;[$CopyFromThing.I3]&amp;&quot;__&quot;&amp;[$CopyFromThing.B3]" office:value-type="string" office:string-value="C0603____100p" calcext:value-type="string">
            <text:p>C0603____100p</text:p>
          </table:table-cell>
          <table:table-cell table:formula="of:=[$CopyFromThing.D3]" office:value-type="string" office:string-value="AADuffy:Cap_SMD_0603" calcext:value-type="string">
            <text:p>AADuffy:Cap_SMD_0603</text:p>
          </table:table-cell>
          <table:table-cell table:formula="of:=FIND(&quot;_&quot;;[.G7])" office:value-type="float" office:value="12" calcext:value-type="float">
            <text:p>12</text:p>
          </table:table-cell>
          <table:table-cell table:formula="of:=IF(ISNUMBER([.H7]);RIGHT([.G7];LEN([.G7])-[.H7]);RIGHT([.G7];LEN([.G7])-FIND(&quot;:&quot;;[.G7])))" office:value-type="string" office:string-value="SMD_0603" calcext:value-type="string">
            <text:p>SMD_0603</text:p>
          </table:table-cell>
          <table:table-cell table:style-name="ce16" table:formula="of:=MATCH([.I7];{&quot;0603&quot;;&quot;1206&quot;};0)" office:value-type="string" office:string-value="" calcext:value-type="error">
            <text:p>#N/A</text:p>
          </table:table-cell>
          <table:table-cell table:style-name="ce16" table:formula="of:=RIGHT([.G7];LEN([.G7])-FIND(&quot;:&quot;;[.G7]))" office:value-type="string" office:string-value="Cap_SMD_0603" calcext:value-type="string">
            <text:p>Cap_SMD_0603</text:p>
          </table:table-cell>
          <table:table-cell table:formula="of:=SEARCH(&quot;0603&quot;;[.G7])" office:value-type="float" office:value="17" calcext:value-type="float">
            <text:p>17</text:p>
          </table:table-cell>
          <table:table-cell table:formula="of:=SEARCH(&quot;1206&quot;;[.G7])" office:value-type="string" office:string-value="" calcext:value-type="error">
            <text:p>#VALUE!</text:p>
          </table:table-cell>
          <table:table-cell table:formula="of:=IF(ISNUMBER([.M7]);&quot;1206&quot;;IF(ISNUMBER([.L7]);&quot;0603&quot;;[.K7]))" office:value-type="string" office:string-value="0603" calcext:value-type="string">
            <text:p>0603</text:p>
          </table:table-cell>
          <table:table-cell table:formula="of:=IF(ISNUMBER([$CopyFromThing.E3]*1);[$CopyFromThing.E3]*1;0)" office:value-type="float" office:value="4" calcext:value-type="float">
            <text:p>4</text:p>
          </table:table-cell>
          <table:table-cell table:formula="of:=VLOOKUP([.F7];[$Supplier_Lookup.$O$7:.$P$104];2;0)" office:value-type="float" office:value="44" calcext:value-type="float">
            <text:p>44</text:p>
          </table:table-cell>
          <table:table-cell table:formula="of:=IF(INDIRECT(&quot;Supplier_Lookup.&quot;&amp;[.Q$3]&amp;[.$P7])&lt;&gt;&quot;&quot;;INDIRECT(&quot;Supplier_Lookup.L&quot;&amp;[.$P7]);INDIRECT(&quot;Supplier_Lookup.&quot;&amp;[.Q$4]&amp;[.$P7]))" office:value-type="string" office:string-value="100p" calcext:value-type="string">
            <text:p>100p</text:p>
          </table:table-cell>
          <table:table-cell table:formula="of:=INDIRECT(&quot;Supplier_Lookup.&quot;&amp;[.R$4]&amp;[.$P7])" office:value-type="string" office:string-value="0603" calcext:value-type="string">
            <text:p>0603</text:p>
          </table:table-cell>
          <table:table-cell table:formula="of:=INDIRECT(&quot;Supplier_Lookup.&quot;&amp;[.S$4]&amp;[.$P7])" office:value-type="float" office:value="0" calcext:value-type="float">
            <text:p>0</text:p>
          </table:table-cell>
          <table:table-cell table:formula="of:=INDIRECT(&quot;Supplier_Lookup.&quot;&amp;[.T$4]&amp;[.$P7])" office:value-type="string" office:string-value="Yaego" calcext:value-type="string">
            <text:p>Yaego</text:p>
          </table:table-cell>
          <table:table-cell table:formula="of:=INDIRECT(&quot;Supplier_Lookup.&quot;&amp;[.U$4]&amp;[.$P7])" office:value-type="string" office:string-value="CC0603FRNPO9BN101" calcext:value-type="string">
            <text:p>CC0603FRNPO9BN101</text:p>
          </table:table-cell>
          <table:table-cell table:formula="of:=INDIRECT(&quot;Supplier_Lookup.&quot;&amp;[.V$4]&amp;[.$P7])" office:value-type="string" office:string-value="LCSC" calcext:value-type="string">
            <text:p>LCSC</text:p>
          </table:table-cell>
          <table:table-cell table:formula="of:=INDIRECT(&quot;Supplier_Lookup.&quot;&amp;[.W$4]&amp;[.$P7])" office:value-type="string" office:string-value="C513648" calcext:value-type="string">
            <text:p>C513648</text:p>
          </table:table-cell>
          <table:table-cell table:formula="of:=INDIRECT(&quot;Supplier_Lookup.&quot;&amp;[.X$4]&amp;[.$P7])" office:value-type="string" office:string-value="https://www.lcsc.com/product-detail/C513648.html" calcext:value-type="string">
            <text:p>https://www.lcsc.com/product-detail/C513648.html</text:p>
          </table:table-cell>
          <table:table-cell table:formula="of:=INDIRECT(&quot;Supplier_Lookup.&quot;&amp;[.Y$4]&amp;[.$P7])" office:value-type="float" office:value="0.0089" calcext:value-type="float">
            <text:p>0.0089</text:p>
          </table:table-cell>
          <table:table-cell table:formula="of:=IF(INDIRECT(&quot;Supplier_Lookup.&quot;&amp;[.Z$4]&amp;[.$P7])=&quot;&quot;;&quot;&quot;;INDIRECT(&quot;Supplier_Lookup.&quot;&amp;[.Z$4]&amp;[.$P7]))">
            <text:p/>
          </table:table-cell>
          <table:table-cell table:formula="of:=IF(ISNUMBER([.Y7]);[.Y7];0)" office:value-type="float" office:value="0.0089" calcext:value-type="float">
            <text:p>0.0089</text:p>
          </table:table-cell>
          <table:table-cell table:formula="of:=[.AA7]*[.O7]" office:value-type="float" office:value="0.0356" calcext:value-type="float">
            <text:p>0.0356</text:p>
          </table:table-cell>
          <table:table-cell table:formula="of:=[.N7]&amp;&quot;-&quot;&amp;[.R7]" office:value-type="string" office:string-value="0603-0603" calcext:value-type="string">
            <text:p>0603-0603</text:p>
          </table:table-cell>
          <table:table-cell table:formula="of:=[$CopyFromThing.A3]" office:value-type="string" office:string-value="C5,C14,C43,C44" calcext:value-type="string">
            <text:p>C5,C14,C43,C44</text:p>
          </table:table-cell>
          <table:table-cell table:formula="of:=[$CopyFromThing.G3]" office:value-type="string" office:string-value="2" calcext:value-type="string">
            <text:p>2</text:p>
          </table:table-cell>
        </table:table-row>
        <table:table-row table:style-name="ro1">
          <table:table-cell/>
          <table:table-cell table:formula="of:=[$CopyFromThing.I4]">
            <text:p/>
          </table:table-cell>
          <table:table-cell table:formula="of:=IF(ISNUMBER(SEARCH(&quot;R&quot;;[$CopyFromThing.A4]));&quot;R&quot;;&quot;&quot;)">
            <text:p/>
          </table:table-cell>
          <table:table-cell table:formula="of:=IF(ISNUMBER(SEARCH(&quot;C&quot;;[$CopyFromThing.A4]));&quot;C&quot;;&quot;&quot;)" office:value-type="string" office:string-value="C" calcext:value-type="string">
            <text:p>C</text:p>
          </table:table-cell>
          <table:table-cell table:formula="of:=IF([.D8]&amp;[.C8]&lt;&gt;&quot;&quot;;[.N8];&quot;&quot;)" office:value-type="string" office:string-value="0603" calcext:value-type="string">
            <text:p>0603</text:p>
          </table:table-cell>
          <table:table-cell table:style-name="ce13" table:formula="of:=[.C8]&amp;[.D8]&amp;[.E8]&amp;&quot;__&quot;&amp;[$CopyFromThing.I4]&amp;&quot;__&quot;&amp;[$CopyFromThing.B4]" office:value-type="string" office:string-value="C0603____1n" calcext:value-type="string">
            <text:p>C0603____1n</text:p>
          </table:table-cell>
          <table:table-cell table:formula="of:=[$CopyFromThing.D4]" office:value-type="string" office:string-value="AADuffy:Cap_SMD_0603" calcext:value-type="string">
            <text:p>AADuffy:Cap_SMD_0603</text:p>
          </table:table-cell>
          <table:table-cell table:formula="of:=FIND(&quot;_&quot;;[.G8])" office:value-type="float" office:value="12" calcext:value-type="float">
            <text:p>12</text:p>
          </table:table-cell>
          <table:table-cell table:formula="of:=IF(ISNUMBER([.H8]);RIGHT([.G8];LEN([.G8])-[.H8]);RIGHT([.G8];LEN([.G8])-FIND(&quot;:&quot;;[.G8])))" office:value-type="string" office:string-value="SMD_0603" calcext:value-type="string">
            <text:p>SMD_0603</text:p>
          </table:table-cell>
          <table:table-cell table:style-name="ce16" table:formula="of:=MATCH([.I8];{&quot;0603&quot;;&quot;1206&quot;};0)" office:value-type="string" office:string-value="" calcext:value-type="error">
            <text:p>#N/A</text:p>
          </table:table-cell>
          <table:table-cell table:style-name="ce16" table:formula="of:=RIGHT([.G8];LEN([.G8])-FIND(&quot;:&quot;;[.G8]))" office:value-type="string" office:string-value="Cap_SMD_0603" calcext:value-type="string">
            <text:p>Cap_SMD_0603</text:p>
          </table:table-cell>
          <table:table-cell table:formula="of:=SEARCH(&quot;0603&quot;;[.G8])" office:value-type="float" office:value="17" calcext:value-type="float">
            <text:p>17</text:p>
          </table:table-cell>
          <table:table-cell table:formula="of:=SEARCH(&quot;1206&quot;;[.G8])" office:value-type="string" office:string-value="" calcext:value-type="error">
            <text:p>#VALUE!</text:p>
          </table:table-cell>
          <table:table-cell table:formula="of:=IF(ISNUMBER([.M8]);&quot;1206&quot;;IF(ISNUMBER([.L8]);&quot;0603&quot;;[.K8]))" office:value-type="string" office:string-value="0603" calcext:value-type="string">
            <text:p>0603</text:p>
          </table:table-cell>
          <table:table-cell table:formula="of:=IF(ISNUMBER([$CopyFromThing.E4]*1);[$CopyFromThing.E4]*1;0)" office:value-type="float" office:value="8" calcext:value-type="float">
            <text:p>8</text:p>
          </table:table-cell>
          <table:table-cell table:formula="of:=VLOOKUP([.F8];[$Supplier_Lookup.$O$7:.$P$104];2;0)" office:value-type="float" office:value="42" calcext:value-type="float">
            <text:p>42</text:p>
          </table:table-cell>
          <table:table-cell table:formula="of:=IF(INDIRECT(&quot;Supplier_Lookup.&quot;&amp;[.Q$3]&amp;[.$P8])&lt;&gt;&quot;&quot;;INDIRECT(&quot;Supplier_Lookup.L&quot;&amp;[.$P8]);INDIRECT(&quot;Supplier_Lookup.&quot;&amp;[.Q$4]&amp;[.$P8]))" office:value-type="string" office:string-value="1n" calcext:value-type="string">
            <text:p>1n</text:p>
          </table:table-cell>
          <table:table-cell table:formula="of:=INDIRECT(&quot;Supplier_Lookup.&quot;&amp;[.R$4]&amp;[.$P8])" office:value-type="string" office:string-value="0603" calcext:value-type="string">
            <text:p>0603</text:p>
          </table:table-cell>
          <table:table-cell table:formula="of:=INDIRECT(&quot;Supplier_Lookup.&quot;&amp;[.S$4]&amp;[.$P8])" office:value-type="float" office:value="0" calcext:value-type="float">
            <text:p>0</text:p>
          </table:table-cell>
          <table:table-cell table:formula="of:=INDIRECT(&quot;Supplier_Lookup.&quot;&amp;[.T$4]&amp;[.$P8])" office:value-type="string" office:string-value="Yaego" calcext:value-type="string">
            <text:p>Yaego</text:p>
          </table:table-cell>
          <table:table-cell table:formula="of:=INDIRECT(&quot;Supplier_Lookup.&quot;&amp;[.U$4]&amp;[.$P8])" office:value-type="string" office:string-value="CC0603FRNPO9BN102" calcext:value-type="string">
            <text:p>CC0603FRNPO9BN102</text:p>
          </table:table-cell>
          <table:table-cell table:formula="of:=INDIRECT(&quot;Supplier_Lookup.&quot;&amp;[.V$4]&amp;[.$P8])" office:value-type="string" office:string-value="LCSC" calcext:value-type="string">
            <text:p>LCSC</text:p>
          </table:table-cell>
          <table:table-cell table:formula="of:=INDIRECT(&quot;Supplier_Lookup.&quot;&amp;[.W$4]&amp;[.$P8])" office:value-type="string" office:string-value="C309468" calcext:value-type="string">
            <text:p>C309468</text:p>
          </table:table-cell>
          <table:table-cell table:formula="of:=INDIRECT(&quot;Supplier_Lookup.&quot;&amp;[.X$4]&amp;[.$P8])" office:value-type="string" office:string-value="https://www.lcsc.com/product-detail/C309468.html" calcext:value-type="string">
            <text:p>https://www.lcsc.com/product-detail/C309468.html</text:p>
          </table:table-cell>
          <table:table-cell table:formula="of:=INDIRECT(&quot;Supplier_Lookup.&quot;&amp;[.Y$4]&amp;[.$P8])" office:value-type="float" office:value="0.0138" calcext:value-type="float">
            <text:p>0.0138</text:p>
          </table:table-cell>
          <table:table-cell table:formula="of:=IF(INDIRECT(&quot;Supplier_Lookup.&quot;&amp;[.Z$4]&amp;[.$P8])=&quot;&quot;;&quot;&quot;;INDIRECT(&quot;Supplier_Lookup.&quot;&amp;[.Z$4]&amp;[.$P8]))">
            <text:p/>
          </table:table-cell>
          <table:table-cell table:formula="of:=IF(ISNUMBER([.Y8]);[.Y8];0)" office:value-type="float" office:value="0.0138" calcext:value-type="float">
            <text:p>0.0138</text:p>
          </table:table-cell>
          <table:table-cell table:formula="of:=[.AA8]*[.O8]" office:value-type="float" office:value="0.1104" calcext:value-type="float">
            <text:p>0.1104</text:p>
          </table:table-cell>
          <table:table-cell table:formula="of:=[.N8]&amp;&quot;-&quot;&amp;[.R8]" office:value-type="string" office:string-value="0603-0603" calcext:value-type="string">
            <text:p>0603-0603</text:p>
          </table:table-cell>
          <table:table-cell table:formula="of:=[$CopyFromThing.A4]" office:value-type="string" office:string-value="C6,C10,C13,C85,C86,C87,C88,C95" calcext:value-type="string">
            <text:p>C6,C10,C13,C85,C86,C87,C88,C95</text:p>
          </table:table-cell>
          <table:table-cell table:formula="of:=[$CopyFromThing.G4]" office:value-type="string" office:string-value="3" calcext:value-type="string">
            <text:p>3</text:p>
          </table:table-cell>
        </table:table-row>
        <table:table-row table:style-name="ro1">
          <table:table-cell/>
          <table:table-cell table:formula="of:=[$CopyFromThing.I5]">
            <text:p/>
          </table:table-cell>
          <table:table-cell table:formula="of:=IF(ISNUMBER(SEARCH(&quot;R&quot;;[$CopyFromThing.A5]));&quot;R&quot;;&quot;&quot;)">
            <text:p/>
          </table:table-cell>
          <table:table-cell table:formula="of:=IF(ISNUMBER(SEARCH(&quot;C&quot;;[$CopyFromThing.A5]));&quot;C&quot;;&quot;&quot;)" office:value-type="string" office:string-value="C" calcext:value-type="string">
            <text:p>C</text:p>
          </table:table-cell>
          <table:table-cell table:formula="of:=IF([.D9]&amp;[.C9]&lt;&gt;&quot;&quot;;[.N9];&quot;&quot;)" office:value-type="string" office:string-value="0603" calcext:value-type="string">
            <text:p>0603</text:p>
          </table:table-cell>
          <table:table-cell table:style-name="ce13" table:formula="of:=[.C9]&amp;[.D9]&amp;[.E9]&amp;&quot;__&quot;&amp;[$CopyFromThing.I5]&amp;&quot;__&quot;&amp;[$CopyFromThing.B5]" office:value-type="string" office:string-value="C0603____33n" calcext:value-type="string">
            <text:p>C0603____33n</text:p>
          </table:table-cell>
          <table:table-cell table:formula="of:=[$CopyFromThing.D5]" office:value-type="string" office:string-value="AADuffy:Cap_SMD_0603" calcext:value-type="string">
            <text:p>AADuffy:Cap_SMD_0603</text:p>
          </table:table-cell>
          <table:table-cell table:formula="of:=FIND(&quot;_&quot;;[.G9])" office:value-type="float" office:value="12" calcext:value-type="float">
            <text:p>12</text:p>
          </table:table-cell>
          <table:table-cell table:formula="of:=IF(ISNUMBER([.H9]);RIGHT([.G9];LEN([.G9])-[.H9]);RIGHT([.G9];LEN([.G9])-FIND(&quot;:&quot;;[.G9])))" office:value-type="string" office:string-value="SMD_0603" calcext:value-type="string">
            <text:p>SMD_0603</text:p>
          </table:table-cell>
          <table:table-cell table:style-name="ce16" table:formula="of:=MATCH([.I9];{&quot;0603&quot;;&quot;1206&quot;};0)" office:value-type="string" office:string-value="" calcext:value-type="error">
            <text:p>#N/A</text:p>
          </table:table-cell>
          <table:table-cell table:style-name="ce16" table:formula="of:=RIGHT([.G9];LEN([.G9])-FIND(&quot;:&quot;;[.G9]))" office:value-type="string" office:string-value="Cap_SMD_0603" calcext:value-type="string">
            <text:p>Cap_SMD_0603</text:p>
          </table:table-cell>
          <table:table-cell table:formula="of:=SEARCH(&quot;0603&quot;;[.G9])" office:value-type="float" office:value="17" calcext:value-type="float">
            <text:p>17</text:p>
          </table:table-cell>
          <table:table-cell table:formula="of:=SEARCH(&quot;1206&quot;;[.G9])" office:value-type="string" office:string-value="" calcext:value-type="error">
            <text:p>#VALUE!</text:p>
          </table:table-cell>
          <table:table-cell table:formula="of:=IF(ISNUMBER([.M9]);&quot;1206&quot;;IF(ISNUMBER([.L9]);&quot;0603&quot;;[.K9]))" office:value-type="string" office:string-value="0603" calcext:value-type="string">
            <text:p>0603</text:p>
          </table:table-cell>
          <table:table-cell table:formula="of:=IF(ISNUMBER([$CopyFromThing.E5]*1);[$CopyFromThing.E5]*1;0)" office:value-type="float" office:value="1" calcext:value-type="float">
            <text:p>1</text:p>
          </table:table-cell>
          <table:table-cell table:formula="of:=VLOOKUP([.F9];[$Supplier_Lookup.$O$7:.$P$104];2;0)" office:value-type="float" office:value="49" calcext:value-type="float">
            <text:p>49</text:p>
          </table:table-cell>
          <table:table-cell table:formula="of:=IF(INDIRECT(&quot;Supplier_Lookup.&quot;&amp;[.Q$3]&amp;[.$P9])&lt;&gt;&quot;&quot;;INDIRECT(&quot;Supplier_Lookup.L&quot;&amp;[.$P9]);INDIRECT(&quot;Supplier_Lookup.&quot;&amp;[.Q$4]&amp;[.$P9]))" office:value-type="string" office:string-value="33n" calcext:value-type="string">
            <text:p>33n</text:p>
          </table:table-cell>
          <table:table-cell table:formula="of:=INDIRECT(&quot;Supplier_Lookup.&quot;&amp;[.R$4]&amp;[.$P9])" office:value-type="string" office:string-value="0603" calcext:value-type="string">
            <text:p>0603</text:p>
          </table:table-cell>
          <table:table-cell table:formula="of:=INDIRECT(&quot;Supplier_Lookup.&quot;&amp;[.S$4]&amp;[.$P9])" office:value-type="float" office:value="0" calcext:value-type="float">
            <text:p>0</text:p>
          </table:table-cell>
          <table:table-cell table:formula="of:=INDIRECT(&quot;Supplier_Lookup.&quot;&amp;[.T$4]&amp;[.$P9])" office:value-type="string" office:string-value="muRata" calcext:value-type="string">
            <text:p>muRata</text:p>
          </table:table-cell>
          <table:table-cell table:formula="of:=INDIRECT(&quot;Supplier_Lookup.&quot;&amp;[.U$4]&amp;[.$P9])" office:value-type="string" office:string-value="GRM1887U1A303JA01J" calcext:value-type="string">
            <text:p>GRM1887U1A303JA01J</text:p>
          </table:table-cell>
          <table:table-cell table:formula="of:=INDIRECT(&quot;Supplier_Lookup.&quot;&amp;[.V$4]&amp;[.$P9])" office:value-type="string" office:string-value="Digikey" calcext:value-type="string">
            <text:p>Digikey</text:p>
          </table:table-cell>
          <table:table-cell table:formula="of:=INDIRECT(&quot;Supplier_Lookup.&quot;&amp;[.W$4]&amp;[.$P9])" office:value-type="string" office:string-value="490-GRM1887U1A303JA01JCT-ND" calcext:value-type="string">
            <text:p>490-GRM1887U1A303JA01JCT-ND</text:p>
          </table:table-cell>
          <table:table-cell table:formula="of:=INDIRECT(&quot;Supplier_Lookup.&quot;&amp;[.X$4]&amp;[.$P9])" office:value-type="string" office:string-value="https://www.digikey.com/en/products/detail/murata-electronics/GRM1887U1A303JA01J/17862050" calcext:value-type="string">
            <text:p>https://www.digikey.com/en/products/detail/murata-electronics/GRM1887U1A303JA01J/17862050</text:p>
          </table:table-cell>
          <table:table-cell table:formula="of:=INDIRECT(&quot;Supplier_Lookup.&quot;&amp;[.Y$4]&amp;[.$P9])" office:value-type="float" office:value="0.137" calcext:value-type="float">
            <text:p>0.137</text:p>
          </table:table-cell>
          <table:table-cell table:formula="of:=IF(INDIRECT(&quot;Supplier_Lookup.&quot;&amp;[.Z$4]&amp;[.$P9])=&quot;&quot;;&quot;&quot;;INDIRECT(&quot;Supplier_Lookup.&quot;&amp;[.Z$4]&amp;[.$P9]))">
            <text:p/>
          </table:table-cell>
          <table:table-cell table:formula="of:=IF(ISNUMBER([.Y9]);[.Y9];0)" office:value-type="float" office:value="0.137" calcext:value-type="float">
            <text:p>0.137</text:p>
          </table:table-cell>
          <table:table-cell table:formula="of:=[.AA9]*[.O9]" office:value-type="float" office:value="0.137" calcext:value-type="float">
            <text:p>0.137</text:p>
          </table:table-cell>
          <table:table-cell table:formula="of:=[.N9]&amp;&quot;-&quot;&amp;[.R9]" office:value-type="string" office:string-value="0603-0603" calcext:value-type="string">
            <text:p>0603-0603</text:p>
          </table:table-cell>
          <table:table-cell table:formula="of:=[$CopyFromThing.A5]" office:value-type="string" office:string-value="C7" calcext:value-type="string">
            <text:p>C7</text:p>
          </table:table-cell>
          <table:table-cell table:formula="of:=[$CopyFromThing.G5]" office:value-type="string" office:string-value="4" calcext:value-type="string">
            <text:p>4</text:p>
          </table:table-cell>
        </table:table-row>
        <table:table-row table:style-name="ro1">
          <table:table-cell/>
          <table:table-cell table:formula="of:=[$CopyFromThing.I6]">
            <text:p/>
          </table:table-cell>
          <table:table-cell table:formula="of:=IF(ISNUMBER(SEARCH(&quot;R&quot;;[$CopyFromThing.A6]));&quot;R&quot;;&quot;&quot;)">
            <text:p/>
          </table:table-cell>
          <table:table-cell table:formula="of:=IF(ISNUMBER(SEARCH(&quot;C&quot;;[$CopyFromThing.A6]));&quot;C&quot;;&quot;&quot;)" office:value-type="string" office:string-value="C" calcext:value-type="string">
            <text:p>C</text:p>
          </table:table-cell>
          <table:table-cell table:formula="of:=IF([.D10]&amp;[.C10]&lt;&gt;&quot;&quot;;[.N10];&quot;&quot;)" office:value-type="string" office:string-value="0603" calcext:value-type="string">
            <text:p>0603</text:p>
          </table:table-cell>
          <table:table-cell table:style-name="ce13" table:formula="of:=[.C10]&amp;[.D10]&amp;[.E10]&amp;&quot;__&quot;&amp;[$CopyFromThing.I6]&amp;&quot;__&quot;&amp;[$CopyFromThing.B6]" office:value-type="string" office:string-value="C0603____10n" calcext:value-type="string">
            <text:p>C0603____10n</text:p>
          </table:table-cell>
          <table:table-cell table:formula="of:=[$CopyFromThing.D6]" office:value-type="string" office:string-value="AADuffy:Cap_SMD_0603" calcext:value-type="string">
            <text:p>AADuffy:Cap_SMD_0603</text:p>
          </table:table-cell>
          <table:table-cell table:formula="of:=FIND(&quot;_&quot;;[.G10])" office:value-type="float" office:value="12" calcext:value-type="float">
            <text:p>12</text:p>
          </table:table-cell>
          <table:table-cell table:formula="of:=IF(ISNUMBER([.H10]);RIGHT([.G10];LEN([.G10])-[.H10]);RIGHT([.G10];LEN([.G10])-FIND(&quot;:&quot;;[.G10])))" office:value-type="string" office:string-value="SMD_0603" calcext:value-type="string">
            <text:p>SMD_0603</text:p>
          </table:table-cell>
          <table:table-cell table:style-name="ce16" table:formula="of:=MATCH([.I10];{&quot;0603&quot;;&quot;1206&quot;};0)" office:value-type="string" office:string-value="" calcext:value-type="error">
            <text:p>#N/A</text:p>
          </table:table-cell>
          <table:table-cell table:style-name="ce16" table:formula="of:=RIGHT([.G10];LEN([.G10])-FIND(&quot;:&quot;;[.G10]))" office:value-type="string" office:string-value="Cap_SMD_0603" calcext:value-type="string">
            <text:p>Cap_SMD_0603</text:p>
          </table:table-cell>
          <table:table-cell table:formula="of:=SEARCH(&quot;0603&quot;;[.G10])" office:value-type="float" office:value="17" calcext:value-type="float">
            <text:p>17</text:p>
          </table:table-cell>
          <table:table-cell table:formula="of:=SEARCH(&quot;1206&quot;;[.G10])" office:value-type="string" office:string-value="" calcext:value-type="error">
            <text:p>#VALUE!</text:p>
          </table:table-cell>
          <table:table-cell table:formula="of:=IF(ISNUMBER([.M10]);&quot;1206&quot;;IF(ISNUMBER([.L10]);&quot;0603&quot;;[.K10]))" office:value-type="string" office:string-value="0603" calcext:value-type="string">
            <text:p>0603</text:p>
          </table:table-cell>
          <table:table-cell table:formula="of:=IF(ISNUMBER([$CopyFromThing.E6]*1);[$CopyFromThing.E6]*1;0)" office:value-type="float" office:value="10" calcext:value-type="float">
            <text:p>10</text:p>
          </table:table-cell>
          <table:table-cell table:formula="of:=VLOOKUP([.F10];[$Supplier_Lookup.$O$7:.$P$104];2;0)" office:value-type="float" office:value="43" calcext:value-type="float">
            <text:p>43</text:p>
          </table:table-cell>
          <table:table-cell table:formula="of:=IF(INDIRECT(&quot;Supplier_Lookup.&quot;&amp;[.Q$3]&amp;[.$P10])&lt;&gt;&quot;&quot;;INDIRECT(&quot;Supplier_Lookup.L&quot;&amp;[.$P10]);INDIRECT(&quot;Supplier_Lookup.&quot;&amp;[.Q$4]&amp;[.$P10]))" office:value-type="string" office:string-value="10n" calcext:value-type="string">
            <text:p>10n</text:p>
          </table:table-cell>
          <table:table-cell table:formula="of:=INDIRECT(&quot;Supplier_Lookup.&quot;&amp;[.R$4]&amp;[.$P10])" office:value-type="string" office:string-value="0603" calcext:value-type="string">
            <text:p>0603</text:p>
          </table:table-cell>
          <table:table-cell table:formula="of:=INDIRECT(&quot;Supplier_Lookup.&quot;&amp;[.S$4]&amp;[.$P10])" office:value-type="float" office:value="0" calcext:value-type="float">
            <text:p>0</text:p>
          </table:table-cell>
          <table:table-cell table:formula="of:=INDIRECT(&quot;Supplier_Lookup.&quot;&amp;[.T$4]&amp;[.$P10])" office:value-type="string" office:string-value="Yaego" calcext:value-type="string">
            <text:p>Yaego</text:p>
          </table:table-cell>
          <table:table-cell table:formula="of:=INDIRECT(&quot;Supplier_Lookup.&quot;&amp;[.U$4]&amp;[.$P10])" office:value-type="string" office:string-value="CC0603JRNPO9BN103" calcext:value-type="string">
            <text:p>CC0603JRNPO9BN103</text:p>
          </table:table-cell>
          <table:table-cell table:formula="of:=INDIRECT(&quot;Supplier_Lookup.&quot;&amp;[.V$4]&amp;[.$P10])" office:value-type="string" office:string-value="LCSC" calcext:value-type="string">
            <text:p>LCSC</text:p>
          </table:table-cell>
          <table:table-cell table:formula="of:=INDIRECT(&quot;Supplier_Lookup.&quot;&amp;[.W$4]&amp;[.$P10])" office:value-type="string" office:string-value="C389113" calcext:value-type="string">
            <text:p>C389113</text:p>
          </table:table-cell>
          <table:table-cell table:formula="of:=INDIRECT(&quot;Supplier_Lookup.&quot;&amp;[.X$4]&amp;[.$P10])" office:value-type="string" office:string-value="https://www.lcsc.com/product-detail/C389113.html" calcext:value-type="string">
            <text:p>https://www.lcsc.com/product-detail/C389113.html</text:p>
          </table:table-cell>
          <table:table-cell table:formula="of:=INDIRECT(&quot;Supplier_Lookup.&quot;&amp;[.Y$4]&amp;[.$P10])" office:value-type="float" office:value="0.0134" calcext:value-type="float">
            <text:p>0.0134</text:p>
          </table:table-cell>
          <table:table-cell table:formula="of:=IF(INDIRECT(&quot;Supplier_Lookup.&quot;&amp;[.Z$4]&amp;[.$P10])=&quot;&quot;;&quot;&quot;;INDIRECT(&quot;Supplier_Lookup.&quot;&amp;[.Z$4]&amp;[.$P10]))">
            <text:p/>
          </table:table-cell>
          <table:table-cell table:formula="of:=IF(ISNUMBER([.Y10]);[.Y10];0)" office:value-type="float" office:value="0.0134" calcext:value-type="float">
            <text:p>0.0134</text:p>
          </table:table-cell>
          <table:table-cell table:formula="of:=[.AA10]*[.O10]" office:value-type="float" office:value="0.134" calcext:value-type="float">
            <text:p>0.134</text:p>
          </table:table-cell>
          <table:table-cell table:formula="of:=[.N10]&amp;&quot;-&quot;&amp;[.R10]" office:value-type="string" office:string-value="0603-0603" calcext:value-type="string">
            <text:p>0603-0603</text:p>
          </table:table-cell>
          <table:table-cell table:formula="of:=[$CopyFromThing.A6]" office:value-type="string" office:string-value="C9,C21,C33,C34,C35,C36,C37,C38,C39,C81" calcext:value-type="string">
            <text:p>C9,C21,C33,C34,C35,C36,C37,C38,C39,C81</text:p>
          </table:table-cell>
          <table:table-cell table:formula="of:=[$CopyFromThing.G6]" office:value-type="string" office:string-value="5" calcext:value-type="string">
            <text:p>5</text:p>
          </table:table-cell>
        </table:table-row>
        <table:table-row table:style-name="ro1">
          <table:table-cell/>
          <table:table-cell table:formula="of:=[$CopyFromThing.I7]">
            <text:p/>
          </table:table-cell>
          <table:table-cell table:formula="of:=IF(ISNUMBER(SEARCH(&quot;R&quot;;[$CopyFromThing.A7]));&quot;R&quot;;&quot;&quot;)">
            <text:p/>
          </table:table-cell>
          <table:table-cell table:formula="of:=IF(ISNUMBER(SEARCH(&quot;C&quot;;[$CopyFromThing.A7]));&quot;C&quot;;&quot;&quot;)" office:value-type="string" office:string-value="C" calcext:value-type="string">
            <text:p>C</text:p>
          </table:table-cell>
          <table:table-cell table:formula="of:=IF([.D11]&amp;[.C11]&lt;&gt;&quot;&quot;;[.N11];&quot;&quot;)" office:value-type="string" office:string-value="0603" calcext:value-type="string">
            <text:p>0603</text:p>
          </table:table-cell>
          <table:table-cell table:style-name="ce13" table:formula="of:=[.C11]&amp;[.D11]&amp;[.E11]&amp;&quot;__&quot;&amp;[$CopyFromThing.I7]&amp;&quot;__&quot;&amp;[$CopyFromThing.B7]" office:value-type="string" office:string-value="C0603____3.3n" calcext:value-type="string">
            <text:p>C0603____3.3n</text:p>
          </table:table-cell>
          <table:table-cell table:formula="of:=[$CopyFromThing.D7]" office:value-type="string" office:string-value="AADuffy:Cap_SMD_0603" calcext:value-type="string">
            <text:p>AADuffy:Cap_SMD_0603</text:p>
          </table:table-cell>
          <table:table-cell table:formula="of:=FIND(&quot;_&quot;;[.G11])" office:value-type="float" office:value="12" calcext:value-type="float">
            <text:p>12</text:p>
          </table:table-cell>
          <table:table-cell table:formula="of:=IF(ISNUMBER([.H11]);RIGHT([.G11];LEN([.G11])-[.H11]);RIGHT([.G11];LEN([.G11])-FIND(&quot;:&quot;;[.G11])))" office:value-type="string" office:string-value="SMD_0603" calcext:value-type="string">
            <text:p>SMD_0603</text:p>
          </table:table-cell>
          <table:table-cell table:style-name="ce16" table:formula="of:=MATCH([.I11];{&quot;0603&quot;;&quot;1206&quot;};0)" office:value-type="string" office:string-value="" calcext:value-type="error">
            <text:p>#N/A</text:p>
          </table:table-cell>
          <table:table-cell table:style-name="ce16" table:formula="of:=RIGHT([.G11];LEN([.G11])-FIND(&quot;:&quot;;[.G11]))" office:value-type="string" office:string-value="Cap_SMD_0603" calcext:value-type="string">
            <text:p>Cap_SMD_0603</text:p>
          </table:table-cell>
          <table:table-cell table:formula="of:=SEARCH(&quot;0603&quot;;[.G11])" office:value-type="float" office:value="17" calcext:value-type="float">
            <text:p>17</text:p>
          </table:table-cell>
          <table:table-cell table:formula="of:=SEARCH(&quot;1206&quot;;[.G11])" office:value-type="string" office:string-value="" calcext:value-type="error">
            <text:p>#VALUE!</text:p>
          </table:table-cell>
          <table:table-cell table:formula="of:=IF(ISNUMBER([.M11]);&quot;1206&quot;;IF(ISNUMBER([.L11]);&quot;0603&quot;;[.K11]))" office:value-type="string" office:string-value="0603" calcext:value-type="string">
            <text:p>0603</text:p>
          </table:table-cell>
          <table:table-cell table:formula="of:=IF(ISNUMBER([$CopyFromThing.E7]*1);[$CopyFromThing.E7]*1;0)" office:value-type="float" office:value="1" calcext:value-type="float">
            <text:p>1</text:p>
          </table:table-cell>
          <table:table-cell table:formula="of:=VLOOKUP([.F11];[$Supplier_Lookup.$O$7:.$P$104];2;0)" office:value-type="float" office:value="47" calcext:value-type="float">
            <text:p>47</text:p>
          </table:table-cell>
          <table:table-cell table:formula="of:=IF(INDIRECT(&quot;Supplier_Lookup.&quot;&amp;[.Q$3]&amp;[.$P11])&lt;&gt;&quot;&quot;;INDIRECT(&quot;Supplier_Lookup.L&quot;&amp;[.$P11]);INDIRECT(&quot;Supplier_Lookup.&quot;&amp;[.Q$4]&amp;[.$P11]))" office:value-type="string" office:string-value="3.3n" calcext:value-type="string">
            <text:p>3.3n</text:p>
          </table:table-cell>
          <table:table-cell table:formula="of:=INDIRECT(&quot;Supplier_Lookup.&quot;&amp;[.R$4]&amp;[.$P11])" office:value-type="string" office:string-value="0603" calcext:value-type="string">
            <text:p>0603</text:p>
          </table:table-cell>
          <table:table-cell table:formula="of:=INDIRECT(&quot;Supplier_Lookup.&quot;&amp;[.S$4]&amp;[.$P11])" office:value-type="float" office:value="0" calcext:value-type="float">
            <text:p>0</text:p>
          </table:table-cell>
          <table:table-cell table:formula="of:=INDIRECT(&quot;Supplier_Lookup.&quot;&amp;[.T$4]&amp;[.$P11])" office:value-type="string" office:string-value="muRata" calcext:value-type="string">
            <text:p>muRata</text:p>
          </table:table-cell>
          <table:table-cell table:formula="of:=INDIRECT(&quot;Supplier_Lookup.&quot;&amp;[.U$4]&amp;[.$P11])" office:value-type="string" office:string-value="GRM1885C1H332JA01D" calcext:value-type="string">
            <text:p>GRM1885C1H332JA01D</text:p>
          </table:table-cell>
          <table:table-cell table:formula="of:=INDIRECT(&quot;Supplier_Lookup.&quot;&amp;[.V$4]&amp;[.$P11])" office:value-type="string" office:string-value="LCSC" calcext:value-type="string">
            <text:p>LCSC</text:p>
          </table:table-cell>
          <table:table-cell table:formula="of:=INDIRECT(&quot;Supplier_Lookup.&quot;&amp;[.W$4]&amp;[.$P11])" office:value-type="string" office:string-value="C77036" calcext:value-type="string">
            <text:p>C77036</text:p>
          </table:table-cell>
          <table:table-cell table:formula="of:=INDIRECT(&quot;Supplier_Lookup.&quot;&amp;[.X$4]&amp;[.$P11])" office:value-type="string" office:string-value="https://www.lcsc.com/product-detail/C77036.html" calcext:value-type="string">
            <text:p>https://www.lcsc.com/product-detail/C77036.html</text:p>
          </table:table-cell>
          <table:table-cell table:formula="of:=INDIRECT(&quot;Supplier_Lookup.&quot;&amp;[.Y$4]&amp;[.$P11])" office:value-type="float" office:value="0.0153" calcext:value-type="float">
            <text:p>0.0153</text:p>
          </table:table-cell>
          <table:table-cell table:formula="of:=IF(INDIRECT(&quot;Supplier_Lookup.&quot;&amp;[.Z$4]&amp;[.$P11])=&quot;&quot;;&quot;&quot;;INDIRECT(&quot;Supplier_Lookup.&quot;&amp;[.Z$4]&amp;[.$P11]))">
            <text:p/>
          </table:table-cell>
          <table:table-cell table:formula="of:=IF(ISNUMBER([.Y11]);[.Y11];0)" office:value-type="float" office:value="0.0153" calcext:value-type="float">
            <text:p>0.0153</text:p>
          </table:table-cell>
          <table:table-cell table:formula="of:=[.AA11]*[.O11]" office:value-type="float" office:value="0.0153" calcext:value-type="float">
            <text:p>0.0153</text:p>
          </table:table-cell>
          <table:table-cell table:formula="of:=[.N11]&amp;&quot;-&quot;&amp;[.R11]" office:value-type="string" office:string-value="0603-0603" calcext:value-type="string">
            <text:p>0603-0603</text:p>
          </table:table-cell>
          <table:table-cell table:formula="of:=[$CopyFromThing.A7]" office:value-type="string" office:string-value="C11" calcext:value-type="string">
            <text:p>C11</text:p>
          </table:table-cell>
          <table:table-cell table:formula="of:=[$CopyFromThing.G7]" office:value-type="string" office:string-value="6" calcext:value-type="string">
            <text:p>6</text:p>
          </table:table-cell>
        </table:table-row>
        <table:table-row table:style-name="ro1">
          <table:table-cell/>
          <table:table-cell table:formula="of:=[$CopyFromThing.I8]">
            <text:p/>
          </table:table-cell>
          <table:table-cell table:formula="of:=IF(ISNUMBER(SEARCH(&quot;R&quot;;[$CopyFromThing.A8]));&quot;R&quot;;&quot;&quot;)">
            <text:p/>
          </table:table-cell>
          <table:table-cell table:formula="of:=IF(ISNUMBER(SEARCH(&quot;C&quot;;[$CopyFromThing.A8]));&quot;C&quot;;&quot;&quot;)" office:value-type="string" office:string-value="C" calcext:value-type="string">
            <text:p>C</text:p>
          </table:table-cell>
          <table:table-cell table:formula="of:=IF([.D12]&amp;[.C12]&lt;&gt;&quot;&quot;;[.N12];&quot;&quot;)" office:value-type="string" office:string-value="0603" calcext:value-type="string">
            <text:p>0603</text:p>
          </table:table-cell>
          <table:table-cell table:style-name="ce13" table:formula="of:=[.C12]&amp;[.D12]&amp;[.E12]&amp;&quot;__&quot;&amp;[$CopyFromThing.I8]&amp;&quot;__&quot;&amp;[$CopyFromThing.B8]" office:value-type="string" office:string-value="C0603____330p" calcext:value-type="string">
            <text:p>C0603____330p</text:p>
          </table:table-cell>
          <table:table-cell table:formula="of:=[$CopyFromThing.D8]" office:value-type="string" office:string-value="AADuffy:Cap_SMD_0603" calcext:value-type="string">
            <text:p>AADuffy:Cap_SMD_0603</text:p>
          </table:table-cell>
          <table:table-cell table:formula="of:=FIND(&quot;_&quot;;[.G12])" office:value-type="float" office:value="12" calcext:value-type="float">
            <text:p>12</text:p>
          </table:table-cell>
          <table:table-cell table:formula="of:=IF(ISNUMBER([.H12]);RIGHT([.G12];LEN([.G12])-[.H12]);RIGHT([.G12];LEN([.G12])-FIND(&quot;:&quot;;[.G12])))" office:value-type="string" office:string-value="SMD_0603" calcext:value-type="string">
            <text:p>SMD_0603</text:p>
          </table:table-cell>
          <table:table-cell table:style-name="ce16" table:formula="of:=MATCH([.I12];{&quot;0603&quot;;&quot;1206&quot;};0)" office:value-type="string" office:string-value="" calcext:value-type="error">
            <text:p>#N/A</text:p>
          </table:table-cell>
          <table:table-cell table:style-name="ce16" table:formula="of:=RIGHT([.G12];LEN([.G12])-FIND(&quot;:&quot;;[.G12]))" office:value-type="string" office:string-value="Cap_SMD_0603" calcext:value-type="string">
            <text:p>Cap_SMD_0603</text:p>
          </table:table-cell>
          <table:table-cell table:formula="of:=SEARCH(&quot;0603&quot;;[.G12])" office:value-type="float" office:value="17" calcext:value-type="float">
            <text:p>17</text:p>
          </table:table-cell>
          <table:table-cell table:formula="of:=SEARCH(&quot;1206&quot;;[.G12])" office:value-type="string" office:string-value="" calcext:value-type="error">
            <text:p>#VALUE!</text:p>
          </table:table-cell>
          <table:table-cell table:formula="of:=IF(ISNUMBER([.M12]);&quot;1206&quot;;IF(ISNUMBER([.L12]);&quot;0603&quot;;[.K12]))" office:value-type="string" office:string-value="0603" calcext:value-type="string">
            <text:p>0603</text:p>
          </table:table-cell>
          <table:table-cell table:formula="of:=IF(ISNUMBER([$CopyFromThing.E8]*1);[$CopyFromThing.E8]*1;0)" office:value-type="float" office:value="1" calcext:value-type="float">
            <text:p>1</text:p>
          </table:table-cell>
          <table:table-cell table:formula="of:=VLOOKUP([.F12];[$Supplier_Lookup.$O$7:.$P$104];2;0)" office:value-type="float" office:value="46" calcext:value-type="float">
            <text:p>46</text:p>
          </table:table-cell>
          <table:table-cell table:formula="of:=IF(INDIRECT(&quot;Supplier_Lookup.&quot;&amp;[.Q$3]&amp;[.$P12])&lt;&gt;&quot;&quot;;INDIRECT(&quot;Supplier_Lookup.L&quot;&amp;[.$P12]);INDIRECT(&quot;Supplier_Lookup.&quot;&amp;[.Q$4]&amp;[.$P12]))" office:value-type="string" office:string-value="330p" calcext:value-type="string">
            <text:p>330p</text:p>
          </table:table-cell>
          <table:table-cell table:formula="of:=INDIRECT(&quot;Supplier_Lookup.&quot;&amp;[.R$4]&amp;[.$P12])" office:value-type="string" office:string-value="0603" calcext:value-type="string">
            <text:p>0603</text:p>
          </table:table-cell>
          <table:table-cell table:formula="of:=INDIRECT(&quot;Supplier_Lookup.&quot;&amp;[.S$4]&amp;[.$P12])" office:value-type="float" office:value="0" calcext:value-type="float">
            <text:p>0</text:p>
          </table:table-cell>
          <table:table-cell table:formula="of:=INDIRECT(&quot;Supplier_Lookup.&quot;&amp;[.T$4]&amp;[.$P12])" office:value-type="string" office:string-value="Yaego" calcext:value-type="string">
            <text:p>Yaego</text:p>
          </table:table-cell>
          <table:table-cell table:formula="of:=INDIRECT(&quot;Supplier_Lookup.&quot;&amp;[.U$4]&amp;[.$P12])" office:value-type="string" office:string-value="CC0603JRNPO9BN331" calcext:value-type="string">
            <text:p>CC0603JRNPO9BN331</text:p>
          </table:table-cell>
          <table:table-cell table:formula="of:=INDIRECT(&quot;Supplier_Lookup.&quot;&amp;[.V$4]&amp;[.$P12])" office:value-type="string" office:string-value="LCSC" calcext:value-type="string">
            <text:p>LCSC</text:p>
          </table:table-cell>
          <table:table-cell table:formula="of:=INDIRECT(&quot;Supplier_Lookup.&quot;&amp;[.W$4]&amp;[.$P12])" office:value-type="string" office:string-value="C62784" calcext:value-type="string">
            <text:p>C62784</text:p>
          </table:table-cell>
          <table:table-cell table:formula="of:=INDIRECT(&quot;Supplier_Lookup.&quot;&amp;[.X$4]&amp;[.$P12])" office:value-type="string" office:string-value="https://www.lcsc.com/product-detail/C62784.html" calcext:value-type="string">
            <text:p>https://www.lcsc.com/product-detail/C62784.html</text:p>
          </table:table-cell>
          <table:table-cell table:formula="of:=INDIRECT(&quot;Supplier_Lookup.&quot;&amp;[.Y$4]&amp;[.$P12])" office:value-type="float" office:value="0.0045" calcext:value-type="float">
            <text:p>0.0045</text:p>
          </table:table-cell>
          <table:table-cell table:formula="of:=IF(INDIRECT(&quot;Supplier_Lookup.&quot;&amp;[.Z$4]&amp;[.$P12])=&quot;&quot;;&quot;&quot;;INDIRECT(&quot;Supplier_Lookup.&quot;&amp;[.Z$4]&amp;[.$P12]))">
            <text:p/>
          </table:table-cell>
          <table:table-cell table:formula="of:=IF(ISNUMBER([.Y12]);[.Y12];0)" office:value-type="float" office:value="0.0045" calcext:value-type="float">
            <text:p>0.0045</text:p>
          </table:table-cell>
          <table:table-cell table:formula="of:=[.AA12]*[.O12]" office:value-type="float" office:value="0.0045" calcext:value-type="float">
            <text:p>0.0045</text:p>
          </table:table-cell>
          <table:table-cell table:formula="of:=[.N12]&amp;&quot;-&quot;&amp;[.R12]" office:value-type="string" office:string-value="0603-0603" calcext:value-type="string">
            <text:p>0603-0603</text:p>
          </table:table-cell>
          <table:table-cell table:formula="of:=[$CopyFromThing.A8]" office:value-type="string" office:string-value="C16" calcext:value-type="string">
            <text:p>C16</text:p>
          </table:table-cell>
          <table:table-cell table:formula="of:=[$CopyFromThing.G8]" office:value-type="string" office:string-value="7" calcext:value-type="string">
            <text:p>7</text:p>
          </table:table-cell>
        </table:table-row>
        <table:table-row table:style-name="ro1">
          <table:table-cell/>
          <table:table-cell table:formula="of:=[$CopyFromThing.I9]">
            <text:p/>
          </table:table-cell>
          <table:table-cell table:formula="of:=IF(ISNUMBER(SEARCH(&quot;R&quot;;[$CopyFromThing.A9]));&quot;R&quot;;&quot;&quot;)">
            <text:p/>
          </table:table-cell>
          <table:table-cell table:formula="of:=IF(ISNUMBER(SEARCH(&quot;C&quot;;[$CopyFromThing.A9]));&quot;C&quot;;&quot;&quot;)" office:value-type="string" office:string-value="C" calcext:value-type="string">
            <text:p>C</text:p>
          </table:table-cell>
          <table:table-cell table:formula="of:=IF([.D13]&amp;[.C13]&lt;&gt;&quot;&quot;;[.N13];&quot;&quot;)" office:value-type="string" office:string-value="0603" calcext:value-type="string">
            <text:p>0603</text:p>
          </table:table-cell>
          <table:table-cell table:style-name="ce13" table:formula="of:=[.C13]&amp;[.D13]&amp;[.E13]&amp;&quot;__&quot;&amp;[$CopyFromThing.I9]&amp;&quot;__&quot;&amp;[$CopyFromThing.B9]" office:value-type="string" office:string-value="C0603____100n" calcext:value-type="string">
            <text:p>C0603____100n</text:p>
          </table:table-cell>
          <table:table-cell table:formula="of:=[$CopyFromThing.D9]" office:value-type="string" office:string-value="AADuffy:Cap_SMD_0603" calcext:value-type="string">
            <text:p>AADuffy:Cap_SMD_0603</text:p>
          </table:table-cell>
          <table:table-cell table:formula="of:=FIND(&quot;_&quot;;[.G13])" office:value-type="float" office:value="12" calcext:value-type="float">
            <text:p>12</text:p>
          </table:table-cell>
          <table:table-cell table:formula="of:=IF(ISNUMBER([.H13]);RIGHT([.G13];LEN([.G13])-[.H13]);RIGHT([.G13];LEN([.G13])-FIND(&quot;:&quot;;[.G13])))" office:value-type="string" office:string-value="SMD_0603" calcext:value-type="string">
            <text:p>SMD_0603</text:p>
          </table:table-cell>
          <table:table-cell table:style-name="ce16" table:formula="of:=MATCH([.I13];{&quot;0603&quot;;&quot;1206&quot;};0)" office:value-type="string" office:string-value="" calcext:value-type="error">
            <text:p>#N/A</text:p>
          </table:table-cell>
          <table:table-cell table:style-name="ce16" table:formula="of:=RIGHT([.G13];LEN([.G13])-FIND(&quot;:&quot;;[.G13]))" office:value-type="string" office:string-value="Cap_SMD_0603" calcext:value-type="string">
            <text:p>Cap_SMD_0603</text:p>
          </table:table-cell>
          <table:table-cell table:formula="of:=SEARCH(&quot;0603&quot;;[.G13])" office:value-type="float" office:value="17" calcext:value-type="float">
            <text:p>17</text:p>
          </table:table-cell>
          <table:table-cell table:formula="of:=SEARCH(&quot;1206&quot;;[.G13])" office:value-type="string" office:string-value="" calcext:value-type="error">
            <text:p>#VALUE!</text:p>
          </table:table-cell>
          <table:table-cell table:formula="of:=IF(ISNUMBER([.M13]);&quot;1206&quot;;IF(ISNUMBER([.L13]);&quot;0603&quot;;[.K13]))" office:value-type="string" office:string-value="0603" calcext:value-type="string">
            <text:p>0603</text:p>
          </table:table-cell>
          <table:table-cell table:formula="of:=IF(ISNUMBER([$CopyFromThing.E9]*1);[$CopyFromThing.E9]*1;0)" office:value-type="float" office:value="12" calcext:value-type="float">
            <text:p>12</text:p>
          </table:table-cell>
          <table:table-cell table:formula="of:=VLOOKUP([.F13];[$Supplier_Lookup.$O$7:.$P$104];2;0)" office:value-type="float" office:value="45" calcext:value-type="float">
            <text:p>45</text:p>
          </table:table-cell>
          <table:table-cell table:formula="of:=IF(INDIRECT(&quot;Supplier_Lookup.&quot;&amp;[.Q$3]&amp;[.$P13])&lt;&gt;&quot;&quot;;INDIRECT(&quot;Supplier_Lookup.L&quot;&amp;[.$P13]);INDIRECT(&quot;Supplier_Lookup.&quot;&amp;[.Q$4]&amp;[.$P13]))" office:value-type="string" office:string-value="100n" calcext:value-type="string">
            <text:p>100n</text:p>
          </table:table-cell>
          <table:table-cell table:formula="of:=INDIRECT(&quot;Supplier_Lookup.&quot;&amp;[.R$4]&amp;[.$P13])" office:value-type="string" office:string-value="0603" calcext:value-type="string">
            <text:p>0603</text:p>
          </table:table-cell>
          <table:table-cell table:formula="of:=INDIRECT(&quot;Supplier_Lookup.&quot;&amp;[.S$4]&amp;[.$P13])" office:value-type="float" office:value="0" calcext:value-type="float">
            <text:p>0</text:p>
          </table:table-cell>
          <table:table-cell table:formula="of:=INDIRECT(&quot;Supplier_Lookup.&quot;&amp;[.T$4]&amp;[.$P13])" office:value-type="string" office:string-value="Samsung" calcext:value-type="string">
            <text:p>Samsung</text:p>
          </table:table-cell>
          <table:table-cell table:formula="of:=INDIRECT(&quot;Supplier_Lookup.&quot;&amp;[.U$4]&amp;[.$P13])" office:value-type="string" office:string-value="CL10B104KB8NNNC" calcext:value-type="string">
            <text:p>CL10B104KB8NNNC</text:p>
          </table:table-cell>
          <table:table-cell table:formula="of:=INDIRECT(&quot;Supplier_Lookup.&quot;&amp;[.V$4]&amp;[.$P13])" office:value-type="string" office:string-value="LCSC" calcext:value-type="string">
            <text:p>LCSC</text:p>
          </table:table-cell>
          <table:table-cell table:formula="of:=INDIRECT(&quot;Supplier_Lookup.&quot;&amp;[.W$4]&amp;[.$P13])" office:value-type="string" office:string-value="C1591" calcext:value-type="string">
            <text:p>C1591</text:p>
          </table:table-cell>
          <table:table-cell table:formula="of:=INDIRECT(&quot;Supplier_Lookup.&quot;&amp;[.X$4]&amp;[.$P13])" office:value-type="string" office:string-value="https://www.lcsc.com/product-detail/C1591.html" calcext:value-type="string">
            <text:p>https://www.lcsc.com/product-detail/C1591.html</text:p>
          </table:table-cell>
          <table:table-cell table:formula="of:=INDIRECT(&quot;Supplier_Lookup.&quot;&amp;[.Y$4]&amp;[.$P13])" office:value-type="float" office:value="0.0028" calcext:value-type="float">
            <text:p>0.0028</text:p>
          </table:table-cell>
          <table:table-cell table:formula="of:=IF(INDIRECT(&quot;Supplier_Lookup.&quot;&amp;[.Z$4]&amp;[.$P13])=&quot;&quot;;&quot;&quot;;INDIRECT(&quot;Supplier_Lookup.&quot;&amp;[.Z$4]&amp;[.$P13]))">
            <text:p/>
          </table:table-cell>
          <table:table-cell table:formula="of:=IF(ISNUMBER([.Y13]);[.Y13];0)" office:value-type="float" office:value="0.0028" calcext:value-type="float">
            <text:p>0.0028</text:p>
          </table:table-cell>
          <table:table-cell table:formula="of:=[.AA13]*[.O13]" office:value-type="float" office:value="0.0336" calcext:value-type="float">
            <text:p>0.0336</text:p>
          </table:table-cell>
          <table:table-cell table:formula="of:=[.N13]&amp;&quot;-&quot;&amp;[.R13]" office:value-type="string" office:string-value="0603-0603" calcext:value-type="string">
            <text:p>0603-0603</text:p>
          </table:table-cell>
          <table:table-cell table:formula="of:=[$CopyFromThing.A9]" office:value-type="string" office:string-value="C17,C18,C19,C20,C23,C24,C25,C45,C46,C52,C53,C55" calcext:value-type="string">
            <text:p>C17,C18,C19,C20,C23,C24,C25,C45,C46,C52,C53,C55</text:p>
          </table:table-cell>
          <table:table-cell table:formula="of:=[$CopyFromThing.G9]" office:value-type="string" office:string-value="8" calcext:value-type="string">
            <text:p>8</text:p>
          </table:table-cell>
        </table:table-row>
        <table:table-row table:style-name="ro1">
          <table:table-cell/>
          <table:table-cell table:formula="of:=[$CopyFromThing.I10]">
            <text:p/>
          </table:table-cell>
          <table:table-cell table:formula="of:=IF(ISNUMBER(SEARCH(&quot;R&quot;;[$CopyFromThing.A10]));&quot;R&quot;;&quot;&quot;)">
            <text:p/>
          </table:table-cell>
          <table:table-cell table:formula="of:=IF(ISNUMBER(SEARCH(&quot;C&quot;;[$CopyFromThing.A10]));&quot;C&quot;;&quot;&quot;)" office:value-type="string" office:string-value="C" calcext:value-type="string">
            <text:p>C</text:p>
          </table:table-cell>
          <table:table-cell table:formula="of:=IF([.D14]&amp;[.C14]&lt;&gt;&quot;&quot;;[.N14];&quot;&quot;)" office:value-type="string" office:string-value="0603" calcext:value-type="string">
            <text:p>0603</text:p>
          </table:table-cell>
          <table:table-cell table:style-name="ce13" table:formula="of:=[.C14]&amp;[.D14]&amp;[.E14]&amp;&quot;__&quot;&amp;[$CopyFromThing.I10]&amp;&quot;__&quot;&amp;[$CopyFromThing.B10]" office:value-type="string" office:string-value="C0603____1u" calcext:value-type="string">
            <text:p>C0603____1u</text:p>
          </table:table-cell>
          <table:table-cell table:formula="of:=[$CopyFromThing.D10]" office:value-type="string" office:string-value="AADuffy:Cap_SMD_0603" calcext:value-type="string">
            <text:p>AADuffy:Cap_SMD_0603</text:p>
          </table:table-cell>
          <table:table-cell table:formula="of:=FIND(&quot;_&quot;;[.G14])" office:value-type="float" office:value="12" calcext:value-type="float">
            <text:p>12</text:p>
          </table:table-cell>
          <table:table-cell table:formula="of:=IF(ISNUMBER([.H14]);RIGHT([.G14];LEN([.G14])-[.H14]);RIGHT([.G14];LEN([.G14])-FIND(&quot;:&quot;;[.G14])))" office:value-type="string" office:string-value="SMD_0603" calcext:value-type="string">
            <text:p>SMD_0603</text:p>
          </table:table-cell>
          <table:table-cell table:style-name="ce16" table:formula="of:=MATCH([.I14];{&quot;0603&quot;;&quot;1206&quot;};0)" office:value-type="string" office:string-value="" calcext:value-type="error">
            <text:p>#N/A</text:p>
          </table:table-cell>
          <table:table-cell table:style-name="ce16" table:formula="of:=RIGHT([.G14];LEN([.G14])-FIND(&quot;:&quot;;[.G14]))" office:value-type="string" office:string-value="Cap_SMD_0603" calcext:value-type="string">
            <text:p>Cap_SMD_0603</text:p>
          </table:table-cell>
          <table:table-cell table:formula="of:=SEARCH(&quot;0603&quot;;[.G14])" office:value-type="float" office:value="17" calcext:value-type="float">
            <text:p>17</text:p>
          </table:table-cell>
          <table:table-cell table:formula="of:=SEARCH(&quot;1206&quot;;[.G14])" office:value-type="string" office:string-value="" calcext:value-type="error">
            <text:p>#VALUE!</text:p>
          </table:table-cell>
          <table:table-cell table:formula="of:=IF(ISNUMBER([.M14]);&quot;1206&quot;;IF(ISNUMBER([.L14]);&quot;0603&quot;;[.K14]))" office:value-type="string" office:string-value="0603" calcext:value-type="string">
            <text:p>0603</text:p>
          </table:table-cell>
          <table:table-cell table:formula="of:=IF(ISNUMBER([$CopyFromThing.E10]*1);[$CopyFromThing.E10]*1;0)" office:value-type="float" office:value="42" calcext:value-type="float">
            <text:p>42</text:p>
          </table:table-cell>
          <table:table-cell table:formula="of:=VLOOKUP([.F14];[$Supplier_Lookup.$O$7:.$P$104];2;0)" office:value-type="float" office:value="13" calcext:value-type="float">
            <text:p>13</text:p>
          </table:table-cell>
          <table:table-cell table:formula="of:=IF(INDIRECT(&quot;Supplier_Lookup.&quot;&amp;[.Q$3]&amp;[.$P14])&lt;&gt;&quot;&quot;;INDIRECT(&quot;Supplier_Lookup.L&quot;&amp;[.$P14]);INDIRECT(&quot;Supplier_Lookup.&quot;&amp;[.Q$4]&amp;[.$P14]))" office:value-type="string" office:string-value="1u" calcext:value-type="string">
            <text:p>1u</text:p>
          </table:table-cell>
          <table:table-cell table:formula="of:=INDIRECT(&quot;Supplier_Lookup.&quot;&amp;[.R$4]&amp;[.$P14])" office:value-type="string" office:string-value="0603" calcext:value-type="string">
            <text:p>0603</text:p>
          </table:table-cell>
          <table:table-cell table:formula="of:=INDIRECT(&quot;Supplier_Lookup.&quot;&amp;[.S$4]&amp;[.$P14])" office:value-type="float" office:value="0" calcext:value-type="float">
            <text:p>0</text:p>
          </table:table-cell>
          <table:table-cell table:formula="of:=INDIRECT(&quot;Supplier_Lookup.&quot;&amp;[.T$4]&amp;[.$P14])" office:value-type="string" office:string-value="Samsung" calcext:value-type="string">
            <text:p>Samsung</text:p>
          </table:table-cell>
          <table:table-cell table:formula="of:=INDIRECT(&quot;Supplier_Lookup.&quot;&amp;[.U$4]&amp;[.$P14])" office:value-type="string" office:string-value="CL10B105KB8NQNC" calcext:value-type="string">
            <text:p>CL10B105KB8NQNC</text:p>
          </table:table-cell>
          <table:table-cell table:formula="of:=INDIRECT(&quot;Supplier_Lookup.&quot;&amp;[.V$4]&amp;[.$P14])" office:value-type="string" office:string-value="LCSC" calcext:value-type="string">
            <text:p>LCSC</text:p>
          </table:table-cell>
          <table:table-cell table:formula="of:=INDIRECT(&quot;Supplier_Lookup.&quot;&amp;[.W$4]&amp;[.$P14])" office:value-type="string" office:string-value="C5199872" calcext:value-type="string">
            <text:p>C5199872</text:p>
          </table:table-cell>
          <table:table-cell table:formula="of:=INDIRECT(&quot;Supplier_Lookup.&quot;&amp;[.X$4]&amp;[.$P14])" office:value-type="string" office:string-value="https://www.lcsc.com/product-detail/C5199872.html&amp;spm=wm.fly.bg.9.xh___wm.fly.tp.4.ml" calcext:value-type="string">
            <text:p>https://www.lcsc.com/product-detail/C5199872.html&amp;spm=wm.fly.bg.9.xh___wm.fly.tp.4.ml</text:p>
          </table:table-cell>
          <table:table-cell table:formula="of:=INDIRECT(&quot;Supplier_Lookup.&quot;&amp;[.Y$4]&amp;[.$P14])" office:value-type="float" office:value="0.0082" calcext:value-type="float">
            <text:p>0.0082</text:p>
          </table:table-cell>
          <table:table-cell table:formula="of:=IF(INDIRECT(&quot;Supplier_Lookup.&quot;&amp;[.Z$4]&amp;[.$P14])=&quot;&quot;;&quot;&quot;;INDIRECT(&quot;Supplier_Lookup.&quot;&amp;[.Z$4]&amp;[.$P14]))">
            <text:p/>
          </table:table-cell>
          <table:table-cell table:formula="of:=IF(ISNUMBER([.Y14]);[.Y14];0)" office:value-type="float" office:value="0.0082" calcext:value-type="float">
            <text:p>0.0082</text:p>
          </table:table-cell>
          <table:table-cell table:formula="of:=[.AA14]*[.O14]" office:value-type="float" office:value="0.3444" calcext:value-type="float">
            <text:p>0.3444</text:p>
          </table:table-cell>
          <table:table-cell table:formula="of:=[.N14]&amp;&quot;-&quot;&amp;[.R14]" office:value-type="string" office:string-value="0603-0603" calcext:value-type="string">
            <text:p>0603-0603</text:p>
          </table:table-cell>
          <table:table-cell table:formula="of:=[$CopyFromThing.A10]" office:value-type="string" office:string-value="C22,C26,C28,C29,C30,C31,C32,C40,C41,C42,C47,C48,C49,C50,C51,C54,C56,C57,C58,C59,C60,C61,C62,C63,C64,C65,C66,C67,C68,C69,C70,C73,C76,C78,C79,C80,C82,C83,C84,C89,C90,C91" calcext:value-type="string">
            <text:p>C22,C26,C28,C29,C30,C31,C32,C40,C41,C42,C47,C48,C49,C50,C51,C54,C56,C57,C58,C59,C60,C61,C62,C63,C64,C65,C66,C67,C68,C69,C70,C73,C76,C78,C79,C80,C82,C83,C84,C89,C90,C91</text:p>
          </table:table-cell>
          <table:table-cell table:formula="of:=[$CopyFromThing.G10]" office:value-type="string" office:string-value="9" calcext:value-type="string">
            <text:p>9</text:p>
          </table:table-cell>
        </table:table-row>
        <table:table-row table:style-name="ro1">
          <table:table-cell/>
          <table:table-cell table:formula="of:=[$CopyFromThing.I11]">
            <text:p/>
          </table:table-cell>
          <table:table-cell table:formula="of:=IF(ISNUMBER(SEARCH(&quot;R&quot;;[$CopyFromThing.A11]));&quot;R&quot;;&quot;&quot;)">
            <text:p/>
          </table:table-cell>
          <table:table-cell table:formula="of:=IF(ISNUMBER(SEARCH(&quot;C&quot;;[$CopyFromThing.A11]));&quot;C&quot;;&quot;&quot;)" office:value-type="string" office:string-value="C" calcext:value-type="string">
            <text:p>C</text:p>
          </table:table-cell>
          <table:table-cell table:formula="of:=IF([.D15]&amp;[.C15]&lt;&gt;&quot;&quot;;[.N15];&quot;&quot;)" office:value-type="string" office:string-value="0603" calcext:value-type="string">
            <text:p>0603</text:p>
          </table:table-cell>
          <table:table-cell table:style-name="ce13" table:formula="of:=[.C15]&amp;[.D15]&amp;[.E15]&amp;&quot;__&quot;&amp;[$CopyFromThing.I11]&amp;&quot;__&quot;&amp;[$CopyFromThing.B11]" office:value-type="string" office:string-value="C0603____15p" calcext:value-type="string">
            <text:p>C0603____15p</text:p>
          </table:table-cell>
          <table:table-cell table:formula="of:=[$CopyFromThing.D11]" office:value-type="string" office:string-value="AADuffy:Cap_SMD_0603" calcext:value-type="string">
            <text:p>AADuffy:Cap_SMD_0603</text:p>
          </table:table-cell>
          <table:table-cell table:formula="of:=FIND(&quot;_&quot;;[.G15])" office:value-type="float" office:value="12" calcext:value-type="float">
            <text:p>12</text:p>
          </table:table-cell>
          <table:table-cell table:formula="of:=IF(ISNUMBER([.H15]);RIGHT([.G15];LEN([.G15])-[.H15]);RIGHT([.G15];LEN([.G15])-FIND(&quot;:&quot;;[.G15])))" office:value-type="string" office:string-value="SMD_0603" calcext:value-type="string">
            <text:p>SMD_0603</text:p>
          </table:table-cell>
          <table:table-cell table:style-name="ce16" table:formula="of:=MATCH([.I15];{&quot;0603&quot;;&quot;1206&quot;};0)" office:value-type="string" office:string-value="" calcext:value-type="error">
            <text:p>#N/A</text:p>
          </table:table-cell>
          <table:table-cell table:style-name="ce16" table:formula="of:=RIGHT([.G15];LEN([.G15])-FIND(&quot;:&quot;;[.G15]))" office:value-type="string" office:string-value="Cap_SMD_0603" calcext:value-type="string">
            <text:p>Cap_SMD_0603</text:p>
          </table:table-cell>
          <table:table-cell table:formula="of:=SEARCH(&quot;0603&quot;;[.G15])" office:value-type="float" office:value="17" calcext:value-type="float">
            <text:p>17</text:p>
          </table:table-cell>
          <table:table-cell table:formula="of:=SEARCH(&quot;1206&quot;;[.G15])" office:value-type="string" office:string-value="" calcext:value-type="error">
            <text:p>#VALUE!</text:p>
          </table:table-cell>
          <table:table-cell table:formula="of:=IF(ISNUMBER([.M15]);&quot;1206&quot;;IF(ISNUMBER([.L15]);&quot;0603&quot;;[.K15]))" office:value-type="string" office:string-value="0603" calcext:value-type="string">
            <text:p>0603</text:p>
          </table:table-cell>
          <table:table-cell table:formula="of:=IF(ISNUMBER([$CopyFromThing.E11]*1);[$CopyFromThing.E11]*1;0)" office:value-type="float" office:value="4" calcext:value-type="float">
            <text:p>4</text:p>
          </table:table-cell>
          <table:table-cell table:formula="of:=VLOOKUP([.F15];[$Supplier_Lookup.$O$7:.$P$104];2;0)" office:value-type="float" office:value="32" calcext:value-type="float">
            <text:p>32</text:p>
          </table:table-cell>
          <table:table-cell table:formula="of:=IF(INDIRECT(&quot;Supplier_Lookup.&quot;&amp;[.Q$3]&amp;[.$P15])&lt;&gt;&quot;&quot;;INDIRECT(&quot;Supplier_Lookup.L&quot;&amp;[.$P15]);INDIRECT(&quot;Supplier_Lookup.&quot;&amp;[.Q$4]&amp;[.$P15]))" office:value-type="string" office:string-value="15p" calcext:value-type="string">
            <text:p>15p</text:p>
          </table:table-cell>
          <table:table-cell table:formula="of:=INDIRECT(&quot;Supplier_Lookup.&quot;&amp;[.R$4]&amp;[.$P15])" office:value-type="string" office:string-value="0603" calcext:value-type="string">
            <text:p>0603</text:p>
          </table:table-cell>
          <table:table-cell table:formula="of:=INDIRECT(&quot;Supplier_Lookup.&quot;&amp;[.S$4]&amp;[.$P15])" office:value-type="float" office:value="0" calcext:value-type="float">
            <text:p>0</text:p>
          </table:table-cell>
          <table:table-cell table:formula="of:=INDIRECT(&quot;Supplier_Lookup.&quot;&amp;[.T$4]&amp;[.$P15])" office:value-type="string" office:string-value="Samsung" calcext:value-type="string">
            <text:p>Samsung</text:p>
          </table:table-cell>
          <table:table-cell table:formula="of:=INDIRECT(&quot;Supplier_Lookup.&quot;&amp;[.U$4]&amp;[.$P15])" office:value-type="string" office:string-value="CL10C150JB8NNNC" calcext:value-type="string">
            <text:p>CL10C150JB8NNNC</text:p>
          </table:table-cell>
          <table:table-cell table:formula="of:=INDIRECT(&quot;Supplier_Lookup.&quot;&amp;[.V$4]&amp;[.$P15])" office:value-type="string" office:string-value="LCSC" calcext:value-type="string">
            <text:p>LCSC</text:p>
          </table:table-cell>
          <table:table-cell table:formula="of:=INDIRECT(&quot;Supplier_Lookup.&quot;&amp;[.W$4]&amp;[.$P15])" office:value-type="string" office:string-value="CL10C150JB8NNNC" calcext:value-type="string">
            <text:p>CL10C150JB8NNNC</text:p>
          </table:table-cell>
          <table:table-cell table:formula="of:=INDIRECT(&quot;Supplier_Lookup.&quot;&amp;[.X$4]&amp;[.$P15])" office:value-type="string" office:string-value="https://www.lcsc.com/product-detail/C1644.html" calcext:value-type="string">
            <text:p>https://www.lcsc.com/product-detail/C1644.html</text:p>
          </table:table-cell>
          <table:table-cell table:formula="of:=INDIRECT(&quot;Supplier_Lookup.&quot;&amp;[.Y$4]&amp;[.$P15])" office:value-type="float" office:value="0.0054" calcext:value-type="float">
            <text:p>0.0054</text:p>
          </table:table-cell>
          <table:table-cell table:formula="of:=IF(INDIRECT(&quot;Supplier_Lookup.&quot;&amp;[.Z$4]&amp;[.$P15])=&quot;&quot;;&quot;&quot;;INDIRECT(&quot;Supplier_Lookup.&quot;&amp;[.Z$4]&amp;[.$P15]))">
            <text:p/>
          </table:table-cell>
          <table:table-cell table:formula="of:=IF(ISNUMBER([.Y15]);[.Y15];0)" office:value-type="float" office:value="0.0054" calcext:value-type="float">
            <text:p>0.0054</text:p>
          </table:table-cell>
          <table:table-cell table:formula="of:=[.AA15]*[.O15]" office:value-type="float" office:value="0.0216" calcext:value-type="float">
            <text:p>0.0216</text:p>
          </table:table-cell>
          <table:table-cell table:formula="of:=[.N15]&amp;&quot;-&quot;&amp;[.R15]" office:value-type="string" office:string-value="0603-0603" calcext:value-type="string">
            <text:p>0603-0603</text:p>
          </table:table-cell>
          <table:table-cell table:formula="of:=[$CopyFromThing.A11]" office:value-type="string" office:string-value="C71,C72,C74,C75" calcext:value-type="string">
            <text:p>C71,C72,C74,C75</text:p>
          </table:table-cell>
          <table:table-cell table:formula="of:=[$CopyFromThing.G11]" office:value-type="string" office:string-value="10" calcext:value-type="string">
            <text:p>10</text:p>
          </table:table-cell>
        </table:table-row>
        <table:table-row table:style-name="ro1">
          <table:table-cell/>
          <table:table-cell table:formula="of:=[$CopyFromThing.I12]" office:value-type="string" office:string-value="1N4007FL" calcext:value-type="string">
            <text:p>1N4007FL</text:p>
          </table:table-cell>
          <table:table-cell table:formula="of:=IF(ISNUMBER(SEARCH(&quot;R&quot;;[$CopyFromThing.A12]));&quot;R&quot;;&quot;&quot;)">
            <text:p/>
          </table:table-cell>
          <table:table-cell table:formula="of:=IF(ISNUMBER(SEARCH(&quot;C&quot;;[$CopyFromThing.A12]));&quot;C&quot;;&quot;&quot;)">
            <text:p/>
          </table:table-cell>
          <table:table-cell table:formula="of:=IF([.D16]&amp;[.C16]&lt;&gt;&quot;&quot;;[.N16];&quot;&quot;)">
            <text:p/>
          </table:table-cell>
          <table:table-cell table:style-name="ce13" table:formula="of:=[.C16]&amp;[.D16]&amp;[.E16]&amp;&quot;__&quot;&amp;[$CopyFromThing.I12]&amp;&quot;__&quot;&amp;[$CopyFromThing.B12]" office:value-type="string" office:string-value="__1N4007FL__1N4007FL" calcext:value-type="string">
            <text:p>__1N4007FL__1N4007FL</text:p>
          </table:table-cell>
          <table:table-cell table:formula="of:=[$CopyFromThing.D12]" office:value-type="string" office:string-value="AADuffy:1N4007FL" calcext:value-type="string">
            <text:p>AADuffy:1N4007FL</text:p>
          </table:table-cell>
          <table:table-cell table:formula="of:=FIND(&quot;_&quot;;[.G16])" office:value-type="string" office:string-value="" calcext:value-type="error">
            <text:p>#VALUE!</text:p>
          </table:table-cell>
          <table:table-cell table:formula="of:=IF(ISNUMBER([.H16]);RIGHT([.G16];LEN([.G16])-[.H16]);RIGHT([.G16];LEN([.G16])-FIND(&quot;:&quot;;[.G16])))" office:value-type="string" office:string-value="1N4007FL" calcext:value-type="string">
            <text:p>1N4007FL</text:p>
          </table:table-cell>
          <table:table-cell table:style-name="ce16" table:formula="of:=MATCH([.I16];{&quot;0603&quot;;&quot;1206&quot;};0)" office:value-type="string" office:string-value="" calcext:value-type="error">
            <text:p>#N/A</text:p>
          </table:table-cell>
          <table:table-cell table:style-name="ce16" table:formula="of:=RIGHT([.G16];LEN([.G16])-FIND(&quot;:&quot;;[.G16]))" office:value-type="string" office:string-value="1N4007FL" calcext:value-type="string">
            <text:p>1N4007FL</text:p>
          </table:table-cell>
          <table:table-cell table:formula="of:=SEARCH(&quot;0603&quot;;[.G16])" office:value-type="string" office:string-value="" calcext:value-type="error">
            <text:p>#VALUE!</text:p>
          </table:table-cell>
          <table:table-cell table:formula="of:=SEARCH(&quot;1206&quot;;[.G16])" office:value-type="string" office:string-value="" calcext:value-type="error">
            <text:p>#VALUE!</text:p>
          </table:table-cell>
          <table:table-cell table:formula="of:=IF(ISNUMBER([.M16]);&quot;1206&quot;;IF(ISNUMBER([.L16]);&quot;0603&quot;;[.K16]))" office:value-type="string" office:string-value="1N4007FL" calcext:value-type="string">
            <text:p>1N4007FL</text:p>
          </table:table-cell>
          <table:table-cell table:formula="of:=IF(ISNUMBER([$CopyFromThing.E12]*1);[$CopyFromThing.E12]*1;0)" office:value-type="float" office:value="6" calcext:value-type="float">
            <text:p>6</text:p>
          </table:table-cell>
          <table:table-cell table:formula="of:=VLOOKUP([.F16];[$Supplier_Lookup.$O$7:.$P$104];2;0)" office:value-type="float" office:value="7" calcext:value-type="float">
            <text:p>7</text:p>
          </table:table-cell>
          <table:table-cell table:formula="of:=IF(INDIRECT(&quot;Supplier_Lookup.&quot;&amp;[.Q$3]&amp;[.$P16])&lt;&gt;&quot;&quot;;INDIRECT(&quot;Supplier_Lookup.L&quot;&amp;[.$P16]);INDIRECT(&quot;Supplier_Lookup.&quot;&amp;[.Q$4]&amp;[.$P16]))" office:value-type="string" office:string-value="1N4007FL" calcext:value-type="string">
            <text:p>1N4007FL</text:p>
          </table:table-cell>
          <table:table-cell table:formula="of:=INDIRECT(&quot;Supplier_Lookup.&quot;&amp;[.R$4]&amp;[.$P16])" office:value-type="float" office:value="0" calcext:value-type="float">
            <text:p>0</text:p>
          </table:table-cell>
          <table:table-cell table:formula="of:=INDIRECT(&quot;Supplier_Lookup.&quot;&amp;[.S$4]&amp;[.$P16])" office:value-type="string" office:string-value="1N4007FL" calcext:value-type="string">
            <text:p>1N4007FL</text:p>
          </table:table-cell>
          <table:table-cell table:formula="of:=INDIRECT(&quot;Supplier_Lookup.&quot;&amp;[.T$4]&amp;[.$P16])" office:value-type="string" office:string-value="SMC" calcext:value-type="string">
            <text:p>SMC</text:p>
          </table:table-cell>
          <table:table-cell table:formula="of:=INDIRECT(&quot;Supplier_Lookup.&quot;&amp;[.U$4]&amp;[.$P16])" office:value-type="string" office:string-value="1N4007FL" calcext:value-type="string">
            <text:p>1N4007FL</text:p>
          </table:table-cell>
          <table:table-cell table:formula="of:=INDIRECT(&quot;Supplier_Lookup.&quot;&amp;[.V$4]&amp;[.$P16])" office:value-type="string" office:string-value="LCSC" calcext:value-type="string">
            <text:p>LCSC</text:p>
          </table:table-cell>
          <table:table-cell table:formula="of:=INDIRECT(&quot;Supplier_Lookup.&quot;&amp;[.W$4]&amp;[.$P16])" office:value-type="string" office:string-value="C493190" calcext:value-type="string">
            <text:p>C493190</text:p>
          </table:table-cell>
          <table:table-cell table:formula="of:=INDIRECT(&quot;Supplier_Lookup.&quot;&amp;[.X$4]&amp;[.$P16])" office:value-type="string" office:string-value="https://www.lcsc.com/product-detail/C493190.html" calcext:value-type="string">
            <text:p>https://www.lcsc.com/product-detail/C493190.html</text:p>
          </table:table-cell>
          <table:table-cell table:formula="of:=INDIRECT(&quot;Supplier_Lookup.&quot;&amp;[.Y$4]&amp;[.$P16])" office:value-type="float" office:value="0.0217" calcext:value-type="float">
            <text:p>0.0217</text:p>
          </table:table-cell>
          <table:table-cell table:formula="of:=IF(INDIRECT(&quot;Supplier_Lookup.&quot;&amp;[.Z$4]&amp;[.$P16])=&quot;&quot;;&quot;&quot;;INDIRECT(&quot;Supplier_Lookup.&quot;&amp;[.Z$4]&amp;[.$P16]))">
            <text:p/>
          </table:table-cell>
          <table:table-cell table:formula="of:=IF(ISNUMBER([.Y16]);[.Y16];0)" office:value-type="float" office:value="0.0217" calcext:value-type="float">
            <text:p>0.0217</text:p>
          </table:table-cell>
          <table:table-cell table:formula="of:=[.AA16]*[.O16]" office:value-type="float" office:value="0.1302" calcext:value-type="float">
            <text:p>0.1302</text:p>
          </table:table-cell>
          <table:table-cell table:formula="of:=[.N16]&amp;&quot;-&quot;&amp;[.R16]" office:value-type="string" office:string-value="1N4007FL-0" calcext:value-type="string">
            <text:p>1N4007FL-0</text:p>
          </table:table-cell>
          <table:table-cell table:formula="of:=[$CopyFromThing.A12]" office:value-type="string" office:string-value="D1,D4,D5,D6,D7,D8" calcext:value-type="string">
            <text:p>D1,D4,D5,D6,D7,D8</text:p>
          </table:table-cell>
          <table:table-cell table:formula="of:=[$CopyFromThing.G12]" office:value-type="string" office:string-value="11" calcext:value-type="string">
            <text:p>11</text:p>
          </table:table-cell>
        </table:table-row>
        <table:table-row table:style-name="ro1">
          <table:table-cell/>
          <table:table-cell table:formula="of:=[$CopyFromThing.I13]" office:value-type="string" office:string-value="MMSZ5231B-7-F" calcext:value-type="string">
            <text:p>MMSZ5231B-7-F</text:p>
          </table:table-cell>
          <table:table-cell table:formula="of:=IF(ISNUMBER(SEARCH(&quot;R&quot;;[$CopyFromThing.A13]));&quot;R&quot;;&quot;&quot;)">
            <text:p/>
          </table:table-cell>
          <table:table-cell table:formula="of:=IF(ISNUMBER(SEARCH(&quot;C&quot;;[$CopyFromThing.A13]));&quot;C&quot;;&quot;&quot;)">
            <text:p/>
          </table:table-cell>
          <table:table-cell table:formula="of:=IF([.D17]&amp;[.C17]&lt;&gt;&quot;&quot;;[.N17];&quot;&quot;)">
            <text:p/>
          </table:table-cell>
          <table:table-cell table:style-name="ce13" table:formula="of:=[.C17]&amp;[.D17]&amp;[.E17]&amp;&quot;__&quot;&amp;[$CopyFromThing.I13]&amp;&quot;__&quot;&amp;[$CopyFromThing.B13]" office:value-type="string" office:string-value="__MMSZ5231B-7-F__6.1V" calcext:value-type="string">
            <text:p>__MMSZ5231B-7-F__6.1V</text:p>
          </table:table-cell>
          <table:table-cell table:formula="of:=[$CopyFromThing.D13]" office:value-type="string" office:string-value="AADuffy:SOD123_MMSZ5231B-7-F" calcext:value-type="string">
            <text:p>AADuffy:SOD123_MMSZ5231B-7-F</text:p>
          </table:table-cell>
          <table:table-cell table:formula="of:=FIND(&quot;_&quot;;[.G17])" office:value-type="float" office:value="15" calcext:value-type="float">
            <text:p>15</text:p>
          </table:table-cell>
          <table:table-cell table:formula="of:=IF(ISNUMBER([.H17]);RIGHT([.G17];LEN([.G17])-[.H17]);RIGHT([.G17];LEN([.G17])-FIND(&quot;:&quot;;[.G17])))" office:value-type="string" office:string-value="MMSZ5231B-7-F" calcext:value-type="string">
            <text:p>MMSZ5231B-7-F</text:p>
          </table:table-cell>
          <table:table-cell table:style-name="ce16" table:formula="of:=MATCH([.I17];{&quot;0603&quot;;&quot;1206&quot;};0)" office:value-type="string" office:string-value="" calcext:value-type="error">
            <text:p>#N/A</text:p>
          </table:table-cell>
          <table:table-cell table:style-name="ce16" table:formula="of:=RIGHT([.G17];LEN([.G17])-FIND(&quot;:&quot;;[.G17]))" office:value-type="string" office:string-value="SOD123_MMSZ5231B-7-F" calcext:value-type="string">
            <text:p>SOD123_MMSZ5231B-7-F</text:p>
          </table:table-cell>
          <table:table-cell table:formula="of:=SEARCH(&quot;0603&quot;;[.G17])" office:value-type="string" office:string-value="" calcext:value-type="error">
            <text:p>#VALUE!</text:p>
          </table:table-cell>
          <table:table-cell table:formula="of:=SEARCH(&quot;1206&quot;;[.G17])" office:value-type="string" office:string-value="" calcext:value-type="error">
            <text:p>#VALUE!</text:p>
          </table:table-cell>
          <table:table-cell table:formula="of:=IF(ISNUMBER([.M17]);&quot;1206&quot;;IF(ISNUMBER([.L17]);&quot;0603&quot;;[.K17]))" office:value-type="string" office:string-value="SOD123_MMSZ5231B-7-F" calcext:value-type="string">
            <text:p>SOD123_MMSZ5231B-7-F</text:p>
          </table:table-cell>
          <table:table-cell table:formula="of:=IF(ISNUMBER([$CopyFromThing.E13]*1);[$CopyFromThing.E13]*1;0)" office:value-type="float" office:value="1" calcext:value-type="float">
            <text:p>1</text:p>
          </table:table-cell>
          <table:table-cell table:formula="of:=VLOOKUP([.F17];[$Supplier_Lookup.$O$7:.$P$104];2;0)" office:value-type="float" office:value="9" calcext:value-type="float">
            <text:p>9</text:p>
          </table:table-cell>
          <table:table-cell table:formula="of:=IF(INDIRECT(&quot;Supplier_Lookup.&quot;&amp;[.Q$3]&amp;[.$P17])&lt;&gt;&quot;&quot;;INDIRECT(&quot;Supplier_Lookup.L&quot;&amp;[.$P17]);INDIRECT(&quot;Supplier_Lookup.&quot;&amp;[.Q$4]&amp;[.$P17]))" office:value-type="string" office:string-value="6.1V" calcext:value-type="string">
            <text:p>6.1V</text:p>
          </table:table-cell>
          <table:table-cell table:formula="of:=INDIRECT(&quot;Supplier_Lookup.&quot;&amp;[.R$4]&amp;[.$P17])" office:value-type="float" office:value="0" calcext:value-type="float">
            <text:p>0</text:p>
          </table:table-cell>
          <table:table-cell table:formula="of:=INDIRECT(&quot;Supplier_Lookup.&quot;&amp;[.S$4]&amp;[.$P17])" office:value-type="string" office:string-value="MMSZ5231B-7-F" calcext:value-type="string">
            <text:p>MMSZ5231B-7-F</text:p>
          </table:table-cell>
          <table:table-cell table:formula="of:=INDIRECT(&quot;Supplier_Lookup.&quot;&amp;[.T$4]&amp;[.$P17])" office:value-type="string" office:string-value="VISHAY" calcext:value-type="string">
            <text:p>VISHAY</text:p>
          </table:table-cell>
          <table:table-cell table:formula="of:=INDIRECT(&quot;Supplier_Lookup.&quot;&amp;[.U$4]&amp;[.$P17])" office:value-type="string" office:string-value="MMSZ4691-E3-08" calcext:value-type="string">
            <text:p>MMSZ4691-E3-08</text:p>
          </table:table-cell>
          <table:table-cell table:formula="of:=INDIRECT(&quot;Supplier_Lookup.&quot;&amp;[.V$4]&amp;[.$P17])" office:value-type="string" office:string-value="Digikey" calcext:value-type="string">
            <text:p>Digikey</text:p>
          </table:table-cell>
          <table:table-cell table:formula="of:=INDIRECT(&quot;Supplier_Lookup.&quot;&amp;[.W$4]&amp;[.$P17])" office:value-type="string" office:string-value="MMSZ4691-E3-08GICT-ND" calcext:value-type="string">
            <text:p>MMSZ4691-E3-08GICT-ND</text:p>
          </table:table-cell>
          <table:table-cell table:formula="of:=INDIRECT(&quot;Supplier_Lookup.&quot;&amp;[.X$4]&amp;[.$P17])" office:value-type="string" office:string-value="https://www.digikey.com/en/products/detail/vishay-general-semiconductor-diodes-division/MMSZ4691-E3-08/4832264" calcext:value-type="string">
            <text:p>https://www.digikey.com/en/products/detail/vishay-general-semiconductor-diodes-division/MMSZ4691-E3-08/4832264</text:p>
          </table:table-cell>
          <table:table-cell table:formula="of:=INDIRECT(&quot;Supplier_Lookup.&quot;&amp;[.Y$4]&amp;[.$P17])" office:value-type="float" office:value="0.28" calcext:value-type="float">
            <text:p>0.28</text:p>
          </table:table-cell>
          <table:table-cell table:formula="of:=IF(INDIRECT(&quot;Supplier_Lookup.&quot;&amp;[.Z$4]&amp;[.$P17])=&quot;&quot;;&quot;&quot;;INDIRECT(&quot;Supplier_Lookup.&quot;&amp;[.Z$4]&amp;[.$P17]))">
            <text:p/>
          </table:table-cell>
          <table:table-cell table:formula="of:=IF(ISNUMBER([.Y17]);[.Y17];0)" office:value-type="float" office:value="0.28" calcext:value-type="float">
            <text:p>0.28</text:p>
          </table:table-cell>
          <table:table-cell table:formula="of:=[.AA17]*[.O17]" office:value-type="float" office:value="0.28" calcext:value-type="float">
            <text:p>0.28</text:p>
          </table:table-cell>
          <table:table-cell table:formula="of:=[.N17]&amp;&quot;-&quot;&amp;[.R17]" office:value-type="string" office:string-value="SOD123_MMSZ5231B-7-F-0" calcext:value-type="string">
            <text:p>SOD123_MMSZ5231B-7-F-0</text:p>
          </table:table-cell>
          <table:table-cell table:formula="of:=[$CopyFromThing.A13]" office:value-type="string" office:string-value="D2" calcext:value-type="string">
            <text:p>D2</text:p>
          </table:table-cell>
          <table:table-cell table:formula="of:=[$CopyFromThing.G13]" office:value-type="string" office:string-value="12" calcext:value-type="string">
            <text:p>12</text:p>
          </table:table-cell>
        </table:table-row>
        <table:table-row table:style-name="ro1">
          <table:table-cell/>
          <table:table-cell table:formula="of:=[$CopyFromThing.I14]" office:value-type="string" office:string-value="MMSZ5231B-7-F" calcext:value-type="string">
            <text:p>MMSZ5231B-7-F</text:p>
          </table:table-cell>
          <table:table-cell table:formula="of:=IF(ISNUMBER(SEARCH(&quot;R&quot;;[$CopyFromThing.A14]));&quot;R&quot;;&quot;&quot;)">
            <text:p/>
          </table:table-cell>
          <table:table-cell table:formula="of:=IF(ISNUMBER(SEARCH(&quot;C&quot;;[$CopyFromThing.A14]));&quot;C&quot;;&quot;&quot;)">
            <text:p/>
          </table:table-cell>
          <table:table-cell table:formula="of:=IF([.D18]&amp;[.C18]&lt;&gt;&quot;&quot;;[.N18];&quot;&quot;)">
            <text:p/>
          </table:table-cell>
          <table:table-cell table:style-name="ce13" table:formula="of:=[.C18]&amp;[.D18]&amp;[.E18]&amp;&quot;__&quot;&amp;[$CopyFromThing.I14]&amp;&quot;__&quot;&amp;[$CopyFromThing.B14]" office:value-type="string" office:string-value="__MMSZ5231B-7-F__5.6V" calcext:value-type="string">
            <text:p>__MMSZ5231B-7-F__5.6V</text:p>
          </table:table-cell>
          <table:table-cell table:formula="of:=[$CopyFromThing.D14]" office:value-type="string" office:string-value="AADuffy:SOD123_MMSZ5231B-7-F" calcext:value-type="string">
            <text:p>AADuffy:SOD123_MMSZ5231B-7-F</text:p>
          </table:table-cell>
          <table:table-cell table:formula="of:=FIND(&quot;_&quot;;[.G18])" office:value-type="float" office:value="15" calcext:value-type="float">
            <text:p>15</text:p>
          </table:table-cell>
          <table:table-cell table:formula="of:=IF(ISNUMBER([.H18]);RIGHT([.G18];LEN([.G18])-[.H18]);RIGHT([.G18];LEN([.G18])-FIND(&quot;:&quot;;[.G18])))" office:value-type="string" office:string-value="MMSZ5231B-7-F" calcext:value-type="string">
            <text:p>MMSZ5231B-7-F</text:p>
          </table:table-cell>
          <table:table-cell table:style-name="ce16" table:formula="of:=MATCH([.I18];{&quot;0603&quot;;&quot;1206&quot;};0)" office:value-type="string" office:string-value="" calcext:value-type="error">
            <text:p>#N/A</text:p>
          </table:table-cell>
          <table:table-cell table:style-name="ce16" table:formula="of:=RIGHT([.G18];LEN([.G18])-FIND(&quot;:&quot;;[.G18]))" office:value-type="string" office:string-value="SOD123_MMSZ5231B-7-F" calcext:value-type="string">
            <text:p>SOD123_MMSZ5231B-7-F</text:p>
          </table:table-cell>
          <table:table-cell table:formula="of:=SEARCH(&quot;0603&quot;;[.G18])" office:value-type="string" office:string-value="" calcext:value-type="error">
            <text:p>#VALUE!</text:p>
          </table:table-cell>
          <table:table-cell table:formula="of:=SEARCH(&quot;1206&quot;;[.G18])" office:value-type="string" office:string-value="" calcext:value-type="error">
            <text:p>#VALUE!</text:p>
          </table:table-cell>
          <table:table-cell table:formula="of:=IF(ISNUMBER([.M18]);&quot;1206&quot;;IF(ISNUMBER([.L18]);&quot;0603&quot;;[.K18]))" office:value-type="string" office:string-value="SOD123_MMSZ5231B-7-F" calcext:value-type="string">
            <text:p>SOD123_MMSZ5231B-7-F</text:p>
          </table:table-cell>
          <table:table-cell table:formula="of:=IF(ISNUMBER([$CopyFromThing.E14]*1);[$CopyFromThing.E14]*1;0)" office:value-type="float" office:value="1" calcext:value-type="float">
            <text:p>1</text:p>
          </table:table-cell>
          <table:table-cell table:formula="of:=VLOOKUP([.F18];[$Supplier_Lookup.$O$7:.$P$104];2;0)" office:value-type="float" office:value="10" calcext:value-type="float">
            <text:p>10</text:p>
          </table:table-cell>
          <table:table-cell table:formula="of:=IF(INDIRECT(&quot;Supplier_Lookup.&quot;&amp;[.Q$3]&amp;[.$P18])&lt;&gt;&quot;&quot;;INDIRECT(&quot;Supplier_Lookup.L&quot;&amp;[.$P18]);INDIRECT(&quot;Supplier_Lookup.&quot;&amp;[.Q$4]&amp;[.$P18]))" office:value-type="string" office:string-value="5.6V" calcext:value-type="string">
            <text:p>5.6V</text:p>
          </table:table-cell>
          <table:table-cell table:style-name="ce40" table:formula="of:=INDIRECT(&quot;Supplier_Lookup.&quot;&amp;[.R$4]&amp;[.$P18])" office:value-type="float" office:value="0" calcext:value-type="float">
            <text:p>0</text:p>
          </table:table-cell>
          <table:table-cell table:formula="of:=INDIRECT(&quot;Supplier_Lookup.&quot;&amp;[.S$4]&amp;[.$P18])" office:value-type="string" office:string-value="MMSZ5231B-7-F" calcext:value-type="string">
            <text:p>MMSZ5231B-7-F</text:p>
          </table:table-cell>
          <table:table-cell table:formula="of:=INDIRECT(&quot;Supplier_Lookup.&quot;&amp;[.T$4]&amp;[.$P18])" office:value-type="string" office:string-value="Diodes Inc" calcext:value-type="string">
            <text:p>Diodes Inc</text:p>
          </table:table-cell>
          <table:table-cell table:formula="of:=INDIRECT(&quot;Supplier_Lookup.&quot;&amp;[.U$4]&amp;[.$P18])" office:value-type="string" office:string-value="MMSZ5232B-7-F" calcext:value-type="string">
            <text:p>MMSZ5232B-7-F</text:p>
          </table:table-cell>
          <table:table-cell table:formula="of:=INDIRECT(&quot;Supplier_Lookup.&quot;&amp;[.V$4]&amp;[.$P18])" office:value-type="string" office:string-value="LCSC" calcext:value-type="string">
            <text:p>LCSC</text:p>
          </table:table-cell>
          <table:table-cell table:formula="of:=INDIRECT(&quot;Supplier_Lookup.&quot;&amp;[.W$4]&amp;[.$P18])" office:value-type="string" office:string-value="C156265" calcext:value-type="string">
            <text:p>C156265</text:p>
          </table:table-cell>
          <table:table-cell table:formula="of:=INDIRECT(&quot;Supplier_Lookup.&quot;&amp;[.X$4]&amp;[.$P18])" office:value-type="string" office:string-value="https://www.lcsc.com/product-detail/C156265.html" calcext:value-type="string">
            <text:p>https://www.lcsc.com/product-detail/C156265.html</text:p>
          </table:table-cell>
          <table:table-cell table:formula="of:=INDIRECT(&quot;Supplier_Lookup.&quot;&amp;[.Y$4]&amp;[.$P18])" office:value-type="float" office:value="0.0475" calcext:value-type="float">
            <text:p>0.0475</text:p>
          </table:table-cell>
          <table:table-cell table:formula="of:=IF(INDIRECT(&quot;Supplier_Lookup.&quot;&amp;[.Z$4]&amp;[.$P18])=&quot;&quot;;&quot;&quot;;INDIRECT(&quot;Supplier_Lookup.&quot;&amp;[.Z$4]&amp;[.$P18]))">
            <text:p/>
          </table:table-cell>
          <table:table-cell table:formula="of:=IF(ISNUMBER([.Y18]);[.Y18];0)" office:value-type="float" office:value="0.0475" calcext:value-type="float">
            <text:p>0.0475</text:p>
          </table:table-cell>
          <table:table-cell table:formula="of:=[.AA18]*[.O18]" office:value-type="float" office:value="0.0475" calcext:value-type="float">
            <text:p>0.0475</text:p>
          </table:table-cell>
          <table:table-cell table:formula="of:=[.N18]&amp;&quot;-&quot;&amp;[.R18]" office:value-type="string" office:string-value="SOD123_MMSZ5231B-7-F-0" calcext:value-type="string">
            <text:p>SOD123_MMSZ5231B-7-F-0</text:p>
          </table:table-cell>
          <table:table-cell table:formula="of:=[$CopyFromThing.A14]" office:value-type="string" office:string-value="D3" calcext:value-type="string">
            <text:p>D3</text:p>
          </table:table-cell>
          <table:table-cell table:formula="of:=[$CopyFromThing.G14]" office:value-type="string" office:string-value="13" calcext:value-type="string">
            <text:p>13</text:p>
          </table:table-cell>
        </table:table-row>
        <table:table-row table:style-name="ro1">
          <table:table-cell/>
          <table:table-cell table:formula="of:=[$CopyFromThing.I15]" office:value-type="string" office:string-value="MMBT3904-TP" calcext:value-type="string">
            <text:p>MMBT3904-TP</text:p>
          </table:table-cell>
          <table:table-cell table:formula="of:=IF(ISNUMBER(SEARCH(&quot;R&quot;;[$CopyFromThing.A15]));&quot;R&quot;;&quot;&quot;)">
            <text:p/>
          </table:table-cell>
          <table:table-cell table:formula="of:=IF(ISNUMBER(SEARCH(&quot;C&quot;;[$CopyFromThing.A15]));&quot;C&quot;;&quot;&quot;)">
            <text:p/>
          </table:table-cell>
          <table:table-cell table:formula="of:=IF([.D19]&amp;[.C19]&lt;&gt;&quot;&quot;;[.N19];&quot;&quot;)">
            <text:p/>
          </table:table-cell>
          <table:table-cell table:style-name="ce13" table:formula="of:=[.C19]&amp;[.D19]&amp;[.E19]&amp;&quot;__&quot;&amp;[$CopyFromThing.I15]&amp;&quot;__&quot;&amp;[$CopyFromThing.B15]" office:value-type="string" office:string-value="__MMBT3904-TP__" calcext:value-type="string">
            <text:p>__MMBT3904-TP__</text:p>
          </table:table-cell>
          <table:table-cell table:formula="of:=[$CopyFromThing.D15]" office:value-type="string" office:string-value="AADuffy:SOT23-3" calcext:value-type="string">
            <text:p>AADuffy:SOT23-3</text:p>
          </table:table-cell>
          <table:table-cell table:formula="of:=FIND(&quot;_&quot;;[.G19])" office:value-type="string" office:string-value="" calcext:value-type="error">
            <text:p>#VALUE!</text:p>
          </table:table-cell>
          <table:table-cell table:formula="of:=IF(ISNUMBER([.H19]);RIGHT([.G19];LEN([.G19])-[.H19]);RIGHT([.G19];LEN([.G19])-FIND(&quot;:&quot;;[.G19])))" office:value-type="string" office:string-value="SOT23-3" calcext:value-type="string">
            <text:p>SOT23-3</text:p>
          </table:table-cell>
          <table:table-cell table:style-name="ce16" table:formula="of:=MATCH([.I19];{&quot;0603&quot;;&quot;1206&quot;};0)" office:value-type="string" office:string-value="" calcext:value-type="error">
            <text:p>#N/A</text:p>
          </table:table-cell>
          <table:table-cell table:style-name="ce16" table:formula="of:=RIGHT([.G19];LEN([.G19])-FIND(&quot;:&quot;;[.G19]))" office:value-type="string" office:string-value="SOT23-3" calcext:value-type="string">
            <text:p>SOT23-3</text:p>
          </table:table-cell>
          <table:table-cell table:formula="of:=SEARCH(&quot;0603&quot;;[.G19])" office:value-type="string" office:string-value="" calcext:value-type="error">
            <text:p>#VALUE!</text:p>
          </table:table-cell>
          <table:table-cell table:formula="of:=SEARCH(&quot;1206&quot;;[.G19])" office:value-type="string" office:string-value="" calcext:value-type="error">
            <text:p>#VALUE!</text:p>
          </table:table-cell>
          <table:table-cell table:formula="of:=IF(ISNUMBER([.M19]);&quot;1206&quot;;IF(ISNUMBER([.L19]);&quot;0603&quot;;[.K19]))" office:value-type="string" office:string-value="SOT23-3" calcext:value-type="string">
            <text:p>SOT23-3</text:p>
          </table:table-cell>
          <table:table-cell table:formula="of:=IF(ISNUMBER([$CopyFromThing.E15]*1);[$CopyFromThing.E15]*1;0)" office:value-type="float" office:value="14" calcext:value-type="float">
            <text:p>14</text:p>
          </table:table-cell>
          <table:table-cell table:formula="of:=VLOOKUP([.F19];[$Supplier_Lookup.$O$7:.$P$104];2;0)" office:value-type="float" office:value="16" calcext:value-type="float">
            <text:p>16</text:p>
          </table:table-cell>
          <table:table-cell table:formula="of:=IF(INDIRECT(&quot;Supplier_Lookup.&quot;&amp;[.Q$3]&amp;[.$P19])&lt;&gt;&quot;&quot;;INDIRECT(&quot;Supplier_Lookup.L&quot;&amp;[.$P19]);INDIRECT(&quot;Supplier_Lookup.&quot;&amp;[.Q$4]&amp;[.$P19]))" office:value-type="float" office:value="0" calcext:value-type="float">
            <text:p>0</text:p>
          </table:table-cell>
          <table:table-cell table:formula="of:=INDIRECT(&quot;Supplier_Lookup.&quot;&amp;[.R$4]&amp;[.$P19])" office:value-type="float" office:value="0" calcext:value-type="float">
            <text:p>0</text:p>
          </table:table-cell>
          <table:table-cell table:formula="of:=INDIRECT(&quot;Supplier_Lookup.&quot;&amp;[.S$4]&amp;[.$P19])" office:value-type="string" office:string-value="MMBT3904-TP" calcext:value-type="string">
            <text:p>MMBT3904-TP</text:p>
          </table:table-cell>
          <table:table-cell table:formula="of:=INDIRECT(&quot;Supplier_Lookup.&quot;&amp;[.T$4]&amp;[.$P19])" office:value-type="string" office:string-value="onsemi" calcext:value-type="string">
            <text:p>onsemi</text:p>
          </table:table-cell>
          <table:table-cell table:formula="of:=INDIRECT(&quot;Supplier_Lookup.&quot;&amp;[.U$4]&amp;[.$P19])" office:value-type="string" office:string-value="MMBT3904LT1G" calcext:value-type="string">
            <text:p>MMBT3904LT1G</text:p>
          </table:table-cell>
          <table:table-cell table:formula="of:=INDIRECT(&quot;Supplier_Lookup.&quot;&amp;[.V$4]&amp;[.$P19])" office:value-type="string" office:string-value="LCSC" calcext:value-type="string">
            <text:p>LCSC</text:p>
          </table:table-cell>
          <table:table-cell table:formula="of:=INDIRECT(&quot;Supplier_Lookup.&quot;&amp;[.W$4]&amp;[.$P19])" office:value-type="string" office:string-value="C81464" calcext:value-type="string">
            <text:p>C81464</text:p>
          </table:table-cell>
          <table:table-cell table:formula="of:=INDIRECT(&quot;Supplier_Lookup.&quot;&amp;[.X$4]&amp;[.$P19])" office:value-type="string" office:string-value="https://www.lcsc.com/product-detail/C81464.html" calcext:value-type="string">
            <text:p>https://www.lcsc.com/product-detail/C81464.html</text:p>
          </table:table-cell>
          <table:table-cell table:formula="of:=INDIRECT(&quot;Supplier_Lookup.&quot;&amp;[.Y$4]&amp;[.$P19])" office:value-type="float" office:value="0.0141" calcext:value-type="float">
            <text:p>0.0141</text:p>
          </table:table-cell>
          <table:table-cell table:formula="of:=IF(INDIRECT(&quot;Supplier_Lookup.&quot;&amp;[.Z$4]&amp;[.$P19])=&quot;&quot;;&quot;&quot;;INDIRECT(&quot;Supplier_Lookup.&quot;&amp;[.Z$4]&amp;[.$P19]))">
            <text:p/>
          </table:table-cell>
          <table:table-cell table:formula="of:=IF(ISNUMBER([.Y19]);[.Y19];0)" office:value-type="float" office:value="0.0141" calcext:value-type="float">
            <text:p>0.0141</text:p>
          </table:table-cell>
          <table:table-cell table:formula="of:=[.AA19]*[.O19]" office:value-type="float" office:value="0.1974" calcext:value-type="float">
            <text:p>0.1974</text:p>
          </table:table-cell>
          <table:table-cell table:formula="of:=[.N19]&amp;&quot;-&quot;&amp;[.R19]" office:value-type="string" office:string-value="SOT23-3-0" calcext:value-type="string">
            <text:p>SOT23-3-0</text:p>
          </table:table-cell>
          <table:table-cell table:formula="of:=[$CopyFromThing.A15]" office:value-type="string" office:string-value="Q1,Q3,Q5,Q7,Q8,Q9,Q12,Q13,Q14,Q17,Q20,Q26,Q30,Q37" calcext:value-type="string">
            <text:p>Q1,Q3,Q5,Q7,Q8,Q9,Q12,Q13,Q14,Q17,Q20,Q26,Q30,Q37</text:p>
          </table:table-cell>
          <table:table-cell table:formula="of:=[$CopyFromThing.G15]" office:value-type="string" office:string-value="14" calcext:value-type="string">
            <text:p>14</text:p>
          </table:table-cell>
        </table:table-row>
        <table:table-row table:style-name="ro1">
          <table:table-cell/>
          <table:table-cell table:formula="of:=[$CopyFromThing.I16]" office:value-type="string" office:string-value="MMFTP84" calcext:value-type="string">
            <text:p>MMFTP84</text:p>
          </table:table-cell>
          <table:table-cell table:formula="of:=IF(ISNUMBER(SEARCH(&quot;R&quot;;[$CopyFromThing.A16]));&quot;R&quot;;&quot;&quot;)">
            <text:p/>
          </table:table-cell>
          <table:table-cell table:formula="of:=IF(ISNUMBER(SEARCH(&quot;C&quot;;[$CopyFromThing.A16]));&quot;C&quot;;&quot;&quot;)">
            <text:p/>
          </table:table-cell>
          <table:table-cell table:formula="of:=IF([.D20]&amp;[.C20]&lt;&gt;&quot;&quot;;[.N20];&quot;&quot;)">
            <text:p/>
          </table:table-cell>
          <table:table-cell table:style-name="ce13" table:formula="of:=[.C20]&amp;[.D20]&amp;[.E20]&amp;&quot;__&quot;&amp;[$CopyFromThing.I16]&amp;&quot;__&quot;&amp;[$CopyFromThing.B16]" office:value-type="string" office:string-value="__MMFTP84__" calcext:value-type="string">
            <text:p>__MMFTP84__</text:p>
          </table:table-cell>
          <table:table-cell table:formula="of:=[$CopyFromThing.D16]" office:value-type="string" office:string-value="AADuffy:DMN65D8L-7" calcext:value-type="string">
            <text:p>AADuffy:DMN65D8L-7</text:p>
          </table:table-cell>
          <table:table-cell table:formula="of:=FIND(&quot;_&quot;;[.G20])" office:value-type="string" office:string-value="" calcext:value-type="error">
            <text:p>#VALUE!</text:p>
          </table:table-cell>
          <table:table-cell table:formula="of:=IF(ISNUMBER([.H20]);RIGHT([.G20];LEN([.G20])-[.H20]);RIGHT([.G20];LEN([.G20])-FIND(&quot;:&quot;;[.G20])))" office:value-type="string" office:string-value="DMN65D8L-7" calcext:value-type="string">
            <text:p>DMN65D8L-7</text:p>
          </table:table-cell>
          <table:table-cell table:style-name="ce16" table:formula="of:=MATCH([.I20];{&quot;0603&quot;;&quot;1206&quot;};0)" office:value-type="string" office:string-value="" calcext:value-type="error">
            <text:p>#N/A</text:p>
          </table:table-cell>
          <table:table-cell table:style-name="ce16" table:formula="of:=RIGHT([.G20];LEN([.G20])-FIND(&quot;:&quot;;[.G20]))" office:value-type="string" office:string-value="DMN65D8L-7" calcext:value-type="string">
            <text:p>DMN65D8L-7</text:p>
          </table:table-cell>
          <table:table-cell table:formula="of:=SEARCH(&quot;0603&quot;;[.G20])" office:value-type="string" office:string-value="" calcext:value-type="error">
            <text:p>#VALUE!</text:p>
          </table:table-cell>
          <table:table-cell table:formula="of:=SEARCH(&quot;1206&quot;;[.G20])" office:value-type="string" office:string-value="" calcext:value-type="error">
            <text:p>#VALUE!</text:p>
          </table:table-cell>
          <table:table-cell table:formula="of:=IF(ISNUMBER([.M20]);&quot;1206&quot;;IF(ISNUMBER([.L20]);&quot;0603&quot;;[.K20]))" office:value-type="string" office:string-value="DMN65D8L-7" calcext:value-type="string">
            <text:p>DMN65D8L-7</text:p>
          </table:table-cell>
          <table:table-cell table:formula="of:=IF(ISNUMBER([$CopyFromThing.E16]*1);[$CopyFromThing.E16]*1;0)" office:value-type="float" office:value="12" calcext:value-type="float">
            <text:p>12</text:p>
          </table:table-cell>
          <table:table-cell table:formula="of:=VLOOKUP([.F20];[$Supplier_Lookup.$O$7:.$P$104];2;0)" office:value-type="float" office:value="18" calcext:value-type="float">
            <text:p>18</text:p>
          </table:table-cell>
          <table:table-cell table:formula="of:=IF(INDIRECT(&quot;Supplier_Lookup.&quot;&amp;[.Q$3]&amp;[.$P20])&lt;&gt;&quot;&quot;;INDIRECT(&quot;Supplier_Lookup.L&quot;&amp;[.$P20]);INDIRECT(&quot;Supplier_Lookup.&quot;&amp;[.Q$4]&amp;[.$P20]))" office:value-type="float" office:value="0" calcext:value-type="float">
            <text:p>0</text:p>
          </table:table-cell>
          <table:table-cell table:formula="of:=INDIRECT(&quot;Supplier_Lookup.&quot;&amp;[.R$4]&amp;[.$P20])" office:value-type="float" office:value="0" calcext:value-type="float">
            <text:p>0</text:p>
          </table:table-cell>
          <table:table-cell table:formula="of:=INDIRECT(&quot;Supplier_Lookup.&quot;&amp;[.S$4]&amp;[.$P20])" office:value-type="string" office:string-value="MMFTP84" calcext:value-type="string">
            <text:p>MMFTP84</text:p>
          </table:table-cell>
          <table:table-cell table:formula="of:=INDIRECT(&quot;Supplier_Lookup.&quot;&amp;[.T$4]&amp;[.$P20])" office:value-type="string" office:string-value="Diotec" calcext:value-type="string">
            <text:p>Diotec</text:p>
          </table:table-cell>
          <table:table-cell table:formula="of:=INDIRECT(&quot;Supplier_Lookup.&quot;&amp;[.U$4]&amp;[.$P20])" office:value-type="string" office:string-value="MMFTP84" calcext:value-type="string">
            <text:p>MMFTP84</text:p>
          </table:table-cell>
          <table:table-cell table:formula="of:=INDIRECT(&quot;Supplier_Lookup.&quot;&amp;[.V$4]&amp;[.$P20])" office:value-type="string" office:string-value="Digikey" calcext:value-type="string">
            <text:p>Digikey</text:p>
          </table:table-cell>
          <table:table-cell table:formula="of:=INDIRECT(&quot;Supplier_Lookup.&quot;&amp;[.W$4]&amp;[.$P20])" office:value-type="string" office:string-value="4878-MMFTP84CT-ND" calcext:value-type="string">
            <text:p>4878-MMFTP84CT-ND</text:p>
          </table:table-cell>
          <table:table-cell table:formula="of:=INDIRECT(&quot;Supplier_Lookup.&quot;&amp;[.X$4]&amp;[.$P20])" office:value-type="string" office:string-value="https://www.digikey.com/en/products/detail/diotec-semiconductor/MMFTP84/13154778" calcext:value-type="string">
            <text:p>https://www.digikey.com/en/products/detail/diotec-semiconductor/MMFTP84/13154778</text:p>
          </table:table-cell>
          <table:table-cell table:formula="of:=INDIRECT(&quot;Supplier_Lookup.&quot;&amp;[.Y$4]&amp;[.$P20])" office:value-type="float" office:value="0.0831" calcext:value-type="float">
            <text:p>0.0831</text:p>
          </table:table-cell>
          <table:table-cell table:formula="of:=IF(INDIRECT(&quot;Supplier_Lookup.&quot;&amp;[.Z$4]&amp;[.$P20])=&quot;&quot;;&quot;&quot;;INDIRECT(&quot;Supplier_Lookup.&quot;&amp;[.Z$4]&amp;[.$P20]))">
            <text:p/>
          </table:table-cell>
          <table:table-cell table:formula="of:=IF(ISNUMBER([.Y20]);[.Y20];0)" office:value-type="float" office:value="0.0831" calcext:value-type="float">
            <text:p>0.0831</text:p>
          </table:table-cell>
          <table:table-cell table:formula="of:=[.AA20]*[.O20]" office:value-type="float" office:value="0.9972" calcext:value-type="float">
            <text:p>0.9972</text:p>
          </table:table-cell>
          <table:table-cell table:formula="of:=[.N20]&amp;&quot;-&quot;&amp;[.R20]" office:value-type="string" office:string-value="DMN65D8L-7-0" calcext:value-type="string">
            <text:p>DMN65D8L-7-0</text:p>
          </table:table-cell>
          <table:table-cell table:formula="of:=[$CopyFromThing.A16]" office:value-type="string" office:string-value="Q2,Q4,Q6,Q11,Q15,Q18,Q22,Q24,Q25,Q27,Q29,Q31" calcext:value-type="string">
            <text:p>Q2,Q4,Q6,Q11,Q15,Q18,Q22,Q24,Q25,Q27,Q29,Q31</text:p>
          </table:table-cell>
          <table:table-cell table:formula="of:=[$CopyFromThing.G16]" office:value-type="string" office:string-value="15" calcext:value-type="string">
            <text:p>15</text:p>
          </table:table-cell>
        </table:table-row>
        <table:table-row table:style-name="ro1">
          <table:table-cell/>
          <table:table-cell table:formula="of:=[$CopyFromThing.I17]" office:value-type="string" office:string-value="DMN65D8L-7" calcext:value-type="string">
            <text:p>DMN65D8L-7</text:p>
          </table:table-cell>
          <table:table-cell table:formula="of:=IF(ISNUMBER(SEARCH(&quot;R&quot;;[$CopyFromThing.A17]));&quot;R&quot;;&quot;&quot;)">
            <text:p/>
          </table:table-cell>
          <table:table-cell table:formula="of:=IF(ISNUMBER(SEARCH(&quot;C&quot;;[$CopyFromThing.A17]));&quot;C&quot;;&quot;&quot;)">
            <text:p/>
          </table:table-cell>
          <table:table-cell table:formula="of:=IF([.D21]&amp;[.C21]&lt;&gt;&quot;&quot;;[.N21];&quot;&quot;)">
            <text:p/>
          </table:table-cell>
          <table:table-cell table:style-name="ce13" table:formula="of:=[.C21]&amp;[.D21]&amp;[.E21]&amp;&quot;__&quot;&amp;[$CopyFromThing.I17]&amp;&quot;__&quot;&amp;[$CopyFromThing.B17]" office:value-type="string" office:string-value="__DMN65D8L-7__" calcext:value-type="string">
            <text:p>__DMN65D8L-7__</text:p>
          </table:table-cell>
          <table:table-cell table:formula="of:=[$CopyFromThing.D17]" office:value-type="string" office:string-value="AADuffy:DMN65D8L-7" calcext:value-type="string">
            <text:p>AADuffy:DMN65D8L-7</text:p>
          </table:table-cell>
          <table:table-cell table:formula="of:=FIND(&quot;_&quot;;[.G21])" office:value-type="string" office:string-value="" calcext:value-type="error">
            <text:p>#VALUE!</text:p>
          </table:table-cell>
          <table:table-cell table:formula="of:=IF(ISNUMBER([.H21]);RIGHT([.G21];LEN([.G21])-[.H21]);RIGHT([.G21];LEN([.G21])-FIND(&quot;:&quot;;[.G21])))" office:value-type="string" office:string-value="DMN65D8L-7" calcext:value-type="string">
            <text:p>DMN65D8L-7</text:p>
          </table:table-cell>
          <table:table-cell table:style-name="ce16" table:formula="of:=MATCH([.I21];{&quot;0603&quot;;&quot;1206&quot;};0)" office:value-type="string" office:string-value="" calcext:value-type="error">
            <text:p>#N/A</text:p>
          </table:table-cell>
          <table:table-cell table:style-name="ce16" table:formula="of:=RIGHT([.G21];LEN([.G21])-FIND(&quot;:&quot;;[.G21]))" office:value-type="string" office:string-value="DMN65D8L-7" calcext:value-type="string">
            <text:p>DMN65D8L-7</text:p>
          </table:table-cell>
          <table:table-cell table:formula="of:=SEARCH(&quot;0603&quot;;[.G21])" office:value-type="string" office:string-value="" calcext:value-type="error">
            <text:p>#VALUE!</text:p>
          </table:table-cell>
          <table:table-cell table:formula="of:=SEARCH(&quot;1206&quot;;[.G21])" office:value-type="string" office:string-value="" calcext:value-type="error">
            <text:p>#VALUE!</text:p>
          </table:table-cell>
          <table:table-cell table:formula="of:=IF(ISNUMBER([.M21]);&quot;1206&quot;;IF(ISNUMBER([.L21]);&quot;0603&quot;;[.K21]))" office:value-type="string" office:string-value="DMN65D8L-7" calcext:value-type="string">
            <text:p>DMN65D8L-7</text:p>
          </table:table-cell>
          <table:table-cell table:formula="of:=IF(ISNUMBER([$CopyFromThing.E17]*1);[$CopyFromThing.E17]*1;0)" office:value-type="float" office:value="4" calcext:value-type="float">
            <text:p>4</text:p>
          </table:table-cell>
          <table:table-cell table:formula="of:=VLOOKUP([.F21];[$Supplier_Lookup.$O$7:.$P$104];2;0)" office:value-type="float" office:value="17" calcext:value-type="float">
            <text:p>17</text:p>
          </table:table-cell>
          <table:table-cell table:formula="of:=IF(INDIRECT(&quot;Supplier_Lookup.&quot;&amp;[.Q$3]&amp;[.$P21])&lt;&gt;&quot;&quot;;INDIRECT(&quot;Supplier_Lookup.L&quot;&amp;[.$P21]);INDIRECT(&quot;Supplier_Lookup.&quot;&amp;[.Q$4]&amp;[.$P21]))" office:value-type="float" office:value="0" calcext:value-type="float">
            <text:p>0</text:p>
          </table:table-cell>
          <table:table-cell table:formula="of:=INDIRECT(&quot;Supplier_Lookup.&quot;&amp;[.R$4]&amp;[.$P21])" office:value-type="float" office:value="0" calcext:value-type="float">
            <text:p>0</text:p>
          </table:table-cell>
          <table:table-cell table:formula="of:=INDIRECT(&quot;Supplier_Lookup.&quot;&amp;[.S$4]&amp;[.$P21])" office:value-type="string" office:string-value="DMN65D8L-7" calcext:value-type="string">
            <text:p>DMN65D8L-7</text:p>
          </table:table-cell>
          <table:table-cell table:formula="of:=INDIRECT(&quot;Supplier_Lookup.&quot;&amp;[.T$4]&amp;[.$P21])" office:value-type="string" office:string-value="Infineon" calcext:value-type="string">
            <text:p>Infineon</text:p>
          </table:table-cell>
          <table:table-cell table:formula="of:=INDIRECT(&quot;Supplier_Lookup.&quot;&amp;[.U$4]&amp;[.$P21])" office:value-type="string" office:string-value="IRLML6344TRPBF" calcext:value-type="string">
            <text:p>IRLML6344TRPBF</text:p>
          </table:table-cell>
          <table:table-cell table:formula="of:=INDIRECT(&quot;Supplier_Lookup.&quot;&amp;[.V$4]&amp;[.$P21])" office:value-type="string" office:string-value="LCSC" calcext:value-type="string">
            <text:p>LCSC</text:p>
          </table:table-cell>
          <table:table-cell table:formula="of:=INDIRECT(&quot;Supplier_Lookup.&quot;&amp;[.W$4]&amp;[.$P21])" office:value-type="string" office:string-value="C53550" calcext:value-type="string">
            <text:p>C53550</text:p>
          </table:table-cell>
          <table:table-cell table:formula="of:=INDIRECT(&quot;Supplier_Lookup.&quot;&amp;[.X$4]&amp;[.$P21])" office:value-type="string" office:string-value="https://www.lcsc.com/product-detail/C53550.html" calcext:value-type="string">
            <text:p>https://www.lcsc.com/product-detail/C53550.html</text:p>
          </table:table-cell>
          <table:table-cell table:formula="of:=INDIRECT(&quot;Supplier_Lookup.&quot;&amp;[.Y$4]&amp;[.$P21])" office:value-type="float" office:value="0.1652" calcext:value-type="float">
            <text:p>0.1652</text:p>
          </table:table-cell>
          <table:table-cell table:formula="of:=IF(INDIRECT(&quot;Supplier_Lookup.&quot;&amp;[.Z$4]&amp;[.$P21])=&quot;&quot;;&quot;&quot;;INDIRECT(&quot;Supplier_Lookup.&quot;&amp;[.Z$4]&amp;[.$P21]))">
            <text:p/>
          </table:table-cell>
          <table:table-cell table:formula="of:=IF(ISNUMBER([.Y21]);[.Y21];0)" office:value-type="float" office:value="0.1652" calcext:value-type="float">
            <text:p>0.1652</text:p>
          </table:table-cell>
          <table:table-cell table:formula="of:=[.AA21]*[.O21]" office:value-type="float" office:value="0.6608" calcext:value-type="float">
            <text:p>0.6608</text:p>
          </table:table-cell>
          <table:table-cell table:formula="of:=[.N21]&amp;&quot;-&quot;&amp;[.R21]" office:value-type="string" office:string-value="DMN65D8L-7-0" calcext:value-type="string">
            <text:p>DMN65D8L-7-0</text:p>
          </table:table-cell>
          <table:table-cell table:formula="of:=[$CopyFromThing.A17]" office:value-type="string" office:string-value="Q16,Q19,Q21,Q23" calcext:value-type="string">
            <text:p>Q16,Q19,Q21,Q23</text:p>
          </table:table-cell>
          <table:table-cell table:formula="of:=[$CopyFromThing.G17]" office:value-type="string" office:string-value="16" calcext:value-type="string">
            <text:p>16</text:p>
          </table:table-cell>
        </table:table-row>
        <table:table-row table:style-name="ro1">
          <table:table-cell/>
          <table:table-cell table:formula="of:=[$CopyFromThing.I18]">
            <text:p/>
          </table:table-cell>
          <table:table-cell table:formula="of:=IF(ISNUMBER(SEARCH(&quot;R&quot;;[$CopyFromThing.A18]));&quot;R&quot;;&quot;&quot;)" office:value-type="string" office:string-value="R" calcext:value-type="string">
            <text:p>R</text:p>
          </table:table-cell>
          <table:table-cell table:formula="of:=IF(ISNUMBER(SEARCH(&quot;C&quot;;[$CopyFromThing.A18]));&quot;C&quot;;&quot;&quot;)">
            <text:p/>
          </table:table-cell>
          <table:table-cell table:formula="of:=IF([.D22]&amp;[.C22]&lt;&gt;&quot;&quot;;[.N22];&quot;&quot;)" office:value-type="string" office:string-value="0603" calcext:value-type="string">
            <text:p>0603</text:p>
          </table:table-cell>
          <table:table-cell table:style-name="ce13" table:formula="of:=[.C22]&amp;[.D22]&amp;[.E22]&amp;&quot;__&quot;&amp;[$CopyFromThing.I18]&amp;&quot;__&quot;&amp;[$CopyFromThing.B18]" office:value-type="string" office:string-value="R0603____100K" calcext:value-type="string">
            <text:p>R0603____100K</text:p>
          </table:table-cell>
          <table:table-cell table:formula="of:=[$CopyFromThing.D18]" office:value-type="string" office:string-value="AADuffy:Resistor_0603" calcext:value-type="string">
            <text:p>AADuffy:Resistor_0603</text:p>
          </table:table-cell>
          <table:table-cell table:formula="of:=FIND(&quot;_&quot;;[.G22])" office:value-type="float" office:value="17" calcext:value-type="float">
            <text:p>17</text:p>
          </table:table-cell>
          <table:table-cell table:formula="of:=IF(ISNUMBER([.H22]);RIGHT([.G22];LEN([.G22])-[.H22]);RIGHT([.G22];LEN([.G22])-FIND(&quot;:&quot;;[.G22])))" office:value-type="string" office:string-value="0603" calcext:value-type="string">
            <text:p>0603</text:p>
          </table:table-cell>
          <table:table-cell table:style-name="ce16" table:formula="of:=MATCH([.I22];{&quot;0603&quot;;&quot;1206&quot;};0)" office:value-type="float" office:value="1" calcext:value-type="float">
            <text:p>1</text:p>
          </table:table-cell>
          <table:table-cell table:style-name="ce16" table:formula="of:=RIGHT([.G22];LEN([.G22])-FIND(&quot;:&quot;;[.G22]))" office:value-type="string" office:string-value="Resistor_0603" calcext:value-type="string">
            <text:p>Resistor_0603</text:p>
          </table:table-cell>
          <table:table-cell table:formula="of:=SEARCH(&quot;0603&quot;;[.G22])" office:value-type="float" office:value="18" calcext:value-type="float">
            <text:p>18</text:p>
          </table:table-cell>
          <table:table-cell table:formula="of:=SEARCH(&quot;1206&quot;;[.G22])" office:value-type="string" office:string-value="" calcext:value-type="error">
            <text:p>#VALUE!</text:p>
          </table:table-cell>
          <table:table-cell table:formula="of:=IF(ISNUMBER([.M22]);&quot;1206&quot;;IF(ISNUMBER([.L22]);&quot;0603&quot;;[.K22]))" office:value-type="string" office:string-value="0603" calcext:value-type="string">
            <text:p>0603</text:p>
          </table:table-cell>
          <table:table-cell table:formula="of:=IF(ISNUMBER([$CopyFromThing.E18]*1);[$CopyFromThing.E18]*1;0)" office:value-type="float" office:value="16" calcext:value-type="float">
            <text:p>16</text:p>
          </table:table-cell>
          <table:table-cell table:formula="of:=VLOOKUP([.F22];[$Supplier_Lookup.$O$7:.$P$104];2;0)" office:value-type="float" office:value="34" calcext:value-type="float">
            <text:p>34</text:p>
          </table:table-cell>
          <table:table-cell table:formula="of:=IF(INDIRECT(&quot;Supplier_Lookup.&quot;&amp;[.Q$3]&amp;[.$P22])&lt;&gt;&quot;&quot;;INDIRECT(&quot;Supplier_Lookup.L&quot;&amp;[.$P22]);INDIRECT(&quot;Supplier_Lookup.&quot;&amp;[.Q$4]&amp;[.$P22]))" office:value-type="string" office:string-value="100K" calcext:value-type="string">
            <text:p>100K</text:p>
          </table:table-cell>
          <table:table-cell table:formula="of:=INDIRECT(&quot;Supplier_Lookup.&quot;&amp;[.R$4]&amp;[.$P22])" office:value-type="string" office:string-value="0603" calcext:value-type="string">
            <text:p>0603</text:p>
          </table:table-cell>
          <table:table-cell table:formula="of:=INDIRECT(&quot;Supplier_Lookup.&quot;&amp;[.S$4]&amp;[.$P22])" office:value-type="float" office:value="0" calcext:value-type="float">
            <text:p>0</text:p>
          </table:table-cell>
          <table:table-cell table:formula="of:=INDIRECT(&quot;Supplier_Lookup.&quot;&amp;[.T$4]&amp;[.$P22])" office:value-type="string" office:string-value="Yaego" calcext:value-type="string">
            <text:p>Yaego</text:p>
          </table:table-cell>
          <table:table-cell table:formula="of:=INDIRECT(&quot;Supplier_Lookup.&quot;&amp;[.U$4]&amp;[.$P22])" office:value-type="string" office:string-value="RC0603FR-07100KL" calcext:value-type="string">
            <text:p>RC0603FR-07100KL</text:p>
          </table:table-cell>
          <table:table-cell table:formula="of:=INDIRECT(&quot;Supplier_Lookup.&quot;&amp;[.V$4]&amp;[.$P22])" office:value-type="string" office:string-value="LCSC" calcext:value-type="string">
            <text:p>LCSC</text:p>
          </table:table-cell>
          <table:table-cell table:formula="of:=INDIRECT(&quot;Supplier_Lookup.&quot;&amp;[.W$4]&amp;[.$P22])" office:value-type="string" office:string-value="C14675" calcext:value-type="string">
            <text:p>C14675</text:p>
          </table:table-cell>
          <table:table-cell table:formula="of:=INDIRECT(&quot;Supplier_Lookup.&quot;&amp;[.X$4]&amp;[.$P22])" office:value-type="string" office:string-value="https://www.lcsc.com/product-detail/C14675.html" calcext:value-type="string">
            <text:p>https://www.lcsc.com/product-detail/C14675.html</text:p>
          </table:table-cell>
          <table:table-cell table:formula="of:=INDIRECT(&quot;Supplier_Lookup.&quot;&amp;[.Y$4]&amp;[.$P22])" office:value-type="float" office:value="0.0014" calcext:value-type="float">
            <text:p>0.0014</text:p>
          </table:table-cell>
          <table:table-cell table:formula="of:=IF(INDIRECT(&quot;Supplier_Lookup.&quot;&amp;[.Z$4]&amp;[.$P22])=&quot;&quot;;&quot;&quot;;INDIRECT(&quot;Supplier_Lookup.&quot;&amp;[.Z$4]&amp;[.$P22]))">
            <text:p/>
          </table:table-cell>
          <table:table-cell table:formula="of:=IF(ISNUMBER([.Y22]);[.Y22];0)" office:value-type="float" office:value="0.0014" calcext:value-type="float">
            <text:p>0.0014</text:p>
          </table:table-cell>
          <table:table-cell table:formula="of:=[.AA22]*[.O22]" office:value-type="float" office:value="0.0224" calcext:value-type="float">
            <text:p>0.0224</text:p>
          </table:table-cell>
          <table:table-cell table:formula="of:=[.N22]&amp;&quot;-&quot;&amp;[.R22]" office:value-type="string" office:string-value="0603-0603" calcext:value-type="string">
            <text:p>0603-0603</text:p>
          </table:table-cell>
          <table:table-cell table:formula="of:=[$CopyFromThing.A18]" office:value-type="string" office:string-value="R1,R11,R17,R26,R34,R39,R45,R49,R50,R52,R53,R71,R72,R95,R96,R97" calcext:value-type="string">
            <text:p>R1,R11,R17,R26,R34,R39,R45,R49,R50,R52,R53,R71,R72,R95,R96,R97</text:p>
          </table:table-cell>
          <table:table-cell table:formula="of:=[$CopyFromThing.G18]" office:value-type="string" office:string-value="17" calcext:value-type="string">
            <text:p>17</text:p>
          </table:table-cell>
        </table:table-row>
        <table:table-row table:style-name="ro1">
          <table:table-cell/>
          <table:table-cell table:formula="of:=[$CopyFromThing.I19]">
            <text:p/>
          </table:table-cell>
          <table:table-cell table:formula="of:=IF(ISNUMBER(SEARCH(&quot;R&quot;;[$CopyFromThing.A19]));&quot;R&quot;;&quot;&quot;)" office:value-type="string" office:string-value="R" calcext:value-type="string">
            <text:p>R</text:p>
          </table:table-cell>
          <table:table-cell table:formula="of:=IF(ISNUMBER(SEARCH(&quot;C&quot;;[$CopyFromThing.A19]));&quot;C&quot;;&quot;&quot;)">
            <text:p/>
          </table:table-cell>
          <table:table-cell table:formula="of:=IF([.D23]&amp;[.C23]&lt;&gt;&quot;&quot;;[.N23];&quot;&quot;)" office:value-type="string" office:string-value="0603" calcext:value-type="string">
            <text:p>0603</text:p>
          </table:table-cell>
          <table:table-cell table:style-name="ce13" table:formula="of:=[.C23]&amp;[.D23]&amp;[.E23]&amp;&quot;__&quot;&amp;[$CopyFromThing.I19]&amp;&quot;__&quot;&amp;[$CopyFromThing.B19]" office:value-type="string" office:string-value="R0603____330K" calcext:value-type="string">
            <text:p>R0603____330K</text:p>
          </table:table-cell>
          <table:table-cell table:formula="of:=[$CopyFromThing.D19]" office:value-type="string" office:string-value="AADuffy:Resistor_0603" calcext:value-type="string">
            <text:p>AADuffy:Resistor_0603</text:p>
          </table:table-cell>
          <table:table-cell table:formula="of:=FIND(&quot;_&quot;;[.G23])" office:value-type="float" office:value="17" calcext:value-type="float">
            <text:p>17</text:p>
          </table:table-cell>
          <table:table-cell table:formula="of:=IF(ISNUMBER([.H23]);RIGHT([.G23];LEN([.G23])-[.H23]);RIGHT([.G23];LEN([.G23])-FIND(&quot;:&quot;;[.G23])))" office:value-type="string" office:string-value="0603" calcext:value-type="string">
            <text:p>0603</text:p>
          </table:table-cell>
          <table:table-cell table:style-name="ce16" table:formula="of:=MATCH([.I23];{&quot;0603&quot;;&quot;1206&quot;};0)" office:value-type="float" office:value="1" calcext:value-type="float">
            <text:p>1</text:p>
          </table:table-cell>
          <table:table-cell table:style-name="ce16" table:formula="of:=RIGHT([.G23];LEN([.G23])-FIND(&quot;:&quot;;[.G23]))" office:value-type="string" office:string-value="Resistor_0603" calcext:value-type="string">
            <text:p>Resistor_0603</text:p>
          </table:table-cell>
          <table:table-cell table:formula="of:=SEARCH(&quot;0603&quot;;[.G23])" office:value-type="float" office:value="18" calcext:value-type="float">
            <text:p>18</text:p>
          </table:table-cell>
          <table:table-cell table:formula="of:=SEARCH(&quot;1206&quot;;[.G23])" office:value-type="string" office:string-value="" calcext:value-type="error">
            <text:p>#VALUE!</text:p>
          </table:table-cell>
          <table:table-cell table:formula="of:=IF(ISNUMBER([.M23]);&quot;1206&quot;;IF(ISNUMBER([.L23]);&quot;0603&quot;;[.K23]))" office:value-type="string" office:string-value="0603" calcext:value-type="string">
            <text:p>0603</text:p>
          </table:table-cell>
          <table:table-cell table:formula="of:=IF(ISNUMBER([$CopyFromThing.E19]*1);[$CopyFromThing.E19]*1;0)" office:value-type="float" office:value="13" calcext:value-type="float">
            <text:p>13</text:p>
          </table:table-cell>
          <table:table-cell table:formula="of:=VLOOKUP([.F23];[$Supplier_Lookup.$O$7:.$P$104];2;0)" office:value-type="float" office:value="37" calcext:value-type="float">
            <text:p>37</text:p>
          </table:table-cell>
          <table:table-cell table:formula="of:=IF(INDIRECT(&quot;Supplier_Lookup.&quot;&amp;[.Q$3]&amp;[.$P23])&lt;&gt;&quot;&quot;;INDIRECT(&quot;Supplier_Lookup.L&quot;&amp;[.$P23]);INDIRECT(&quot;Supplier_Lookup.&quot;&amp;[.Q$4]&amp;[.$P23]))" office:value-type="string" office:string-value="330K" calcext:value-type="string">
            <text:p>330K</text:p>
          </table:table-cell>
          <table:table-cell table:formula="of:=INDIRECT(&quot;Supplier_Lookup.&quot;&amp;[.R$4]&amp;[.$P23])" office:value-type="string" office:string-value="0603" calcext:value-type="string">
            <text:p>0603</text:p>
          </table:table-cell>
          <table:table-cell table:formula="of:=INDIRECT(&quot;Supplier_Lookup.&quot;&amp;[.S$4]&amp;[.$P23])" office:value-type="float" office:value="0" calcext:value-type="float">
            <text:p>0</text:p>
          </table:table-cell>
          <table:table-cell table:formula="of:=INDIRECT(&quot;Supplier_Lookup.&quot;&amp;[.T$4]&amp;[.$P23])" office:value-type="string" office:string-value="Yaego" calcext:value-type="string">
            <text:p>Yaego</text:p>
          </table:table-cell>
          <table:table-cell table:formula="of:=INDIRECT(&quot;Supplier_Lookup.&quot;&amp;[.U$4]&amp;[.$P23])" office:value-type="string" office:string-value="RT0603FRE07330KL" calcext:value-type="string">
            <text:p>RT0603FRE07330KL</text:p>
          </table:table-cell>
          <table:table-cell table:formula="of:=INDIRECT(&quot;Supplier_Lookup.&quot;&amp;[.V$4]&amp;[.$P23])" office:value-type="string" office:string-value="LCSC" calcext:value-type="string">
            <text:p>LCSC</text:p>
          </table:table-cell>
          <table:table-cell table:formula="of:=INDIRECT(&quot;Supplier_Lookup.&quot;&amp;[.W$4]&amp;[.$P23])" office:value-type="string" office:string-value="C863745" calcext:value-type="string">
            <text:p>C863745</text:p>
          </table:table-cell>
          <table:table-cell table:formula="of:=INDIRECT(&quot;Supplier_Lookup.&quot;&amp;[.X$4]&amp;[.$P23])" office:value-type="string" office:string-value="https://www.lcsc.com/product-detail/C863745.html" calcext:value-type="string">
            <text:p>https://www.lcsc.com/product-detail/C863745.html</text:p>
          </table:table-cell>
          <table:table-cell table:formula="of:=INDIRECT(&quot;Supplier_Lookup.&quot;&amp;[.Y$4]&amp;[.$P23])" office:value-type="float" office:value="0.0105" calcext:value-type="float">
            <text:p>0.0105</text:p>
          </table:table-cell>
          <table:table-cell table:formula="of:=IF(INDIRECT(&quot;Supplier_Lookup.&quot;&amp;[.Z$4]&amp;[.$P23])=&quot;&quot;;&quot;&quot;;INDIRECT(&quot;Supplier_Lookup.&quot;&amp;[.Z$4]&amp;[.$P23]))">
            <text:p/>
          </table:table-cell>
          <table:table-cell table:formula="of:=IF(ISNUMBER([.Y23]);[.Y23];0)" office:value-type="float" office:value="0.0105" calcext:value-type="float">
            <text:p>0.0105</text:p>
          </table:table-cell>
          <table:table-cell table:formula="of:=[.AA23]*[.O23]" office:value-type="float" office:value="0.1365" calcext:value-type="float">
            <text:p>0.1365</text:p>
          </table:table-cell>
          <table:table-cell table:formula="of:=[.N23]&amp;&quot;-&quot;&amp;[.R23]" office:value-type="string" office:string-value="0603-0603" calcext:value-type="string">
            <text:p>0603-0603</text:p>
          </table:table-cell>
          <table:table-cell table:formula="of:=[$CopyFromThing.A19]" office:value-type="string" office:string-value="R2,R13,R20,R27,R35,R36,R47,R54,R68,R69,R70,R73,R74" calcext:value-type="string">
            <text:p>R2,R13,R20,R27,R35,R36,R47,R54,R68,R69,R70,R73,R74</text:p>
          </table:table-cell>
          <table:table-cell table:formula="of:=[$CopyFromThing.G19]" office:value-type="string" office:string-value="18" calcext:value-type="string">
            <text:p>18</text:p>
          </table:table-cell>
        </table:table-row>
        <table:table-row table:style-name="ro1">
          <table:table-cell/>
          <table:table-cell table:formula="of:=[$CopyFromThing.I20]">
            <text:p/>
          </table:table-cell>
          <table:table-cell table:formula="of:=IF(ISNUMBER(SEARCH(&quot;R&quot;;[$CopyFromThing.A20]));&quot;R&quot;;&quot;&quot;)" office:value-type="string" office:string-value="R" calcext:value-type="string">
            <text:p>R</text:p>
          </table:table-cell>
          <table:table-cell table:formula="of:=IF(ISNUMBER(SEARCH(&quot;C&quot;;[$CopyFromThing.A20]));&quot;C&quot;;&quot;&quot;)">
            <text:p/>
          </table:table-cell>
          <table:table-cell table:formula="of:=IF([.D24]&amp;[.C24]&lt;&gt;&quot;&quot;;[.N24];&quot;&quot;)" office:value-type="string" office:string-value="0603" calcext:value-type="string">
            <text:p>0603</text:p>
          </table:table-cell>
          <table:table-cell table:style-name="ce13" table:formula="of:=[.C24]&amp;[.D24]&amp;[.E24]&amp;&quot;__&quot;&amp;[$CopyFromThing.I20]&amp;&quot;__&quot;&amp;[$CopyFromThing.B20]" office:value-type="string" office:string-value="R0603____1K" calcext:value-type="string">
            <text:p>R0603____1K</text:p>
          </table:table-cell>
          <table:table-cell table:formula="of:=[$CopyFromThing.D20]" office:value-type="string" office:string-value="AADuffy:Resistor_0603" calcext:value-type="string">
            <text:p>AADuffy:Resistor_0603</text:p>
          </table:table-cell>
          <table:table-cell table:formula="of:=FIND(&quot;_&quot;;[.G24])" office:value-type="float" office:value="17" calcext:value-type="float">
            <text:p>17</text:p>
          </table:table-cell>
          <table:table-cell table:formula="of:=IF(ISNUMBER([.H24]);RIGHT([.G24];LEN([.G24])-[.H24]);RIGHT([.G24];LEN([.G24])-FIND(&quot;:&quot;;[.G24])))" office:value-type="string" office:string-value="0603" calcext:value-type="string">
            <text:p>0603</text:p>
          </table:table-cell>
          <table:table-cell table:style-name="ce16" table:formula="of:=MATCH([.I24];{&quot;0603&quot;;&quot;1206&quot;};0)" office:value-type="float" office:value="1" calcext:value-type="float">
            <text:p>1</text:p>
          </table:table-cell>
          <table:table-cell table:style-name="ce16" table:formula="of:=RIGHT([.G24];LEN([.G24])-FIND(&quot;:&quot;;[.G24]))" office:value-type="string" office:string-value="Resistor_0603" calcext:value-type="string">
            <text:p>Resistor_0603</text:p>
          </table:table-cell>
          <table:table-cell table:formula="of:=SEARCH(&quot;0603&quot;;[.G24])" office:value-type="float" office:value="18" calcext:value-type="float">
            <text:p>18</text:p>
          </table:table-cell>
          <table:table-cell table:formula="of:=SEARCH(&quot;1206&quot;;[.G24])" office:value-type="string" office:string-value="" calcext:value-type="error">
            <text:p>#VALUE!</text:p>
          </table:table-cell>
          <table:table-cell table:formula="of:=IF(ISNUMBER([.M24]);&quot;1206&quot;;IF(ISNUMBER([.L24]);&quot;0603&quot;;[.K24]))" office:value-type="string" office:string-value="0603" calcext:value-type="string">
            <text:p>0603</text:p>
          </table:table-cell>
          <table:table-cell table:formula="of:=IF(ISNUMBER([$CopyFromThing.E20]*1);[$CopyFromThing.E20]*1;0)" office:value-type="float" office:value="9" calcext:value-type="float">
            <text:p>9</text:p>
          </table:table-cell>
          <table:table-cell table:formula="of:=VLOOKUP([.F24];[$Supplier_Lookup.$O$7:.$P$104];2;0)" office:value-type="float" office:value="33" calcext:value-type="float">
            <text:p>33</text:p>
          </table:table-cell>
          <table:table-cell table:formula="of:=IF(INDIRECT(&quot;Supplier_Lookup.&quot;&amp;[.Q$3]&amp;[.$P24])&lt;&gt;&quot;&quot;;INDIRECT(&quot;Supplier_Lookup.L&quot;&amp;[.$P24]);INDIRECT(&quot;Supplier_Lookup.&quot;&amp;[.Q$4]&amp;[.$P24]))" office:value-type="string" office:string-value="1K" calcext:value-type="string">
            <text:p>1K</text:p>
          </table:table-cell>
          <table:table-cell table:formula="of:=INDIRECT(&quot;Supplier_Lookup.&quot;&amp;[.R$4]&amp;[.$P24])" office:value-type="string" office:string-value="0603" calcext:value-type="string">
            <text:p>0603</text:p>
          </table:table-cell>
          <table:table-cell table:formula="of:=INDIRECT(&quot;Supplier_Lookup.&quot;&amp;[.S$4]&amp;[.$P24])" office:value-type="float" office:value="0" calcext:value-type="float">
            <text:p>0</text:p>
          </table:table-cell>
          <table:table-cell table:formula="of:=INDIRECT(&quot;Supplier_Lookup.&quot;&amp;[.T$4]&amp;[.$P24])" office:value-type="string" office:string-value="Yaego" calcext:value-type="string">
            <text:p>Yaego</text:p>
          </table:table-cell>
          <table:table-cell table:formula="of:=INDIRECT(&quot;Supplier_Lookup.&quot;&amp;[.U$4]&amp;[.$P24])" office:value-type="string" office:string-value="RC0603FR-071KL" calcext:value-type="string">
            <text:p>RC0603FR-071KL</text:p>
          </table:table-cell>
          <table:table-cell table:formula="of:=INDIRECT(&quot;Supplier_Lookup.&quot;&amp;[.V$4]&amp;[.$P24])" office:value-type="string" office:string-value="LCSC" calcext:value-type="string">
            <text:p>LCSC</text:p>
          </table:table-cell>
          <table:table-cell table:formula="of:=INDIRECT(&quot;Supplier_Lookup.&quot;&amp;[.W$4]&amp;[.$P24])" office:value-type="string" office:string-value="C22548" calcext:value-type="string">
            <text:p>C22548</text:p>
          </table:table-cell>
          <table:table-cell table:formula="of:=INDIRECT(&quot;Supplier_Lookup.&quot;&amp;[.X$4]&amp;[.$P24])" office:value-type="string" office:string-value="https://www.lcsc.com/product-detail/C22548.html" calcext:value-type="string">
            <text:p>https://www.lcsc.com/product-detail/C22548.html</text:p>
          </table:table-cell>
          <table:table-cell table:formula="of:=INDIRECT(&quot;Supplier_Lookup.&quot;&amp;[.Y$4]&amp;[.$P24])" office:value-type="float" office:value="0.0015" calcext:value-type="float">
            <text:p>0.0015</text:p>
          </table:table-cell>
          <table:table-cell table:formula="of:=IF(INDIRECT(&quot;Supplier_Lookup.&quot;&amp;[.Z$4]&amp;[.$P24])=&quot;&quot;;&quot;&quot;;INDIRECT(&quot;Supplier_Lookup.&quot;&amp;[.Z$4]&amp;[.$P24]))">
            <text:p/>
          </table:table-cell>
          <table:table-cell table:formula="of:=IF(ISNUMBER([.Y24]);[.Y24];0)" office:value-type="float" office:value="0.0015" calcext:value-type="float">
            <text:p>0.0015</text:p>
          </table:table-cell>
          <table:table-cell table:formula="of:=[.AA24]*[.O24]" office:value-type="float" office:value="0.0135" calcext:value-type="float">
            <text:p>0.0135</text:p>
          </table:table-cell>
          <table:table-cell table:formula="of:=[.N24]&amp;&quot;-&quot;&amp;[.R24]" office:value-type="string" office:string-value="0603-0603" calcext:value-type="string">
            <text:p>0603-0603</text:p>
          </table:table-cell>
          <table:table-cell table:formula="of:=[$CopyFromThing.A20]" office:value-type="string" office:string-value="R14,R33,R42,R55,R80,R83,R86,R88,R109" calcext:value-type="string">
            <text:p>R14,R33,R42,R55,R80,R83,R86,R88,R109</text:p>
          </table:table-cell>
          <table:table-cell table:formula="of:=[$CopyFromThing.G20]" office:value-type="string" office:string-value="19" calcext:value-type="string">
            <text:p>19</text:p>
          </table:table-cell>
        </table:table-row>
        <table:table-row table:style-name="ro1">
          <table:table-cell/>
          <table:table-cell table:formula="of:=[$CopyFromThing.I21]">
            <text:p/>
          </table:table-cell>
          <table:table-cell table:formula="of:=IF(ISNUMBER(SEARCH(&quot;R&quot;;[$CopyFromThing.A21]));&quot;R&quot;;&quot;&quot;)" office:value-type="string" office:string-value="R" calcext:value-type="string">
            <text:p>R</text:p>
          </table:table-cell>
          <table:table-cell table:formula="of:=IF(ISNUMBER(SEARCH(&quot;C&quot;;[$CopyFromThing.A21]));&quot;C&quot;;&quot;&quot;)">
            <text:p/>
          </table:table-cell>
          <table:table-cell table:formula="of:=IF([.D25]&amp;[.C25]&lt;&gt;&quot;&quot;;[.N25];&quot;&quot;)" office:value-type="string" office:string-value="1206" calcext:value-type="string">
            <text:p>1206</text:p>
          </table:table-cell>
          <table:table-cell table:style-name="ce13" table:formula="of:=[.C25]&amp;[.D25]&amp;[.E25]&amp;&quot;__&quot;&amp;[$CopyFromThing.I21]&amp;&quot;__&quot;&amp;[$CopyFromThing.B21]" office:value-type="string" office:string-value="R1206____100K" calcext:value-type="string">
            <text:p>R1206____100K</text:p>
          </table:table-cell>
          <table:table-cell table:formula="of:=[$CopyFromThing.D21]" office:value-type="string" office:string-value="AADuffy:Resistor_1206_ThinEnds" calcext:value-type="string">
            <text:p>AADuffy:Resistor_1206_ThinEnds</text:p>
          </table:table-cell>
          <table:table-cell table:formula="of:=FIND(&quot;_&quot;;[.G25])" office:value-type="float" office:value="17" calcext:value-type="float">
            <text:p>17</text:p>
          </table:table-cell>
          <table:table-cell table:formula="of:=IF(ISNUMBER([.H25]);RIGHT([.G25];LEN([.G25])-[.H25]);RIGHT([.G25];LEN([.G25])-FIND(&quot;:&quot;;[.G25])))" office:value-type="string" office:string-value="1206_ThinEnds" calcext:value-type="string">
            <text:p>1206_ThinEnds</text:p>
          </table:table-cell>
          <table:table-cell table:style-name="ce16" table:formula="of:=MATCH([.I25];{&quot;0603&quot;;&quot;1206&quot;};0)" office:value-type="string" office:string-value="" calcext:value-type="error">
            <text:p>#N/A</text:p>
          </table:table-cell>
          <table:table-cell table:style-name="ce16" table:formula="of:=RIGHT([.G25];LEN([.G25])-FIND(&quot;:&quot;;[.G25]))" office:value-type="string" office:string-value="Resistor_1206_ThinEnds" calcext:value-type="string">
            <text:p>Resistor_1206_ThinEnds</text:p>
          </table:table-cell>
          <table:table-cell table:formula="of:=SEARCH(&quot;0603&quot;;[.G25])" office:value-type="string" office:string-value="" calcext:value-type="error">
            <text:p>#VALUE!</text:p>
          </table:table-cell>
          <table:table-cell table:formula="of:=SEARCH(&quot;1206&quot;;[.G25])" office:value-type="float" office:value="18" calcext:value-type="float">
            <text:p>18</text:p>
          </table:table-cell>
          <table:table-cell table:formula="of:=IF(ISNUMBER([.M25]);&quot;1206&quot;;IF(ISNUMBER([.L25]);&quot;0603&quot;;[.K25]))" office:value-type="string" office:string-value="1206" calcext:value-type="string">
            <text:p>1206</text:p>
          </table:table-cell>
          <table:table-cell table:formula="of:=IF(ISNUMBER([$CopyFromThing.E21]*1);[$CopyFromThing.E21]*1;0)" office:value-type="float" office:value="1" calcext:value-type="float">
            <text:p>1</text:p>
          </table:table-cell>
          <table:table-cell table:formula="of:=VLOOKUP([.F25];[$Supplier_Lookup.$O$7:.$P$104];2;0)" office:value-type="float" office:value="51" calcext:value-type="float">
            <text:p>51</text:p>
          </table:table-cell>
          <table:table-cell table:formula="of:=IF(INDIRECT(&quot;Supplier_Lookup.&quot;&amp;[.Q$3]&amp;[.$P25])&lt;&gt;&quot;&quot;;INDIRECT(&quot;Supplier_Lookup.L&quot;&amp;[.$P25]);INDIRECT(&quot;Supplier_Lookup.&quot;&amp;[.Q$4]&amp;[.$P25]))" office:value-type="string" office:string-value="100K" calcext:value-type="string">
            <text:p>100K</text:p>
          </table:table-cell>
          <table:table-cell table:formula="of:=INDIRECT(&quot;Supplier_Lookup.&quot;&amp;[.R$4]&amp;[.$P25])" office:value-type="string" office:string-value="1206" calcext:value-type="string">
            <text:p>1206</text:p>
          </table:table-cell>
          <table:table-cell table:formula="of:=INDIRECT(&quot;Supplier_Lookup.&quot;&amp;[.S$4]&amp;[.$P25])" office:value-type="float" office:value="0" calcext:value-type="float">
            <text:p>0</text:p>
          </table:table-cell>
          <table:table-cell table:formula="of:=INDIRECT(&quot;Supplier_Lookup.&quot;&amp;[.T$4]&amp;[.$P25])" office:value-type="string" office:string-value="Bourns" calcext:value-type="string">
            <text:p>Bourns</text:p>
          </table:table-cell>
          <table:table-cell table:formula="of:=INDIRECT(&quot;Supplier_Lookup.&quot;&amp;[.U$4]&amp;[.$P25])" office:value-type="string" office:string-value="CHV1206-FX-1003ELF" calcext:value-type="string">
            <text:p>CHV1206-FX-1003ELF</text:p>
          </table:table-cell>
          <table:table-cell table:formula="of:=INDIRECT(&quot;Supplier_Lookup.&quot;&amp;[.V$4]&amp;[.$P25])" office:value-type="string" office:string-value="LCSC" calcext:value-type="string">
            <text:p>LCSC</text:p>
          </table:table-cell>
          <table:table-cell table:formula="of:=INDIRECT(&quot;Supplier_Lookup.&quot;&amp;[.W$4]&amp;[.$P25])" office:value-type="string" office:string-value="C2078737" calcext:value-type="string">
            <text:p>C2078737</text:p>
          </table:table-cell>
          <table:table-cell table:formula="of:=INDIRECT(&quot;Supplier_Lookup.&quot;&amp;[.X$4]&amp;[.$P25])" office:value-type="string" office:string-value="https://www.lcsc.com/product-detail/C2078737.html" calcext:value-type="string">
            <text:p>https://www.lcsc.com/product-detail/C2078737.html</text:p>
          </table:table-cell>
          <table:table-cell table:formula="of:=INDIRECT(&quot;Supplier_Lookup.&quot;&amp;[.Y$4]&amp;[.$P25])" office:value-type="float" office:value="0.1034" calcext:value-type="float">
            <text:p>0.1034</text:p>
          </table:table-cell>
          <table:table-cell table:formula="of:=IF(INDIRECT(&quot;Supplier_Lookup.&quot;&amp;[.Z$4]&amp;[.$P25])=&quot;&quot;;&quot;&quot;;INDIRECT(&quot;Supplier_Lookup.&quot;&amp;[.Z$4]&amp;[.$P25]))">
            <text:p/>
          </table:table-cell>
          <table:table-cell table:formula="of:=IF(ISNUMBER([.Y25]);[.Y25];0)" office:value-type="float" office:value="0.1034" calcext:value-type="float">
            <text:p>0.1034</text:p>
          </table:table-cell>
          <table:table-cell table:formula="of:=[.AA25]*[.O25]" office:value-type="float" office:value="0.1034" calcext:value-type="float">
            <text:p>0.1034</text:p>
          </table:table-cell>
          <table:table-cell table:formula="of:=[.N25]&amp;&quot;-&quot;&amp;[.R25]" office:value-type="string" office:string-value="1206-1206" calcext:value-type="string">
            <text:p>1206-1206</text:p>
          </table:table-cell>
          <table:table-cell table:formula="of:=[$CopyFromThing.A21]" office:value-type="string" office:string-value="R16" calcext:value-type="string">
            <text:p>R16</text:p>
          </table:table-cell>
          <table:table-cell table:formula="of:=[$CopyFromThing.G21]" office:value-type="string" office:string-value="20" calcext:value-type="string">
            <text:p>20</text:p>
          </table:table-cell>
        </table:table-row>
        <table:table-row table:style-name="ro1">
          <table:table-cell/>
          <table:table-cell table:formula="of:=[$CopyFromThing.I22]">
            <text:p/>
          </table:table-cell>
          <table:table-cell table:formula="of:=IF(ISNUMBER(SEARCH(&quot;R&quot;;[$CopyFromThing.A22]));&quot;R&quot;;&quot;&quot;)" office:value-type="string" office:string-value="R" calcext:value-type="string">
            <text:p>R</text:p>
          </table:table-cell>
          <table:table-cell table:formula="of:=IF(ISNUMBER(SEARCH(&quot;C&quot;;[$CopyFromThing.A22]));&quot;C&quot;;&quot;&quot;)">
            <text:p/>
          </table:table-cell>
          <table:table-cell table:formula="of:=IF([.D26]&amp;[.C26]&lt;&gt;&quot;&quot;;[.N26];&quot;&quot;)" office:value-type="string" office:string-value="1206" calcext:value-type="string">
            <text:p>1206</text:p>
          </table:table-cell>
          <table:table-cell table:style-name="ce13" table:formula="of:=[.C26]&amp;[.D26]&amp;[.E26]&amp;&quot;__&quot;&amp;[$CopyFromThing.I22]&amp;&quot;__&quot;&amp;[$CopyFromThing.B22]" office:value-type="string" office:string-value="R1206____470" calcext:value-type="string">
            <text:p>R1206____470</text:p>
          </table:table-cell>
          <table:table-cell table:formula="of:=[$CopyFromThing.D22]" office:value-type="string" office:string-value="AADuffy:Resistor_1206" calcext:value-type="string">
            <text:p>AADuffy:Resistor_1206</text:p>
          </table:table-cell>
          <table:table-cell table:formula="of:=FIND(&quot;_&quot;;[.G26])" office:value-type="float" office:value="17" calcext:value-type="float">
            <text:p>17</text:p>
          </table:table-cell>
          <table:table-cell table:formula="of:=IF(ISNUMBER([.H26]);RIGHT([.G26];LEN([.G26])-[.H26]);RIGHT([.G26];LEN([.G26])-FIND(&quot;:&quot;;[.G26])))" office:value-type="string" office:string-value="1206" calcext:value-type="string">
            <text:p>1206</text:p>
          </table:table-cell>
          <table:table-cell table:style-name="ce16" table:formula="of:=MATCH([.I26];{&quot;0603&quot;;&quot;1206&quot;};0)" office:value-type="float" office:value="2" calcext:value-type="float">
            <text:p>2</text:p>
          </table:table-cell>
          <table:table-cell table:style-name="ce16" table:formula="of:=RIGHT([.G26];LEN([.G26])-FIND(&quot;:&quot;;[.G26]))" office:value-type="string" office:string-value="Resistor_1206" calcext:value-type="string">
            <text:p>Resistor_1206</text:p>
          </table:table-cell>
          <table:table-cell table:formula="of:=SEARCH(&quot;0603&quot;;[.G26])" office:value-type="string" office:string-value="" calcext:value-type="error">
            <text:p>#VALUE!</text:p>
          </table:table-cell>
          <table:table-cell table:formula="of:=SEARCH(&quot;1206&quot;;[.G26])" office:value-type="float" office:value="18" calcext:value-type="float">
            <text:p>18</text:p>
          </table:table-cell>
          <table:table-cell table:formula="of:=IF(ISNUMBER([.M26]);&quot;1206&quot;;IF(ISNUMBER([.L26]);&quot;0603&quot;;[.K26]))" office:value-type="string" office:string-value="1206" calcext:value-type="string">
            <text:p>1206</text:p>
          </table:table-cell>
          <table:table-cell table:formula="of:=IF(ISNUMBER([$CopyFromThing.E22]*1);[$CopyFromThing.E22]*1;0)" office:value-type="float" office:value="1" calcext:value-type="float">
            <text:p>1</text:p>
          </table:table-cell>
          <table:table-cell table:formula="of:=VLOOKUP([.F26];[$Supplier_Lookup.$O$7:.$P$104];2;0)" office:value-type="float" office:value="50" calcext:value-type="float">
            <text:p>50</text:p>
          </table:table-cell>
          <table:table-cell table:formula="of:=IF(INDIRECT(&quot;Supplier_Lookup.&quot;&amp;[.Q$3]&amp;[.$P26])&lt;&gt;&quot;&quot;;INDIRECT(&quot;Supplier_Lookup.L&quot;&amp;[.$P26]);INDIRECT(&quot;Supplier_Lookup.&quot;&amp;[.Q$4]&amp;[.$P26]))" office:value-type="float" office:value="470" calcext:value-type="float">
            <text:p>470</text:p>
          </table:table-cell>
          <table:table-cell table:formula="of:=INDIRECT(&quot;Supplier_Lookup.&quot;&amp;[.R$4]&amp;[.$P26])" office:value-type="string" office:string-value="1206" calcext:value-type="string">
            <text:p>1206</text:p>
          </table:table-cell>
          <table:table-cell table:formula="of:=INDIRECT(&quot;Supplier_Lookup.&quot;&amp;[.S$4]&amp;[.$P26])" office:value-type="float" office:value="0" calcext:value-type="float">
            <text:p>0</text:p>
          </table:table-cell>
          <table:table-cell table:formula="of:=INDIRECT(&quot;Supplier_Lookup.&quot;&amp;[.T$4]&amp;[.$P26])" office:value-type="string" office:string-value="Yaego" calcext:value-type="string">
            <text:p>Yaego</text:p>
          </table:table-cell>
          <table:table-cell table:formula="of:=INDIRECT(&quot;Supplier_Lookup.&quot;&amp;[.U$4]&amp;[.$P26])" office:value-type="string" office:string-value="SR1206JR-7W470RL" calcext:value-type="string">
            <text:p>SR1206JR-7W470RL</text:p>
          </table:table-cell>
          <table:table-cell table:formula="of:=INDIRECT(&quot;Supplier_Lookup.&quot;&amp;[.V$4]&amp;[.$P26])" office:value-type="string" office:string-value="LCSC" calcext:value-type="string">
            <text:p>LCSC</text:p>
          </table:table-cell>
          <table:table-cell table:formula="of:=INDIRECT(&quot;Supplier_Lookup.&quot;&amp;[.W$4]&amp;[.$P26])" office:value-type="string" office:string-value="C874087" calcext:value-type="string">
            <text:p>C874087</text:p>
          </table:table-cell>
          <table:table-cell table:formula="of:=INDIRECT(&quot;Supplier_Lookup.&quot;&amp;[.X$4]&amp;[.$P26])" office:value-type="string" office:string-value="https://www.lcsc.com/product-detail/C874087.html" calcext:value-type="string">
            <text:p>https://www.lcsc.com/product-detail/C874087.html</text:p>
          </table:table-cell>
          <table:table-cell table:formula="of:=INDIRECT(&quot;Supplier_Lookup.&quot;&amp;[.Y$4]&amp;[.$P26])" office:value-type="float" office:value="0.0253" calcext:value-type="float">
            <text:p>0.0253</text:p>
          </table:table-cell>
          <table:table-cell table:formula="of:=IF(INDIRECT(&quot;Supplier_Lookup.&quot;&amp;[.Z$4]&amp;[.$P26])=&quot;&quot;;&quot;&quot;;INDIRECT(&quot;Supplier_Lookup.&quot;&amp;[.Z$4]&amp;[.$P26]))">
            <text:p/>
          </table:table-cell>
          <table:table-cell table:formula="of:=IF(ISNUMBER([.Y26]);[.Y26];0)" office:value-type="float" office:value="0.0253" calcext:value-type="float">
            <text:p>0.0253</text:p>
          </table:table-cell>
          <table:table-cell table:formula="of:=[.AA26]*[.O26]" office:value-type="float" office:value="0.0253" calcext:value-type="float">
            <text:p>0.0253</text:p>
          </table:table-cell>
          <table:table-cell table:formula="of:=[.N26]&amp;&quot;-&quot;&amp;[.R26]" office:value-type="string" office:string-value="1206-1206" calcext:value-type="string">
            <text:p>1206-1206</text:p>
          </table:table-cell>
          <table:table-cell table:formula="of:=[$CopyFromThing.A22]" office:value-type="string" office:string-value="R18" calcext:value-type="string">
            <text:p>R18</text:p>
          </table:table-cell>
          <table:table-cell table:formula="of:=[$CopyFromThing.G22]" office:value-type="string" office:string-value="21" calcext:value-type="string">
            <text:p>21</text:p>
          </table:table-cell>
        </table:table-row>
        <table:table-row table:style-name="ro1">
          <table:table-cell/>
          <table:table-cell table:formula="of:=[$CopyFromThing.I23]">
            <text:p/>
          </table:table-cell>
          <table:table-cell table:formula="of:=IF(ISNUMBER(SEARCH(&quot;R&quot;;[$CopyFromThing.A23]));&quot;R&quot;;&quot;&quot;)" office:value-type="string" office:string-value="R" calcext:value-type="string">
            <text:p>R</text:p>
          </table:table-cell>
          <table:table-cell table:formula="of:=IF(ISNUMBER(SEARCH(&quot;C&quot;;[$CopyFromThing.A23]));&quot;C&quot;;&quot;&quot;)">
            <text:p/>
          </table:table-cell>
          <table:table-cell table:formula="of:=IF([.D27]&amp;[.C27]&lt;&gt;&quot;&quot;;[.N27];&quot;&quot;)" office:value-type="string" office:string-value="1206" calcext:value-type="string">
            <text:p>1206</text:p>
          </table:table-cell>
          <table:table-cell table:style-name="ce13" table:formula="of:=[.C27]&amp;[.D27]&amp;[.E27]&amp;&quot;__&quot;&amp;[$CopyFromThing.I23]&amp;&quot;__&quot;&amp;[$CopyFromThing.B23]" office:value-type="string" office:string-value="R1206____1M" calcext:value-type="string">
            <text:p>R1206____1M</text:p>
          </table:table-cell>
          <table:table-cell table:formula="of:=[$CopyFromThing.D23]" office:value-type="string" office:string-value="AADuffy:Resistor_1206_ThinEnds" calcext:value-type="string">
            <text:p>AADuffy:Resistor_1206_ThinEnds</text:p>
          </table:table-cell>
          <table:table-cell table:formula="of:=FIND(&quot;_&quot;;[.G27])" office:value-type="float" office:value="17" calcext:value-type="float">
            <text:p>17</text:p>
          </table:table-cell>
          <table:table-cell table:formula="of:=IF(ISNUMBER([.H27]);RIGHT([.G27];LEN([.G27])-[.H27]);RIGHT([.G27];LEN([.G27])-FIND(&quot;:&quot;;[.G27])))" office:value-type="string" office:string-value="1206_ThinEnds" calcext:value-type="string">
            <text:p>1206_ThinEnds</text:p>
          </table:table-cell>
          <table:table-cell table:style-name="ce16" table:formula="of:=MATCH([.I27];{&quot;0603&quot;;&quot;1206&quot;};0)" office:value-type="string" office:string-value="" calcext:value-type="error">
            <text:p>#N/A</text:p>
          </table:table-cell>
          <table:table-cell table:style-name="ce16" table:formula="of:=RIGHT([.G27];LEN([.G27])-FIND(&quot;:&quot;;[.G27]))" office:value-type="string" office:string-value="Resistor_1206_ThinEnds" calcext:value-type="string">
            <text:p>Resistor_1206_ThinEnds</text:p>
          </table:table-cell>
          <table:table-cell table:formula="of:=SEARCH(&quot;0603&quot;;[.G27])" office:value-type="string" office:string-value="" calcext:value-type="error">
            <text:p>#VALUE!</text:p>
          </table:table-cell>
          <table:table-cell table:formula="of:=SEARCH(&quot;1206&quot;;[.G27])" office:value-type="float" office:value="18" calcext:value-type="float">
            <text:p>18</text:p>
          </table:table-cell>
          <table:table-cell table:formula="of:=IF(ISNUMBER([.M27]);&quot;1206&quot;;IF(ISNUMBER([.L27]);&quot;0603&quot;;[.K27]))" office:value-type="string" office:string-value="1206" calcext:value-type="string">
            <text:p>1206</text:p>
          </table:table-cell>
          <table:table-cell table:formula="of:=IF(ISNUMBER([$CopyFromThing.E23]*1);[$CopyFromThing.E23]*1;0)" office:value-type="float" office:value="2" calcext:value-type="float">
            <text:p>2</text:p>
          </table:table-cell>
          <table:table-cell table:formula="of:=VLOOKUP([.F27];[$Supplier_Lookup.$O$7:.$P$104];2;0)" office:value-type="float" office:value="57" calcext:value-type="float">
            <text:p>57</text:p>
          </table:table-cell>
          <table:table-cell table:formula="of:=IF(INDIRECT(&quot;Supplier_Lookup.&quot;&amp;[.Q$3]&amp;[.$P27])&lt;&gt;&quot;&quot;;INDIRECT(&quot;Supplier_Lookup.L&quot;&amp;[.$P27]);INDIRECT(&quot;Supplier_Lookup.&quot;&amp;[.Q$4]&amp;[.$P27]))" office:value-type="string" office:string-value="1M" calcext:value-type="string">
            <text:p>1M</text:p>
          </table:table-cell>
          <table:table-cell table:formula="of:=INDIRECT(&quot;Supplier_Lookup.&quot;&amp;[.R$4]&amp;[.$P27])" office:value-type="string" office:string-value="1206" calcext:value-type="string">
            <text:p>1206</text:p>
          </table:table-cell>
          <table:table-cell table:formula="of:=INDIRECT(&quot;Supplier_Lookup.&quot;&amp;[.S$4]&amp;[.$P27])" office:value-type="float" office:value="0" calcext:value-type="float">
            <text:p>0</text:p>
          </table:table-cell>
          <table:table-cell table:formula="of:=INDIRECT(&quot;Supplier_Lookup.&quot;&amp;[.T$4]&amp;[.$P27])" office:value-type="string" office:string-value="Yaego" calcext:value-type="string">
            <text:p>Yaego</text:p>
          </table:table-cell>
          <table:table-cell table:formula="of:=INDIRECT(&quot;Supplier_Lookup.&quot;&amp;[.U$4]&amp;[.$P27])" office:value-type="string" office:string-value="AH1206FR-071ML" calcext:value-type="string">
            <text:p>AH1206FR-071ML</text:p>
          </table:table-cell>
          <table:table-cell table:formula="of:=INDIRECT(&quot;Supplier_Lookup.&quot;&amp;[.V$4]&amp;[.$P27])" office:value-type="string" office:string-value="LCSC" calcext:value-type="string">
            <text:p>LCSC</text:p>
          </table:table-cell>
          <table:table-cell table:formula="of:=INDIRECT(&quot;Supplier_Lookup.&quot;&amp;[.W$4]&amp;[.$P27])" office:value-type="string" office:string-value="C43749042" calcext:value-type="string">
            <text:p>C43749042</text:p>
          </table:table-cell>
          <table:table-cell table:formula="of:=INDIRECT(&quot;Supplier_Lookup.&quot;&amp;[.X$4]&amp;[.$P27])" office:value-type="string" office:string-value="https://www.lcsc.com/product-detail/C43749042.html" calcext:value-type="string">
            <text:p>https://www.lcsc.com/product-detail/C43749042.html</text:p>
          </table:table-cell>
          <table:table-cell table:formula="of:=INDIRECT(&quot;Supplier_Lookup.&quot;&amp;[.Y$4]&amp;[.$P27])" office:value-type="float" office:value="0.0275" calcext:value-type="float">
            <text:p>0.0275</text:p>
          </table:table-cell>
          <table:table-cell table:formula="of:=IF(INDIRECT(&quot;Supplier_Lookup.&quot;&amp;[.Z$4]&amp;[.$P27])=&quot;&quot;;&quot;&quot;;INDIRECT(&quot;Supplier_Lookup.&quot;&amp;[.Z$4]&amp;[.$P27]))">
            <text:p/>
          </table:table-cell>
          <table:table-cell table:formula="of:=IF(ISNUMBER([.Y27]);[.Y27];0)" office:value-type="float" office:value="0.0275" calcext:value-type="float">
            <text:p>0.0275</text:p>
          </table:table-cell>
          <table:table-cell table:formula="of:=[.AA27]*[.O27]" office:value-type="float" office:value="0.055" calcext:value-type="float">
            <text:p>0.055</text:p>
          </table:table-cell>
          <table:table-cell table:formula="of:=[.N27]&amp;&quot;-&quot;&amp;[.R27]" office:value-type="string" office:string-value="1206-1206" calcext:value-type="string">
            <text:p>1206-1206</text:p>
          </table:table-cell>
          <table:table-cell table:formula="of:=[$CopyFromThing.A23]" office:value-type="string" office:string-value="R21,R22" calcext:value-type="string">
            <text:p>R21,R22</text:p>
          </table:table-cell>
          <table:table-cell table:formula="of:=[$CopyFromThing.G23]" office:value-type="string" office:string-value="22" calcext:value-type="string">
            <text:p>22</text:p>
          </table:table-cell>
        </table:table-row>
        <table:table-row table:style-name="ro1">
          <table:table-cell/>
          <table:table-cell table:formula="of:=[$CopyFromThing.I24]">
            <text:p/>
          </table:table-cell>
          <table:table-cell table:formula="of:=IF(ISNUMBER(SEARCH(&quot;R&quot;;[$CopyFromThing.A24]));&quot;R&quot;;&quot;&quot;)" office:value-type="string" office:string-value="R" calcext:value-type="string">
            <text:p>R</text:p>
          </table:table-cell>
          <table:table-cell table:formula="of:=IF(ISNUMBER(SEARCH(&quot;C&quot;;[$CopyFromThing.A24]));&quot;C&quot;;&quot;&quot;)">
            <text:p/>
          </table:table-cell>
          <table:table-cell table:formula="of:=IF([.D28]&amp;[.C28]&lt;&gt;&quot;&quot;;[.N28];&quot;&quot;)" office:value-type="string" office:string-value="0603" calcext:value-type="string">
            <text:p>0603</text:p>
          </table:table-cell>
          <table:table-cell table:style-name="ce13" table:formula="of:=[.C28]&amp;[.D28]&amp;[.E28]&amp;&quot;__&quot;&amp;[$CopyFromThing.I24]&amp;&quot;__&quot;&amp;[$CopyFromThing.B24]" office:value-type="string" office:string-value="R0603____10K" calcext:value-type="string">
            <text:p>R0603____10K</text:p>
          </table:table-cell>
          <table:table-cell table:formula="of:=[$CopyFromThing.D24]" office:value-type="string" office:string-value="AADuffy:Resistor_0603" calcext:value-type="string">
            <text:p>AADuffy:Resistor_0603</text:p>
          </table:table-cell>
          <table:table-cell table:formula="of:=FIND(&quot;_&quot;;[.G28])" office:value-type="float" office:value="17" calcext:value-type="float">
            <text:p>17</text:p>
          </table:table-cell>
          <table:table-cell table:formula="of:=IF(ISNUMBER([.H28]);RIGHT([.G28];LEN([.G28])-[.H28]);RIGHT([.G28];LEN([.G28])-FIND(&quot;:&quot;;[.G28])))" office:value-type="string" office:string-value="0603" calcext:value-type="string">
            <text:p>0603</text:p>
          </table:table-cell>
          <table:table-cell table:style-name="ce16" table:formula="of:=MATCH([.I28];{&quot;0603&quot;;&quot;1206&quot;};0)" office:value-type="float" office:value="1" calcext:value-type="float">
            <text:p>1</text:p>
          </table:table-cell>
          <table:table-cell table:style-name="ce16" table:formula="of:=RIGHT([.G28];LEN([.G28])-FIND(&quot;:&quot;;[.G28]))" office:value-type="string" office:string-value="Resistor_0603" calcext:value-type="string">
            <text:p>Resistor_0603</text:p>
          </table:table-cell>
          <table:table-cell table:formula="of:=SEARCH(&quot;0603&quot;;[.G28])" office:value-type="float" office:value="18" calcext:value-type="float">
            <text:p>18</text:p>
          </table:table-cell>
          <table:table-cell table:formula="of:=SEARCH(&quot;1206&quot;;[.G28])" office:value-type="string" office:string-value="" calcext:value-type="error">
            <text:p>#VALUE!</text:p>
          </table:table-cell>
          <table:table-cell table:formula="of:=IF(ISNUMBER([.M28]);&quot;1206&quot;;IF(ISNUMBER([.L28]);&quot;0603&quot;;[.K28]))" office:value-type="string" office:string-value="0603" calcext:value-type="string">
            <text:p>0603</text:p>
          </table:table-cell>
          <table:table-cell table:formula="of:=IF(ISNUMBER([$CopyFromThing.E24]*1);[$CopyFromThing.E24]*1;0)" office:value-type="float" office:value="8" calcext:value-type="float">
            <text:p>8</text:p>
          </table:table-cell>
          <table:table-cell table:formula="of:=VLOOKUP([.F28];[$Supplier_Lookup.$O$7:.$P$104];2;0)" office:value-type="float" office:value="40" calcext:value-type="float">
            <text:p>40</text:p>
          </table:table-cell>
          <table:table-cell table:formula="of:=IF(INDIRECT(&quot;Supplier_Lookup.&quot;&amp;[.Q$3]&amp;[.$P28])&lt;&gt;&quot;&quot;;INDIRECT(&quot;Supplier_Lookup.L&quot;&amp;[.$P28]);INDIRECT(&quot;Supplier_Lookup.&quot;&amp;[.Q$4]&amp;[.$P28]))" office:value-type="string" office:string-value="10K" calcext:value-type="string">
            <text:p>10K</text:p>
          </table:table-cell>
          <table:table-cell table:formula="of:=INDIRECT(&quot;Supplier_Lookup.&quot;&amp;[.R$4]&amp;[.$P28])" office:value-type="string" office:string-value="0603" calcext:value-type="string">
            <text:p>0603</text:p>
          </table:table-cell>
          <table:table-cell table:formula="of:=INDIRECT(&quot;Supplier_Lookup.&quot;&amp;[.S$4]&amp;[.$P28])" office:value-type="float" office:value="0" calcext:value-type="float">
            <text:p>0</text:p>
          </table:table-cell>
          <table:table-cell table:formula="of:=INDIRECT(&quot;Supplier_Lookup.&quot;&amp;[.T$4]&amp;[.$P28])" office:value-type="string" office:string-value="Yaego" calcext:value-type="string">
            <text:p>Yaego</text:p>
          </table:table-cell>
          <table:table-cell table:formula="of:=INDIRECT(&quot;Supplier_Lookup.&quot;&amp;[.U$4]&amp;[.$P28])" office:value-type="string" office:string-value="RC0603FR-0710KL" calcext:value-type="string">
            <text:p>RC0603FR-0710KL</text:p>
          </table:table-cell>
          <table:table-cell table:formula="of:=INDIRECT(&quot;Supplier_Lookup.&quot;&amp;[.V$4]&amp;[.$P28])" office:value-type="string" office:string-value="LCSC" calcext:value-type="string">
            <text:p>LCSC</text:p>
          </table:table-cell>
          <table:table-cell table:formula="of:=INDIRECT(&quot;Supplier_Lookup.&quot;&amp;[.W$4]&amp;[.$P28])" office:value-type="string" office:string-value="C98220" calcext:value-type="string">
            <text:p>C98220</text:p>
          </table:table-cell>
          <table:table-cell table:formula="of:=INDIRECT(&quot;Supplier_Lookup.&quot;&amp;[.X$4]&amp;[.$P28])" office:value-type="string" office:string-value="https://www.lcsc.com/product-detail/C98220.html" calcext:value-type="string">
            <text:p>https://www.lcsc.com/product-detail/C98220.html</text:p>
          </table:table-cell>
          <table:table-cell table:formula="of:=INDIRECT(&quot;Supplier_Lookup.&quot;&amp;[.Y$4]&amp;[.$P28])" office:value-type="float" office:value="0.0015" calcext:value-type="float">
            <text:p>0.0015</text:p>
          </table:table-cell>
          <table:table-cell table:formula="of:=IF(INDIRECT(&quot;Supplier_Lookup.&quot;&amp;[.Z$4]&amp;[.$P28])=&quot;&quot;;&quot;&quot;;INDIRECT(&quot;Supplier_Lookup.&quot;&amp;[.Z$4]&amp;[.$P28]))">
            <text:p/>
          </table:table-cell>
          <table:table-cell table:formula="of:=IF(ISNUMBER([.Y28]);[.Y28];0)" office:value-type="float" office:value="0.0015" calcext:value-type="float">
            <text:p>0.0015</text:p>
          </table:table-cell>
          <table:table-cell table:formula="of:=[.AA28]*[.O28]" office:value-type="float" office:value="0.012" calcext:value-type="float">
            <text:p>0.012</text:p>
          </table:table-cell>
          <table:table-cell table:formula="of:=[.N28]&amp;&quot;-&quot;&amp;[.R28]" office:value-type="string" office:string-value="0603-0603" calcext:value-type="string">
            <text:p>0603-0603</text:p>
          </table:table-cell>
          <table:table-cell table:formula="of:=[$CopyFromThing.A24]" office:value-type="string" office:string-value="R41,R48,R66,R67,R76,R77,R82,R87" calcext:value-type="string">
            <text:p>R41,R48,R66,R67,R76,R77,R82,R87</text:p>
          </table:table-cell>
          <table:table-cell table:formula="of:=[$CopyFromThing.G24]" office:value-type="string" office:string-value="23" calcext:value-type="string">
            <text:p>23</text:p>
          </table:table-cell>
        </table:table-row>
        <table:table-row table:style-name="ro1">
          <table:table-cell/>
          <table:table-cell table:formula="of:=[$CopyFromThing.I25]" office:value-type="string" office:string-value="CRIT" calcext:value-type="string">
            <text:p>CRIT</text:p>
          </table:table-cell>
          <table:table-cell table:formula="of:=IF(ISNUMBER(SEARCH(&quot;R&quot;;[$CopyFromThing.A25]));&quot;R&quot;;&quot;&quot;)" office:value-type="string" office:string-value="R" calcext:value-type="string">
            <text:p>R</text:p>
          </table:table-cell>
          <table:table-cell table:formula="of:=IF(ISNUMBER(SEARCH(&quot;C&quot;;[$CopyFromThing.A25]));&quot;C&quot;;&quot;&quot;)">
            <text:p/>
          </table:table-cell>
          <table:table-cell table:formula="of:=IF([.D29]&amp;[.C29]&lt;&gt;&quot;&quot;;[.N29];&quot;&quot;)" office:value-type="string" office:string-value="0603" calcext:value-type="string">
            <text:p>0603</text:p>
          </table:table-cell>
          <table:table-cell table:style-name="ce13" table:formula="of:=[.C29]&amp;[.D29]&amp;[.E29]&amp;&quot;__&quot;&amp;[$CopyFromThing.I25]&amp;&quot;__&quot;&amp;[$CopyFromThing.B25]" office:value-type="string" office:string-value="R0603__CRIT__3.3K" calcext:value-type="string">
            <text:p>R0603__CRIT__3.3K</text:p>
          </table:table-cell>
          <table:table-cell table:formula="of:=[$CopyFromThing.D25]" office:value-type="string" office:string-value="AADuffy:Resistor_0603" calcext:value-type="string">
            <text:p>AADuffy:Resistor_0603</text:p>
          </table:table-cell>
          <table:table-cell table:formula="of:=FIND(&quot;_&quot;;[.G29])" office:value-type="float" office:value="17" calcext:value-type="float">
            <text:p>17</text:p>
          </table:table-cell>
          <table:table-cell table:formula="of:=IF(ISNUMBER([.H29]);RIGHT([.G29];LEN([.G29])-[.H29]);RIGHT([.G29];LEN([.G29])-FIND(&quot;:&quot;;[.G29])))" office:value-type="string" office:string-value="0603" calcext:value-type="string">
            <text:p>0603</text:p>
          </table:table-cell>
          <table:table-cell table:style-name="ce16" table:formula="of:=MATCH([.I29];{&quot;0603&quot;;&quot;1206&quot;};0)" office:value-type="float" office:value="1" calcext:value-type="float">
            <text:p>1</text:p>
          </table:table-cell>
          <table:table-cell table:style-name="ce16" table:formula="of:=RIGHT([.G29];LEN([.G29])-FIND(&quot;:&quot;;[.G29]))" office:value-type="string" office:string-value="Resistor_0603" calcext:value-type="string">
            <text:p>Resistor_0603</text:p>
          </table:table-cell>
          <table:table-cell table:formula="of:=SEARCH(&quot;0603&quot;;[.G29])" office:value-type="float" office:value="18" calcext:value-type="float">
            <text:p>18</text:p>
          </table:table-cell>
          <table:table-cell table:formula="of:=SEARCH(&quot;1206&quot;;[.G29])" office:value-type="string" office:string-value="" calcext:value-type="error">
            <text:p>#VALUE!</text:p>
          </table:table-cell>
          <table:table-cell table:formula="of:=IF(ISNUMBER([.M29]);&quot;1206&quot;;IF(ISNUMBER([.L29]);&quot;0603&quot;;[.K29]))" office:value-type="string" office:string-value="0603" calcext:value-type="string">
            <text:p>0603</text:p>
          </table:table-cell>
          <table:table-cell table:formula="of:=IF(ISNUMBER([$CopyFromThing.E25]*1);[$CopyFromThing.E25]*1;0)" office:value-type="float" office:value="2" calcext:value-type="float">
            <text:p>2</text:p>
          </table:table-cell>
          <table:table-cell table:formula="of:=VLOOKUP([.F29];[$Supplier_Lookup.$O$7:.$P$104];2;0)" office:value-type="float" office:value="52" calcext:value-type="float">
            <text:p>52</text:p>
          </table:table-cell>
          <table:table-cell table:formula="of:=IF(INDIRECT(&quot;Supplier_Lookup.&quot;&amp;[.Q$3]&amp;[.$P29])&lt;&gt;&quot;&quot;;INDIRECT(&quot;Supplier_Lookup.L&quot;&amp;[.$P29]);INDIRECT(&quot;Supplier_Lookup.&quot;&amp;[.Q$4]&amp;[.$P29]))" office:value-type="string" office:string-value="3.3K" calcext:value-type="string">
            <text:p>3.3K</text:p>
          </table:table-cell>
          <table:table-cell table:formula="of:=INDIRECT(&quot;Supplier_Lookup.&quot;&amp;[.R$4]&amp;[.$P29])" office:value-type="string" office:string-value="0603" calcext:value-type="string">
            <text:p>0603</text:p>
          </table:table-cell>
          <table:table-cell table:formula="of:=INDIRECT(&quot;Supplier_Lookup.&quot;&amp;[.S$4]&amp;[.$P29])" office:value-type="string" office:string-value="CRIT" calcext:value-type="string">
            <text:p>CRIT</text:p>
          </table:table-cell>
          <table:table-cell table:formula="of:=INDIRECT(&quot;Supplier_Lookup.&quot;&amp;[.T$4]&amp;[.$P29])" office:value-type="string" office:string-value="Yaego" calcext:value-type="string">
            <text:p>Yaego</text:p>
          </table:table-cell>
          <table:table-cell table:formula="of:=INDIRECT(&quot;Supplier_Lookup.&quot;&amp;[.U$4]&amp;[.$P29])" office:value-type="string" office:string-value="RT0603BRD073K3L" calcext:value-type="string">
            <text:p>RT0603BRD073K3L</text:p>
          </table:table-cell>
          <table:table-cell table:formula="of:=INDIRECT(&quot;Supplier_Lookup.&quot;&amp;[.V$4]&amp;[.$P29])" office:value-type="string" office:string-value="LCSC" calcext:value-type="string">
            <text:p>LCSC</text:p>
          </table:table-cell>
          <table:table-cell table:formula="of:=INDIRECT(&quot;Supplier_Lookup.&quot;&amp;[.W$4]&amp;[.$P29])" office:value-type="string" office:string-value="C309653" calcext:value-type="string">
            <text:p>C309653</text:p>
          </table:table-cell>
          <table:table-cell table:formula="of:=INDIRECT(&quot;Supplier_Lookup.&quot;&amp;[.X$4]&amp;[.$P29])" office:value-type="string" office:string-value="https://www.lcsc.com/product-detail/C309653.html" calcext:value-type="string">
            <text:p>https://www.lcsc.com/product-detail/C309653.html</text:p>
          </table:table-cell>
          <table:table-cell table:formula="of:=INDIRECT(&quot;Supplier_Lookup.&quot;&amp;[.Y$4]&amp;[.$P29])" office:value-type="float" office:value="0.0271" calcext:value-type="float">
            <text:p>0.0271</text:p>
          </table:table-cell>
          <table:table-cell table:formula="of:=IF(INDIRECT(&quot;Supplier_Lookup.&quot;&amp;[.Z$4]&amp;[.$P29])=&quot;&quot;;&quot;&quot;;INDIRECT(&quot;Supplier_Lookup.&quot;&amp;[.Z$4]&amp;[.$P29]))">
            <text:p/>
          </table:table-cell>
          <table:table-cell table:formula="of:=IF(ISNUMBER([.Y29]);[.Y29];0)" office:value-type="float" office:value="0.0271" calcext:value-type="float">
            <text:p>0.0271</text:p>
          </table:table-cell>
          <table:table-cell table:formula="of:=[.AA29]*[.O29]" office:value-type="float" office:value="0.0542" calcext:value-type="float">
            <text:p>0.0542</text:p>
          </table:table-cell>
          <table:table-cell table:formula="of:=[.N29]&amp;&quot;-&quot;&amp;[.R29]" office:value-type="string" office:string-value="0603-0603" calcext:value-type="string">
            <text:p>0603-0603</text:p>
          </table:table-cell>
          <table:table-cell table:formula="of:=[$CopyFromThing.A25]" office:value-type="string" office:string-value="R43,R44" calcext:value-type="string">
            <text:p>R43,R44</text:p>
          </table:table-cell>
          <table:table-cell table:formula="of:=[$CopyFromThing.G25]" office:value-type="string" office:string-value="24" calcext:value-type="string">
            <text:p>24</text:p>
          </table:table-cell>
        </table:table-row>
        <table:table-row table:style-name="ro1">
          <table:table-cell/>
          <table:table-cell table:formula="of:=[$CopyFromThing.I26]">
            <text:p/>
          </table:table-cell>
          <table:table-cell table:formula="of:=IF(ISNUMBER(SEARCH(&quot;R&quot;;[$CopyFromThing.A26]));&quot;R&quot;;&quot;&quot;)" office:value-type="string" office:string-value="R" calcext:value-type="string">
            <text:p>R</text:p>
          </table:table-cell>
          <table:table-cell table:formula="of:=IF(ISNUMBER(SEARCH(&quot;C&quot;;[$CopyFromThing.A26]));&quot;C&quot;;&quot;&quot;)">
            <text:p/>
          </table:table-cell>
          <table:table-cell table:formula="of:=IF([.D30]&amp;[.C30]&lt;&gt;&quot;&quot;;[.N30];&quot;&quot;)" office:value-type="string" office:string-value="0603" calcext:value-type="string">
            <text:p>0603</text:p>
          </table:table-cell>
          <table:table-cell table:style-name="ce13" table:formula="of:=[.C30]&amp;[.D30]&amp;[.E30]&amp;&quot;__&quot;&amp;[$CopyFromThing.I26]&amp;&quot;__&quot;&amp;[$CopyFromThing.B26]" office:value-type="string" office:string-value="R0603____33K" calcext:value-type="string">
            <text:p>R0603____33K</text:p>
          </table:table-cell>
          <table:table-cell table:formula="of:=[$CopyFromThing.D26]" office:value-type="string" office:string-value="AADuffy:Resistor_0603" calcext:value-type="string">
            <text:p>AADuffy:Resistor_0603</text:p>
          </table:table-cell>
          <table:table-cell table:formula="of:=FIND(&quot;_&quot;;[.G30])" office:value-type="float" office:value="17" calcext:value-type="float">
            <text:p>17</text:p>
          </table:table-cell>
          <table:table-cell table:formula="of:=IF(ISNUMBER([.H30]);RIGHT([.G30];LEN([.G30])-[.H30]);RIGHT([.G30];LEN([.G30])-FIND(&quot;:&quot;;[.G30])))" office:value-type="string" office:string-value="0603" calcext:value-type="string">
            <text:p>0603</text:p>
          </table:table-cell>
          <table:table-cell table:style-name="ce16" table:formula="of:=MATCH([.I30];{&quot;0603&quot;;&quot;1206&quot;};0)" office:value-type="float" office:value="1" calcext:value-type="float">
            <text:p>1</text:p>
          </table:table-cell>
          <table:table-cell table:style-name="ce16" table:formula="of:=RIGHT([.G30];LEN([.G30])-FIND(&quot;:&quot;;[.G30]))" office:value-type="string" office:string-value="Resistor_0603" calcext:value-type="string">
            <text:p>Resistor_0603</text:p>
          </table:table-cell>
          <table:table-cell table:formula="of:=SEARCH(&quot;0603&quot;;[.G30])" office:value-type="float" office:value="18" calcext:value-type="float">
            <text:p>18</text:p>
          </table:table-cell>
          <table:table-cell table:formula="of:=SEARCH(&quot;1206&quot;;[.G30])" office:value-type="string" office:string-value="" calcext:value-type="error">
            <text:p>#VALUE!</text:p>
          </table:table-cell>
          <table:table-cell table:formula="of:=IF(ISNUMBER([.M30]);&quot;1206&quot;;IF(ISNUMBER([.L30]);&quot;0603&quot;;[.K30]))" office:value-type="string" office:string-value="0603" calcext:value-type="string">
            <text:p>0603</text:p>
          </table:table-cell>
          <table:table-cell table:formula="of:=IF(ISNUMBER([$CopyFromThing.E26]*1);[$CopyFromThing.E26]*1;0)" office:value-type="float" office:value="8" calcext:value-type="float">
            <text:p>8</text:p>
          </table:table-cell>
          <table:table-cell table:formula="of:=VLOOKUP([.F30];[$Supplier_Lookup.$O$7:.$P$104];2;0)" office:value-type="float" office:value="36" calcext:value-type="float">
            <text:p>36</text:p>
          </table:table-cell>
          <table:table-cell table:formula="of:=IF(INDIRECT(&quot;Supplier_Lookup.&quot;&amp;[.Q$3]&amp;[.$P30])&lt;&gt;&quot;&quot;;INDIRECT(&quot;Supplier_Lookup.L&quot;&amp;[.$P30]);INDIRECT(&quot;Supplier_Lookup.&quot;&amp;[.Q$4]&amp;[.$P30]))" office:value-type="string" office:string-value="33K" calcext:value-type="string">
            <text:p>33K</text:p>
          </table:table-cell>
          <table:table-cell table:formula="of:=INDIRECT(&quot;Supplier_Lookup.&quot;&amp;[.R$4]&amp;[.$P30])" office:value-type="string" office:string-value="0603" calcext:value-type="string">
            <text:p>0603</text:p>
          </table:table-cell>
          <table:table-cell table:formula="of:=INDIRECT(&quot;Supplier_Lookup.&quot;&amp;[.S$4]&amp;[.$P30])" office:value-type="float" office:value="0" calcext:value-type="float">
            <text:p>0</text:p>
          </table:table-cell>
          <table:table-cell table:formula="of:=INDIRECT(&quot;Supplier_Lookup.&quot;&amp;[.T$4]&amp;[.$P30])" office:value-type="string" office:string-value="Vishay" calcext:value-type="string">
            <text:p>Vishay</text:p>
          </table:table-cell>
          <table:table-cell table:formula="of:=INDIRECT(&quot;Supplier_Lookup.&quot;&amp;[.U$4]&amp;[.$P30])" office:value-type="string" office:string-value="CRCW060333K0FKEA" calcext:value-type="string">
            <text:p>CRCW060333K0FKEA</text:p>
          </table:table-cell>
          <table:table-cell table:formula="of:=INDIRECT(&quot;Supplier_Lookup.&quot;&amp;[.V$4]&amp;[.$P30])" office:value-type="string" office:string-value="LCSC" calcext:value-type="string">
            <text:p>LCSC</text:p>
          </table:table-cell>
          <table:table-cell table:formula="of:=INDIRECT(&quot;Supplier_Lookup.&quot;&amp;[.W$4]&amp;[.$P30])" office:value-type="string" office:string-value="C844778" calcext:value-type="string">
            <text:p>C844778</text:p>
          </table:table-cell>
          <table:table-cell table:formula="of:=INDIRECT(&quot;Supplier_Lookup.&quot;&amp;[.X$4]&amp;[.$P30])" office:value-type="string" office:string-value="https://www.lcsc.com/product-detail/C844778.html" calcext:value-type="string">
            <text:p>https://www.lcsc.com/product-detail/C844778.html</text:p>
          </table:table-cell>
          <table:table-cell table:formula="of:=INDIRECT(&quot;Supplier_Lookup.&quot;&amp;[.Y$4]&amp;[.$P30])" office:value-type="float" office:value="0.0046" calcext:value-type="float">
            <text:p>0.0046</text:p>
          </table:table-cell>
          <table:table-cell table:formula="of:=IF(INDIRECT(&quot;Supplier_Lookup.&quot;&amp;[.Z$4]&amp;[.$P30])=&quot;&quot;;&quot;&quot;;INDIRECT(&quot;Supplier_Lookup.&quot;&amp;[.Z$4]&amp;[.$P30]))">
            <text:p/>
          </table:table-cell>
          <table:table-cell table:formula="of:=IF(ISNUMBER([.Y30]);[.Y30];0)" office:value-type="float" office:value="0.0046" calcext:value-type="float">
            <text:p>0.0046</text:p>
          </table:table-cell>
          <table:table-cell table:formula="of:=[.AA30]*[.O30]" office:value-type="float" office:value="0.0368" calcext:value-type="float">
            <text:p>0.0368</text:p>
          </table:table-cell>
          <table:table-cell table:formula="of:=[.N30]&amp;&quot;-&quot;&amp;[.R30]" office:value-type="string" office:string-value="0603-0603" calcext:value-type="string">
            <text:p>0603-0603</text:p>
          </table:table-cell>
          <table:table-cell table:formula="of:=[$CopyFromThing.A26]" office:value-type="string" office:string-value="R46,R51,R94,R98,R99,R100,R101,R102" calcext:value-type="string">
            <text:p>R46,R51,R94,R98,R99,R100,R101,R102</text:p>
          </table:table-cell>
          <table:table-cell table:formula="of:=[$CopyFromThing.G26]" office:value-type="string" office:string-value="25" calcext:value-type="string">
            <text:p>25</text:p>
          </table:table-cell>
        </table:table-row>
        <table:table-row table:style-name="ro1">
          <table:table-cell/>
          <table:table-cell table:formula="of:=[$CopyFromThing.I27]">
            <text:p/>
          </table:table-cell>
          <table:table-cell table:formula="of:=IF(ISNUMBER(SEARCH(&quot;R&quot;;[$CopyFromThing.A27]));&quot;R&quot;;&quot;&quot;)" office:value-type="string" office:string-value="R" calcext:value-type="string">
            <text:p>R</text:p>
          </table:table-cell>
          <table:table-cell table:formula="of:=IF(ISNUMBER(SEARCH(&quot;C&quot;;[$CopyFromThing.A27]));&quot;C&quot;;&quot;&quot;)">
            <text:p/>
          </table:table-cell>
          <table:table-cell table:formula="of:=IF([.D31]&amp;[.C31]&lt;&gt;&quot;&quot;;[.N31];&quot;&quot;)" office:value-type="string" office:string-value="1206" calcext:value-type="string">
            <text:p>1206</text:p>
          </table:table-cell>
          <table:table-cell table:style-name="ce13" table:formula="of:=[.C31]&amp;[.D31]&amp;[.E31]&amp;&quot;__&quot;&amp;[$CopyFromThing.I27]&amp;&quot;__&quot;&amp;[$CopyFromThing.B27]" office:value-type="string" office:string-value="R1206____100" calcext:value-type="string">
            <text:p>R1206____100</text:p>
          </table:table-cell>
          <table:table-cell table:formula="of:=[$CopyFromThing.D27]" office:value-type="string" office:string-value="AADuffy:Resistor_1206" calcext:value-type="string">
            <text:p>AADuffy:Resistor_1206</text:p>
          </table:table-cell>
          <table:table-cell table:formula="of:=FIND(&quot;_&quot;;[.G31])" office:value-type="float" office:value="17" calcext:value-type="float">
            <text:p>17</text:p>
          </table:table-cell>
          <table:table-cell table:formula="of:=IF(ISNUMBER([.H31]);RIGHT([.G31];LEN([.G31])-[.H31]);RIGHT([.G31];LEN([.G31])-FIND(&quot;:&quot;;[.G31])))" office:value-type="string" office:string-value="1206" calcext:value-type="string">
            <text:p>1206</text:p>
          </table:table-cell>
          <table:table-cell table:style-name="ce16" table:formula="of:=MATCH([.I31];{&quot;0603&quot;;&quot;1206&quot;};0)" office:value-type="float" office:value="2" calcext:value-type="float">
            <text:p>2</text:p>
          </table:table-cell>
          <table:table-cell table:style-name="ce16" table:formula="of:=RIGHT([.G31];LEN([.G31])-FIND(&quot;:&quot;;[.G31]))" office:value-type="string" office:string-value="Resistor_1206" calcext:value-type="string">
            <text:p>Resistor_1206</text:p>
          </table:table-cell>
          <table:table-cell table:formula="of:=SEARCH(&quot;0603&quot;;[.G31])" office:value-type="string" office:string-value="" calcext:value-type="error">
            <text:p>#VALUE!</text:p>
          </table:table-cell>
          <table:table-cell table:formula="of:=SEARCH(&quot;1206&quot;;[.G31])" office:value-type="float" office:value="18" calcext:value-type="float">
            <text:p>18</text:p>
          </table:table-cell>
          <table:table-cell table:formula="of:=IF(ISNUMBER([.M31]);&quot;1206&quot;;IF(ISNUMBER([.L31]);&quot;0603&quot;;[.K31]))" office:value-type="string" office:string-value="1206" calcext:value-type="string">
            <text:p>1206</text:p>
          </table:table-cell>
          <table:table-cell table:formula="of:=IF(ISNUMBER([$CopyFromThing.E27]*1);[$CopyFromThing.E27]*1;0)" office:value-type="float" office:value="1" calcext:value-type="float">
            <text:p>1</text:p>
          </table:table-cell>
          <table:table-cell table:formula="of:=VLOOKUP([.F31];[$Supplier_Lookup.$O$7:.$P$104];2;0)" office:value-type="float" office:value="58" calcext:value-type="float">
            <text:p>58</text:p>
          </table:table-cell>
          <table:table-cell table:formula="of:=IF(INDIRECT(&quot;Supplier_Lookup.&quot;&amp;[.Q$3]&amp;[.$P31])&lt;&gt;&quot;&quot;;INDIRECT(&quot;Supplier_Lookup.L&quot;&amp;[.$P31]);INDIRECT(&quot;Supplier_Lookup.&quot;&amp;[.Q$4]&amp;[.$P31]))" office:value-type="float" office:value="100" calcext:value-type="float">
            <text:p>100</text:p>
          </table:table-cell>
          <table:table-cell table:formula="of:=INDIRECT(&quot;Supplier_Lookup.&quot;&amp;[.R$4]&amp;[.$P31])" office:value-type="string" office:string-value="1206" calcext:value-type="string">
            <text:p>1206</text:p>
          </table:table-cell>
          <table:table-cell table:formula="of:=INDIRECT(&quot;Supplier_Lookup.&quot;&amp;[.S$4]&amp;[.$P31])" office:value-type="float" office:value="0" calcext:value-type="float">
            <text:p>0</text:p>
          </table:table-cell>
          <table:table-cell table:formula="of:=INDIRECT(&quot;Supplier_Lookup.&quot;&amp;[.T$4]&amp;[.$P31])" office:value-type="string" office:string-value="Yaego" calcext:value-type="string">
            <text:p>Yaego</text:p>
          </table:table-cell>
          <table:table-cell table:formula="of:=INDIRECT(&quot;Supplier_Lookup.&quot;&amp;[.U$4]&amp;[.$P31])" office:value-type="string" office:string-value="RT1206BRB07100RL" calcext:value-type="string">
            <text:p>RT1206BRB07100RL</text:p>
          </table:table-cell>
          <table:table-cell table:formula="of:=INDIRECT(&quot;Supplier_Lookup.&quot;&amp;[.V$4]&amp;[.$P31])" office:value-type="string" office:string-value="LCSC" calcext:value-type="string">
            <text:p>LCSC</text:p>
          </table:table-cell>
          <table:table-cell table:formula="of:=INDIRECT(&quot;Supplier_Lookup.&quot;&amp;[.W$4]&amp;[.$P31])" office:value-type="string" office:string-value="C869681" calcext:value-type="string">
            <text:p>C869681</text:p>
          </table:table-cell>
          <table:table-cell table:formula="of:=INDIRECT(&quot;Supplier_Lookup.&quot;&amp;[.X$4]&amp;[.$P31])" office:value-type="string" office:string-value="https://www.lcsc.com/product-detail/C869681.html" calcext:value-type="string">
            <text:p>https://www.lcsc.com/product-detail/C869681.html</text:p>
          </table:table-cell>
          <table:table-cell table:formula="of:=INDIRECT(&quot;Supplier_Lookup.&quot;&amp;[.Y$4]&amp;[.$P31])" office:value-type="float" office:value="0.0916" calcext:value-type="float">
            <text:p>0.0916</text:p>
          </table:table-cell>
          <table:table-cell table:formula="of:=IF(INDIRECT(&quot;Supplier_Lookup.&quot;&amp;[.Z$4]&amp;[.$P31])=&quot;&quot;;&quot;&quot;;INDIRECT(&quot;Supplier_Lookup.&quot;&amp;[.Z$4]&amp;[.$P31]))">
            <text:p/>
          </table:table-cell>
          <table:table-cell table:formula="of:=IF(ISNUMBER([.Y31]);[.Y31];0)" office:value-type="float" office:value="0.0916" calcext:value-type="float">
            <text:p>0.0916</text:p>
          </table:table-cell>
          <table:table-cell table:formula="of:=[.AA31]*[.O31]" office:value-type="float" office:value="0.0916" calcext:value-type="float">
            <text:p>0.0916</text:p>
          </table:table-cell>
          <table:table-cell table:formula="of:=[.N31]&amp;&quot;-&quot;&amp;[.R31]" office:value-type="string" office:string-value="1206-1206" calcext:value-type="string">
            <text:p>1206-1206</text:p>
          </table:table-cell>
          <table:table-cell table:formula="of:=[$CopyFromThing.A27]" office:value-type="string" office:string-value="R56" calcext:value-type="string">
            <text:p>R56</text:p>
          </table:table-cell>
          <table:table-cell table:formula="of:=[$CopyFromThing.G27]" office:value-type="string" office:string-value="26" calcext:value-type="string">
            <text:p>26</text:p>
          </table:table-cell>
        </table:table-row>
        <table:table-row table:style-name="ro1">
          <table:table-cell/>
          <table:table-cell table:formula="of:=[$CopyFromThing.I28]">
            <text:p/>
          </table:table-cell>
          <table:table-cell table:formula="of:=IF(ISNUMBER(SEARCH(&quot;R&quot;;[$CopyFromThing.A28]));&quot;R&quot;;&quot;&quot;)" office:value-type="string" office:string-value="R" calcext:value-type="string">
            <text:p>R</text:p>
          </table:table-cell>
          <table:table-cell table:formula="of:=IF(ISNUMBER(SEARCH(&quot;C&quot;;[$CopyFromThing.A28]));&quot;C&quot;;&quot;&quot;)">
            <text:p/>
          </table:table-cell>
          <table:table-cell table:formula="of:=IF([.D32]&amp;[.C32]&lt;&gt;&quot;&quot;;[.N32];&quot;&quot;)" office:value-type="string" office:string-value="0603" calcext:value-type="string">
            <text:p>0603</text:p>
          </table:table-cell>
          <table:table-cell table:style-name="ce13" table:formula="of:=[.C32]&amp;[.D32]&amp;[.E32]&amp;&quot;__&quot;&amp;[$CopyFromThing.I28]&amp;&quot;__&quot;&amp;[$CopyFromThing.B28]" office:value-type="string" office:string-value="R0603____220" calcext:value-type="string">
            <text:p>R0603____220</text:p>
          </table:table-cell>
          <table:table-cell table:formula="of:=[$CopyFromThing.D28]" office:value-type="string" office:string-value="AADuffy:Resistor_0603" calcext:value-type="string">
            <text:p>AADuffy:Resistor_0603</text:p>
          </table:table-cell>
          <table:table-cell table:formula="of:=FIND(&quot;_&quot;;[.G32])" office:value-type="float" office:value="17" calcext:value-type="float">
            <text:p>17</text:p>
          </table:table-cell>
          <table:table-cell table:formula="of:=IF(ISNUMBER([.H32]);RIGHT([.G32];LEN([.G32])-[.H32]);RIGHT([.G32];LEN([.G32])-FIND(&quot;:&quot;;[.G32])))" office:value-type="string" office:string-value="0603" calcext:value-type="string">
            <text:p>0603</text:p>
          </table:table-cell>
          <table:table-cell table:style-name="ce16" table:formula="of:=MATCH([.I32];{&quot;0603&quot;;&quot;1206&quot;};0)" office:value-type="float" office:value="1" calcext:value-type="float">
            <text:p>1</text:p>
          </table:table-cell>
          <table:table-cell table:style-name="ce16" table:formula="of:=RIGHT([.G32];LEN([.G32])-FIND(&quot;:&quot;;[.G32]))" office:value-type="string" office:string-value="Resistor_0603" calcext:value-type="string">
            <text:p>Resistor_0603</text:p>
          </table:table-cell>
          <table:table-cell table:formula="of:=SEARCH(&quot;0603&quot;;[.G32])" office:value-type="float" office:value="18" calcext:value-type="float">
            <text:p>18</text:p>
          </table:table-cell>
          <table:table-cell table:formula="of:=SEARCH(&quot;1206&quot;;[.G32])" office:value-type="string" office:string-value="" calcext:value-type="error">
            <text:p>#VALUE!</text:p>
          </table:table-cell>
          <table:table-cell table:formula="of:=IF(ISNUMBER([.M32]);&quot;1206&quot;;IF(ISNUMBER([.L32]);&quot;0603&quot;;[.K32]))" office:value-type="string" office:string-value="0603" calcext:value-type="string">
            <text:p>0603</text:p>
          </table:table-cell>
          <table:table-cell table:formula="of:=IF(ISNUMBER([$CopyFromThing.E28]*1);[$CopyFromThing.E28]*1;0)" office:value-type="float" office:value="9" calcext:value-type="float">
            <text:p>9</text:p>
          </table:table-cell>
          <table:table-cell table:formula="of:=VLOOKUP([.F32];[$Supplier_Lookup.$O$7:.$P$104];2;0)" office:value-type="float" office:value="39" calcext:value-type="float">
            <text:p>39</text:p>
          </table:table-cell>
          <table:table-cell table:formula="of:=IF(INDIRECT(&quot;Supplier_Lookup.&quot;&amp;[.Q$3]&amp;[.$P32])&lt;&gt;&quot;&quot;;INDIRECT(&quot;Supplier_Lookup.L&quot;&amp;[.$P32]);INDIRECT(&quot;Supplier_Lookup.&quot;&amp;[.Q$4]&amp;[.$P32]))" office:value-type="float" office:value="220" calcext:value-type="float">
            <text:p>220</text:p>
          </table:table-cell>
          <table:table-cell table:formula="of:=INDIRECT(&quot;Supplier_Lookup.&quot;&amp;[.R$4]&amp;[.$P32])" office:value-type="string" office:string-value="0603" calcext:value-type="string">
            <text:p>0603</text:p>
          </table:table-cell>
          <table:table-cell table:formula="of:=INDIRECT(&quot;Supplier_Lookup.&quot;&amp;[.S$4]&amp;[.$P32])" office:value-type="float" office:value="0" calcext:value-type="float">
            <text:p>0</text:p>
          </table:table-cell>
          <table:table-cell table:formula="of:=INDIRECT(&quot;Supplier_Lookup.&quot;&amp;[.T$4]&amp;[.$P32])" office:value-type="string" office:string-value="Yaego" calcext:value-type="string">
            <text:p>Yaego</text:p>
          </table:table-cell>
          <table:table-cell table:formula="of:=INDIRECT(&quot;Supplier_Lookup.&quot;&amp;[.U$4]&amp;[.$P32])" office:value-type="string" office:string-value="ERJ3EKF2200V" calcext:value-type="string">
            <text:p>ERJ3EKF2200V</text:p>
          </table:table-cell>
          <table:table-cell table:formula="of:=INDIRECT(&quot;Supplier_Lookup.&quot;&amp;[.V$4]&amp;[.$P32])" office:value-type="string" office:string-value="LCSC" calcext:value-type="string">
            <text:p>LCSC</text:p>
          </table:table-cell>
          <table:table-cell table:formula="of:=INDIRECT(&quot;Supplier_Lookup.&quot;&amp;[.W$4]&amp;[.$P32])" office:value-type="string" office:string-value="C403073" calcext:value-type="string">
            <text:p>C403073</text:p>
          </table:table-cell>
          <table:table-cell table:formula="of:=INDIRECT(&quot;Supplier_Lookup.&quot;&amp;[.X$4]&amp;[.$P32])" office:value-type="string" office:string-value="https://www.lcsc.com/product-detail/C403073.html" calcext:value-type="string">
            <text:p>https://www.lcsc.com/product-detail/C403073.html</text:p>
          </table:table-cell>
          <table:table-cell table:formula="of:=INDIRECT(&quot;Supplier_Lookup.&quot;&amp;[.Y$4]&amp;[.$P32])" office:value-type="float" office:value="0.0053" calcext:value-type="float">
            <text:p>0.0053</text:p>
          </table:table-cell>
          <table:table-cell table:formula="of:=IF(INDIRECT(&quot;Supplier_Lookup.&quot;&amp;[.Z$4]&amp;[.$P32])=&quot;&quot;;&quot;&quot;;INDIRECT(&quot;Supplier_Lookup.&quot;&amp;[.Z$4]&amp;[.$P32]))">
            <text:p/>
          </table:table-cell>
          <table:table-cell table:formula="of:=IF(ISNUMBER([.Y32]);[.Y32];0)" office:value-type="float" office:value="0.0053" calcext:value-type="float">
            <text:p>0.0053</text:p>
          </table:table-cell>
          <table:table-cell table:formula="of:=[.AA32]*[.O32]" office:value-type="float" office:value="0.0477" calcext:value-type="float">
            <text:p>0.0477</text:p>
          </table:table-cell>
          <table:table-cell table:formula="of:=[.N32]&amp;&quot;-&quot;&amp;[.R32]" office:value-type="string" office:string-value="0603-0603" calcext:value-type="string">
            <text:p>0603-0603</text:p>
          </table:table-cell>
          <table:table-cell table:formula="of:=[$CopyFromThing.A28]" office:value-type="string" office:string-value="R59,R60,R61,R62,R63,R64,R65,R106,R107" calcext:value-type="string">
            <text:p>R59,R60,R61,R62,R63,R64,R65,R106,R107</text:p>
          </table:table-cell>
          <table:table-cell table:formula="of:=[$CopyFromThing.G28]" office:value-type="string" office:string-value="27" calcext:value-type="string">
            <text:p>27</text:p>
          </table:table-cell>
        </table:table-row>
        <table:table-row table:style-name="ro1">
          <table:table-cell/>
          <table:table-cell table:formula="of:=[$CopyFromThing.I29]">
            <text:p/>
          </table:table-cell>
          <table:table-cell table:formula="of:=IF(ISNUMBER(SEARCH(&quot;R&quot;;[$CopyFromThing.A29]));&quot;R&quot;;&quot;&quot;)" office:value-type="string" office:string-value="R" calcext:value-type="string">
            <text:p>R</text:p>
          </table:table-cell>
          <table:table-cell table:formula="of:=IF(ISNUMBER(SEARCH(&quot;C&quot;;[$CopyFromThing.A29]));&quot;C&quot;;&quot;&quot;)">
            <text:p/>
          </table:table-cell>
          <table:table-cell table:formula="of:=IF([.D33]&amp;[.C33]&lt;&gt;&quot;&quot;;[.N33];&quot;&quot;)" office:value-type="string" office:string-value="0603" calcext:value-type="string">
            <text:p>0603</text:p>
          </table:table-cell>
          <table:table-cell table:style-name="ce13" table:formula="of:=[.C33]&amp;[.D33]&amp;[.E33]&amp;&quot;__&quot;&amp;[$CopyFromThing.I29]&amp;&quot;__&quot;&amp;[$CopyFromThing.B29]" office:value-type="string" office:string-value="R0603____27" calcext:value-type="string">
            <text:p>R0603____27</text:p>
          </table:table-cell>
          <table:table-cell table:formula="of:=[$CopyFromThing.D29]" office:value-type="string" office:string-value="AADuffy:Resistor_0603" calcext:value-type="string">
            <text:p>AADuffy:Resistor_0603</text:p>
          </table:table-cell>
          <table:table-cell table:formula="of:=FIND(&quot;_&quot;;[.G33])" office:value-type="float" office:value="17" calcext:value-type="float">
            <text:p>17</text:p>
          </table:table-cell>
          <table:table-cell table:formula="of:=IF(ISNUMBER([.H33]);RIGHT([.G33];LEN([.G33])-[.H33]);RIGHT([.G33];LEN([.G33])-FIND(&quot;:&quot;;[.G33])))" office:value-type="string" office:string-value="0603" calcext:value-type="string">
            <text:p>0603</text:p>
          </table:table-cell>
          <table:table-cell table:style-name="ce16" table:formula="of:=MATCH([.I33];{&quot;0603&quot;;&quot;1206&quot;};0)" office:value-type="float" office:value="1" calcext:value-type="float">
            <text:p>1</text:p>
          </table:table-cell>
          <table:table-cell table:style-name="ce16" table:formula="of:=RIGHT([.G33];LEN([.G33])-FIND(&quot;:&quot;;[.G33]))" office:value-type="string" office:string-value="Resistor_0603" calcext:value-type="string">
            <text:p>Resistor_0603</text:p>
          </table:table-cell>
          <table:table-cell table:formula="of:=SEARCH(&quot;0603&quot;;[.G33])" office:value-type="float" office:value="18" calcext:value-type="float">
            <text:p>18</text:p>
          </table:table-cell>
          <table:table-cell table:formula="of:=SEARCH(&quot;1206&quot;;[.G33])" office:value-type="string" office:string-value="" calcext:value-type="error">
            <text:p>#VALUE!</text:p>
          </table:table-cell>
          <table:table-cell table:formula="of:=IF(ISNUMBER([.M33]);&quot;1206&quot;;IF(ISNUMBER([.L33]);&quot;0603&quot;;[.K33]))" office:value-type="string" office:string-value="0603" calcext:value-type="string">
            <text:p>0603</text:p>
          </table:table-cell>
          <table:table-cell table:formula="of:=IF(ISNUMBER([$CopyFromThing.E29]*1);[$CopyFromThing.E29]*1;0)" office:value-type="float" office:value="9" calcext:value-type="float">
            <text:p>9</text:p>
          </table:table-cell>
          <table:table-cell table:formula="of:=VLOOKUP([.F33];[$Supplier_Lookup.$O$7:.$P$104];2;0)" office:value-type="float" office:value="38" calcext:value-type="float">
            <text:p>38</text:p>
          </table:table-cell>
          <table:table-cell table:formula="of:=IF(INDIRECT(&quot;Supplier_Lookup.&quot;&amp;[.Q$3]&amp;[.$P33])&lt;&gt;&quot;&quot;;INDIRECT(&quot;Supplier_Lookup.L&quot;&amp;[.$P33]);INDIRECT(&quot;Supplier_Lookup.&quot;&amp;[.Q$4]&amp;[.$P33]))" office:value-type="float" office:value="27" calcext:value-type="float">
            <text:p>27</text:p>
          </table:table-cell>
          <table:table-cell table:formula="of:=INDIRECT(&quot;Supplier_Lookup.&quot;&amp;[.R$4]&amp;[.$P33])" office:value-type="string" office:string-value="0603" calcext:value-type="string">
            <text:p>0603</text:p>
          </table:table-cell>
          <table:table-cell table:formula="of:=INDIRECT(&quot;Supplier_Lookup.&quot;&amp;[.S$4]&amp;[.$P33])" office:value-type="float" office:value="0" calcext:value-type="float">
            <text:p>0</text:p>
          </table:table-cell>
          <table:table-cell table:formula="of:=INDIRECT(&quot;Supplier_Lookup.&quot;&amp;[.T$4]&amp;[.$P33])" office:value-type="string" office:string-value="Yaego" calcext:value-type="string">
            <text:p>Yaego</text:p>
          </table:table-cell>
          <table:table-cell table:formula="of:=INDIRECT(&quot;Supplier_Lookup.&quot;&amp;[.U$4]&amp;[.$P33])" office:value-type="string" office:string-value="CRCW060327R0FKEA" calcext:value-type="string">
            <text:p>CRCW060327R0FKEA</text:p>
          </table:table-cell>
          <table:table-cell table:formula="of:=INDIRECT(&quot;Supplier_Lookup.&quot;&amp;[.V$4]&amp;[.$P33])" office:value-type="string" office:string-value="LCSC" calcext:value-type="string">
            <text:p>LCSC</text:p>
          </table:table-cell>
          <table:table-cell table:formula="of:=INDIRECT(&quot;Supplier_Lookup.&quot;&amp;[.W$4]&amp;[.$P33])" office:value-type="string" office:string-value="C844545" calcext:value-type="string">
            <text:p>C844545</text:p>
          </table:table-cell>
          <table:table-cell table:formula="of:=INDIRECT(&quot;Supplier_Lookup.&quot;&amp;[.X$4]&amp;[.$P33])" office:value-type="string" office:string-value="https://www.lcsc.com/product-detail/C844545.html" calcext:value-type="string">
            <text:p>https://www.lcsc.com/product-detail/C844545.html</text:p>
          </table:table-cell>
          <table:table-cell table:formula="of:=INDIRECT(&quot;Supplier_Lookup.&quot;&amp;[.Y$4]&amp;[.$P33])" office:value-type="float" office:value="0.0045" calcext:value-type="float">
            <text:p>0.0045</text:p>
          </table:table-cell>
          <table:table-cell table:formula="of:=IF(INDIRECT(&quot;Supplier_Lookup.&quot;&amp;[.Z$4]&amp;[.$P33])=&quot;&quot;;&quot;&quot;;INDIRECT(&quot;Supplier_Lookup.&quot;&amp;[.Z$4]&amp;[.$P33]))">
            <text:p/>
          </table:table-cell>
          <table:table-cell table:formula="of:=IF(ISNUMBER([.Y33]);[.Y33];0)" office:value-type="float" office:value="0.0045" calcext:value-type="float">
            <text:p>0.0045</text:p>
          </table:table-cell>
          <table:table-cell table:formula="of:=[.AA33]*[.O33]" office:value-type="float" office:value="0.0405" calcext:value-type="float">
            <text:p>0.0405</text:p>
          </table:table-cell>
          <table:table-cell table:formula="of:=[.N33]&amp;&quot;-&quot;&amp;[.R33]" office:value-type="string" office:string-value="0603-0603" calcext:value-type="string">
            <text:p>0603-0603</text:p>
          </table:table-cell>
          <table:table-cell table:formula="of:=[$CopyFromThing.A29]" office:value-type="string" office:string-value="R75,R78,R79,R81,R84,R85,R103,R104,R105" calcext:value-type="string">
            <text:p>R75,R78,R79,R81,R84,R85,R103,R104,R105</text:p>
          </table:table-cell>
          <table:table-cell table:formula="of:=[$CopyFromThing.G29]" office:value-type="string" office:string-value="28" calcext:value-type="string">
            <text:p>28</text:p>
          </table:table-cell>
        </table:table-row>
        <table:table-row table:style-name="ro1">
          <table:table-cell/>
          <table:table-cell table:formula="of:=[$CopyFromThing.I30]">
            <text:p/>
          </table:table-cell>
          <table:table-cell table:formula="of:=IF(ISNUMBER(SEARCH(&quot;R&quot;;[$CopyFromThing.A30]));&quot;R&quot;;&quot;&quot;)" office:value-type="string" office:string-value="R" calcext:value-type="string">
            <text:p>R</text:p>
          </table:table-cell>
          <table:table-cell table:formula="of:=IF(ISNUMBER(SEARCH(&quot;C&quot;;[$CopyFromThing.A30]));&quot;C&quot;;&quot;&quot;)">
            <text:p/>
          </table:table-cell>
          <table:table-cell table:formula="of:=IF([.D34]&amp;[.C34]&lt;&gt;&quot;&quot;;[.N34];&quot;&quot;)" office:value-type="string" office:string-value="0603" calcext:value-type="string">
            <text:p>0603</text:p>
          </table:table-cell>
          <table:table-cell table:style-name="ce13" table:formula="of:=[.C34]&amp;[.D34]&amp;[.E34]&amp;&quot;__&quot;&amp;[$CopyFromThing.I30]&amp;&quot;__&quot;&amp;[$CopyFromThing.B30]" office:value-type="string" office:string-value="R0603____5.1K" calcext:value-type="string">
            <text:p>R0603____5.1K</text:p>
          </table:table-cell>
          <table:table-cell table:formula="of:=[$CopyFromThing.D30]" office:value-type="string" office:string-value="AADuffy:Resistor_0603" calcext:value-type="string">
            <text:p>AADuffy:Resistor_0603</text:p>
          </table:table-cell>
          <table:table-cell table:formula="of:=FIND(&quot;_&quot;;[.G34])" office:value-type="float" office:value="17" calcext:value-type="float">
            <text:p>17</text:p>
          </table:table-cell>
          <table:table-cell table:formula="of:=IF(ISNUMBER([.H34]);RIGHT([.G34];LEN([.G34])-[.H34]);RIGHT([.G34];LEN([.G34])-FIND(&quot;:&quot;;[.G34])))" office:value-type="string" office:string-value="0603" calcext:value-type="string">
            <text:p>0603</text:p>
          </table:table-cell>
          <table:table-cell table:style-name="ce16" table:formula="of:=MATCH([.I34];{&quot;0603&quot;;&quot;1206&quot;};0)" office:value-type="float" office:value="1" calcext:value-type="float">
            <text:p>1</text:p>
          </table:table-cell>
          <table:table-cell table:style-name="ce16" table:formula="of:=RIGHT([.G34];LEN([.G34])-FIND(&quot;:&quot;;[.G34]))" office:value-type="string" office:string-value="Resistor_0603" calcext:value-type="string">
            <text:p>Resistor_0603</text:p>
          </table:table-cell>
          <table:table-cell table:formula="of:=SEARCH(&quot;0603&quot;;[.G34])" office:value-type="float" office:value="18" calcext:value-type="float">
            <text:p>18</text:p>
          </table:table-cell>
          <table:table-cell table:formula="of:=SEARCH(&quot;1206&quot;;[.G34])" office:value-type="string" office:string-value="" calcext:value-type="error">
            <text:p>#VALUE!</text:p>
          </table:table-cell>
          <table:table-cell table:formula="of:=IF(ISNUMBER([.M34]);&quot;1206&quot;;IF(ISNUMBER([.L34]);&quot;0603&quot;;[.K34]))" office:value-type="string" office:string-value="0603" calcext:value-type="string">
            <text:p>0603</text:p>
          </table:table-cell>
          <table:table-cell table:formula="of:=IF(ISNUMBER([$CopyFromThing.E30]*1);[$CopyFromThing.E30]*1;0)" office:value-type="float" office:value="4" calcext:value-type="float">
            <text:p>4</text:p>
          </table:table-cell>
          <table:table-cell table:formula="of:=VLOOKUP([.F34];[$Supplier_Lookup.$O$7:.$P$104];2;0)" office:value-type="float" office:value="35" calcext:value-type="float">
            <text:p>35</text:p>
          </table:table-cell>
          <table:table-cell table:formula="of:=IF(INDIRECT(&quot;Supplier_Lookup.&quot;&amp;[.Q$3]&amp;[.$P34])&lt;&gt;&quot;&quot;;INDIRECT(&quot;Supplier_Lookup.L&quot;&amp;[.$P34]);INDIRECT(&quot;Supplier_Lookup.&quot;&amp;[.Q$4]&amp;[.$P34]))" office:value-type="string" office:string-value="5.1K" calcext:value-type="string">
            <text:p>5.1K</text:p>
          </table:table-cell>
          <table:table-cell table:formula="of:=INDIRECT(&quot;Supplier_Lookup.&quot;&amp;[.R$4]&amp;[.$P34])" office:value-type="string" office:string-value="0603" calcext:value-type="string">
            <text:p>0603</text:p>
          </table:table-cell>
          <table:table-cell table:formula="of:=INDIRECT(&quot;Supplier_Lookup.&quot;&amp;[.S$4]&amp;[.$P34])" office:value-type="float" office:value="0" calcext:value-type="float">
            <text:p>0</text:p>
          </table:table-cell>
          <table:table-cell table:formula="of:=INDIRECT(&quot;Supplier_Lookup.&quot;&amp;[.T$4]&amp;[.$P34])" office:value-type="string" office:string-value="Yaego" calcext:value-type="string">
            <text:p>Yaego</text:p>
          </table:table-cell>
          <table:table-cell table:formula="of:=INDIRECT(&quot;Supplier_Lookup.&quot;&amp;[.U$4]&amp;[.$P34])" office:value-type="string" office:string-value="AC0603FR-075K1L" calcext:value-type="string">
            <text:p>AC0603FR-075K1L</text:p>
          </table:table-cell>
          <table:table-cell table:formula="of:=INDIRECT(&quot;Supplier_Lookup.&quot;&amp;[.V$4]&amp;[.$P34])" office:value-type="string" office:string-value="LCSC" calcext:value-type="string">
            <text:p>LCSC</text:p>
          </table:table-cell>
          <table:table-cell table:formula="of:=INDIRECT(&quot;Supplier_Lookup.&quot;&amp;[.W$4]&amp;[.$P34])" office:value-type="string" office:string-value="C125891" calcext:value-type="string">
            <text:p>C125891</text:p>
          </table:table-cell>
          <table:table-cell table:formula="of:=INDIRECT(&quot;Supplier_Lookup.&quot;&amp;[.X$4]&amp;[.$P34])" office:value-type="string" office:string-value="https://www.lcsc.com/product-detail/C125891.html" calcext:value-type="string">
            <text:p>https://www.lcsc.com/product-detail/C125891.html</text:p>
          </table:table-cell>
          <table:table-cell table:formula="of:=INDIRECT(&quot;Supplier_Lookup.&quot;&amp;[.Y$4]&amp;[.$P34])" office:value-type="float" office:value="0.0024" calcext:value-type="float">
            <text:p>0.0024</text:p>
          </table:table-cell>
          <table:table-cell table:formula="of:=IF(INDIRECT(&quot;Supplier_Lookup.&quot;&amp;[.Z$4]&amp;[.$P34])=&quot;&quot;;&quot;&quot;;INDIRECT(&quot;Supplier_Lookup.&quot;&amp;[.Z$4]&amp;[.$P34]))">
            <text:p/>
          </table:table-cell>
          <table:table-cell table:formula="of:=IF(ISNUMBER([.Y34]);[.Y34];0)" office:value-type="float" office:value="0.0024" calcext:value-type="float">
            <text:p>0.0024</text:p>
          </table:table-cell>
          <table:table-cell table:formula="of:=[.AA34]*[.O34]" office:value-type="float" office:value="0.0096" calcext:value-type="float">
            <text:p>0.0096</text:p>
          </table:table-cell>
          <table:table-cell table:formula="of:=[.N34]&amp;&quot;-&quot;&amp;[.R34]" office:value-type="string" office:string-value="0603-0603" calcext:value-type="string">
            <text:p>0603-0603</text:p>
          </table:table-cell>
          <table:table-cell table:formula="of:=[$CopyFromThing.A30]" office:value-type="string" office:string-value="R89,R90,R91,R92" calcext:value-type="string">
            <text:p>R89,R90,R91,R92</text:p>
          </table:table-cell>
          <table:table-cell table:formula="of:=[$CopyFromThing.G30]" office:value-type="string" office:string-value="29" calcext:value-type="string">
            <text:p>29</text:p>
          </table:table-cell>
        </table:table-row>
        <table:table-row table:style-name="ro1">
          <table:table-cell/>
          <table:table-cell table:formula="of:=[$CopyFromThing.I31]" office:value-type="string" office:string-value="AS2376S-13" calcext:value-type="string">
            <text:p>AS2376S-13</text:p>
          </table:table-cell>
          <table:table-cell table:formula="of:=IF(ISNUMBER(SEARCH(&quot;R&quot;;[$CopyFromThing.A31]));&quot;R&quot;;&quot;&quot;)">
            <text:p/>
          </table:table-cell>
          <table:table-cell table:formula="of:=IF(ISNUMBER(SEARCH(&quot;C&quot;;[$CopyFromThing.A31]));&quot;C&quot;;&quot;&quot;)">
            <text:p/>
          </table:table-cell>
          <table:table-cell table:formula="of:=IF([.D35]&amp;[.C35]&lt;&gt;&quot;&quot;;[.N35];&quot;&quot;)">
            <text:p/>
          </table:table-cell>
          <table:table-cell table:style-name="ce13" table:formula="of:=[.C35]&amp;[.D35]&amp;[.E35]&amp;&quot;__&quot;&amp;[$CopyFromThing.I31]&amp;&quot;__&quot;&amp;[$CopyFromThing.B31]" office:value-type="string" office:string-value="__AS2376S-13__0.2pA 5uV" calcext:value-type="string">
            <text:p>__AS2376S-13__0.2pA 5uV</text:p>
          </table:table-cell>
          <table:table-cell table:formula="of:=[$CopyFromThing.D31]" office:value-type="string" office:string-value="AADuffy:SOIC-8_AS2376S-13" calcext:value-type="string">
            <text:p>AADuffy:SOIC-8_AS2376S-13</text:p>
          </table:table-cell>
          <table:table-cell table:formula="of:=FIND(&quot;_&quot;;[.G35])" office:value-type="float" office:value="15" calcext:value-type="float">
            <text:p>15</text:p>
          </table:table-cell>
          <table:table-cell table:formula="of:=IF(ISNUMBER([.H35]);RIGHT([.G35];LEN([.G35])-[.H35]);RIGHT([.G35];LEN([.G35])-FIND(&quot;:&quot;;[.G35])))" office:value-type="string" office:string-value="AS2376S-13" calcext:value-type="string">
            <text:p>AS2376S-13</text:p>
          </table:table-cell>
          <table:table-cell table:style-name="ce16" table:formula="of:=MATCH([.I35];{&quot;0603&quot;;&quot;1206&quot;};0)" office:value-type="string" office:string-value="" calcext:value-type="error">
            <text:p>#N/A</text:p>
          </table:table-cell>
          <table:table-cell table:style-name="ce16" table:formula="of:=RIGHT([.G35];LEN([.G35])-FIND(&quot;:&quot;;[.G35]))" office:value-type="string" office:string-value="SOIC-8_AS2376S-13" calcext:value-type="string">
            <text:p>SOIC-8_AS2376S-13</text:p>
          </table:table-cell>
          <table:table-cell table:formula="of:=SEARCH(&quot;0603&quot;;[.G35])" office:value-type="string" office:string-value="" calcext:value-type="error">
            <text:p>#VALUE!</text:p>
          </table:table-cell>
          <table:table-cell table:formula="of:=SEARCH(&quot;1206&quot;;[.G35])" office:value-type="string" office:string-value="" calcext:value-type="error">
            <text:p>#VALUE!</text:p>
          </table:table-cell>
          <table:table-cell table:formula="of:=IF(ISNUMBER([.M35]);&quot;1206&quot;;IF(ISNUMBER([.L35]);&quot;0603&quot;;[.K35]))" office:value-type="string" office:string-value="SOIC-8_AS2376S-13" calcext:value-type="string">
            <text:p>SOIC-8_AS2376S-13</text:p>
          </table:table-cell>
          <table:table-cell table:formula="of:=IF(ISNUMBER([$CopyFromThing.E31]*1);[$CopyFromThing.E31]*1;0)" office:value-type="float" office:value="1" calcext:value-type="float">
            <text:p>1</text:p>
          </table:table-cell>
          <table:table-cell table:formula="of:=VLOOKUP([.F35];[$Supplier_Lookup.$O$7:.$P$104];2;0)" office:value-type="float" office:value="15" calcext:value-type="float">
            <text:p>15</text:p>
          </table:table-cell>
          <table:table-cell table:formula="of:=IF(INDIRECT(&quot;Supplier_Lookup.&quot;&amp;[.Q$3]&amp;[.$P35])&lt;&gt;&quot;&quot;;INDIRECT(&quot;Supplier_Lookup.L&quot;&amp;[.$P35]);INDIRECT(&quot;Supplier_Lookup.&quot;&amp;[.Q$4]&amp;[.$P35]))" office:value-type="string" office:string-value="0.2pA 5uV" calcext:value-type="string">
            <text:p>0.2pA 5uV</text:p>
          </table:table-cell>
          <table:table-cell table:formula="of:=INDIRECT(&quot;Supplier_Lookup.&quot;&amp;[.R$4]&amp;[.$P35])" office:value-type="float" office:value="0" calcext:value-type="float">
            <text:p>0</text:p>
          </table:table-cell>
          <table:table-cell table:formula="of:=INDIRECT(&quot;Supplier_Lookup.&quot;&amp;[.S$4]&amp;[.$P35])" office:value-type="string" office:string-value="AS2376S-13" calcext:value-type="string">
            <text:p>AS2376S-13</text:p>
          </table:table-cell>
          <table:table-cell table:formula="of:=INDIRECT(&quot;Supplier_Lookup.&quot;&amp;[.T$4]&amp;[.$P35])" office:value-type="string" office:string-value="Diodes Inc" calcext:value-type="string">
            <text:p>Diodes Inc</text:p>
          </table:table-cell>
          <table:table-cell table:formula="of:=INDIRECT(&quot;Supplier_Lookup.&quot;&amp;[.U$4]&amp;[.$P35])" office:value-type="string" office:string-value="AS2376QS-13" calcext:value-type="string">
            <text:p>AS2376QS-13</text:p>
          </table:table-cell>
          <table:table-cell table:formula="of:=INDIRECT(&quot;Supplier_Lookup.&quot;&amp;[.V$4]&amp;[.$P35])" office:value-type="string" office:string-value="LCSC" calcext:value-type="string">
            <text:p>LCSC</text:p>
          </table:table-cell>
          <table:table-cell table:formula="of:=INDIRECT(&quot;Supplier_Lookup.&quot;&amp;[.W$4]&amp;[.$P35])" office:value-type="string" office:string-value="C19948478" calcext:value-type="string">
            <text:p>C19948478</text:p>
          </table:table-cell>
          <table:table-cell table:formula="of:=INDIRECT(&quot;Supplier_Lookup.&quot;&amp;[.X$4]&amp;[.$P35])" office:value-type="string" office:string-value="https://www.lcsc.com/product-detail/C19948478.html" calcext:value-type="string">
            <text:p>https://www.lcsc.com/product-detail/C19948478.html</text:p>
          </table:table-cell>
          <table:table-cell table:formula="of:=INDIRECT(&quot;Supplier_Lookup.&quot;&amp;[.Y$4]&amp;[.$P35])" office:value-type="float" office:value="0.53" calcext:value-type="float">
            <text:p>0.53</text:p>
          </table:table-cell>
          <table:table-cell table:formula="of:=IF(INDIRECT(&quot;Supplier_Lookup.&quot;&amp;[.Z$4]&amp;[.$P35])=&quot;&quot;;&quot;&quot;;INDIRECT(&quot;Supplier_Lookup.&quot;&amp;[.Z$4]&amp;[.$P35]))">
            <text:p/>
          </table:table-cell>
          <table:table-cell table:formula="of:=IF(ISNUMBER([.Y35]);[.Y35];0)" office:value-type="float" office:value="0.53" calcext:value-type="float">
            <text:p>0.53</text:p>
          </table:table-cell>
          <table:table-cell table:formula="of:=[.AA35]*[.O35]" office:value-type="float" office:value="0.53" calcext:value-type="float">
            <text:p>0.53</text:p>
          </table:table-cell>
          <table:table-cell table:formula="of:=[.N35]&amp;&quot;-&quot;&amp;[.R35]" office:value-type="string" office:string-value="SOIC-8_AS2376S-13-0" calcext:value-type="string">
            <text:p>SOIC-8_AS2376S-13-0</text:p>
          </table:table-cell>
          <table:table-cell table:formula="of:=[$CopyFromThing.A31]" office:value-type="string" office:string-value="U1" calcext:value-type="string">
            <text:p>U1</text:p>
          </table:table-cell>
          <table:table-cell table:formula="of:=[$CopyFromThing.G31]" office:value-type="string" office:string-value="30" calcext:value-type="string">
            <text:p>30</text:p>
          </table:table-cell>
        </table:table-row>
        <table:table-row table:style-name="ro1">
          <table:table-cell/>
          <table:table-cell table:formula="of:=[$CopyFromThing.I32]" office:value-type="string" office:string-value="TS5A3159DCKR" calcext:value-type="string">
            <text:p>TS5A3159DCKR</text:p>
          </table:table-cell>
          <table:table-cell table:formula="of:=IF(ISNUMBER(SEARCH(&quot;R&quot;;[$CopyFromThing.A32]));&quot;R&quot;;&quot;&quot;)">
            <text:p/>
          </table:table-cell>
          <table:table-cell table:formula="of:=IF(ISNUMBER(SEARCH(&quot;C&quot;;[$CopyFromThing.A32]));&quot;C&quot;;&quot;&quot;)">
            <text:p/>
          </table:table-cell>
          <table:table-cell table:formula="of:=IF([.D36]&amp;[.C36]&lt;&gt;&quot;&quot;;[.N36];&quot;&quot;)">
            <text:p/>
          </table:table-cell>
          <table:table-cell table:style-name="ce13" table:formula="of:=[.C36]&amp;[.D36]&amp;[.E36]&amp;&quot;__&quot;&amp;[$CopyFromThing.I32]&amp;&quot;__&quot;&amp;[$CopyFromThing.B32]" office:value-type="string" office:string-value="__TS5A3159DCKR__TS5A3159DCKR" calcext:value-type="string">
            <text:p>__TS5A3159DCKR__TS5A3159DCKR</text:p>
          </table:table-cell>
          <table:table-cell table:formula="of:=[$CopyFromThing.D32]" office:value-type="string" office:string-value="AADuffy:SC-70_TS5A3159DCKR" calcext:value-type="string">
            <text:p>AADuffy:SC-70_TS5A3159DCKR</text:p>
          </table:table-cell>
          <table:table-cell table:formula="of:=FIND(&quot;_&quot;;[.G36])" office:value-type="float" office:value="14" calcext:value-type="float">
            <text:p>14</text:p>
          </table:table-cell>
          <table:table-cell table:formula="of:=IF(ISNUMBER([.H36]);RIGHT([.G36];LEN([.G36])-[.H36]);RIGHT([.G36];LEN([.G36])-FIND(&quot;:&quot;;[.G36])))" office:value-type="string" office:string-value="TS5A3159DCKR" calcext:value-type="string">
            <text:p>TS5A3159DCKR</text:p>
          </table:table-cell>
          <table:table-cell table:style-name="ce16" table:formula="of:=MATCH([.I36];{&quot;0603&quot;;&quot;1206&quot;};0)" office:value-type="string" office:string-value="" calcext:value-type="error">
            <text:p>#N/A</text:p>
          </table:table-cell>
          <table:table-cell table:style-name="ce16" table:formula="of:=RIGHT([.G36];LEN([.G36])-FIND(&quot;:&quot;;[.G36]))" office:value-type="string" office:string-value="SC-70_TS5A3159DCKR" calcext:value-type="string">
            <text:p>SC-70_TS5A3159DCKR</text:p>
          </table:table-cell>
          <table:table-cell table:formula="of:=SEARCH(&quot;0603&quot;;[.G36])" office:value-type="string" office:string-value="" calcext:value-type="error">
            <text:p>#VALUE!</text:p>
          </table:table-cell>
          <table:table-cell table:formula="of:=SEARCH(&quot;1206&quot;;[.G36])" office:value-type="string" office:string-value="" calcext:value-type="error">
            <text:p>#VALUE!</text:p>
          </table:table-cell>
          <table:table-cell table:formula="of:=IF(ISNUMBER([.M36]);&quot;1206&quot;;IF(ISNUMBER([.L36]);&quot;0603&quot;;[.K36]))" office:value-type="string" office:string-value="SC-70_TS5A3159DCKR" calcext:value-type="string">
            <text:p>SC-70_TS5A3159DCKR</text:p>
          </table:table-cell>
          <table:table-cell table:formula="of:=IF(ISNUMBER([$CopyFromThing.E32]*1);[$CopyFromThing.E32]*1;0)" office:value-type="float" office:value="4" calcext:value-type="float">
            <text:p>4</text:p>
          </table:table-cell>
          <table:table-cell table:formula="of:=VLOOKUP([.F36];[$Supplier_Lookup.$O$7:.$P$104];2;0)" office:value-type="float" office:value="20" calcext:value-type="float">
            <text:p>20</text:p>
          </table:table-cell>
          <table:table-cell table:formula="of:=IF(INDIRECT(&quot;Supplier_Lookup.&quot;&amp;[.Q$3]&amp;[.$P36])&lt;&gt;&quot;&quot;;INDIRECT(&quot;Supplier_Lookup.L&quot;&amp;[.$P36]);INDIRECT(&quot;Supplier_Lookup.&quot;&amp;[.Q$4]&amp;[.$P36]))" office:value-type="string" office:string-value="TS5A3159DCKR" calcext:value-type="string">
            <text:p>TS5A3159DCKR</text:p>
          </table:table-cell>
          <table:table-cell table:formula="of:=INDIRECT(&quot;Supplier_Lookup.&quot;&amp;[.R$4]&amp;[.$P36])" office:value-type="float" office:value="0" calcext:value-type="float">
            <text:p>0</text:p>
          </table:table-cell>
          <table:table-cell table:formula="of:=INDIRECT(&quot;Supplier_Lookup.&quot;&amp;[.S$4]&amp;[.$P36])" office:value-type="string" office:string-value="TS5A3159DCKR" calcext:value-type="string">
            <text:p>TS5A3159DCKR</text:p>
          </table:table-cell>
          <table:table-cell table:formula="of:=INDIRECT(&quot;Supplier_Lookup.&quot;&amp;[.T$4]&amp;[.$P36])" office:value-type="string" office:string-value="TI" calcext:value-type="string">
            <text:p>TI</text:p>
          </table:table-cell>
          <table:table-cell table:formula="of:=INDIRECT(&quot;Supplier_Lookup.&quot;&amp;[.U$4]&amp;[.$P36])" office:value-type="string" office:string-value="TS5A3159DCKR" calcext:value-type="string">
            <text:p>TS5A3159DCKR</text:p>
          </table:table-cell>
          <table:table-cell table:formula="of:=INDIRECT(&quot;Supplier_Lookup.&quot;&amp;[.V$4]&amp;[.$P36])" office:value-type="string" office:string-value="LCSC" calcext:value-type="string">
            <text:p>LCSC</text:p>
          </table:table-cell>
          <table:table-cell table:formula="of:=INDIRECT(&quot;Supplier_Lookup.&quot;&amp;[.W$4]&amp;[.$P36])" office:value-type="string" office:string-value="C46388" calcext:value-type="string">
            <text:p>C46388</text:p>
          </table:table-cell>
          <table:table-cell table:formula="of:=INDIRECT(&quot;Supplier_Lookup.&quot;&amp;[.X$4]&amp;[.$P36])" office:value-type="string" office:string-value="https://www.lcsc.com/product-detail/C46388.html" calcext:value-type="string">
            <text:p>https://www.lcsc.com/product-detail/C46388.html</text:p>
          </table:table-cell>
          <table:table-cell table:formula="of:=INDIRECT(&quot;Supplier_Lookup.&quot;&amp;[.Y$4]&amp;[.$P36])" office:value-type="float" office:value="0.1724" calcext:value-type="float">
            <text:p>0.1724</text:p>
          </table:table-cell>
          <table:table-cell table:formula="of:=IF(INDIRECT(&quot;Supplier_Lookup.&quot;&amp;[.Z$4]&amp;[.$P36])=&quot;&quot;;&quot;&quot;;INDIRECT(&quot;Supplier_Lookup.&quot;&amp;[.Z$4]&amp;[.$P36]))">
            <text:p/>
          </table:table-cell>
          <table:table-cell table:formula="of:=IF(ISNUMBER([.Y36]);[.Y36];0)" office:value-type="float" office:value="0.1724" calcext:value-type="float">
            <text:p>0.1724</text:p>
          </table:table-cell>
          <table:table-cell table:formula="of:=[.AA36]*[.O36]" office:value-type="float" office:value="0.6896" calcext:value-type="float">
            <text:p>0.6896</text:p>
          </table:table-cell>
          <table:table-cell table:formula="of:=[.N36]&amp;&quot;-&quot;&amp;[.R36]" office:value-type="string" office:string-value="SC-70_TS5A3159DCKR-0" calcext:value-type="string">
            <text:p>SC-70_TS5A3159DCKR-0</text:p>
          </table:table-cell>
          <table:table-cell table:formula="of:=[$CopyFromThing.A32]" office:value-type="string" office:string-value="U2,U3,U4,U5" calcext:value-type="string">
            <text:p>U2,U3,U4,U5</text:p>
          </table:table-cell>
          <table:table-cell table:formula="of:=[$CopyFromThing.G32]" office:value-type="string" office:string-value="31" calcext:value-type="string">
            <text:p>31</text:p>
          </table:table-cell>
        </table:table-row>
        <table:table-row table:style-name="ro1">
          <table:table-cell/>
          <table:table-cell table:formula="of:=[$CopyFromThing.I33]" office:value-type="string" office:string-value="AS333SE-7" calcext:value-type="string">
            <text:p>AS333SE-7</text:p>
          </table:table-cell>
          <table:table-cell table:formula="of:=IF(ISNUMBER(SEARCH(&quot;R&quot;;[$CopyFromThing.A33]));&quot;R&quot;;&quot;&quot;)">
            <text:p/>
          </table:table-cell>
          <table:table-cell table:formula="of:=IF(ISNUMBER(SEARCH(&quot;C&quot;;[$CopyFromThing.A33]));&quot;C&quot;;&quot;&quot;)">
            <text:p/>
          </table:table-cell>
          <table:table-cell table:formula="of:=IF([.D37]&amp;[.C37]&lt;&gt;&quot;&quot;;[.N37];&quot;&quot;)">
            <text:p/>
          </table:table-cell>
          <table:table-cell table:style-name="ce13" table:formula="of:=[.C37]&amp;[.D37]&amp;[.E37]&amp;&quot;__&quot;&amp;[$CopyFromThing.I33]&amp;&quot;__&quot;&amp;[$CopyFromThing.B33]" office:value-type="string" office:string-value="__AS333SE-7__70pA 8uV" calcext:value-type="string">
            <text:p>__AS333SE-7__70pA 8uV</text:p>
          </table:table-cell>
          <table:table-cell table:formula="of:=[$CopyFromThing.D33]" office:value-type="string" office:string-value="AADuffy:SC-70-5_AS333SE-7" calcext:value-type="string">
            <text:p>AADuffy:SC-70-5_AS333SE-7</text:p>
          </table:table-cell>
          <table:table-cell table:formula="of:=FIND(&quot;_&quot;;[.G37])" office:value-type="float" office:value="16" calcext:value-type="float">
            <text:p>16</text:p>
          </table:table-cell>
          <table:table-cell table:formula="of:=IF(ISNUMBER([.H37]);RIGHT([.G37];LEN([.G37])-[.H37]);RIGHT([.G37];LEN([.G37])-FIND(&quot;:&quot;;[.G37])))" office:value-type="string" office:string-value="AS333SE-7" calcext:value-type="string">
            <text:p>AS333SE-7</text:p>
          </table:table-cell>
          <table:table-cell table:style-name="ce16" table:formula="of:=MATCH([.I37];{&quot;0603&quot;;&quot;1206&quot;};0)" office:value-type="string" office:string-value="" calcext:value-type="error">
            <text:p>#N/A</text:p>
          </table:table-cell>
          <table:table-cell table:style-name="ce16" table:formula="of:=RIGHT([.G37];LEN([.G37])-FIND(&quot;:&quot;;[.G37]))" office:value-type="string" office:string-value="SC-70-5_AS333SE-7" calcext:value-type="string">
            <text:p>SC-70-5_AS333SE-7</text:p>
          </table:table-cell>
          <table:table-cell table:formula="of:=SEARCH(&quot;0603&quot;;[.G37])" office:value-type="string" office:string-value="" calcext:value-type="error">
            <text:p>#VALUE!</text:p>
          </table:table-cell>
          <table:table-cell table:formula="of:=SEARCH(&quot;1206&quot;;[.G37])" office:value-type="string" office:string-value="" calcext:value-type="error">
            <text:p>#VALUE!</text:p>
          </table:table-cell>
          <table:table-cell table:formula="of:=IF(ISNUMBER([.M37]);&quot;1206&quot;;IF(ISNUMBER([.L37]);&quot;0603&quot;;[.K37]))" office:value-type="string" office:string-value="SC-70-5_AS333SE-7" calcext:value-type="string">
            <text:p>SC-70-5_AS333SE-7</text:p>
          </table:table-cell>
          <table:table-cell table:formula="of:=IF(ISNUMBER([$CopyFromThing.E33]*1);[$CopyFromThing.E33]*1;0)" office:value-type="float" office:value="6" calcext:value-type="float">
            <text:p>6</text:p>
          </table:table-cell>
          <table:table-cell table:formula="of:=VLOOKUP([.F37];[$Supplier_Lookup.$O$7:.$P$104];2;0)" office:value-type="float" office:value="22" calcext:value-type="float">
            <text:p>22</text:p>
          </table:table-cell>
          <table:table-cell table:formula="of:=IF(INDIRECT(&quot;Supplier_Lookup.&quot;&amp;[.Q$3]&amp;[.$P37])&lt;&gt;&quot;&quot;;INDIRECT(&quot;Supplier_Lookup.L&quot;&amp;[.$P37]);INDIRECT(&quot;Supplier_Lookup.&quot;&amp;[.Q$4]&amp;[.$P37]))" office:value-type="string" office:string-value="70pA 8uV" calcext:value-type="string">
            <text:p>70pA 8uV</text:p>
          </table:table-cell>
          <table:table-cell table:formula="of:=INDIRECT(&quot;Supplier_Lookup.&quot;&amp;[.R$4]&amp;[.$P37])" office:value-type="float" office:value="0" calcext:value-type="float">
            <text:p>0</text:p>
          </table:table-cell>
          <table:table-cell table:formula="of:=INDIRECT(&quot;Supplier_Lookup.&quot;&amp;[.S$4]&amp;[.$P37])" office:value-type="string" office:string-value="AS333SE-7" calcext:value-type="string">
            <text:p>AS333SE-7</text:p>
          </table:table-cell>
          <table:table-cell table:formula="of:=INDIRECT(&quot;Supplier_Lookup.&quot;&amp;[.T$4]&amp;[.$P37])" office:value-type="string" office:string-value="TI" calcext:value-type="string">
            <text:p>TI</text:p>
          </table:table-cell>
          <table:table-cell table:formula="of:=INDIRECT(&quot;Supplier_Lookup.&quot;&amp;[.U$4]&amp;[.$P37])" office:value-type="string" office:string-value="TLV333IDCKR" calcext:value-type="string">
            <text:p>TLV333IDCKR</text:p>
          </table:table-cell>
          <table:table-cell table:formula="of:=INDIRECT(&quot;Supplier_Lookup.&quot;&amp;[.V$4]&amp;[.$P37])" office:value-type="string" office:string-value="LCSC" calcext:value-type="string">
            <text:p>LCSC</text:p>
          </table:table-cell>
          <table:table-cell table:formula="of:=INDIRECT(&quot;Supplier_Lookup.&quot;&amp;[.W$4]&amp;[.$P37])" office:value-type="string" office:string-value="C181502" calcext:value-type="string">
            <text:p>C181502</text:p>
          </table:table-cell>
          <table:table-cell table:formula="of:=INDIRECT(&quot;Supplier_Lookup.&quot;&amp;[.X$4]&amp;[.$P37])" office:value-type="string" office:string-value="https://www.lcsc.com/product-detail/C181502.html" calcext:value-type="string">
            <text:p>https://www.lcsc.com/product-detail/C181502.html</text:p>
          </table:table-cell>
          <table:table-cell table:formula="of:=INDIRECT(&quot;Supplier_Lookup.&quot;&amp;[.Y$4]&amp;[.$P37])" office:value-type="float" office:value="0.2764" calcext:value-type="float">
            <text:p>0.2764</text:p>
          </table:table-cell>
          <table:table-cell table:formula="of:=IF(INDIRECT(&quot;Supplier_Lookup.&quot;&amp;[.Z$4]&amp;[.$P37])=&quot;&quot;;&quot;&quot;;INDIRECT(&quot;Supplier_Lookup.&quot;&amp;[.Z$4]&amp;[.$P37]))">
            <text:p/>
          </table:table-cell>
          <table:table-cell table:formula="of:=IF(ISNUMBER([.Y37]);[.Y37];0)" office:value-type="float" office:value="0.2764" calcext:value-type="float">
            <text:p>0.2764</text:p>
          </table:table-cell>
          <table:table-cell table:formula="of:=[.AA37]*[.O37]" office:value-type="float" office:value="1.6584" calcext:value-type="float">
            <text:p>1.6584</text:p>
          </table:table-cell>
          <table:table-cell table:formula="of:=[.N37]&amp;&quot;-&quot;&amp;[.R37]" office:value-type="string" office:string-value="SC-70-5_AS333SE-7-0" calcext:value-type="string">
            <text:p>SC-70-5_AS333SE-7-0</text:p>
          </table:table-cell>
          <table:table-cell table:formula="of:=[$CopyFromThing.A33]" office:value-type="string" office:string-value="U6,U7,U8,U12,U13,U16" calcext:value-type="string">
            <text:p>U6,U7,U8,U12,U13,U16</text:p>
          </table:table-cell>
          <table:table-cell table:formula="of:=[$CopyFromThing.G33]" office:value-type="string" office:string-value="32" calcext:value-type="string">
            <text:p>32</text:p>
          </table:table-cell>
        </table:table-row>
        <table:table-row table:style-name="ro1">
          <table:table-cell/>
          <table:table-cell table:formula="of:=[$CopyFromThing.I34]" office:value-type="string" office:string-value="AP2210K-5.0TRG1" calcext:value-type="string">
            <text:p>AP2210K-5.0TRG1</text:p>
          </table:table-cell>
          <table:table-cell table:formula="of:=IF(ISNUMBER(SEARCH(&quot;R&quot;;[$CopyFromThing.A34]));&quot;R&quot;;&quot;&quot;)">
            <text:p/>
          </table:table-cell>
          <table:table-cell table:formula="of:=IF(ISNUMBER(SEARCH(&quot;C&quot;;[$CopyFromThing.A34]));&quot;C&quot;;&quot;&quot;)">
            <text:p/>
          </table:table-cell>
          <table:table-cell table:formula="of:=IF([.D38]&amp;[.C38]&lt;&gt;&quot;&quot;;[.N38];&quot;&quot;)">
            <text:p/>
          </table:table-cell>
          <table:table-cell table:style-name="ce13" table:formula="of:=[.C38]&amp;[.D38]&amp;[.E38]&amp;&quot;__&quot;&amp;[$CopyFromThing.I34]&amp;&quot;__&quot;&amp;[$CopyFromThing.B34]" office:value-type="string" office:string-value="__AP2210K-5.0TRG1__5V" calcext:value-type="string">
            <text:p>__AP2210K-5.0TRG1__5V</text:p>
          </table:table-cell>
          <table:table-cell table:formula="of:=[$CopyFromThing.D34]" office:value-type="string" office:string-value="AADuffy:SOT23-5" calcext:value-type="string">
            <text:p>AADuffy:SOT23-5</text:p>
          </table:table-cell>
          <table:table-cell table:formula="of:=FIND(&quot;_&quot;;[.G38])" office:value-type="string" office:string-value="" calcext:value-type="error">
            <text:p>#VALUE!</text:p>
          </table:table-cell>
          <table:table-cell table:formula="of:=IF(ISNUMBER([.H38]);RIGHT([.G38];LEN([.G38])-[.H38]);RIGHT([.G38];LEN([.G38])-FIND(&quot;:&quot;;[.G38])))" office:value-type="string" office:string-value="SOT23-5" calcext:value-type="string">
            <text:p>SOT23-5</text:p>
          </table:table-cell>
          <table:table-cell table:style-name="ce16" table:formula="of:=MATCH([.I38];{&quot;0603&quot;;&quot;1206&quot;};0)" office:value-type="string" office:string-value="" calcext:value-type="error">
            <text:p>#N/A</text:p>
          </table:table-cell>
          <table:table-cell table:style-name="ce16" table:formula="of:=RIGHT([.G38];LEN([.G38])-FIND(&quot;:&quot;;[.G38]))" office:value-type="string" office:string-value="SOT23-5" calcext:value-type="string">
            <text:p>SOT23-5</text:p>
          </table:table-cell>
          <table:table-cell table:formula="of:=SEARCH(&quot;0603&quot;;[.G38])" office:value-type="string" office:string-value="" calcext:value-type="error">
            <text:p>#VALUE!</text:p>
          </table:table-cell>
          <table:table-cell table:formula="of:=SEARCH(&quot;1206&quot;;[.G38])" office:value-type="string" office:string-value="" calcext:value-type="error">
            <text:p>#VALUE!</text:p>
          </table:table-cell>
          <table:table-cell table:formula="of:=IF(ISNUMBER([.M38]);&quot;1206&quot;;IF(ISNUMBER([.L38]);&quot;0603&quot;;[.K38]))" office:value-type="string" office:string-value="SOT23-5" calcext:value-type="string">
            <text:p>SOT23-5</text:p>
          </table:table-cell>
          <table:table-cell table:formula="of:=IF(ISNUMBER([$CopyFromThing.E34]*1);[$CopyFromThing.E34]*1;0)" office:value-type="float" office:value="2" calcext:value-type="float">
            <text:p>2</text:p>
          </table:table-cell>
          <table:table-cell table:formula="of:=VLOOKUP([.F38];[$Supplier_Lookup.$O$7:.$P$104];2;0)" office:value-type="float" office:value="23" calcext:value-type="float">
            <text:p>23</text:p>
          </table:table-cell>
          <table:table-cell table:formula="of:=IF(INDIRECT(&quot;Supplier_Lookup.&quot;&amp;[.Q$3]&amp;[.$P38])&lt;&gt;&quot;&quot;;INDIRECT(&quot;Supplier_Lookup.L&quot;&amp;[.$P38]);INDIRECT(&quot;Supplier_Lookup.&quot;&amp;[.Q$4]&amp;[.$P38]))" office:value-type="string" office:string-value="5V" calcext:value-type="string">
            <text:p>5V</text:p>
          </table:table-cell>
          <table:table-cell table:formula="of:=INDIRECT(&quot;Supplier_Lookup.&quot;&amp;[.R$4]&amp;[.$P38])" office:value-type="float" office:value="0" calcext:value-type="float">
            <text:p>0</text:p>
          </table:table-cell>
          <table:table-cell table:formula="of:=INDIRECT(&quot;Supplier_Lookup.&quot;&amp;[.S$4]&amp;[.$P38])" office:value-type="string" office:string-value="AP2210K-5.0TRG1" calcext:value-type="string">
            <text:p>AP2210K-5.0TRG1</text:p>
          </table:table-cell>
          <table:table-cell table:formula="of:=INDIRECT(&quot;Supplier_Lookup.&quot;&amp;[.T$4]&amp;[.$P38])" office:value-type="string" office:string-value="Diodes Inc" calcext:value-type="string">
            <text:p>Diodes Inc</text:p>
          </table:table-cell>
          <table:table-cell table:formula="of:=INDIRECT(&quot;Supplier_Lookup.&quot;&amp;[.U$4]&amp;[.$P38])" office:value-type="string" office:string-value="AP2210K-5.0TRG1" calcext:value-type="string">
            <text:p>AP2210K-5.0TRG1</text:p>
          </table:table-cell>
          <table:table-cell table:formula="of:=INDIRECT(&quot;Supplier_Lookup.&quot;&amp;[.V$4]&amp;[.$P38])" office:value-type="string" office:string-value="LCSC" calcext:value-type="string">
            <text:p>LCSC</text:p>
          </table:table-cell>
          <table:table-cell table:formula="of:=INDIRECT(&quot;Supplier_Lookup.&quot;&amp;[.W$4]&amp;[.$P38])" office:value-type="string" office:string-value="C500758" calcext:value-type="string">
            <text:p>C500758</text:p>
          </table:table-cell>
          <table:table-cell table:formula="of:=INDIRECT(&quot;Supplier_Lookup.&quot;&amp;[.X$4]&amp;[.$P38])" office:value-type="string" office:string-value="https://www.lcsc.com/product-detail/C500758.html" calcext:value-type="string">
            <text:p>https://www.lcsc.com/product-detail/C500758.html</text:p>
          </table:table-cell>
          <table:table-cell table:formula="of:=INDIRECT(&quot;Supplier_Lookup.&quot;&amp;[.Y$4]&amp;[.$P38])" office:value-type="float" office:value="0.16" calcext:value-type="float">
            <text:p>0.16</text:p>
          </table:table-cell>
          <table:table-cell table:formula="of:=IF(INDIRECT(&quot;Supplier_Lookup.&quot;&amp;[.Z$4]&amp;[.$P38])=&quot;&quot;;&quot;&quot;;INDIRECT(&quot;Supplier_Lookup.&quot;&amp;[.Z$4]&amp;[.$P38]))">
            <text:p/>
          </table:table-cell>
          <table:table-cell table:formula="of:=IF(ISNUMBER([.Y38]);[.Y38];0)" office:value-type="float" office:value="0.16" calcext:value-type="float">
            <text:p>0.16</text:p>
          </table:table-cell>
          <table:table-cell table:formula="of:=[.AA38]*[.O38]" office:value-type="float" office:value="0.32" calcext:value-type="float">
            <text:p>0.32</text:p>
          </table:table-cell>
          <table:table-cell table:formula="of:=[.N38]&amp;&quot;-&quot;&amp;[.R38]" office:value-type="string" office:string-value="SOT23-5-0" calcext:value-type="string">
            <text:p>SOT23-5-0</text:p>
          </table:table-cell>
          <table:table-cell table:formula="of:=[$CopyFromThing.A34]" office:value-type="string" office:string-value="U9,U10" calcext:value-type="string">
            <text:p>U9,U10</text:p>
          </table:table-cell>
          <table:table-cell table:formula="of:=[$CopyFromThing.G34]" office:value-type="string" office:string-value="33" calcext:value-type="string">
            <text:p>33</text:p>
          </table:table-cell>
        </table:table-row>
        <table:table-row table:style-name="ro1">
          <table:table-cell/>
          <table:table-cell table:formula="of:=[$CopyFromThing.I35]" office:value-type="string" office:string-value="TCR2EF33" calcext:value-type="string">
            <text:p>TCR2EF33</text:p>
          </table:table-cell>
          <table:table-cell table:formula="of:=IF(ISNUMBER(SEARCH(&quot;R&quot;;[$CopyFromThing.A35]));&quot;R&quot;;&quot;&quot;)">
            <text:p/>
          </table:table-cell>
          <table:table-cell table:formula="of:=IF(ISNUMBER(SEARCH(&quot;C&quot;;[$CopyFromThing.A35]));&quot;C&quot;;&quot;&quot;)">
            <text:p/>
          </table:table-cell>
          <table:table-cell table:formula="of:=IF([.D39]&amp;[.C39]&lt;&gt;&quot;&quot;;[.N39];&quot;&quot;)">
            <text:p/>
          </table:table-cell>
          <table:table-cell table:style-name="ce13" table:formula="of:=[.C39]&amp;[.D39]&amp;[.E39]&amp;&quot;__&quot;&amp;[$CopyFromThing.I35]&amp;&quot;__&quot;&amp;[$CopyFromThing.B35]" office:value-type="string" office:string-value="__TCR2EF33__3.3V" calcext:value-type="string">
            <text:p>__TCR2EF33__3.3V</text:p>
          </table:table-cell>
          <table:table-cell table:formula="of:=[$CopyFromThing.D35]" office:value-type="string" office:string-value="AADuffy:SC-74A_standard" calcext:value-type="string">
            <text:p>AADuffy:SC-74A_standard</text:p>
          </table:table-cell>
          <table:table-cell table:formula="of:=FIND(&quot;_&quot;;[.G39])" office:value-type="float" office:value="15" calcext:value-type="float">
            <text:p>15</text:p>
          </table:table-cell>
          <table:table-cell table:formula="of:=IF(ISNUMBER([.H39]);RIGHT([.G39];LEN([.G39])-[.H39]);RIGHT([.G39];LEN([.G39])-FIND(&quot;:&quot;;[.G39])))" office:value-type="string" office:string-value="standard" calcext:value-type="string">
            <text:p>standard</text:p>
          </table:table-cell>
          <table:table-cell table:style-name="ce16" table:formula="of:=MATCH([.I39];{&quot;0603&quot;;&quot;1206&quot;};0)" office:value-type="string" office:string-value="" calcext:value-type="error">
            <text:p>#N/A</text:p>
          </table:table-cell>
          <table:table-cell table:style-name="ce16" table:formula="of:=RIGHT([.G39];LEN([.G39])-FIND(&quot;:&quot;;[.G39]))" office:value-type="string" office:string-value="SC-74A_standard" calcext:value-type="string">
            <text:p>SC-74A_standard</text:p>
          </table:table-cell>
          <table:table-cell table:formula="of:=SEARCH(&quot;0603&quot;;[.G39])" office:value-type="string" office:string-value="" calcext:value-type="error">
            <text:p>#VALUE!</text:p>
          </table:table-cell>
          <table:table-cell table:formula="of:=SEARCH(&quot;1206&quot;;[.G39])" office:value-type="string" office:string-value="" calcext:value-type="error">
            <text:p>#VALUE!</text:p>
          </table:table-cell>
          <table:table-cell table:formula="of:=IF(ISNUMBER([.M39]);&quot;1206&quot;;IF(ISNUMBER([.L39]);&quot;0603&quot;;[.K39]))" office:value-type="string" office:string-value="SC-74A_standard" calcext:value-type="string">
            <text:p>SC-74A_standard</text:p>
          </table:table-cell>
          <table:table-cell table:formula="of:=IF(ISNUMBER([$CopyFromThing.E35]*1);[$CopyFromThing.E35]*1;0)" office:value-type="float" office:value="3" calcext:value-type="float">
            <text:p>3</text:p>
          </table:table-cell>
          <table:table-cell table:formula="of:=VLOOKUP([.F39];[$Supplier_Lookup.$O$7:.$P$104];2;0)" office:value-type="float" office:value="24" calcext:value-type="float">
            <text:p>24</text:p>
          </table:table-cell>
          <table:table-cell table:formula="of:=IF(INDIRECT(&quot;Supplier_Lookup.&quot;&amp;[.Q$3]&amp;[.$P39])&lt;&gt;&quot;&quot;;INDIRECT(&quot;Supplier_Lookup.L&quot;&amp;[.$P39]);INDIRECT(&quot;Supplier_Lookup.&quot;&amp;[.Q$4]&amp;[.$P39]))" office:value-type="string" office:string-value="3.3V" calcext:value-type="string">
            <text:p>3.3V</text:p>
          </table:table-cell>
          <table:table-cell table:formula="of:=INDIRECT(&quot;Supplier_Lookup.&quot;&amp;[.R$4]&amp;[.$P39])" office:value-type="float" office:value="0" calcext:value-type="float">
            <text:p>0</text:p>
          </table:table-cell>
          <table:table-cell table:formula="of:=INDIRECT(&quot;Supplier_Lookup.&quot;&amp;[.S$4]&amp;[.$P39])" office:value-type="string" office:string-value="TCR2EF33" calcext:value-type="string">
            <text:p>TCR2EF33</text:p>
          </table:table-cell>
          <table:table-cell table:formula="of:=INDIRECT(&quot;Supplier_Lookup.&quot;&amp;[.T$4]&amp;[.$P39])" office:value-type="string" office:string-value="Toshiba" calcext:value-type="string">
            <text:p>Toshiba</text:p>
          </table:table-cell>
          <table:table-cell table:formula="of:=INDIRECT(&quot;Supplier_Lookup.&quot;&amp;[.U$4]&amp;[.$P39])" office:value-type="string" office:string-value="TCR2EF33,LM(CT" calcext:value-type="string">
            <text:p>TCR2EF33,LM(CT</text:p>
          </table:table-cell>
          <table:table-cell table:formula="of:=INDIRECT(&quot;Supplier_Lookup.&quot;&amp;[.V$4]&amp;[.$P39])" office:value-type="string" office:string-value="LCSC" calcext:value-type="string">
            <text:p>LCSC</text:p>
          </table:table-cell>
          <table:table-cell table:formula="of:=INDIRECT(&quot;Supplier_Lookup.&quot;&amp;[.W$4]&amp;[.$P39])" office:value-type="string" office:string-value="C843273" calcext:value-type="string">
            <text:p>C843273</text:p>
          </table:table-cell>
          <table:table-cell table:formula="of:=INDIRECT(&quot;Supplier_Lookup.&quot;&amp;[.X$4]&amp;[.$P39])" office:value-type="string" office:string-value="https://www.lcsc.com/product-detail/C843273.html" calcext:value-type="string">
            <text:p>https://www.lcsc.com/product-detail/C843273.html</text:p>
          </table:table-cell>
          <table:table-cell table:formula="of:=INDIRECT(&quot;Supplier_Lookup.&quot;&amp;[.Y$4]&amp;[.$P39])" office:value-type="float" office:value="0.1047" calcext:value-type="float">
            <text:p>0.1047</text:p>
          </table:table-cell>
          <table:table-cell table:formula="of:=IF(INDIRECT(&quot;Supplier_Lookup.&quot;&amp;[.Z$4]&amp;[.$P39])=&quot;&quot;;&quot;&quot;;INDIRECT(&quot;Supplier_Lookup.&quot;&amp;[.Z$4]&amp;[.$P39]))">
            <text:p/>
          </table:table-cell>
          <table:table-cell table:formula="of:=IF(ISNUMBER([.Y39]);[.Y39];0)" office:value-type="float" office:value="0.1047" calcext:value-type="float">
            <text:p>0.1047</text:p>
          </table:table-cell>
          <table:table-cell table:formula="of:=[.AA39]*[.O39]" office:value-type="float" office:value="0.3141" calcext:value-type="float">
            <text:p>0.3141</text:p>
          </table:table-cell>
          <table:table-cell table:formula="of:=[.N39]&amp;&quot;-&quot;&amp;[.R39]" office:value-type="string" office:string-value="SC-74A_standard-0" calcext:value-type="string">
            <text:p>SC-74A_standard-0</text:p>
          </table:table-cell>
          <table:table-cell table:formula="of:=[$CopyFromThing.A35]" office:value-type="string" office:string-value="U11,U15,U27" calcext:value-type="string">
            <text:p>U11,U15,U27</text:p>
          </table:table-cell>
          <table:table-cell table:formula="of:=[$CopyFromThing.G35]" office:value-type="string" office:string-value="34" calcext:value-type="string">
            <text:p>34</text:p>
          </table:table-cell>
        </table:table-row>
        <table:table-row table:style-name="ro1">
          <table:table-cell/>
          <table:table-cell table:formula="of:=[$CopyFromThing.I36]" office:value-type="string" office:string-value="NMUX1308BQX" calcext:value-type="string">
            <text:p>NMUX1308BQX</text:p>
          </table:table-cell>
          <table:table-cell table:formula="of:=IF(ISNUMBER(SEARCH(&quot;R&quot;;[$CopyFromThing.A36]));&quot;R&quot;;&quot;&quot;)">
            <text:p/>
          </table:table-cell>
          <table:table-cell table:formula="of:=IF(ISNUMBER(SEARCH(&quot;C&quot;;[$CopyFromThing.A36]));&quot;C&quot;;&quot;&quot;)">
            <text:p/>
          </table:table-cell>
          <table:table-cell table:formula="of:=IF([.D40]&amp;[.C40]&lt;&gt;&quot;&quot;;[.N40];&quot;&quot;)">
            <text:p/>
          </table:table-cell>
          <table:table-cell table:style-name="ce13" table:formula="of:=[.C40]&amp;[.D40]&amp;[.E40]&amp;&quot;__&quot;&amp;[$CopyFromThing.I36]&amp;&quot;__&quot;&amp;[$CopyFromThing.B36]" office:value-type="string" office:string-value="__NMUX1308BQX__NMUX1308" calcext:value-type="string">
            <text:p>__NMUX1308BQX__NMUX1308</text:p>
          </table:table-cell>
          <table:table-cell table:formula="of:=[$CopyFromThing.D36]" office:value-type="string" office:string-value="AADuffy:16-DHVQFN_NMUX1308" calcext:value-type="string">
            <text:p>AADuffy:16-DHVQFN_NMUX1308</text:p>
          </table:table-cell>
          <table:table-cell table:formula="of:=FIND(&quot;_&quot;;[.G40])" office:value-type="float" office:value="18" calcext:value-type="float">
            <text:p>18</text:p>
          </table:table-cell>
          <table:table-cell table:formula="of:=IF(ISNUMBER([.H40]);RIGHT([.G40];LEN([.G40])-[.H40]);RIGHT([.G40];LEN([.G40])-FIND(&quot;:&quot;;[.G40])))" office:value-type="string" office:string-value="NMUX1308" calcext:value-type="string">
            <text:p>NMUX1308</text:p>
          </table:table-cell>
          <table:table-cell table:style-name="ce16" table:formula="of:=MATCH([.I40];{&quot;0603&quot;;&quot;1206&quot;};0)" office:value-type="string" office:string-value="" calcext:value-type="error">
            <text:p>#N/A</text:p>
          </table:table-cell>
          <table:table-cell table:style-name="ce16" table:formula="of:=RIGHT([.G40];LEN([.G40])-FIND(&quot;:&quot;;[.G40]))" office:value-type="string" office:string-value="16-DHVQFN_NMUX1308" calcext:value-type="string">
            <text:p>16-DHVQFN_NMUX1308</text:p>
          </table:table-cell>
          <table:table-cell table:formula="of:=SEARCH(&quot;0603&quot;;[.G40])" office:value-type="string" office:string-value="" calcext:value-type="error">
            <text:p>#VALUE!</text:p>
          </table:table-cell>
          <table:table-cell table:formula="of:=SEARCH(&quot;1206&quot;;[.G40])" office:value-type="string" office:string-value="" calcext:value-type="error">
            <text:p>#VALUE!</text:p>
          </table:table-cell>
          <table:table-cell table:formula="of:=IF(ISNUMBER([.M40]);&quot;1206&quot;;IF(ISNUMBER([.L40]);&quot;0603&quot;;[.K40]))" office:value-type="string" office:string-value="16-DHVQFN_NMUX1308" calcext:value-type="string">
            <text:p>16-DHVQFN_NMUX1308</text:p>
          </table:table-cell>
          <table:table-cell table:formula="of:=IF(ISNUMBER([$CopyFromThing.E36]*1);[$CopyFromThing.E36]*1;0)" office:value-type="float" office:value="1" calcext:value-type="float">
            <text:p>1</text:p>
          </table:table-cell>
          <table:table-cell table:formula="of:=VLOOKUP([.F40];[$Supplier_Lookup.$O$7:.$P$104];2;0)" office:value-type="float" office:value="25" calcext:value-type="float">
            <text:p>25</text:p>
          </table:table-cell>
          <table:table-cell table:formula="of:=IF(INDIRECT(&quot;Supplier_Lookup.&quot;&amp;[.Q$3]&amp;[.$P40])&lt;&gt;&quot;&quot;;INDIRECT(&quot;Supplier_Lookup.L&quot;&amp;[.$P40]);INDIRECT(&quot;Supplier_Lookup.&quot;&amp;[.Q$4]&amp;[.$P40]))" office:value-type="string" office:string-value="NMUX1308" calcext:value-type="string">
            <text:p>NMUX1308</text:p>
          </table:table-cell>
          <table:table-cell table:formula="of:=INDIRECT(&quot;Supplier_Lookup.&quot;&amp;[.R$4]&amp;[.$P40])" office:value-type="float" office:value="0" calcext:value-type="float">
            <text:p>0</text:p>
          </table:table-cell>
          <table:table-cell table:formula="of:=INDIRECT(&quot;Supplier_Lookup.&quot;&amp;[.S$4]&amp;[.$P40])" office:value-type="string" office:string-value="NMUX1308BQX" calcext:value-type="string">
            <text:p>NMUX1308BQX</text:p>
          </table:table-cell>
          <table:table-cell table:formula="of:=INDIRECT(&quot;Supplier_Lookup.&quot;&amp;[.T$4]&amp;[.$P40])" office:value-type="string" office:string-value="Nexperia" calcext:value-type="string">
            <text:p>Nexperia</text:p>
          </table:table-cell>
          <table:table-cell table:formula="of:=INDIRECT(&quot;Supplier_Lookup.&quot;&amp;[.U$4]&amp;[.$P40])" office:value-type="string" office:string-value="NMUX1308BQX" calcext:value-type="string">
            <text:p>NMUX1308BQX</text:p>
          </table:table-cell>
          <table:table-cell table:formula="of:=INDIRECT(&quot;Supplier_Lookup.&quot;&amp;[.V$4]&amp;[.$P40])" office:value-type="string" office:string-value="Digikey" calcext:value-type="string">
            <text:p>Digikey</text:p>
          </table:table-cell>
          <table:table-cell table:formula="of:=INDIRECT(&quot;Supplier_Lookup.&quot;&amp;[.W$4]&amp;[.$P40])" office:value-type="string" office:string-value="1727-NMUX1308BQXCT-ND" calcext:value-type="string">
            <text:p>1727-NMUX1308BQXCT-ND</text:p>
          </table:table-cell>
          <table:table-cell table:formula="of:=INDIRECT(&quot;Supplier_Lookup.&quot;&amp;[.X$4]&amp;[.$P40])" office:value-type="string" office:string-value="https://www.digikey.com/en/products/detail/nexperia-usa-inc/NMUX1308BQX/22050149?s=N4IgTCBcDaIHIFkCqANAjAZgAwA4BCAiiiALoC%2BQA" calcext:value-type="string">
            <text:p>https://www.digikey.com/en/products/detail/nexperia-usa-inc/NMUX1308BQX/22050149?s=N4IgTCBcDaIHIFkCqANAjAZgAwA4BCAiiiALoC%2BQA</text:p>
          </table:table-cell>
          <table:table-cell table:formula="of:=INDIRECT(&quot;Supplier_Lookup.&quot;&amp;[.Y$4]&amp;[.$P40])" office:value-type="float" office:value="0.229" calcext:value-type="float">
            <text:p>0.229</text:p>
          </table:table-cell>
          <table:table-cell table:formula="of:=IF(INDIRECT(&quot;Supplier_Lookup.&quot;&amp;[.Z$4]&amp;[.$P40])=&quot;&quot;;&quot;&quot;;INDIRECT(&quot;Supplier_Lookup.&quot;&amp;[.Z$4]&amp;[.$P40]))">
            <text:p/>
          </table:table-cell>
          <table:table-cell table:formula="of:=IF(ISNUMBER([.Y40]);[.Y40];0)" office:value-type="float" office:value="0.229" calcext:value-type="float">
            <text:p>0.229</text:p>
          </table:table-cell>
          <table:table-cell table:formula="of:=[.AA40]*[.O40]" office:value-type="float" office:value="0.229" calcext:value-type="float">
            <text:p>0.229</text:p>
          </table:table-cell>
          <table:table-cell table:formula="of:=[.N40]&amp;&quot;-&quot;&amp;[.R40]" office:value-type="string" office:string-value="16-DHVQFN_NMUX1308-0" calcext:value-type="string">
            <text:p>16-DHVQFN_NMUX1308-0</text:p>
          </table:table-cell>
          <table:table-cell table:formula="of:=[$CopyFromThing.A36]" office:value-type="string" office:string-value="U14" calcext:value-type="string">
            <text:p>U14</text:p>
          </table:table-cell>
          <table:table-cell table:formula="of:=[$CopyFromThing.G36]" office:value-type="string" office:string-value="35" calcext:value-type="string">
            <text:p>35</text:p>
          </table:table-cell>
        </table:table-row>
        <table:table-row table:style-name="ro1">
          <table:table-cell/>
          <table:table-cell table:formula="of:=[$CopyFromThing.I37]" office:value-type="string" office:string-value="MCP3460R" calcext:value-type="string">
            <text:p>MCP3460R</text:p>
          </table:table-cell>
          <table:table-cell table:formula="of:=IF(ISNUMBER(SEARCH(&quot;R&quot;;[$CopyFromThing.A37]));&quot;R&quot;;&quot;&quot;)">
            <text:p/>
          </table:table-cell>
          <table:table-cell table:formula="of:=IF(ISNUMBER(SEARCH(&quot;C&quot;;[$CopyFromThing.A37]));&quot;C&quot;;&quot;&quot;)">
            <text:p/>
          </table:table-cell>
          <table:table-cell table:formula="of:=IF([.D41]&amp;[.C41]&lt;&gt;&quot;&quot;;[.N41];&quot;&quot;)">
            <text:p/>
          </table:table-cell>
          <table:table-cell table:style-name="ce13" table:formula="of:=[.C41]&amp;[.D41]&amp;[.E41]&amp;&quot;__&quot;&amp;[$CopyFromThing.I37]&amp;&quot;__&quot;&amp;[$CopyFromThing.B37]" office:value-type="string" office:string-value="__MCP3460R__MCP3460RT" calcext:value-type="string">
            <text:p>__MCP3460R__MCP3460RT</text:p>
          </table:table-cell>
          <table:table-cell table:formula="of:=[$CopyFromThing.D37]" office:value-type="string" office:string-value="AADuffy:MCP3460R_VQFN-20_3x3mm_EP" calcext:value-type="string">
            <text:p>AADuffy:MCP3460R_VQFN-20_3x3mm_EP</text:p>
          </table:table-cell>
          <table:table-cell table:formula="of:=FIND(&quot;_&quot;;[.G41])" office:value-type="float" office:value="17" calcext:value-type="float">
            <text:p>17</text:p>
          </table:table-cell>
          <table:table-cell table:formula="of:=IF(ISNUMBER([.H41]);RIGHT([.G41];LEN([.G41])-[.H41]);RIGHT([.G41];LEN([.G41])-FIND(&quot;:&quot;;[.G41])))" office:value-type="string" office:string-value="VQFN-20_3x3mm_EP" calcext:value-type="string">
            <text:p>VQFN-20_3x3mm_EP</text:p>
          </table:table-cell>
          <table:table-cell table:style-name="ce16" table:formula="of:=MATCH([.I41];{&quot;0603&quot;;&quot;1206&quot;};0)" office:value-type="string" office:string-value="" calcext:value-type="error">
            <text:p>#N/A</text:p>
          </table:table-cell>
          <table:table-cell table:style-name="ce16" table:formula="of:=RIGHT([.G41];LEN([.G41])-FIND(&quot;:&quot;;[.G41]))" office:value-type="string" office:string-value="MCP3460R_VQFN-20_3x3mm_EP" calcext:value-type="string">
            <text:p>MCP3460R_VQFN-20_3x3mm_EP</text:p>
          </table:table-cell>
          <table:table-cell table:formula="of:=SEARCH(&quot;0603&quot;;[.G41])" office:value-type="string" office:string-value="" calcext:value-type="error">
            <text:p>#VALUE!</text:p>
          </table:table-cell>
          <table:table-cell table:formula="of:=SEARCH(&quot;1206&quot;;[.G41])" office:value-type="string" office:string-value="" calcext:value-type="error">
            <text:p>#VALUE!</text:p>
          </table:table-cell>
          <table:table-cell table:formula="of:=IF(ISNUMBER([.M41]);&quot;1206&quot;;IF(ISNUMBER([.L41]);&quot;0603&quot;;[.K41]))" office:value-type="string" office:string-value="MCP3460R_VQFN-20_3x3mm_EP" calcext:value-type="string">
            <text:p>MCP3460R_VQFN-20_3x3mm_EP</text:p>
          </table:table-cell>
          <table:table-cell table:formula="of:=IF(ISNUMBER([$CopyFromThing.E37]*1);[$CopyFromThing.E37]*1;0)" office:value-type="float" office:value="1" calcext:value-type="float">
            <text:p>1</text:p>
          </table:table-cell>
          <table:table-cell table:formula="of:=VLOOKUP([.F41];[$Supplier_Lookup.$O$7:.$P$104];2;0)" office:value-type="float" office:value="26" calcext:value-type="float">
            <text:p>26</text:p>
          </table:table-cell>
          <table:table-cell table:formula="of:=IF(INDIRECT(&quot;Supplier_Lookup.&quot;&amp;[.Q$3]&amp;[.$P41])&lt;&gt;&quot;&quot;;INDIRECT(&quot;Supplier_Lookup.L&quot;&amp;[.$P41]);INDIRECT(&quot;Supplier_Lookup.&quot;&amp;[.Q$4]&amp;[.$P41]))" office:value-type="string" office:string-value="MCP3460RT" calcext:value-type="string">
            <text:p>MCP3460RT</text:p>
          </table:table-cell>
          <table:table-cell table:formula="of:=INDIRECT(&quot;Supplier_Lookup.&quot;&amp;[.R$4]&amp;[.$P41])" office:value-type="float" office:value="0" calcext:value-type="float">
            <text:p>0</text:p>
          </table:table-cell>
          <table:table-cell table:formula="of:=INDIRECT(&quot;Supplier_Lookup.&quot;&amp;[.S$4]&amp;[.$P41])" office:value-type="string" office:string-value="MCP3460R" calcext:value-type="string">
            <text:p>MCP3460R</text:p>
          </table:table-cell>
          <table:table-cell table:formula="of:=INDIRECT(&quot;Supplier_Lookup.&quot;&amp;[.T$4]&amp;[.$P41])" office:value-type="string" office:string-value="Microchip" calcext:value-type="string">
            <text:p>Microchip</text:p>
          </table:table-cell>
          <table:table-cell table:formula="of:=INDIRECT(&quot;Supplier_Lookup.&quot;&amp;[.U$4]&amp;[.$P41])" office:value-type="string" office:string-value="MCP3460RT-E/2LX" calcext:value-type="string">
            <text:p>MCP3460RT-E/2LX</text:p>
          </table:table-cell>
          <table:table-cell table:formula="of:=INDIRECT(&quot;Supplier_Lookup.&quot;&amp;[.V$4]&amp;[.$P41])" office:value-type="string" office:string-value="Digikey" calcext:value-type="string">
            <text:p>Digikey</text:p>
          </table:table-cell>
          <table:table-cell table:formula="of:=INDIRECT(&quot;Supplier_Lookup.&quot;&amp;[.W$4]&amp;[.$P41])" office:value-type="string" office:string-value="150-MCP3460RT-E/2LXCT-ND" calcext:value-type="string">
            <text:p>150-MCP3460RT-E/2LXCT-ND</text:p>
          </table:table-cell>
          <table:table-cell table:formula="of:=INDIRECT(&quot;Supplier_Lookup.&quot;&amp;[.X$4]&amp;[.$P41])" office:value-type="string" office:string-value="https://www.digikey.com/en/products/detail/microchip-technology/MCP3460RT-E-2LX/26653549?s=N4IgjCBcpgnAHLKoDGUBmBDANgZwKYA0IA9lANogAMIAugL73EBMFIAsgMIAKAzACwA2KgCU69IA" calcext:value-type="string">
            <text:p>https://www.digikey.com/en/products/detail/microchip-technology/MCP3460RT-E-2LX/26653549?s=N4IgjCBcpgnAHLKoDGUBmBDANgZwKYA0IA9lANogAMIAugL73EBMFIAsgMIAKAzACwA2KgCU69IA</text:p>
          </table:table-cell>
          <table:table-cell table:formula="of:=INDIRECT(&quot;Supplier_Lookup.&quot;&amp;[.Y$4]&amp;[.$P41])" office:value-type="float" office:value="1.35" calcext:value-type="float">
            <text:p>1.35</text:p>
          </table:table-cell>
          <table:table-cell table:formula="of:=IF(INDIRECT(&quot;Supplier_Lookup.&quot;&amp;[.Z$4]&amp;[.$P41])=&quot;&quot;;&quot;&quot;;INDIRECT(&quot;Supplier_Lookup.&quot;&amp;[.Z$4]&amp;[.$P41]))">
            <text:p/>
          </table:table-cell>
          <table:table-cell table:formula="of:=IF(ISNUMBER([.Y41]);[.Y41];0)" office:value-type="float" office:value="1.35" calcext:value-type="float">
            <text:p>1.35</text:p>
          </table:table-cell>
          <table:table-cell table:formula="of:=[.AA41]*[.O41]" office:value-type="float" office:value="1.35" calcext:value-type="float">
            <text:p>1.35</text:p>
          </table:table-cell>
          <table:table-cell table:formula="of:=[.N41]&amp;&quot;-&quot;&amp;[.R41]" office:value-type="string" office:string-value="MCP3460R_VQFN-20_3x3mm_EP-0" calcext:value-type="string">
            <text:p>MCP3460R_VQFN-20_3x3mm_EP-0</text:p>
          </table:table-cell>
          <table:table-cell table:formula="of:=[$CopyFromThing.A37]" office:value-type="string" office:string-value="U17" calcext:value-type="string">
            <text:p>U17</text:p>
          </table:table-cell>
          <table:table-cell table:formula="of:=[$CopyFromThing.G37]" office:value-type="string" office:string-value="36" calcext:value-type="string">
            <text:p>36</text:p>
          </table:table-cell>
        </table:table-row>
        <table:table-row table:style-name="ro1">
          <table:table-cell/>
          <table:table-cell table:formula="of:=[$CopyFromThing.I38]" office:value-type="string" office:string-value="74HC595BQ,115" calcext:value-type="string">
            <text:p>74HC595BQ,115</text:p>
          </table:table-cell>
          <table:table-cell table:formula="of:=IF(ISNUMBER(SEARCH(&quot;R&quot;;[$CopyFromThing.A38]));&quot;R&quot;;&quot;&quot;)">
            <text:p/>
          </table:table-cell>
          <table:table-cell table:formula="of:=IF(ISNUMBER(SEARCH(&quot;C&quot;;[$CopyFromThing.A38]));&quot;C&quot;;&quot;&quot;)">
            <text:p/>
          </table:table-cell>
          <table:table-cell table:formula="of:=IF([.D42]&amp;[.C42]&lt;&gt;&quot;&quot;;[.N42];&quot;&quot;)">
            <text:p/>
          </table:table-cell>
          <table:table-cell table:style-name="ce13" table:formula="of:=[.C42]&amp;[.D42]&amp;[.E42]&amp;&quot;__&quot;&amp;[$CopyFromThing.I38]&amp;&quot;__&quot;&amp;[$CopyFromThing.B38]" office:value-type="string" office:string-value="__74HC595BQ,115__74HC595BQ,115" calcext:value-type="string">
            <text:p>__74HC595BQ,115__74HC595BQ,115</text:p>
          </table:table-cell>
          <table:table-cell table:formula="of:=[$CopyFromThing.D38]" office:value-type="string" office:string-value="AADuffy:16-DHVQFN_74HC595BQ" calcext:value-type="string">
            <text:p>AADuffy:16-DHVQFN_74HC595BQ</text:p>
          </table:table-cell>
          <table:table-cell table:formula="of:=FIND(&quot;_&quot;;[.G42])" office:value-type="float" office:value="18" calcext:value-type="float">
            <text:p>18</text:p>
          </table:table-cell>
          <table:table-cell table:formula="of:=IF(ISNUMBER([.H42]);RIGHT([.G42];LEN([.G42])-[.H42]);RIGHT([.G42];LEN([.G42])-FIND(&quot;:&quot;;[.G42])))" office:value-type="string" office:string-value="74HC595BQ" calcext:value-type="string">
            <text:p>74HC595BQ</text:p>
          </table:table-cell>
          <table:table-cell table:style-name="ce16" table:formula="of:=MATCH([.I42];{&quot;0603&quot;;&quot;1206&quot;};0)" office:value-type="string" office:string-value="" calcext:value-type="error">
            <text:p>#N/A</text:p>
          </table:table-cell>
          <table:table-cell table:style-name="ce16" table:formula="of:=RIGHT([.G42];LEN([.G42])-FIND(&quot;:&quot;;[.G42]))" office:value-type="string" office:string-value="16-DHVQFN_74HC595BQ" calcext:value-type="string">
            <text:p>16-DHVQFN_74HC595BQ</text:p>
          </table:table-cell>
          <table:table-cell table:formula="of:=SEARCH(&quot;0603&quot;;[.G42])" office:value-type="string" office:string-value="" calcext:value-type="error">
            <text:p>#VALUE!</text:p>
          </table:table-cell>
          <table:table-cell table:formula="of:=SEARCH(&quot;1206&quot;;[.G42])" office:value-type="string" office:string-value="" calcext:value-type="error">
            <text:p>#VALUE!</text:p>
          </table:table-cell>
          <table:table-cell table:formula="of:=IF(ISNUMBER([.M42]);&quot;1206&quot;;IF(ISNUMBER([.L42]);&quot;0603&quot;;[.K42]))" office:value-type="string" office:string-value="16-DHVQFN_74HC595BQ" calcext:value-type="string">
            <text:p>16-DHVQFN_74HC595BQ</text:p>
          </table:table-cell>
          <table:table-cell table:formula="of:=IF(ISNUMBER([$CopyFromThing.E38]*1);[$CopyFromThing.E38]*1;0)" office:value-type="float" office:value="4" calcext:value-type="float">
            <text:p>4</text:p>
          </table:table-cell>
          <table:table-cell table:formula="of:=VLOOKUP([.F42];[$Supplier_Lookup.$O$7:.$P$104];2;0)" office:value-type="float" office:value="27" calcext:value-type="float">
            <text:p>27</text:p>
          </table:table-cell>
          <table:table-cell table:formula="of:=IF(INDIRECT(&quot;Supplier_Lookup.&quot;&amp;[.Q$3]&amp;[.$P42])&lt;&gt;&quot;&quot;;INDIRECT(&quot;Supplier_Lookup.L&quot;&amp;[.$P42]);INDIRECT(&quot;Supplier_Lookup.&quot;&amp;[.Q$4]&amp;[.$P42]))" office:value-type="string" office:string-value="74HC595BQ,115" calcext:value-type="string">
            <text:p>74HC595BQ,115</text:p>
          </table:table-cell>
          <table:table-cell table:formula="of:=INDIRECT(&quot;Supplier_Lookup.&quot;&amp;[.R$4]&amp;[.$P42])" office:value-type="float" office:value="0" calcext:value-type="float">
            <text:p>0</text:p>
          </table:table-cell>
          <table:table-cell table:formula="of:=INDIRECT(&quot;Supplier_Lookup.&quot;&amp;[.S$4]&amp;[.$P42])" office:value-type="string" office:string-value="74HC595BQ,115" calcext:value-type="string">
            <text:p>74HC595BQ,115</text:p>
          </table:table-cell>
          <table:table-cell table:formula="of:=INDIRECT(&quot;Supplier_Lookup.&quot;&amp;[.T$4]&amp;[.$P42])" office:value-type="string" office:string-value="Nexperia" calcext:value-type="string">
            <text:p>Nexperia</text:p>
          </table:table-cell>
          <table:table-cell table:formula="of:=INDIRECT(&quot;Supplier_Lookup.&quot;&amp;[.U$4]&amp;[.$P42])" office:value-type="string" office:string-value="74HC595BQ,115" calcext:value-type="string">
            <text:p>74HC595BQ,115</text:p>
          </table:table-cell>
          <table:table-cell table:formula="of:=INDIRECT(&quot;Supplier_Lookup.&quot;&amp;[.V$4]&amp;[.$P42])" office:value-type="string" office:string-value="LCSC" calcext:value-type="string">
            <text:p>LCSC</text:p>
          </table:table-cell>
          <table:table-cell table:formula="of:=INDIRECT(&quot;Supplier_Lookup.&quot;&amp;[.W$4]&amp;[.$P42])" office:value-type="string" office:string-value="C730243" calcext:value-type="string">
            <text:p>C730243</text:p>
          </table:table-cell>
          <table:table-cell table:formula="of:=INDIRECT(&quot;Supplier_Lookup.&quot;&amp;[.X$4]&amp;[.$P42])" office:value-type="string" office:string-value="https://www.lcsc.com/product-detail/C730243.html?s_z=n_q_74HC595BQ%252C115&amp;spm=wm.ssy.bg.0.xh&amp;lcsc_vid=ElkMVlNXTgcPUgBXFgILUwdVEVRWUlEFQ1VXUgAHFFMxVlNRQFRdUVVUR1lXVjsOAxUeFF5JWBYZEEoKFBINSQcJGk4eFQsCAgIaSgADAwAHC0slQ1hdVl1WWQkaCgg%3D" calcext:value-type="string">
            <text:p>https://www.lcsc.com/product-detail/C730243.html?s_z=n_q_74HC595BQ%252C115&amp;spm=wm.ssy.bg.0.xh&amp;lcsc_vid=ElkMVlNXTgcPUgBXFgILUwdVEVRWUlEFQ1VXUgAHFFMxVlNRQFRdUVVUR1lXVjsOAxUeFF5JWBYZEEoKFBINSQcJGk4eFQsCAgIaSgADAwAHC0slQ1hdVl1WWQkaCgg%3D</text:p>
          </table:table-cell>
          <table:table-cell table:formula="of:=INDIRECT(&quot;Supplier_Lookup.&quot;&amp;[.Y$4]&amp;[.$P42])" office:value-type="float" office:value="0.177" calcext:value-type="float">
            <text:p>0.177</text:p>
          </table:table-cell>
          <table:table-cell table:formula="of:=IF(INDIRECT(&quot;Supplier_Lookup.&quot;&amp;[.Z$4]&amp;[.$P42])=&quot;&quot;;&quot;&quot;;INDIRECT(&quot;Supplier_Lookup.&quot;&amp;[.Z$4]&amp;[.$P42]))">
            <text:p/>
          </table:table-cell>
          <table:table-cell table:formula="of:=IF(ISNUMBER([.Y42]);[.Y42];0)" office:value-type="float" office:value="0.177" calcext:value-type="float">
            <text:p>0.177</text:p>
          </table:table-cell>
          <table:table-cell table:formula="of:=[.AA42]*[.O42]" office:value-type="float" office:value="0.708" calcext:value-type="float">
            <text:p>0.708</text:p>
          </table:table-cell>
          <table:table-cell table:formula="of:=[.N42]&amp;&quot;-&quot;&amp;[.R42]" office:value-type="string" office:string-value="16-DHVQFN_74HC595BQ-0" calcext:value-type="string">
            <text:p>16-DHVQFN_74HC595BQ-0</text:p>
          </table:table-cell>
          <table:table-cell table:formula="of:=[$CopyFromThing.A38]" office:value-type="string" office:string-value="U18,U19,U20,U31" calcext:value-type="string">
            <text:p>U18,U19,U20,U31</text:p>
          </table:table-cell>
          <table:table-cell table:formula="of:=[$CopyFromThing.G38]" office:value-type="string" office:string-value="37" calcext:value-type="string">
            <text:p>37</text:p>
          </table:table-cell>
        </table:table-row>
        <table:table-row table:style-name="ro1">
          <table:table-cell/>
          <table:table-cell table:formula="of:=[$CopyFromThing.I39]" office:value-type="string" office:string-value="11AA080T-I/TT" calcext:value-type="string">
            <text:p>11AA080T-I/TT</text:p>
          </table:table-cell>
          <table:table-cell table:formula="of:=IF(ISNUMBER(SEARCH(&quot;R&quot;;[$CopyFromThing.A39]));&quot;R&quot;;&quot;&quot;)">
            <text:p/>
          </table:table-cell>
          <table:table-cell table:formula="of:=IF(ISNUMBER(SEARCH(&quot;C&quot;;[$CopyFromThing.A39]));&quot;C&quot;;&quot;&quot;)">
            <text:p/>
          </table:table-cell>
          <table:table-cell table:formula="of:=IF([.D43]&amp;[.C43]&lt;&gt;&quot;&quot;;[.N43];&quot;&quot;)">
            <text:p/>
          </table:table-cell>
          <table:table-cell table:style-name="ce13" table:formula="of:=[.C43]&amp;[.D43]&amp;[.E43]&amp;&quot;__&quot;&amp;[$CopyFromThing.I39]&amp;&quot;__&quot;&amp;[$CopyFromThing.B39]" office:value-type="string" office:string-value="__11AA080T-I/TT__8kbit" calcext:value-type="string">
            <text:p>__11AA080T-I/TT__8kbit</text:p>
          </table:table-cell>
          <table:table-cell table:formula="of:=[$CopyFromThing.D39]" office:value-type="string" office:string-value="AADuffy:SOT23-3" calcext:value-type="string">
            <text:p>AADuffy:SOT23-3</text:p>
          </table:table-cell>
          <table:table-cell table:formula="of:=FIND(&quot;_&quot;;[.G43])" office:value-type="string" office:string-value="" calcext:value-type="error">
            <text:p>#VALUE!</text:p>
          </table:table-cell>
          <table:table-cell table:formula="of:=IF(ISNUMBER([.H43]);RIGHT([.G43];LEN([.G43])-[.H43]);RIGHT([.G43];LEN([.G43])-FIND(&quot;:&quot;;[.G43])))" office:value-type="string" office:string-value="SOT23-3" calcext:value-type="string">
            <text:p>SOT23-3</text:p>
          </table:table-cell>
          <table:table-cell table:style-name="ce16" table:formula="of:=MATCH([.I43];{&quot;0603&quot;;&quot;1206&quot;};0)" office:value-type="string" office:string-value="" calcext:value-type="error">
            <text:p>#N/A</text:p>
          </table:table-cell>
          <table:table-cell table:style-name="ce16" table:formula="of:=RIGHT([.G43];LEN([.G43])-FIND(&quot;:&quot;;[.G43]))" office:value-type="string" office:string-value="SOT23-3" calcext:value-type="string">
            <text:p>SOT23-3</text:p>
          </table:table-cell>
          <table:table-cell table:formula="of:=SEARCH(&quot;0603&quot;;[.G43])" office:value-type="string" office:string-value="" calcext:value-type="error">
            <text:p>#VALUE!</text:p>
          </table:table-cell>
          <table:table-cell table:formula="of:=SEARCH(&quot;1206&quot;;[.G43])" office:value-type="string" office:string-value="" calcext:value-type="error">
            <text:p>#VALUE!</text:p>
          </table:table-cell>
          <table:table-cell table:formula="of:=IF(ISNUMBER([.M43]);&quot;1206&quot;;IF(ISNUMBER([.L43]);&quot;0603&quot;;[.K43]))" office:value-type="string" office:string-value="SOT23-3" calcext:value-type="string">
            <text:p>SOT23-3</text:p>
          </table:table-cell>
          <table:table-cell table:formula="of:=IF(ISNUMBER([$CopyFromThing.E39]*1);[$CopyFromThing.E39]*1;0)" office:value-type="float" office:value="1" calcext:value-type="float">
            <text:p>1</text:p>
          </table:table-cell>
          <table:table-cell table:formula="of:=VLOOKUP([.F43];[$Supplier_Lookup.$O$7:.$P$104];2;0)" office:value-type="float" office:value="28" calcext:value-type="float">
            <text:p>28</text:p>
          </table:table-cell>
          <table:table-cell table:formula="of:=IF(INDIRECT(&quot;Supplier_Lookup.&quot;&amp;[.Q$3]&amp;[.$P43])&lt;&gt;&quot;&quot;;INDIRECT(&quot;Supplier_Lookup.L&quot;&amp;[.$P43]);INDIRECT(&quot;Supplier_Lookup.&quot;&amp;[.Q$4]&amp;[.$P43]))" office:value-type="string" office:string-value="16Kbit" calcext:value-type="string">
            <text:p>16Kbit</text:p>
          </table:table-cell>
          <table:table-cell table:formula="of:=INDIRECT(&quot;Supplier_Lookup.&quot;&amp;[.R$4]&amp;[.$P43])" office:value-type="float" office:value="0" calcext:value-type="float">
            <text:p>0</text:p>
          </table:table-cell>
          <table:table-cell table:formula="of:=INDIRECT(&quot;Supplier_Lookup.&quot;&amp;[.S$4]&amp;[.$P43])" office:value-type="string" office:string-value="11AA080T-I/TT" calcext:value-type="string">
            <text:p>11AA080T-I/TT</text:p>
          </table:table-cell>
          <table:table-cell table:formula="of:=INDIRECT(&quot;Supplier_Lookup.&quot;&amp;[.T$4]&amp;[.$P43])" office:value-type="string" office:string-value="Microchip" calcext:value-type="string">
            <text:p>Microchip</text:p>
          </table:table-cell>
          <table:table-cell table:formula="of:=INDIRECT(&quot;Supplier_Lookup.&quot;&amp;[.U$4]&amp;[.$P43])" office:value-type="string" office:string-value="11AA160T-I/TT" calcext:value-type="string">
            <text:p>11AA160T-I/TT</text:p>
          </table:table-cell>
          <table:table-cell table:formula="of:=INDIRECT(&quot;Supplier_Lookup.&quot;&amp;[.V$4]&amp;[.$P43])" office:value-type="string" office:string-value="Digikey" calcext:value-type="string">
            <text:p>Digikey</text:p>
          </table:table-cell>
          <table:table-cell table:formula="of:=INDIRECT(&quot;Supplier_Lookup.&quot;&amp;[.W$4]&amp;[.$P43])" office:value-type="string" office:string-value="11AA160T-I/TTCT-ND" calcext:value-type="string">
            <text:p>11AA160T-I/TTCT-ND</text:p>
          </table:table-cell>
          <table:table-cell table:formula="of:=INDIRECT(&quot;Supplier_Lookup.&quot;&amp;[.X$4]&amp;[.$P43])" office:value-type="string" office:string-value="https://www.digikey.com/en/products/detail/microchip-technology/11AA160T-I-TT/1851330" calcext:value-type="string">
            <text:p>https://www.digikey.com/en/products/detail/microchip-technology/11AA160T-I-TT/1851330</text:p>
          </table:table-cell>
          <table:table-cell table:formula="of:=INDIRECT(&quot;Supplier_Lookup.&quot;&amp;[.Y$4]&amp;[.$P43])" office:value-type="float" office:value="0.37" calcext:value-type="float">
            <text:p>0.37</text:p>
          </table:table-cell>
          <table:table-cell table:formula="of:=IF(INDIRECT(&quot;Supplier_Lookup.&quot;&amp;[.Z$4]&amp;[.$P43])=&quot;&quot;;&quot;&quot;;INDIRECT(&quot;Supplier_Lookup.&quot;&amp;[.Z$4]&amp;[.$P43]))" office:value-type="string" office:string-value="16Kbit" calcext:value-type="string">
            <text:p>16Kbit</text:p>
          </table:table-cell>
          <table:table-cell table:formula="of:=IF(ISNUMBER([.Y43]);[.Y43];0)" office:value-type="float" office:value="0.37" calcext:value-type="float">
            <text:p>0.37</text:p>
          </table:table-cell>
          <table:table-cell table:formula="of:=[.AA43]*[.O43]" office:value-type="float" office:value="0.37" calcext:value-type="float">
            <text:p>0.37</text:p>
          </table:table-cell>
          <table:table-cell table:formula="of:=[.N43]&amp;&quot;-&quot;&amp;[.R43]" office:value-type="string" office:string-value="SOT23-3-0" calcext:value-type="string">
            <text:p>SOT23-3-0</text:p>
          </table:table-cell>
          <table:table-cell table:formula="of:=[$CopyFromThing.A39]" office:value-type="string" office:string-value="U21" calcext:value-type="string">
            <text:p>U21</text:p>
          </table:table-cell>
          <table:table-cell table:formula="of:=[$CopyFromThing.G39]" office:value-type="string" office:string-value="38" calcext:value-type="string">
            <text:p>38</text:p>
          </table:table-cell>
        </table:table-row>
        <table:table-row table:style-name="ro1">
          <table:table-cell/>
          <table:table-cell table:formula="of:=[$CopyFromThing.I40]" office:value-type="string" office:string-value="18012115421H" calcext:value-type="string">
            <text:p>18012115421H</text:p>
          </table:table-cell>
          <table:table-cell table:formula="of:=IF(ISNUMBER(SEARCH(&quot;R&quot;;[$CopyFromThing.A40]));&quot;R&quot;;&quot;&quot;)">
            <text:p/>
          </table:table-cell>
          <table:table-cell table:formula="of:=IF(ISNUMBER(SEARCH(&quot;C&quot;;[$CopyFromThing.A40]));&quot;C&quot;;&quot;&quot;)">
            <text:p/>
          </table:table-cell>
          <table:table-cell table:formula="of:=IF([.D44]&amp;[.C44]&lt;&gt;&quot;&quot;;[.N44];&quot;&quot;)">
            <text:p/>
          </table:table-cell>
          <table:table-cell table:style-name="ce13" table:formula="of:=[.C44]&amp;[.D44]&amp;[.E44]&amp;&quot;__&quot;&amp;[$CopyFromThing.I40]&amp;&quot;__&quot;&amp;[$CopyFromThing.B40]" office:value-type="string" office:string-value="__18012115421H__18012115421H" calcext:value-type="string">
            <text:p>__18012115421H__18012115421H</text:p>
          </table:table-cell>
          <table:table-cell table:formula="of:=[$CopyFromThing.D40]" office:value-type="string" office:string-value="AADuffy:SOIC-8_STISO621TR" calcext:value-type="string">
            <text:p>AADuffy:SOIC-8_STISO621TR</text:p>
          </table:table-cell>
          <table:table-cell table:formula="of:=FIND(&quot;_&quot;;[.G44])" office:value-type="float" office:value="15" calcext:value-type="float">
            <text:p>15</text:p>
          </table:table-cell>
          <table:table-cell table:formula="of:=IF(ISNUMBER([.H44]);RIGHT([.G44];LEN([.G44])-[.H44]);RIGHT([.G44];LEN([.G44])-FIND(&quot;:&quot;;[.G44])))" office:value-type="string" office:string-value="STISO621TR" calcext:value-type="string">
            <text:p>STISO621TR</text:p>
          </table:table-cell>
          <table:table-cell table:style-name="ce16" table:formula="of:=MATCH([.I44];{&quot;0603&quot;;&quot;1206&quot;};0)" office:value-type="string" office:string-value="" calcext:value-type="error">
            <text:p>#N/A</text:p>
          </table:table-cell>
          <table:table-cell table:style-name="ce16" table:formula="of:=RIGHT([.G44];LEN([.G44])-FIND(&quot;:&quot;;[.G44]))" office:value-type="string" office:string-value="SOIC-8_STISO621TR" calcext:value-type="string">
            <text:p>SOIC-8_STISO621TR</text:p>
          </table:table-cell>
          <table:table-cell table:formula="of:=SEARCH(&quot;0603&quot;;[.G44])" office:value-type="string" office:string-value="" calcext:value-type="error">
            <text:p>#VALUE!</text:p>
          </table:table-cell>
          <table:table-cell table:formula="of:=SEARCH(&quot;1206&quot;;[.G44])" office:value-type="string" office:string-value="" calcext:value-type="error">
            <text:p>#VALUE!</text:p>
          </table:table-cell>
          <table:table-cell table:formula="of:=IF(ISNUMBER([.M44]);&quot;1206&quot;;IF(ISNUMBER([.L44]);&quot;0603&quot;;[.K44]))" office:value-type="string" office:string-value="SOIC-8_STISO621TR" calcext:value-type="string">
            <text:p>SOIC-8_STISO621TR</text:p>
          </table:table-cell>
          <table:table-cell table:formula="of:=IF(ISNUMBER([$CopyFromThing.E40]*1);[$CopyFromThing.E40]*1;0)" office:value-type="float" office:value="1" calcext:value-type="float">
            <text:p>1</text:p>
          </table:table-cell>
          <table:table-cell table:formula="of:=VLOOKUP([.F44];[$Supplier_Lookup.$O$7:.$P$104];2;0)" office:value-type="float" office:value="29" calcext:value-type="float">
            <text:p>29</text:p>
          </table:table-cell>
          <table:table-cell table:formula="of:=IF(INDIRECT(&quot;Supplier_Lookup.&quot;&amp;[.Q$3]&amp;[.$P44])&lt;&gt;&quot;&quot;;INDIRECT(&quot;Supplier_Lookup.L&quot;&amp;[.$P44]);INDIRECT(&quot;Supplier_Lookup.&quot;&amp;[.Q$4]&amp;[.$P44]))" office:value-type="string" office:string-value="STISO621TR" calcext:value-type="string">
            <text:p>STISO621TR</text:p>
          </table:table-cell>
          <table:table-cell table:formula="of:=INDIRECT(&quot;Supplier_Lookup.&quot;&amp;[.R$4]&amp;[.$P44])" office:value-type="float" office:value="0" calcext:value-type="float">
            <text:p>0</text:p>
          </table:table-cell>
          <table:table-cell table:formula="of:=INDIRECT(&quot;Supplier_Lookup.&quot;&amp;[.S$4]&amp;[.$P44])" office:value-type="string" office:string-value="18012115421H" calcext:value-type="string">
            <text:p>18012115421H</text:p>
          </table:table-cell>
          <table:table-cell table:formula="of:=INDIRECT(&quot;Supplier_Lookup.&quot;&amp;[.T$4]&amp;[.$P44])" office:value-type="string" office:string-value="ST" calcext:value-type="string">
            <text:p>ST</text:p>
          </table:table-cell>
          <table:table-cell table:formula="of:=INDIRECT(&quot;Supplier_Lookup.&quot;&amp;[.U$4]&amp;[.$P44])" office:value-type="string" office:string-value="STISO621TR" calcext:value-type="string">
            <text:p>STISO621TR</text:p>
          </table:table-cell>
          <table:table-cell table:formula="of:=INDIRECT(&quot;Supplier_Lookup.&quot;&amp;[.V$4]&amp;[.$P44])" office:value-type="string" office:string-value="LCSC" calcext:value-type="string">
            <text:p>LCSC</text:p>
          </table:table-cell>
          <table:table-cell table:formula="of:=INDIRECT(&quot;Supplier_Lookup.&quot;&amp;[.W$4]&amp;[.$P44])" office:value-type="string" office:string-value="C5447162" calcext:value-type="string">
            <text:p>C5447162</text:p>
          </table:table-cell>
          <table:table-cell table:formula="of:=INDIRECT(&quot;Supplier_Lookup.&quot;&amp;[.X$4]&amp;[.$P44])" office:value-type="string" office:string-value="https://www.lcsc.com/product-detail/C5447162.html" calcext:value-type="string">
            <text:p>https://www.lcsc.com/product-detail/C5447162.html</text:p>
          </table:table-cell>
          <table:table-cell table:formula="of:=INDIRECT(&quot;Supplier_Lookup.&quot;&amp;[.Y$4]&amp;[.$P44])" office:value-type="float" office:value="1.071" calcext:value-type="float">
            <text:p>1.071</text:p>
          </table:table-cell>
          <table:table-cell table:formula="of:=IF(INDIRECT(&quot;Supplier_Lookup.&quot;&amp;[.Z$4]&amp;[.$P44])=&quot;&quot;;&quot;&quot;;INDIRECT(&quot;Supplier_Lookup.&quot;&amp;[.Z$4]&amp;[.$P44]))" office:value-type="string" office:string-value="STISO621TR" calcext:value-type="string">
            <text:p>STISO621TR</text:p>
          </table:table-cell>
          <table:table-cell table:formula="of:=IF(ISNUMBER([.Y44]);[.Y44];0)" office:value-type="float" office:value="1.071" calcext:value-type="float">
            <text:p>1.071</text:p>
          </table:table-cell>
          <table:table-cell table:formula="of:=[.AA44]*[.O44]" office:value-type="float" office:value="1.071" calcext:value-type="float">
            <text:p>1.071</text:p>
          </table:table-cell>
          <table:table-cell table:formula="of:=[.N44]&amp;&quot;-&quot;&amp;[.R44]" office:value-type="string" office:string-value="SOIC-8_STISO621TR-0" calcext:value-type="string">
            <text:p>SOIC-8_STISO621TR-0</text:p>
          </table:table-cell>
          <table:table-cell table:formula="of:=[$CopyFromThing.A40]" office:value-type="string" office:string-value="U23" calcext:value-type="string">
            <text:p>U23</text:p>
          </table:table-cell>
          <table:table-cell table:formula="of:=[$CopyFromThing.G40]" office:value-type="string" office:string-value="39" calcext:value-type="string">
            <text:p>39</text:p>
          </table:table-cell>
        </table:table-row>
        <table:table-row table:style-name="ro1">
          <table:table-cell/>
          <table:table-cell table:formula="of:=[$CopyFromThing.I41]">
            <text:p/>
          </table:table-cell>
          <table:table-cell table:formula="of:=IF(ISNUMBER(SEARCH(&quot;R&quot;;[$CopyFromThing.A41]));&quot;R&quot;;&quot;&quot;)">
            <text:p/>
          </table:table-cell>
          <table:table-cell table:formula="of:=IF(ISNUMBER(SEARCH(&quot;C&quot;;[$CopyFromThing.A41]));&quot;C&quot;;&quot;&quot;)">
            <text:p/>
          </table:table-cell>
          <table:table-cell table:formula="of:=IF([.D45]&amp;[.C45]&lt;&gt;&quot;&quot;;[.N45];&quot;&quot;)">
            <text:p/>
          </table:table-cell>
          <table:table-cell table:style-name="ce13" table:formula="of:=[.C45]&amp;[.D45]&amp;[.E45]&amp;&quot;__&quot;&amp;[$CopyFromThing.I41]&amp;&quot;__&quot;&amp;[$CopyFromThing.B41]" office:value-type="string" office:string-value="____RP2040" calcext:value-type="string">
            <text:p>____RP2040</text:p>
          </table:table-cell>
          <table:table-cell table:formula="of:=[$CopyFromThing.D41]" office:value-type="string" office:string-value="Package_DFN_QFN:QFN-56-1EP_7x7mm_P0.4mm_EP3.2x3.2mm" calcext:value-type="string">
            <text:p>Package_DFN_QFN:QFN-56-1EP_7x7mm_P0.4mm_EP3.2x3.2mm</text:p>
          </table:table-cell>
          <table:table-cell table:formula="of:=FIND(&quot;_&quot;;[.G45])" office:value-type="float" office:value="8" calcext:value-type="float">
            <text:p>8</text:p>
          </table:table-cell>
          <table:table-cell table:formula="of:=IF(ISNUMBER([.H45]);RIGHT([.G45];LEN([.G45])-[.H45]);RIGHT([.G45];LEN([.G45])-FIND(&quot;:&quot;;[.G45])))" office:value-type="string" office:string-value="DFN_QFN:QFN-56-1EP_7x7mm_P0.4mm_EP3.2x3.2mm" calcext:value-type="string">
            <text:p>DFN_QFN:QFN-56-1EP_7x7mm_P0.4mm_EP3.2x3.2mm</text:p>
          </table:table-cell>
          <table:table-cell table:style-name="ce16" table:formula="of:=MATCH([.I45];{&quot;0603&quot;;&quot;1206&quot;};0)" office:value-type="string" office:string-value="" calcext:value-type="error">
            <text:p>#N/A</text:p>
          </table:table-cell>
          <table:table-cell table:style-name="ce16" table:formula="of:=RIGHT([.G45];LEN([.G45])-FIND(&quot;:&quot;;[.G45]))" office:value-type="string" office:string-value="QFN-56-1EP_7x7mm_P0.4mm_EP3.2x3.2mm" calcext:value-type="string">
            <text:p>QFN-56-1EP_7x7mm_P0.4mm_EP3.2x3.2mm</text:p>
          </table:table-cell>
          <table:table-cell table:formula="of:=SEARCH(&quot;0603&quot;;[.G45])" office:value-type="string" office:string-value="" calcext:value-type="error">
            <text:p>#VALUE!</text:p>
          </table:table-cell>
          <table:table-cell table:formula="of:=SEARCH(&quot;1206&quot;;[.G45])" office:value-type="string" office:string-value="" calcext:value-type="error">
            <text:p>#VALUE!</text:p>
          </table:table-cell>
          <table:table-cell table:formula="of:=IF(ISNUMBER([.M45]);&quot;1206&quot;;IF(ISNUMBER([.L45]);&quot;0603&quot;;[.K45]))" office:value-type="string" office:string-value="QFN-56-1EP_7x7mm_P0.4mm_EP3.2x3.2mm" calcext:value-type="string">
            <text:p>QFN-56-1EP_7x7mm_P0.4mm_EP3.2x3.2mm</text:p>
          </table:table-cell>
          <table:table-cell table:formula="of:=IF(ISNUMBER([$CopyFromThing.E41]*1);[$CopyFromThing.E41]*1;0)" office:value-type="float" office:value="2" calcext:value-type="float">
            <text:p>2</text:p>
          </table:table-cell>
          <table:table-cell table:formula="of:=VLOOKUP([.F45];[$Supplier_Lookup.$O$7:.$P$104];2;0)" office:value-type="float" office:value="11" calcext:value-type="float">
            <text:p>11</text:p>
          </table:table-cell>
          <table:table-cell table:formula="of:=IF(INDIRECT(&quot;Supplier_Lookup.&quot;&amp;[.Q$3]&amp;[.$P45])&lt;&gt;&quot;&quot;;INDIRECT(&quot;Supplier_Lookup.L&quot;&amp;[.$P45]);INDIRECT(&quot;Supplier_Lookup.&quot;&amp;[.Q$4]&amp;[.$P45]))" office:value-type="string" office:string-value="RP2040" calcext:value-type="string">
            <text:p>RP2040</text:p>
          </table:table-cell>
          <table:table-cell table:formula="of:=INDIRECT(&quot;Supplier_Lookup.&quot;&amp;[.R$4]&amp;[.$P45])" office:value-type="float" office:value="0" calcext:value-type="float">
            <text:p>0</text:p>
          </table:table-cell>
          <table:table-cell table:formula="of:=INDIRECT(&quot;Supplier_Lookup.&quot;&amp;[.S$4]&amp;[.$P45])" office:value-type="float" office:value="0" calcext:value-type="float">
            <text:p>0</text:p>
          </table:table-cell>
          <table:table-cell table:formula="of:=INDIRECT(&quot;Supplier_Lookup.&quot;&amp;[.T$4]&amp;[.$P45])" office:value-type="string" office:string-value="Raspberry Pi" calcext:value-type="string">
            <text:p>Raspberry Pi</text:p>
          </table:table-cell>
          <table:table-cell table:formula="of:=INDIRECT(&quot;Supplier_Lookup.&quot;&amp;[.U$4]&amp;[.$P45])" office:value-type="string" office:string-value="RP2040" calcext:value-type="string">
            <text:p>RP2040</text:p>
          </table:table-cell>
          <table:table-cell table:formula="of:=INDIRECT(&quot;Supplier_Lookup.&quot;&amp;[.V$4]&amp;[.$P45])" office:value-type="string" office:string-value="LCSC" calcext:value-type="string">
            <text:p>LCSC</text:p>
          </table:table-cell>
          <table:table-cell table:formula="of:=INDIRECT(&quot;Supplier_Lookup.&quot;&amp;[.W$4]&amp;[.$P45])" office:value-type="string" office:string-value="C2040" calcext:value-type="string">
            <text:p>C2040</text:p>
          </table:table-cell>
          <table:table-cell table:formula="of:=INDIRECT(&quot;Supplier_Lookup.&quot;&amp;[.X$4]&amp;[.$P45])" office:value-type="string" office:string-value="https://www.lcsc.com/product-detail/C2040.html" calcext:value-type="string">
            <text:p>https://www.lcsc.com/product-detail/C2040.html</text:p>
          </table:table-cell>
          <table:table-cell table:formula="of:=INDIRECT(&quot;Supplier_Lookup.&quot;&amp;[.Y$4]&amp;[.$P45])" office:value-type="float" office:value="0.87" calcext:value-type="float">
            <text:p>0.87</text:p>
          </table:table-cell>
          <table:table-cell table:formula="of:=IF(INDIRECT(&quot;Supplier_Lookup.&quot;&amp;[.Z$4]&amp;[.$P45])=&quot;&quot;;&quot;&quot;;INDIRECT(&quot;Supplier_Lookup.&quot;&amp;[.Z$4]&amp;[.$P45]))">
            <text:p/>
          </table:table-cell>
          <table:table-cell table:formula="of:=IF(ISNUMBER([.Y45]);[.Y45];0)" office:value-type="float" office:value="0.87" calcext:value-type="float">
            <text:p>0.87</text:p>
          </table:table-cell>
          <table:table-cell table:formula="of:=[.AA45]*[.O45]" office:value-type="float" office:value="1.74" calcext:value-type="float">
            <text:p>1.74</text:p>
          </table:table-cell>
          <table:table-cell table:formula="of:=[.N45]&amp;&quot;-&quot;&amp;[.R45]" office:value-type="string" office:string-value="QFN-56-1EP_7x7mm_P0.4mm_EP3.2x3.2mm-0" calcext:value-type="string">
            <text:p>QFN-56-1EP_7x7mm_P0.4mm_EP3.2x3.2mm-0</text:p>
          </table:table-cell>
          <table:table-cell table:formula="of:=[$CopyFromThing.A41]" office:value-type="string" office:string-value="U25,U26" calcext:value-type="string">
            <text:p>U25,U26</text:p>
          </table:table-cell>
          <table:table-cell table:formula="of:=[$CopyFromThing.G41]" office:value-type="string" office:string-value="40" calcext:value-type="string">
            <text:p>40</text:p>
          </table:table-cell>
        </table:table-row>
        <table:table-row table:style-name="ro1">
          <table:table-cell/>
          <table:table-cell table:formula="of:=[$CopyFromThing.I42]">
            <text:p/>
          </table:table-cell>
          <table:table-cell table:formula="of:=IF(ISNUMBER(SEARCH(&quot;R&quot;;[$CopyFromThing.A42]));&quot;R&quot;;&quot;&quot;)">
            <text:p/>
          </table:table-cell>
          <table:table-cell table:formula="of:=IF(ISNUMBER(SEARCH(&quot;C&quot;;[$CopyFromThing.A42]));&quot;C&quot;;&quot;&quot;)">
            <text:p/>
          </table:table-cell>
          <table:table-cell table:formula="of:=IF([.D46]&amp;[.C46]&lt;&gt;&quot;&quot;;[.N46];&quot;&quot;)">
            <text:p/>
          </table:table-cell>
          <table:table-cell table:style-name="ce13" table:formula="of:=[.C46]&amp;[.D46]&amp;[.E46]&amp;&quot;__&quot;&amp;[$CopyFromThing.I42]&amp;&quot;__&quot;&amp;[$CopyFromThing.B42]" office:value-type="string" office:string-value="____W25Q16JVSS" calcext:value-type="string">
            <text:p>____W25Q16JVSS</text:p>
          </table:table-cell>
          <table:table-cell table:formula="of:=[$CopyFromThing.D42]" office:value-type="string" office:string-value="Package_SO:SOIC-8_5.3x5.3mm_P1.27mm" calcext:value-type="string">
            <text:p>Package_SO:SOIC-8_5.3x5.3mm_P1.27mm</text:p>
          </table:table-cell>
          <table:table-cell table:formula="of:=FIND(&quot;_&quot;;[.G46])" office:value-type="float" office:value="8" calcext:value-type="float">
            <text:p>8</text:p>
          </table:table-cell>
          <table:table-cell table:formula="of:=IF(ISNUMBER([.H46]);RIGHT([.G46];LEN([.G46])-[.H46]);RIGHT([.G46];LEN([.G46])-FIND(&quot;:&quot;;[.G46])))" office:value-type="string" office:string-value="SO:SOIC-8_5.3x5.3mm_P1.27mm" calcext:value-type="string">
            <text:p>SO:SOIC-8_5.3x5.3mm_P1.27mm</text:p>
          </table:table-cell>
          <table:table-cell table:style-name="ce16" table:formula="of:=MATCH([.I46];{&quot;0603&quot;;&quot;1206&quot;};0)" office:value-type="string" office:string-value="" calcext:value-type="error">
            <text:p>#N/A</text:p>
          </table:table-cell>
          <table:table-cell table:style-name="ce16" table:formula="of:=RIGHT([.G46];LEN([.G46])-FIND(&quot;:&quot;;[.G46]))" office:value-type="string" office:string-value="SOIC-8_5.3x5.3mm_P1.27mm" calcext:value-type="string">
            <text:p>SOIC-8_5.3x5.3mm_P1.27mm</text:p>
          </table:table-cell>
          <table:table-cell table:formula="of:=SEARCH(&quot;0603&quot;;[.G46])" office:value-type="string" office:string-value="" calcext:value-type="error">
            <text:p>#VALUE!</text:p>
          </table:table-cell>
          <table:table-cell table:formula="of:=SEARCH(&quot;1206&quot;;[.G46])" office:value-type="string" office:string-value="" calcext:value-type="error">
            <text:p>#VALUE!</text:p>
          </table:table-cell>
          <table:table-cell table:formula="of:=IF(ISNUMBER([.M46]);&quot;1206&quot;;IF(ISNUMBER([.L46]);&quot;0603&quot;;[.K46]))" office:value-type="string" office:string-value="SOIC-8_5.3x5.3mm_P1.27mm" calcext:value-type="string">
            <text:p>SOIC-8_5.3x5.3mm_P1.27mm</text:p>
          </table:table-cell>
          <table:table-cell table:formula="of:=IF(ISNUMBER([$CopyFromThing.E42]*1);[$CopyFromThing.E42]*1;0)" office:value-type="float" office:value="2" calcext:value-type="float">
            <text:p>2</text:p>
          </table:table-cell>
          <table:table-cell table:formula="of:=VLOOKUP([.F46];[$Supplier_Lookup.$O$7:.$P$104];2;0)" office:value-type="float" office:value="12" calcext:value-type="float">
            <text:p>12</text:p>
          </table:table-cell>
          <table:table-cell table:formula="of:=IF(INDIRECT(&quot;Supplier_Lookup.&quot;&amp;[.Q$3]&amp;[.$P46])&lt;&gt;&quot;&quot;;INDIRECT(&quot;Supplier_Lookup.L&quot;&amp;[.$P46]);INDIRECT(&quot;Supplier_Lookup.&quot;&amp;[.Q$4]&amp;[.$P46]))" office:value-type="string" office:string-value="W25Q16JVSS" calcext:value-type="string">
            <text:p>W25Q16JVSS</text:p>
          </table:table-cell>
          <table:table-cell table:formula="of:=INDIRECT(&quot;Supplier_Lookup.&quot;&amp;[.R$4]&amp;[.$P46])" office:value-type="float" office:value="0" calcext:value-type="float">
            <text:p>0</text:p>
          </table:table-cell>
          <table:table-cell table:formula="of:=INDIRECT(&quot;Supplier_Lookup.&quot;&amp;[.S$4]&amp;[.$P46])" office:value-type="float" office:value="0" calcext:value-type="float">
            <text:p>0</text:p>
          </table:table-cell>
          <table:table-cell table:formula="of:=INDIRECT(&quot;Supplier_Lookup.&quot;&amp;[.T$4]&amp;[.$P46])" office:value-type="string" office:string-value="Winbond" calcext:value-type="string">
            <text:p>Winbond</text:p>
          </table:table-cell>
          <table:table-cell table:formula="of:=INDIRECT(&quot;Supplier_Lookup.&quot;&amp;[.U$4]&amp;[.$P46])" office:value-type="string" office:string-value="W25Q16JVSS" calcext:value-type="string">
            <text:p>W25Q16JVSS</text:p>
          </table:table-cell>
          <table:table-cell table:formula="of:=INDIRECT(&quot;Supplier_Lookup.&quot;&amp;[.V$4]&amp;[.$P46])" office:value-type="string" office:string-value="LCSC" calcext:value-type="string">
            <text:p>LCSC</text:p>
          </table:table-cell>
          <table:table-cell table:formula="of:=INDIRECT(&quot;Supplier_Lookup.&quot;&amp;[.W$4]&amp;[.$P46])" office:value-type="string" office:string-value="C82317" calcext:value-type="string">
            <text:p>C82317</text:p>
          </table:table-cell>
          <table:table-cell table:formula="of:=INDIRECT(&quot;Supplier_Lookup.&quot;&amp;[.X$4]&amp;[.$P46])" office:value-type="string" office:string-value="https://www.lcsc.com/product-detail/C82317.html" calcext:value-type="string">
            <text:p>https://www.lcsc.com/product-detail/C82317.html</text:p>
          </table:table-cell>
          <table:table-cell table:formula="of:=INDIRECT(&quot;Supplier_Lookup.&quot;&amp;[.Y$4]&amp;[.$P46])" office:value-type="float" office:value="0.74" calcext:value-type="float">
            <text:p>0.74</text:p>
          </table:table-cell>
          <table:table-cell table:formula="of:=IF(INDIRECT(&quot;Supplier_Lookup.&quot;&amp;[.Z$4]&amp;[.$P46])=&quot;&quot;;&quot;&quot;;INDIRECT(&quot;Supplier_Lookup.&quot;&amp;[.Z$4]&amp;[.$P46]))">
            <text:p/>
          </table:table-cell>
          <table:table-cell table:formula="of:=IF(ISNUMBER([.Y46]);[.Y46];0)" office:value-type="float" office:value="0.74" calcext:value-type="float">
            <text:p>0.74</text:p>
          </table:table-cell>
          <table:table-cell table:formula="of:=[.AA46]*[.O46]" office:value-type="float" office:value="1.48" calcext:value-type="float">
            <text:p>1.48</text:p>
          </table:table-cell>
          <table:table-cell table:formula="of:=[.N46]&amp;&quot;-&quot;&amp;[.R46]" office:value-type="string" office:string-value="SOIC-8_5.3x5.3mm_P1.27mm-0" calcext:value-type="string">
            <text:p>SOIC-8_5.3x5.3mm_P1.27mm-0</text:p>
          </table:table-cell>
          <table:table-cell table:formula="of:=[$CopyFromThing.A42]" office:value-type="string" office:string-value="U28,U29" calcext:value-type="string">
            <text:p>U28,U29</text:p>
          </table:table-cell>
          <table:table-cell table:formula="of:=[$CopyFromThing.G42]" office:value-type="string" office:string-value="41" calcext:value-type="string">
            <text:p>41</text:p>
          </table:table-cell>
        </table:table-row>
        <table:table-row table:style-name="ro1">
          <table:table-cell/>
          <table:table-cell table:formula="of:=[$CopyFromThing.I43]" office:value-type="string" office:string-value="NST3904DP6T5G" calcext:value-type="string">
            <text:p>NST3904DP6T5G</text:p>
          </table:table-cell>
          <table:table-cell table:formula="of:=IF(ISNUMBER(SEARCH(&quot;R&quot;;[$CopyFromThing.A43]));&quot;R&quot;;&quot;&quot;)">
            <text:p/>
          </table:table-cell>
          <table:table-cell table:formula="of:=IF(ISNUMBER(SEARCH(&quot;C&quot;;[$CopyFromThing.A43]));&quot;C&quot;;&quot;&quot;)">
            <text:p/>
          </table:table-cell>
          <table:table-cell table:formula="of:=IF([.D47]&amp;[.C47]&lt;&gt;&quot;&quot;;[.N47];&quot;&quot;)">
            <text:p/>
          </table:table-cell>
          <table:table-cell table:style-name="ce13" table:formula="of:=[.C47]&amp;[.D47]&amp;[.E47]&amp;&quot;__&quot;&amp;[$CopyFromThing.I43]&amp;&quot;__&quot;&amp;[$CopyFromThing.B43]" office:value-type="string" office:string-value="__NST3904DP6T5G__NST3904DP6T5G" calcext:value-type="string">
            <text:p>__NST3904DP6T5G__NST3904DP6T5G</text:p>
          </table:table-cell>
          <table:table-cell table:formula="of:=[$CopyFromThing.D43]" office:value-type="string" office:string-value="AADuffy:SOT-963_NST3904DP6T5G" calcext:value-type="string">
            <text:p>AADuffy:SOT-963_NST3904DP6T5G</text:p>
          </table:table-cell>
          <table:table-cell table:formula="of:=FIND(&quot;_&quot;;[.G47])" office:value-type="float" office:value="16" calcext:value-type="float">
            <text:p>16</text:p>
          </table:table-cell>
          <table:table-cell table:formula="of:=IF(ISNUMBER([.H47]);RIGHT([.G47];LEN([.G47])-[.H47]);RIGHT([.G47];LEN([.G47])-FIND(&quot;:&quot;;[.G47])))" office:value-type="string" office:string-value="NST3904DP6T5G" calcext:value-type="string">
            <text:p>NST3904DP6T5G</text:p>
          </table:table-cell>
          <table:table-cell table:style-name="ce16" table:formula="of:=MATCH([.I47];{&quot;0603&quot;;&quot;1206&quot;};0)" office:value-type="string" office:string-value="" calcext:value-type="error">
            <text:p>#N/A</text:p>
          </table:table-cell>
          <table:table-cell table:style-name="ce16" table:formula="of:=RIGHT([.G47];LEN([.G47])-FIND(&quot;:&quot;;[.G47]))" office:value-type="string" office:string-value="SOT-963_NST3904DP6T5G" calcext:value-type="string">
            <text:p>SOT-963_NST3904DP6T5G</text:p>
          </table:table-cell>
          <table:table-cell table:formula="of:=SEARCH(&quot;0603&quot;;[.G47])" office:value-type="string" office:string-value="" calcext:value-type="error">
            <text:p>#VALUE!</text:p>
          </table:table-cell>
          <table:table-cell table:formula="of:=SEARCH(&quot;1206&quot;;[.G47])" office:value-type="string" office:string-value="" calcext:value-type="error">
            <text:p>#VALUE!</text:p>
          </table:table-cell>
          <table:table-cell table:formula="of:=IF(ISNUMBER([.M47]);&quot;1206&quot;;IF(ISNUMBER([.L47]);&quot;0603&quot;;[.K47]))" office:value-type="string" office:string-value="SOT-963_NST3904DP6T5G" calcext:value-type="string">
            <text:p>SOT-963_NST3904DP6T5G</text:p>
          </table:table-cell>
          <table:table-cell table:formula="of:=IF(ISNUMBER([$CopyFromThing.E43]*1);[$CopyFromThing.E43]*1;0)" office:value-type="float" office:value="7" calcext:value-type="float">
            <text:p>7</text:p>
          </table:table-cell>
          <table:table-cell table:formula="of:=VLOOKUP([.F47];[$Supplier_Lookup.$O$7:.$P$104];2;0)" office:value-type="float" office:value="30" calcext:value-type="float">
            <text:p>30</text:p>
          </table:table-cell>
          <table:table-cell table:formula="of:=IF(INDIRECT(&quot;Supplier_Lookup.&quot;&amp;[.Q$3]&amp;[.$P47])&lt;&gt;&quot;&quot;;INDIRECT(&quot;Supplier_Lookup.L&quot;&amp;[.$P47]);INDIRECT(&quot;Supplier_Lookup.&quot;&amp;[.Q$4]&amp;[.$P47]))" office:value-type="string" office:string-value="NST3904DP6T5G" calcext:value-type="string">
            <text:p>NST3904DP6T5G</text:p>
          </table:table-cell>
          <table:table-cell table:formula="of:=INDIRECT(&quot;Supplier_Lookup.&quot;&amp;[.R$4]&amp;[.$P47])" office:value-type="float" office:value="0" calcext:value-type="float">
            <text:p>0</text:p>
          </table:table-cell>
          <table:table-cell table:formula="of:=INDIRECT(&quot;Supplier_Lookup.&quot;&amp;[.S$4]&amp;[.$P47])" office:value-type="string" office:string-value="NST3904DP6T5G" calcext:value-type="string">
            <text:p>NST3904DP6T5G</text:p>
          </table:table-cell>
          <table:table-cell table:formula="of:=INDIRECT(&quot;Supplier_Lookup.&quot;&amp;[.T$4]&amp;[.$P47])" office:value-type="string" office:string-value="onsemi" calcext:value-type="string">
            <text:p>onsemi</text:p>
          </table:table-cell>
          <table:table-cell table:formula="of:=INDIRECT(&quot;Supplier_Lookup.&quot;&amp;[.U$4]&amp;[.$P47])" office:value-type="string" office:string-value="NST3904DP6T5G" calcext:value-type="string">
            <text:p>NST3904DP6T5G</text:p>
          </table:table-cell>
          <table:table-cell table:formula="of:=INDIRECT(&quot;Supplier_Lookup.&quot;&amp;[.V$4]&amp;[.$P47])" office:value-type="string" office:string-value="LCSC" calcext:value-type="string">
            <text:p>LCSC</text:p>
          </table:table-cell>
          <table:table-cell table:formula="of:=INDIRECT(&quot;Supplier_Lookup.&quot;&amp;[.W$4]&amp;[.$P47])" office:value-type="string" office:string-value="C462939" calcext:value-type="string">
            <text:p>C462939</text:p>
          </table:table-cell>
          <table:table-cell table:formula="of:=INDIRECT(&quot;Supplier_Lookup.&quot;&amp;[.X$4]&amp;[.$P47])" office:value-type="string" office:string-value="https://www.lcsc.com/product-detail/C462939.html" calcext:value-type="string">
            <text:p>https://www.lcsc.com/product-detail/C462939.html</text:p>
          </table:table-cell>
          <table:table-cell table:formula="of:=INDIRECT(&quot;Supplier_Lookup.&quot;&amp;[.Y$4]&amp;[.$P47])" office:value-type="float" office:value="0.0411" calcext:value-type="float">
            <text:p>0.0411</text:p>
          </table:table-cell>
          <table:table-cell table:formula="of:=IF(INDIRECT(&quot;Supplier_Lookup.&quot;&amp;[.Z$4]&amp;[.$P47])=&quot;&quot;;&quot;&quot;;INDIRECT(&quot;Supplier_Lookup.&quot;&amp;[.Z$4]&amp;[.$P47]))">
            <text:p/>
          </table:table-cell>
          <table:table-cell table:formula="of:=IF(ISNUMBER([.Y47]);[.Y47];0)" office:value-type="float" office:value="0.0411" calcext:value-type="float">
            <text:p>0.0411</text:p>
          </table:table-cell>
          <table:table-cell table:formula="of:=[.AA47]*[.O47]" office:value-type="float" office:value="0.2877" calcext:value-type="float">
            <text:p>0.2877</text:p>
          </table:table-cell>
          <table:table-cell table:formula="of:=[.N47]&amp;&quot;-&quot;&amp;[.R47]" office:value-type="string" office:string-value="SOT-963_NST3904DP6T5G-0" calcext:value-type="string">
            <text:p>SOT-963_NST3904DP6T5G-0</text:p>
          </table:table-cell>
          <table:table-cell table:formula="of:=[$CopyFromThing.A43]" office:value-type="string" office:string-value="U30,U32,U33,U34,U35,U36,U37" calcext:value-type="string">
            <text:p>U30,U32,U33,U34,U35,U36,U37</text:p>
          </table:table-cell>
          <table:table-cell table:formula="of:=[$CopyFromThing.G43]" office:value-type="string" office:string-value="42" calcext:value-type="string">
            <text:p>42</text:p>
          </table:table-cell>
        </table:table-row>
        <table:table-row table:style-name="ro1">
          <table:table-cell/>
          <table:table-cell table:formula="of:=[$CopyFromThing.I44]" office:value-type="string" office:string-value="ABM8-272-T3" calcext:value-type="string">
            <text:p>ABM8-272-T3</text:p>
          </table:table-cell>
          <table:table-cell table:formula="of:=IF(ISNUMBER(SEARCH(&quot;R&quot;;[$CopyFromThing.A44]));&quot;R&quot;;&quot;&quot;)">
            <text:p/>
          </table:table-cell>
          <table:table-cell table:formula="of:=IF(ISNUMBER(SEARCH(&quot;C&quot;;[$CopyFromThing.A44]));&quot;C&quot;;&quot;&quot;)">
            <text:p/>
          </table:table-cell>
          <table:table-cell table:formula="of:=IF([.D48]&amp;[.C48]&lt;&gt;&quot;&quot;;[.N48];&quot;&quot;)">
            <text:p/>
          </table:table-cell>
          <table:table-cell table:style-name="ce13" table:formula="of:=[.C48]&amp;[.D48]&amp;[.E48]&amp;&quot;__&quot;&amp;[$CopyFromThing.I44]&amp;&quot;__&quot;&amp;[$CopyFromThing.B44]" office:value-type="string" office:string-value="__ABM8-272-T3__ABM8-272-T3" calcext:value-type="string">
            <text:p>__ABM8-272-T3__ABM8-272-T3</text:p>
          </table:table-cell>
          <table:table-cell table:formula="of:=[$CopyFromThing.D44]" office:value-type="string" office:string-value="AADuffy:XTAL_3225-4Pin_3.2x2.5mm" calcext:value-type="string">
            <text:p>AADuffy:XTAL_3225-4Pin_3.2x2.5mm</text:p>
          </table:table-cell>
          <table:table-cell table:formula="of:=FIND(&quot;_&quot;;[.G48])" office:value-type="float" office:value="13" calcext:value-type="float">
            <text:p>13</text:p>
          </table:table-cell>
          <table:table-cell table:formula="of:=IF(ISNUMBER([.H48]);RIGHT([.G48];LEN([.G48])-[.H48]);RIGHT([.G48];LEN([.G48])-FIND(&quot;:&quot;;[.G48])))" office:value-type="string" office:string-value="3225-4Pin_3.2x2.5mm" calcext:value-type="string">
            <text:p>3225-4Pin_3.2x2.5mm</text:p>
          </table:table-cell>
          <table:table-cell table:style-name="ce16" table:formula="of:=MATCH([.I48];{&quot;0603&quot;;&quot;1206&quot;};0)" office:value-type="string" office:string-value="" calcext:value-type="error">
            <text:p>#N/A</text:p>
          </table:table-cell>
          <table:table-cell table:style-name="ce16" table:formula="of:=RIGHT([.G48];LEN([.G48])-FIND(&quot;:&quot;;[.G48]))" office:value-type="string" office:string-value="XTAL_3225-4Pin_3.2x2.5mm" calcext:value-type="string">
            <text:p>XTAL_3225-4Pin_3.2x2.5mm</text:p>
          </table:table-cell>
          <table:table-cell table:formula="of:=SEARCH(&quot;0603&quot;;[.G48])" office:value-type="string" office:string-value="" calcext:value-type="error">
            <text:p>#VALUE!</text:p>
          </table:table-cell>
          <table:table-cell table:formula="of:=SEARCH(&quot;1206&quot;;[.G48])" office:value-type="string" office:string-value="" calcext:value-type="error">
            <text:p>#VALUE!</text:p>
          </table:table-cell>
          <table:table-cell table:formula="of:=IF(ISNUMBER([.M48]);&quot;1206&quot;;IF(ISNUMBER([.L48]);&quot;0603&quot;;[.K48]))" office:value-type="string" office:string-value="XTAL_3225-4Pin_3.2x2.5mm" calcext:value-type="string">
            <text:p>XTAL_3225-4Pin_3.2x2.5mm</text:p>
          </table:table-cell>
          <table:table-cell table:formula="of:=IF(ISNUMBER([$CopyFromThing.E44]*1);[$CopyFromThing.E44]*1;0)" office:value-type="float" office:value="2" calcext:value-type="float">
            <text:p>2</text:p>
          </table:table-cell>
          <table:table-cell table:formula="of:=VLOOKUP([.F48];[$Supplier_Lookup.$O$7:.$P$104];2;0)" office:value-type="float" office:value="31" calcext:value-type="float">
            <text:p>31</text:p>
          </table:table-cell>
          <table:table-cell table:formula="of:=IF(INDIRECT(&quot;Supplier_Lookup.&quot;&amp;[.Q$3]&amp;[.$P48])&lt;&gt;&quot;&quot;;INDIRECT(&quot;Supplier_Lookup.L&quot;&amp;[.$P48]);INDIRECT(&quot;Supplier_Lookup.&quot;&amp;[.Q$4]&amp;[.$P48]))" office:value-type="string" office:string-value="ABM8-272-T3" calcext:value-type="string">
            <text:p>ABM8-272-T3</text:p>
          </table:table-cell>
          <table:table-cell table:formula="of:=INDIRECT(&quot;Supplier_Lookup.&quot;&amp;[.R$4]&amp;[.$P48])" office:value-type="float" office:value="0" calcext:value-type="float">
            <text:p>0</text:p>
          </table:table-cell>
          <table:table-cell table:formula="of:=INDIRECT(&quot;Supplier_Lookup.&quot;&amp;[.S$4]&amp;[.$P48])" office:value-type="string" office:string-value="ABM8-272-T3" calcext:value-type="string">
            <text:p>ABM8-272-T3</text:p>
          </table:table-cell>
          <table:table-cell table:formula="of:=INDIRECT(&quot;Supplier_Lookup.&quot;&amp;[.T$4]&amp;[.$P48])" office:value-type="string" office:string-value="Abracon" calcext:value-type="string">
            <text:p>Abracon</text:p>
          </table:table-cell>
          <table:table-cell table:formula="of:=INDIRECT(&quot;Supplier_Lookup.&quot;&amp;[.U$4]&amp;[.$P48])" office:value-type="string" office:string-value="ABM8-272-T3" calcext:value-type="string">
            <text:p>ABM8-272-T3</text:p>
          </table:table-cell>
          <table:table-cell table:formula="of:=INDIRECT(&quot;Supplier_Lookup.&quot;&amp;[.V$4]&amp;[.$P48])" office:value-type="string" office:string-value="LCSC" calcext:value-type="string">
            <text:p>LCSC</text:p>
          </table:table-cell>
          <table:table-cell table:formula="of:=INDIRECT(&quot;Supplier_Lookup.&quot;&amp;[.W$4]&amp;[.$P48])" office:value-type="string" office:string-value="C20625731" calcext:value-type="string">
            <text:p>C20625731</text:p>
          </table:table-cell>
          <table:table-cell table:formula="of:=INDIRECT(&quot;Supplier_Lookup.&quot;&amp;[.X$4]&amp;[.$P48])" office:value-type="string" office:string-value="https://www.lcsc.com/product-detail/C20625731.html" calcext:value-type="string">
            <text:p>https://www.lcsc.com/product-detail/C20625731.html</text:p>
          </table:table-cell>
          <table:table-cell table:formula="of:=INDIRECT(&quot;Supplier_Lookup.&quot;&amp;[.Y$4]&amp;[.$P48])" office:value-type="float" office:value="0.2936" calcext:value-type="float">
            <text:p>0.2936</text:p>
          </table:table-cell>
          <table:table-cell table:formula="of:=IF(INDIRECT(&quot;Supplier_Lookup.&quot;&amp;[.Z$4]&amp;[.$P48])=&quot;&quot;;&quot;&quot;;INDIRECT(&quot;Supplier_Lookup.&quot;&amp;[.Z$4]&amp;[.$P48]))">
            <text:p/>
          </table:table-cell>
          <table:table-cell table:formula="of:=IF(ISNUMBER([.Y48]);[.Y48];0)" office:value-type="float" office:value="0.2936" calcext:value-type="float">
            <text:p>0.2936</text:p>
          </table:table-cell>
          <table:table-cell table:formula="of:=[.AA48]*[.O48]" office:value-type="float" office:value="0.5872" calcext:value-type="float">
            <text:p>0.5872</text:p>
          </table:table-cell>
          <table:table-cell table:formula="of:=[.N48]&amp;&quot;-&quot;&amp;[.R48]" office:value-type="string" office:string-value="XTAL_3225-4Pin_3.2x2.5mm-0" calcext:value-type="string">
            <text:p>XTAL_3225-4Pin_3.2x2.5mm-0</text:p>
          </table:table-cell>
          <table:table-cell table:formula="of:=[$CopyFromThing.A44]" office:value-type="string" office:string-value="Y1,Y2" calcext:value-type="string">
            <text:p>Y1,Y2</text:p>
          </table:table-cell>
          <table:table-cell table:formula="of:=[$CopyFromThing.G44]" office:value-type="string" office:string-value="43" calcext:value-type="string">
            <text:p>43</text:p>
          </table:table-cell>
        </table:table-row>
        <table:table-row table:style-name="ro1">
          <table:table-cell/>
          <table:table-cell table:formula="of:=[$CopyFromThing.I45]">
            <text:p/>
          </table:table-cell>
          <table:table-cell table:formula="of:=IF(ISNUMBER(SEARCH(&quot;R&quot;;[$CopyFromThing.A45]));&quot;R&quot;;&quot;&quot;)">
            <text:p/>
          </table:table-cell>
          <table:table-cell table:formula="of:=IF(ISNUMBER(SEARCH(&quot;C&quot;;[$CopyFromThing.A45]));&quot;C&quot;;&quot;&quot;)">
            <text:p/>
          </table:table-cell>
          <table:table-cell table:formula="of:=IF([.D49]&amp;[.C49]&lt;&gt;&quot;&quot;;[.N49];&quot;&quot;)">
            <text:p/>
          </table:table-cell>
          <table:table-cell table:style-name="ce13" table:formula="of:=[.C49]&amp;[.D49]&amp;[.E49]&amp;&quot;__&quot;&amp;[$CopyFromThing.I45]&amp;&quot;__&quot;&amp;[$CopyFromThing.B45]" office:value-type="string" office:string-value="____" calcext:value-type="string">
            <text:p>____</text:p>
          </table:table-cell>
          <table:table-cell table:formula="of:=[$CopyFromThing.D45]">
            <text:p/>
          </table:table-cell>
          <table:table-cell table:formula="of:=FIND(&quot;_&quot;;[.G49])" office:value-type="string" office:string-value="" calcext:value-type="error">
            <text:p>#VALUE!</text:p>
          </table:table-cell>
          <table:table-cell table:formula="of:=IF(ISNUMBER([.H49]);RIGHT([.G49];LEN([.G49])-[.H49]);RIGHT([.G49];LEN([.G49])-FIND(&quot;:&quot;;[.G49])))" office:value-type="string" office:string-value="" calcext:value-type="error">
            <text:p>#VALUE!</text:p>
          </table:table-cell>
          <table:table-cell table:style-name="ce16" table:formula="of:=MATCH([.I49];{&quot;0603&quot;;&quot;1206&quot;};0)" office:value-type="string" office:string-value="" calcext:value-type="error">
            <text:p>#VALUE!</text:p>
          </table:table-cell>
          <table:table-cell table:style-name="ce16" table:formula="of:=RIGHT([.G49];LEN([.G49])-FIND(&quot;:&quot;;[.G49]))" office:value-type="string" office:string-value="" calcext:value-type="error">
            <text:p>#VALUE!</text:p>
          </table:table-cell>
          <table:table-cell table:formula="of:=SEARCH(&quot;0603&quot;;[.G49])" office:value-type="string" office:string-value="" calcext:value-type="error">
            <text:p>#VALUE!</text:p>
          </table:table-cell>
          <table:table-cell table:formula="of:=SEARCH(&quot;1206&quot;;[.G49])" office:value-type="string" office:string-value="" calcext:value-type="error">
            <text:p>#VALUE!</text:p>
          </table:table-cell>
          <table:table-cell table:formula="of:=IF(ISNUMBER([.M49]);&quot;1206&quot;;IF(ISNUMBER([.L49]);&quot;0603&quot;;[.K49]))" office:value-type="string" office:string-value="" calcext:value-type="error">
            <text:p>#VALUE!</text:p>
          </table:table-cell>
          <table:table-cell table:formula="of:=IF(ISNUMBER([$CopyFromThing.E45]*1);[$CopyFromThing.E45]*1;0)" office:value-type="float" office:value="0" calcext:value-type="float">
            <text:p>0</text:p>
          </table:table-cell>
          <table:table-cell table:formula="of:=VLOOKUP([.F49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49])&lt;&gt;&quot;&quot;;INDIRECT(&quot;Supplier_Lookup.L&quot;&amp;[.$P49]);INDIRECT(&quot;Supplier_Lookup.&quot;&amp;[.Q$4]&amp;[.$P49]))" office:value-type="float" office:value="0" calcext:value-type="float">
            <text:p>0</text:p>
          </table:table-cell>
          <table:table-cell table:formula="of:=INDIRECT(&quot;Supplier_Lookup.&quot;&amp;[.R$4]&amp;[.$P49])" office:value-type="float" office:value="0" calcext:value-type="float">
            <text:p>0</text:p>
          </table:table-cell>
          <table:table-cell table:formula="of:=INDIRECT(&quot;Supplier_Lookup.&quot;&amp;[.S$4]&amp;[.$P49])" office:value-type="float" office:value="0" calcext:value-type="float">
            <text:p>0</text:p>
          </table:table-cell>
          <table:table-cell table:formula="of:=INDIRECT(&quot;Supplier_Lookup.&quot;&amp;[.T$4]&amp;[.$P49])" office:value-type="float" office:value="0" calcext:value-type="float">
            <text:p>0</text:p>
          </table:table-cell>
          <table:table-cell table:formula="of:=INDIRECT(&quot;Supplier_Lookup.&quot;&amp;[.U$4]&amp;[.$P49])" office:value-type="float" office:value="0" calcext:value-type="float">
            <text:p>0</text:p>
          </table:table-cell>
          <table:table-cell table:formula="of:=INDIRECT(&quot;Supplier_Lookup.&quot;&amp;[.V$4]&amp;[.$P49])" office:value-type="float" office:value="0" calcext:value-type="float">
            <text:p>0</text:p>
          </table:table-cell>
          <table:table-cell table:formula="of:=INDIRECT(&quot;Supplier_Lookup.&quot;&amp;[.W$4]&amp;[.$P49])" office:value-type="float" office:value="0" calcext:value-type="float">
            <text:p>0</text:p>
          </table:table-cell>
          <table:table-cell table:formula="of:=INDIRECT(&quot;Supplier_Lookup.&quot;&amp;[.X$4]&amp;[.$P49])" office:value-type="float" office:value="0" calcext:value-type="float">
            <text:p>0</text:p>
          </table:table-cell>
          <table:table-cell table:formula="of:=INDIRECT(&quot;Supplier_Lookup.&quot;&amp;[.Y$4]&amp;[.$P49])" office:value-type="float" office:value="0" calcext:value-type="float">
            <text:p>0</text:p>
          </table:table-cell>
          <table:table-cell table:formula="of:=IF(INDIRECT(&quot;Supplier_Lookup.&quot;&amp;[.Z$4]&amp;[.$P49])=&quot;&quot;;&quot;&quot;;INDIRECT(&quot;Supplier_Lookup.&quot;&amp;[.Z$4]&amp;[.$P49]))">
            <text:p/>
          </table:table-cell>
          <table:table-cell table:formula="of:=IF(ISNUMBER([.Y49]);[.Y49];0)" office:value-type="float" office:value="0" calcext:value-type="float">
            <text:p>0</text:p>
          </table:table-cell>
          <table:table-cell table:formula="of:=[.AA49]*[.O49]" office:value-type="float" office:value="0" calcext:value-type="float">
            <text:p>0</text:p>
          </table:table-cell>
          <table:table-cell table:formula="of:=[.N49]&amp;&quot;-&quot;&amp;[.R49]" office:value-type="string" office:string-value="" calcext:value-type="error">
            <text:p>#VALUE!</text:p>
          </table:table-cell>
          <table:table-cell table:formula="of:=[$CopyFromThing.A45]">
            <text:p/>
          </table:table-cell>
          <table:table-cell table:formula="of:=[$CopyFromThing.G45]">
            <text:p/>
          </table:table-cell>
        </table:table-row>
        <table:table-row table:style-name="ro1">
          <table:table-cell/>
          <table:table-cell table:formula="of:=[$CopyFromThing.I46]">
            <text:p/>
          </table:table-cell>
          <table:table-cell table:formula="of:=IF(ISNUMBER(SEARCH(&quot;R&quot;;[$CopyFromThing.A46]));&quot;R&quot;;&quot;&quot;)">
            <text:p/>
          </table:table-cell>
          <table:table-cell table:formula="of:=IF(ISNUMBER(SEARCH(&quot;C&quot;;[$CopyFromThing.A46]));&quot;C&quot;;&quot;&quot;)">
            <text:p/>
          </table:table-cell>
          <table:table-cell table:formula="of:=IF([.D50]&amp;[.C50]&lt;&gt;&quot;&quot;;[.N50];&quot;&quot;)">
            <text:p/>
          </table:table-cell>
          <table:table-cell table:style-name="ce13" table:formula="of:=[.C50]&amp;[.D50]&amp;[.E50]&amp;&quot;__&quot;&amp;[$CopyFromThing.I46]&amp;&quot;__&quot;&amp;[$CopyFromThing.B46]" office:value-type="string" office:string-value="____" calcext:value-type="string">
            <text:p>____</text:p>
          </table:table-cell>
          <table:table-cell table:formula="of:=[$CopyFromThing.D46]">
            <text:p/>
          </table:table-cell>
          <table:table-cell table:formula="of:=FIND(&quot;_&quot;;[.G50])" office:value-type="string" office:string-value="" calcext:value-type="error">
            <text:p>#VALUE!</text:p>
          </table:table-cell>
          <table:table-cell table:formula="of:=IF(ISNUMBER([.H50]);RIGHT([.G50];LEN([.G50])-[.H50]);RIGHT([.G50];LEN([.G50])-FIND(&quot;:&quot;;[.G50])))" office:value-type="string" office:string-value="" calcext:value-type="error">
            <text:p>#VALUE!</text:p>
          </table:table-cell>
          <table:table-cell table:style-name="ce16" table:formula="of:=MATCH([.I50];{&quot;0603&quot;;&quot;1206&quot;};0)" office:value-type="string" office:string-value="" calcext:value-type="error">
            <text:p>#VALUE!</text:p>
          </table:table-cell>
          <table:table-cell table:style-name="ce16" table:formula="of:=RIGHT([.G50];LEN([.G50])-FIND(&quot;:&quot;;[.G50]))" office:value-type="string" office:string-value="" calcext:value-type="error">
            <text:p>#VALUE!</text:p>
          </table:table-cell>
          <table:table-cell table:formula="of:=SEARCH(&quot;0603&quot;;[.G50])" office:value-type="string" office:string-value="" calcext:value-type="error">
            <text:p>#VALUE!</text:p>
          </table:table-cell>
          <table:table-cell table:formula="of:=SEARCH(&quot;1206&quot;;[.G50])" office:value-type="string" office:string-value="" calcext:value-type="error">
            <text:p>#VALUE!</text:p>
          </table:table-cell>
          <table:table-cell table:formula="of:=IF(ISNUMBER([.M50]);&quot;1206&quot;;IF(ISNUMBER([.L50]);&quot;0603&quot;;[.K50]))" office:value-type="string" office:string-value="" calcext:value-type="error">
            <text:p>#VALUE!</text:p>
          </table:table-cell>
          <table:table-cell table:formula="of:=IF(ISNUMBER([$CopyFromThing.E46]*1);[$CopyFromThing.E46]*1;0)" office:value-type="float" office:value="0" calcext:value-type="float">
            <text:p>0</text:p>
          </table:table-cell>
          <table:table-cell table:formula="of:=VLOOKUP([.F50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0])&lt;&gt;&quot;&quot;;INDIRECT(&quot;Supplier_Lookup.L&quot;&amp;[.$P50]);INDIRECT(&quot;Supplier_Lookup.&quot;&amp;[.Q$4]&amp;[.$P50]))" office:value-type="float" office:value="0" calcext:value-type="float">
            <text:p>0</text:p>
          </table:table-cell>
          <table:table-cell table:formula="of:=INDIRECT(&quot;Supplier_Lookup.&quot;&amp;[.R$4]&amp;[.$P50])" office:value-type="float" office:value="0" calcext:value-type="float">
            <text:p>0</text:p>
          </table:table-cell>
          <table:table-cell table:formula="of:=INDIRECT(&quot;Supplier_Lookup.&quot;&amp;[.S$4]&amp;[.$P50])" office:value-type="float" office:value="0" calcext:value-type="float">
            <text:p>0</text:p>
          </table:table-cell>
          <table:table-cell table:formula="of:=INDIRECT(&quot;Supplier_Lookup.&quot;&amp;[.T$4]&amp;[.$P50])" office:value-type="float" office:value="0" calcext:value-type="float">
            <text:p>0</text:p>
          </table:table-cell>
          <table:table-cell table:formula="of:=INDIRECT(&quot;Supplier_Lookup.&quot;&amp;[.U$4]&amp;[.$P50])" office:value-type="float" office:value="0" calcext:value-type="float">
            <text:p>0</text:p>
          </table:table-cell>
          <table:table-cell table:formula="of:=INDIRECT(&quot;Supplier_Lookup.&quot;&amp;[.V$4]&amp;[.$P50])" office:value-type="float" office:value="0" calcext:value-type="float">
            <text:p>0</text:p>
          </table:table-cell>
          <table:table-cell table:formula="of:=INDIRECT(&quot;Supplier_Lookup.&quot;&amp;[.W$4]&amp;[.$P50])" office:value-type="float" office:value="0" calcext:value-type="float">
            <text:p>0</text:p>
          </table:table-cell>
          <table:table-cell table:formula="of:=INDIRECT(&quot;Supplier_Lookup.&quot;&amp;[.X$4]&amp;[.$P50])" office:value-type="float" office:value="0" calcext:value-type="float">
            <text:p>0</text:p>
          </table:table-cell>
          <table:table-cell table:formula="of:=INDIRECT(&quot;Supplier_Lookup.&quot;&amp;[.Y$4]&amp;[.$P50])" office:value-type="float" office:value="0" calcext:value-type="float">
            <text:p>0</text:p>
          </table:table-cell>
          <table:table-cell table:formula="of:=IF(INDIRECT(&quot;Supplier_Lookup.&quot;&amp;[.Z$4]&amp;[.$P50])=&quot;&quot;;&quot;&quot;;INDIRECT(&quot;Supplier_Lookup.&quot;&amp;[.Z$4]&amp;[.$P50]))">
            <text:p/>
          </table:table-cell>
          <table:table-cell table:formula="of:=IF(ISNUMBER([.Y50]);[.Y50];0)" office:value-type="float" office:value="0" calcext:value-type="float">
            <text:p>0</text:p>
          </table:table-cell>
          <table:table-cell table:formula="of:=[.AA50]*[.O50]" office:value-type="float" office:value="0" calcext:value-type="float">
            <text:p>0</text:p>
          </table:table-cell>
          <table:table-cell table:formula="of:=[.N50]&amp;&quot;-&quot;&amp;[.R50]" office:value-type="string" office:string-value="" calcext:value-type="error">
            <text:p>#VALUE!</text:p>
          </table:table-cell>
          <table:table-cell table:formula="of:=[$CopyFromThing.A46]">
            <text:p/>
          </table:table-cell>
          <table:table-cell table:formula="of:=[$CopyFromThing.G46]">
            <text:p/>
          </table:table-cell>
        </table:table-row>
        <table:table-row table:style-name="ro1">
          <table:table-cell/>
          <table:table-cell table:formula="of:=[$CopyFromThing.I47]">
            <text:p/>
          </table:table-cell>
          <table:table-cell table:formula="of:=IF(ISNUMBER(SEARCH(&quot;R&quot;;[$CopyFromThing.A47]));&quot;R&quot;;&quot;&quot;)">
            <text:p/>
          </table:table-cell>
          <table:table-cell table:formula="of:=IF(ISNUMBER(SEARCH(&quot;C&quot;;[$CopyFromThing.A47]));&quot;C&quot;;&quot;&quot;)">
            <text:p/>
          </table:table-cell>
          <table:table-cell table:formula="of:=IF([.D51]&amp;[.C51]&lt;&gt;&quot;&quot;;[.N51];&quot;&quot;)">
            <text:p/>
          </table:table-cell>
          <table:table-cell table:style-name="ce13" table:formula="of:=[.C51]&amp;[.D51]&amp;[.E51]&amp;&quot;__&quot;&amp;[$CopyFromThing.I47]&amp;&quot;__&quot;&amp;[$CopyFromThing.B47]" office:value-type="string" office:string-value="____" calcext:value-type="string">
            <text:p>____</text:p>
          </table:table-cell>
          <table:table-cell table:formula="of:=[$CopyFromThing.D47]">
            <text:p/>
          </table:table-cell>
          <table:table-cell table:formula="of:=FIND(&quot;_&quot;;[.G51])" office:value-type="string" office:string-value="" calcext:value-type="error">
            <text:p>#VALUE!</text:p>
          </table:table-cell>
          <table:table-cell table:formula="of:=IF(ISNUMBER([.H51]);RIGHT([.G51];LEN([.G51])-[.H51]);RIGHT([.G51];LEN([.G51])-FIND(&quot;:&quot;;[.G51])))" office:value-type="string" office:string-value="" calcext:value-type="error">
            <text:p>#VALUE!</text:p>
          </table:table-cell>
          <table:table-cell table:style-name="ce16" table:formula="of:=MATCH([.I51];{&quot;0603&quot;;&quot;1206&quot;};0)" office:value-type="string" office:string-value="" calcext:value-type="error">
            <text:p>#VALUE!</text:p>
          </table:table-cell>
          <table:table-cell table:style-name="ce16" table:formula="of:=RIGHT([.G51];LEN([.G51])-FIND(&quot;:&quot;;[.G51]))" office:value-type="string" office:string-value="" calcext:value-type="error">
            <text:p>#VALUE!</text:p>
          </table:table-cell>
          <table:table-cell table:formula="of:=SEARCH(&quot;0603&quot;;[.G51])" office:value-type="string" office:string-value="" calcext:value-type="error">
            <text:p>#VALUE!</text:p>
          </table:table-cell>
          <table:table-cell table:formula="of:=SEARCH(&quot;1206&quot;;[.G51])" office:value-type="string" office:string-value="" calcext:value-type="error">
            <text:p>#VALUE!</text:p>
          </table:table-cell>
          <table:table-cell table:formula="of:=IF(ISNUMBER([.M51]);&quot;1206&quot;;IF(ISNUMBER([.L51]);&quot;0603&quot;;[.K51]))" office:value-type="string" office:string-value="" calcext:value-type="error">
            <text:p>#VALUE!</text:p>
          </table:table-cell>
          <table:table-cell table:formula="of:=IF(ISNUMBER([$CopyFromThing.E47]*1);[$CopyFromThing.E47]*1;0)" office:value-type="float" office:value="0" calcext:value-type="float">
            <text:p>0</text:p>
          </table:table-cell>
          <table:table-cell table:formula="of:=VLOOKUP([.F51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1])&lt;&gt;&quot;&quot;;INDIRECT(&quot;Supplier_Lookup.L&quot;&amp;[.$P51]);INDIRECT(&quot;Supplier_Lookup.&quot;&amp;[.Q$4]&amp;[.$P51]))" office:value-type="float" office:value="0" calcext:value-type="float">
            <text:p>0</text:p>
          </table:table-cell>
          <table:table-cell table:formula="of:=INDIRECT(&quot;Supplier_Lookup.&quot;&amp;[.R$4]&amp;[.$P51])" office:value-type="float" office:value="0" calcext:value-type="float">
            <text:p>0</text:p>
          </table:table-cell>
          <table:table-cell table:formula="of:=INDIRECT(&quot;Supplier_Lookup.&quot;&amp;[.S$4]&amp;[.$P51])" office:value-type="float" office:value="0" calcext:value-type="float">
            <text:p>0</text:p>
          </table:table-cell>
          <table:table-cell table:formula="of:=INDIRECT(&quot;Supplier_Lookup.&quot;&amp;[.T$4]&amp;[.$P51])" office:value-type="float" office:value="0" calcext:value-type="float">
            <text:p>0</text:p>
          </table:table-cell>
          <table:table-cell table:formula="of:=INDIRECT(&quot;Supplier_Lookup.&quot;&amp;[.U$4]&amp;[.$P51])" office:value-type="float" office:value="0" calcext:value-type="float">
            <text:p>0</text:p>
          </table:table-cell>
          <table:table-cell table:formula="of:=INDIRECT(&quot;Supplier_Lookup.&quot;&amp;[.V$4]&amp;[.$P51])" office:value-type="float" office:value="0" calcext:value-type="float">
            <text:p>0</text:p>
          </table:table-cell>
          <table:table-cell table:formula="of:=INDIRECT(&quot;Supplier_Lookup.&quot;&amp;[.W$4]&amp;[.$P51])" office:value-type="float" office:value="0" calcext:value-type="float">
            <text:p>0</text:p>
          </table:table-cell>
          <table:table-cell table:formula="of:=INDIRECT(&quot;Supplier_Lookup.&quot;&amp;[.X$4]&amp;[.$P51])" office:value-type="float" office:value="0" calcext:value-type="float">
            <text:p>0</text:p>
          </table:table-cell>
          <table:table-cell table:formula="of:=INDIRECT(&quot;Supplier_Lookup.&quot;&amp;[.Y$4]&amp;[.$P51])" office:value-type="float" office:value="0" calcext:value-type="float">
            <text:p>0</text:p>
          </table:table-cell>
          <table:table-cell table:formula="of:=IF(INDIRECT(&quot;Supplier_Lookup.&quot;&amp;[.Z$4]&amp;[.$P51])=&quot;&quot;;&quot;&quot;;INDIRECT(&quot;Supplier_Lookup.&quot;&amp;[.Z$4]&amp;[.$P51]))">
            <text:p/>
          </table:table-cell>
          <table:table-cell table:formula="of:=IF(ISNUMBER([.Y51]);[.Y51];0)" office:value-type="float" office:value="0" calcext:value-type="float">
            <text:p>0</text:p>
          </table:table-cell>
          <table:table-cell table:formula="of:=[.AA51]*[.O51]" office:value-type="float" office:value="0" calcext:value-type="float">
            <text:p>0</text:p>
          </table:table-cell>
          <table:table-cell table:formula="of:=[.N51]&amp;&quot;-&quot;&amp;[.R51]" office:value-type="string" office:string-value="" calcext:value-type="error">
            <text:p>#VALUE!</text:p>
          </table:table-cell>
          <table:table-cell table:formula="of:=[$CopyFromThing.A47]">
            <text:p/>
          </table:table-cell>
          <table:table-cell table:formula="of:=[$CopyFromThing.G47]">
            <text:p/>
          </table:table-cell>
        </table:table-row>
        <table:table-row table:style-name="ro1">
          <table:table-cell/>
          <table:table-cell table:formula="of:=[$CopyFromThing.I48]">
            <text:p/>
          </table:table-cell>
          <table:table-cell table:formula="of:=IF(ISNUMBER(SEARCH(&quot;R&quot;;[$CopyFromThing.A48]));&quot;R&quot;;&quot;&quot;)">
            <text:p/>
          </table:table-cell>
          <table:table-cell table:formula="of:=IF(ISNUMBER(SEARCH(&quot;C&quot;;[$CopyFromThing.A48]));&quot;C&quot;;&quot;&quot;)">
            <text:p/>
          </table:table-cell>
          <table:table-cell table:formula="of:=IF([.D52]&amp;[.C52]&lt;&gt;&quot;&quot;;[.N52];&quot;&quot;)">
            <text:p/>
          </table:table-cell>
          <table:table-cell table:style-name="ce13" table:formula="of:=[.C52]&amp;[.D52]&amp;[.E52]&amp;&quot;__&quot;&amp;[$CopyFromThing.I48]&amp;&quot;__&quot;&amp;[$CopyFromThing.B48]" office:value-type="string" office:string-value="____" calcext:value-type="string">
            <text:p>____</text:p>
          </table:table-cell>
          <table:table-cell table:formula="of:=[$CopyFromThing.D48]">
            <text:p/>
          </table:table-cell>
          <table:table-cell table:formula="of:=FIND(&quot;_&quot;;[.G52])" office:value-type="string" office:string-value="" calcext:value-type="error">
            <text:p>#VALUE!</text:p>
          </table:table-cell>
          <table:table-cell table:formula="of:=IF(ISNUMBER([.H52]);RIGHT([.G52];LEN([.G52])-[.H52]);RIGHT([.G52];LEN([.G52])-FIND(&quot;:&quot;;[.G52])))" office:value-type="string" office:string-value="" calcext:value-type="error">
            <text:p>#VALUE!</text:p>
          </table:table-cell>
          <table:table-cell table:style-name="ce16" table:formula="of:=MATCH([.I52];{&quot;0603&quot;;&quot;1206&quot;};0)" office:value-type="string" office:string-value="" calcext:value-type="error">
            <text:p>#VALUE!</text:p>
          </table:table-cell>
          <table:table-cell table:style-name="ce16" table:formula="of:=RIGHT([.G52];LEN([.G52])-FIND(&quot;:&quot;;[.G52]))" office:value-type="string" office:string-value="" calcext:value-type="error">
            <text:p>#VALUE!</text:p>
          </table:table-cell>
          <table:table-cell table:formula="of:=SEARCH(&quot;0603&quot;;[.G52])" office:value-type="string" office:string-value="" calcext:value-type="error">
            <text:p>#VALUE!</text:p>
          </table:table-cell>
          <table:table-cell table:formula="of:=SEARCH(&quot;1206&quot;;[.G52])" office:value-type="string" office:string-value="" calcext:value-type="error">
            <text:p>#VALUE!</text:p>
          </table:table-cell>
          <table:table-cell table:formula="of:=IF(ISNUMBER([.M52]);&quot;1206&quot;;IF(ISNUMBER([.L52]);&quot;0603&quot;;[.K52]))" office:value-type="string" office:string-value="" calcext:value-type="error">
            <text:p>#VALUE!</text:p>
          </table:table-cell>
          <table:table-cell table:formula="of:=IF(ISNUMBER([$CopyFromThing.E48]*1);[$CopyFromThing.E48]*1;0)" office:value-type="float" office:value="0" calcext:value-type="float">
            <text:p>0</text:p>
          </table:table-cell>
          <table:table-cell table:formula="of:=VLOOKUP([.F52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2])&lt;&gt;&quot;&quot;;INDIRECT(&quot;Supplier_Lookup.L&quot;&amp;[.$P52]);INDIRECT(&quot;Supplier_Lookup.&quot;&amp;[.Q$4]&amp;[.$P52]))" office:value-type="float" office:value="0" calcext:value-type="float">
            <text:p>0</text:p>
          </table:table-cell>
          <table:table-cell table:formula="of:=INDIRECT(&quot;Supplier_Lookup.&quot;&amp;[.R$4]&amp;[.$P52])" office:value-type="float" office:value="0" calcext:value-type="float">
            <text:p>0</text:p>
          </table:table-cell>
          <table:table-cell table:formula="of:=INDIRECT(&quot;Supplier_Lookup.&quot;&amp;[.S$4]&amp;[.$P52])" office:value-type="float" office:value="0" calcext:value-type="float">
            <text:p>0</text:p>
          </table:table-cell>
          <table:table-cell table:formula="of:=INDIRECT(&quot;Supplier_Lookup.&quot;&amp;[.T$4]&amp;[.$P52])" office:value-type="float" office:value="0" calcext:value-type="float">
            <text:p>0</text:p>
          </table:table-cell>
          <table:table-cell table:formula="of:=INDIRECT(&quot;Supplier_Lookup.&quot;&amp;[.U$4]&amp;[.$P52])" office:value-type="float" office:value="0" calcext:value-type="float">
            <text:p>0</text:p>
          </table:table-cell>
          <table:table-cell table:formula="of:=INDIRECT(&quot;Supplier_Lookup.&quot;&amp;[.V$4]&amp;[.$P52])" office:value-type="float" office:value="0" calcext:value-type="float">
            <text:p>0</text:p>
          </table:table-cell>
          <table:table-cell table:formula="of:=INDIRECT(&quot;Supplier_Lookup.&quot;&amp;[.W$4]&amp;[.$P52])" office:value-type="float" office:value="0" calcext:value-type="float">
            <text:p>0</text:p>
          </table:table-cell>
          <table:table-cell table:formula="of:=INDIRECT(&quot;Supplier_Lookup.&quot;&amp;[.X$4]&amp;[.$P52])" office:value-type="float" office:value="0" calcext:value-type="float">
            <text:p>0</text:p>
          </table:table-cell>
          <table:table-cell table:formula="of:=INDIRECT(&quot;Supplier_Lookup.&quot;&amp;[.Y$4]&amp;[.$P52])" office:value-type="float" office:value="0" calcext:value-type="float">
            <text:p>0</text:p>
          </table:table-cell>
          <table:table-cell table:formula="of:=IF(INDIRECT(&quot;Supplier_Lookup.&quot;&amp;[.Z$4]&amp;[.$P52])=&quot;&quot;;&quot;&quot;;INDIRECT(&quot;Supplier_Lookup.&quot;&amp;[.Z$4]&amp;[.$P52]))">
            <text:p/>
          </table:table-cell>
          <table:table-cell table:formula="of:=IF(ISNUMBER([.Y52]);[.Y52];0)" office:value-type="float" office:value="0" calcext:value-type="float">
            <text:p>0</text:p>
          </table:table-cell>
          <table:table-cell table:formula="of:=[.AA52]*[.O52]" office:value-type="float" office:value="0" calcext:value-type="float">
            <text:p>0</text:p>
          </table:table-cell>
          <table:table-cell table:formula="of:=[.N52]&amp;&quot;-&quot;&amp;[.R52]" office:value-type="string" office:string-value="" calcext:value-type="error">
            <text:p>#VALUE!</text:p>
          </table:table-cell>
          <table:table-cell table:formula="of:=[$CopyFromThing.A48]">
            <text:p/>
          </table:table-cell>
          <table:table-cell table:formula="of:=[$CopyFromThing.G48]">
            <text:p/>
          </table:table-cell>
        </table:table-row>
        <table:table-row table:style-name="ro1">
          <table:table-cell/>
          <table:table-cell table:formula="of:=[$CopyFromThing.I49]">
            <text:p/>
          </table:table-cell>
          <table:table-cell table:formula="of:=IF(ISNUMBER(SEARCH(&quot;R&quot;;[$CopyFromThing.A49]));&quot;R&quot;;&quot;&quot;)">
            <text:p/>
          </table:table-cell>
          <table:table-cell table:formula="of:=IF(ISNUMBER(SEARCH(&quot;C&quot;;[$CopyFromThing.A49]));&quot;C&quot;;&quot;&quot;)">
            <text:p/>
          </table:table-cell>
          <table:table-cell table:formula="of:=IF([.D53]&amp;[.C53]&lt;&gt;&quot;&quot;;[.N53];&quot;&quot;)">
            <text:p/>
          </table:table-cell>
          <table:table-cell table:style-name="ce13" table:formula="of:=[.C53]&amp;[.D53]&amp;[.E53]&amp;&quot;__&quot;&amp;[$CopyFromThing.I49]&amp;&quot;__&quot;&amp;[$CopyFromThing.B49]" office:value-type="string" office:string-value="____" calcext:value-type="string">
            <text:p>____</text:p>
          </table:table-cell>
          <table:table-cell table:formula="of:=[$CopyFromThing.D49]">
            <text:p/>
          </table:table-cell>
          <table:table-cell table:formula="of:=FIND(&quot;_&quot;;[.G53])" office:value-type="string" office:string-value="" calcext:value-type="error">
            <text:p>#VALUE!</text:p>
          </table:table-cell>
          <table:table-cell table:formula="of:=IF(ISNUMBER([.H53]);RIGHT([.G53];LEN([.G53])-[.H53]);RIGHT([.G53];LEN([.G53])-FIND(&quot;:&quot;;[.G53])))" office:value-type="string" office:string-value="" calcext:value-type="error">
            <text:p>#VALUE!</text:p>
          </table:table-cell>
          <table:table-cell table:style-name="ce16" table:formula="of:=MATCH([.I53];{&quot;0603&quot;;&quot;1206&quot;};0)" office:value-type="string" office:string-value="" calcext:value-type="error">
            <text:p>#VALUE!</text:p>
          </table:table-cell>
          <table:table-cell table:style-name="ce16" table:formula="of:=RIGHT([.G53];LEN([.G53])-FIND(&quot;:&quot;;[.G53]))" office:value-type="string" office:string-value="" calcext:value-type="error">
            <text:p>#VALUE!</text:p>
          </table:table-cell>
          <table:table-cell table:formula="of:=SEARCH(&quot;0603&quot;;[.G53])" office:value-type="string" office:string-value="" calcext:value-type="error">
            <text:p>#VALUE!</text:p>
          </table:table-cell>
          <table:table-cell table:formula="of:=SEARCH(&quot;1206&quot;;[.G53])" office:value-type="string" office:string-value="" calcext:value-type="error">
            <text:p>#VALUE!</text:p>
          </table:table-cell>
          <table:table-cell table:formula="of:=IF(ISNUMBER([.M53]);&quot;1206&quot;;IF(ISNUMBER([.L53]);&quot;0603&quot;;[.K53]))" office:value-type="string" office:string-value="" calcext:value-type="error">
            <text:p>#VALUE!</text:p>
          </table:table-cell>
          <table:table-cell table:formula="of:=IF(ISNUMBER([$CopyFromThing.E49]*1);[$CopyFromThing.E49]*1;0)" office:value-type="float" office:value="0" calcext:value-type="float">
            <text:p>0</text:p>
          </table:table-cell>
          <table:table-cell table:formula="of:=VLOOKUP([.F53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3])&lt;&gt;&quot;&quot;;INDIRECT(&quot;Supplier_Lookup.L&quot;&amp;[.$P53]);INDIRECT(&quot;Supplier_Lookup.&quot;&amp;[.Q$4]&amp;[.$P53]))" office:value-type="float" office:value="0" calcext:value-type="float">
            <text:p>0</text:p>
          </table:table-cell>
          <table:table-cell table:formula="of:=INDIRECT(&quot;Supplier_Lookup.&quot;&amp;[.R$4]&amp;[.$P53])" office:value-type="float" office:value="0" calcext:value-type="float">
            <text:p>0</text:p>
          </table:table-cell>
          <table:table-cell table:formula="of:=INDIRECT(&quot;Supplier_Lookup.&quot;&amp;[.S$4]&amp;[.$P53])" office:value-type="float" office:value="0" calcext:value-type="float">
            <text:p>0</text:p>
          </table:table-cell>
          <table:table-cell table:formula="of:=INDIRECT(&quot;Supplier_Lookup.&quot;&amp;[.T$4]&amp;[.$P53])" office:value-type="float" office:value="0" calcext:value-type="float">
            <text:p>0</text:p>
          </table:table-cell>
          <table:table-cell table:formula="of:=INDIRECT(&quot;Supplier_Lookup.&quot;&amp;[.U$4]&amp;[.$P53])" office:value-type="float" office:value="0" calcext:value-type="float">
            <text:p>0</text:p>
          </table:table-cell>
          <table:table-cell table:formula="of:=INDIRECT(&quot;Supplier_Lookup.&quot;&amp;[.V$4]&amp;[.$P53])" office:value-type="float" office:value="0" calcext:value-type="float">
            <text:p>0</text:p>
          </table:table-cell>
          <table:table-cell table:formula="of:=INDIRECT(&quot;Supplier_Lookup.&quot;&amp;[.W$4]&amp;[.$P53])" office:value-type="float" office:value="0" calcext:value-type="float">
            <text:p>0</text:p>
          </table:table-cell>
          <table:table-cell table:formula="of:=INDIRECT(&quot;Supplier_Lookup.&quot;&amp;[.X$4]&amp;[.$P53])" office:value-type="float" office:value="0" calcext:value-type="float">
            <text:p>0</text:p>
          </table:table-cell>
          <table:table-cell table:formula="of:=INDIRECT(&quot;Supplier_Lookup.&quot;&amp;[.Y$4]&amp;[.$P53])" office:value-type="float" office:value="0" calcext:value-type="float">
            <text:p>0</text:p>
          </table:table-cell>
          <table:table-cell table:formula="of:=IF(INDIRECT(&quot;Supplier_Lookup.&quot;&amp;[.Z$4]&amp;[.$P53])=&quot;&quot;;&quot;&quot;;INDIRECT(&quot;Supplier_Lookup.&quot;&amp;[.Z$4]&amp;[.$P53]))">
            <text:p/>
          </table:table-cell>
          <table:table-cell table:formula="of:=IF(ISNUMBER([.Y53]);[.Y53];0)" office:value-type="float" office:value="0" calcext:value-type="float">
            <text:p>0</text:p>
          </table:table-cell>
          <table:table-cell table:formula="of:=[.AA53]*[.O53]" office:value-type="float" office:value="0" calcext:value-type="float">
            <text:p>0</text:p>
          </table:table-cell>
          <table:table-cell table:formula="of:=[.N53]&amp;&quot;-&quot;&amp;[.R53]" office:value-type="string" office:string-value="" calcext:value-type="error">
            <text:p>#VALUE!</text:p>
          </table:table-cell>
          <table:table-cell table:formula="of:=[$CopyFromThing.A49]">
            <text:p/>
          </table:table-cell>
          <table:table-cell table:formula="of:=[$CopyFromThing.G49]">
            <text:p/>
          </table:table-cell>
        </table:table-row>
        <table:table-row table:style-name="ro1">
          <table:table-cell/>
          <table:table-cell table:formula="of:=[$CopyFromThing.I50]">
            <text:p/>
          </table:table-cell>
          <table:table-cell table:formula="of:=IF(ISNUMBER(SEARCH(&quot;R&quot;;[$CopyFromThing.A50]));&quot;R&quot;;&quot;&quot;)">
            <text:p/>
          </table:table-cell>
          <table:table-cell table:formula="of:=IF(ISNUMBER(SEARCH(&quot;C&quot;;[$CopyFromThing.A50]));&quot;C&quot;;&quot;&quot;)">
            <text:p/>
          </table:table-cell>
          <table:table-cell table:formula="of:=IF([.D54]&amp;[.C54]&lt;&gt;&quot;&quot;;[.N54];&quot;&quot;)">
            <text:p/>
          </table:table-cell>
          <table:table-cell table:style-name="ce13" table:formula="of:=[.C54]&amp;[.D54]&amp;[.E54]&amp;&quot;__&quot;&amp;[$CopyFromThing.I50]&amp;&quot;__&quot;&amp;[$CopyFromThing.B50]" office:value-type="string" office:string-value="____" calcext:value-type="string">
            <text:p>____</text:p>
          </table:table-cell>
          <table:table-cell table:formula="of:=[$CopyFromThing.D50]">
            <text:p/>
          </table:table-cell>
          <table:table-cell table:formula="of:=FIND(&quot;_&quot;;[.G54])" office:value-type="string" office:string-value="" calcext:value-type="error">
            <text:p>#VALUE!</text:p>
          </table:table-cell>
          <table:table-cell table:formula="of:=IF(ISNUMBER([.H54]);RIGHT([.G54];LEN([.G54])-[.H54]);RIGHT([.G54];LEN([.G54])-FIND(&quot;:&quot;;[.G54])))" office:value-type="string" office:string-value="" calcext:value-type="error">
            <text:p>#VALUE!</text:p>
          </table:table-cell>
          <table:table-cell table:style-name="ce16" table:formula="of:=MATCH([.I54];{&quot;0603&quot;;&quot;1206&quot;};0)" office:value-type="string" office:string-value="" calcext:value-type="error">
            <text:p>#VALUE!</text:p>
          </table:table-cell>
          <table:table-cell table:style-name="ce16" table:formula="of:=RIGHT([.G54];LEN([.G54])-FIND(&quot;:&quot;;[.G54]))" office:value-type="string" office:string-value="" calcext:value-type="error">
            <text:p>#VALUE!</text:p>
          </table:table-cell>
          <table:table-cell table:formula="of:=SEARCH(&quot;0603&quot;;[.G54])" office:value-type="string" office:string-value="" calcext:value-type="error">
            <text:p>#VALUE!</text:p>
          </table:table-cell>
          <table:table-cell table:formula="of:=SEARCH(&quot;1206&quot;;[.G54])" office:value-type="string" office:string-value="" calcext:value-type="error">
            <text:p>#VALUE!</text:p>
          </table:table-cell>
          <table:table-cell table:formula="of:=IF(ISNUMBER([.M54]);&quot;1206&quot;;IF(ISNUMBER([.L54]);&quot;0603&quot;;[.K54]))" office:value-type="string" office:string-value="" calcext:value-type="error">
            <text:p>#VALUE!</text:p>
          </table:table-cell>
          <table:table-cell table:formula="of:=IF(ISNUMBER([$CopyFromThing.E50]*1);[$CopyFromThing.E50]*1;0)" office:value-type="float" office:value="0" calcext:value-type="float">
            <text:p>0</text:p>
          </table:table-cell>
          <table:table-cell table:formula="of:=VLOOKUP([.F54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4])&lt;&gt;&quot;&quot;;INDIRECT(&quot;Supplier_Lookup.L&quot;&amp;[.$P54]);INDIRECT(&quot;Supplier_Lookup.&quot;&amp;[.Q$4]&amp;[.$P54]))" office:value-type="float" office:value="0" calcext:value-type="float">
            <text:p>0</text:p>
          </table:table-cell>
          <table:table-cell table:formula="of:=INDIRECT(&quot;Supplier_Lookup.&quot;&amp;[.R$4]&amp;[.$P54])" office:value-type="float" office:value="0" calcext:value-type="float">
            <text:p>0</text:p>
          </table:table-cell>
          <table:table-cell table:formula="of:=INDIRECT(&quot;Supplier_Lookup.&quot;&amp;[.S$4]&amp;[.$P54])" office:value-type="float" office:value="0" calcext:value-type="float">
            <text:p>0</text:p>
          </table:table-cell>
          <table:table-cell table:formula="of:=INDIRECT(&quot;Supplier_Lookup.&quot;&amp;[.T$4]&amp;[.$P54])" office:value-type="float" office:value="0" calcext:value-type="float">
            <text:p>0</text:p>
          </table:table-cell>
          <table:table-cell table:formula="of:=INDIRECT(&quot;Supplier_Lookup.&quot;&amp;[.U$4]&amp;[.$P54])" office:value-type="float" office:value="0" calcext:value-type="float">
            <text:p>0</text:p>
          </table:table-cell>
          <table:table-cell table:formula="of:=INDIRECT(&quot;Supplier_Lookup.&quot;&amp;[.V$4]&amp;[.$P54])" office:value-type="float" office:value="0" calcext:value-type="float">
            <text:p>0</text:p>
          </table:table-cell>
          <table:table-cell table:formula="of:=INDIRECT(&quot;Supplier_Lookup.&quot;&amp;[.W$4]&amp;[.$P54])" office:value-type="float" office:value="0" calcext:value-type="float">
            <text:p>0</text:p>
          </table:table-cell>
          <table:table-cell table:formula="of:=INDIRECT(&quot;Supplier_Lookup.&quot;&amp;[.X$4]&amp;[.$P54])" office:value-type="float" office:value="0" calcext:value-type="float">
            <text:p>0</text:p>
          </table:table-cell>
          <table:table-cell table:formula="of:=INDIRECT(&quot;Supplier_Lookup.&quot;&amp;[.Y$4]&amp;[.$P54])" office:value-type="float" office:value="0" calcext:value-type="float">
            <text:p>0</text:p>
          </table:table-cell>
          <table:table-cell table:formula="of:=IF(INDIRECT(&quot;Supplier_Lookup.&quot;&amp;[.Z$4]&amp;[.$P54])=&quot;&quot;;&quot;&quot;;INDIRECT(&quot;Supplier_Lookup.&quot;&amp;[.Z$4]&amp;[.$P54]))">
            <text:p/>
          </table:table-cell>
          <table:table-cell table:formula="of:=IF(ISNUMBER([.Y54]);[.Y54];0)" office:value-type="float" office:value="0" calcext:value-type="float">
            <text:p>0</text:p>
          </table:table-cell>
          <table:table-cell table:formula="of:=[.AA54]*[.O54]" office:value-type="float" office:value="0" calcext:value-type="float">
            <text:p>0</text:p>
          </table:table-cell>
          <table:table-cell table:formula="of:=[.N54]&amp;&quot;-&quot;&amp;[.R54]" office:value-type="string" office:string-value="" calcext:value-type="error">
            <text:p>#VALUE!</text:p>
          </table:table-cell>
          <table:table-cell table:formula="of:=[$CopyFromThing.A50]">
            <text:p/>
          </table:table-cell>
          <table:table-cell table:formula="of:=[$CopyFromThing.G50]">
            <text:p/>
          </table:table-cell>
        </table:table-row>
        <table:table-row table:style-name="ro1">
          <table:table-cell/>
          <table:table-cell table:formula="of:=[$CopyFromThing.I51]">
            <text:p/>
          </table:table-cell>
          <table:table-cell table:formula="of:=IF(ISNUMBER(SEARCH(&quot;R&quot;;[$CopyFromThing.A51]));&quot;R&quot;;&quot;&quot;)">
            <text:p/>
          </table:table-cell>
          <table:table-cell table:formula="of:=IF(ISNUMBER(SEARCH(&quot;C&quot;;[$CopyFromThing.A51]));&quot;C&quot;;&quot;&quot;)">
            <text:p/>
          </table:table-cell>
          <table:table-cell table:formula="of:=IF([.D55]&amp;[.C55]&lt;&gt;&quot;&quot;;[.N55];&quot;&quot;)">
            <text:p/>
          </table:table-cell>
          <table:table-cell table:style-name="ce13" table:formula="of:=[.C55]&amp;[.D55]&amp;[.E55]&amp;&quot;__&quot;&amp;[$CopyFromThing.I51]&amp;&quot;__&quot;&amp;[$CopyFromThing.B51]" office:value-type="string" office:string-value="____" calcext:value-type="string">
            <text:p>____</text:p>
          </table:table-cell>
          <table:table-cell table:formula="of:=[$CopyFromThing.D51]">
            <text:p/>
          </table:table-cell>
          <table:table-cell table:formula="of:=FIND(&quot;_&quot;;[.G55])" office:value-type="string" office:string-value="" calcext:value-type="error">
            <text:p>#VALUE!</text:p>
          </table:table-cell>
          <table:table-cell table:formula="of:=IF(ISNUMBER([.H55]);RIGHT([.G55];LEN([.G55])-[.H55]);RIGHT([.G55];LEN([.G55])-FIND(&quot;:&quot;;[.G55])))" office:value-type="string" office:string-value="" calcext:value-type="error">
            <text:p>#VALUE!</text:p>
          </table:table-cell>
          <table:table-cell table:style-name="ce16" table:formula="of:=MATCH([.I55];{&quot;0603&quot;;&quot;1206&quot;};0)" office:value-type="string" office:string-value="" calcext:value-type="error">
            <text:p>#VALUE!</text:p>
          </table:table-cell>
          <table:table-cell table:style-name="ce16" table:formula="of:=RIGHT([.G55];LEN([.G55])-FIND(&quot;:&quot;;[.G55]))" office:value-type="string" office:string-value="" calcext:value-type="error">
            <text:p>#VALUE!</text:p>
          </table:table-cell>
          <table:table-cell table:formula="of:=SEARCH(&quot;0603&quot;;[.G55])" office:value-type="string" office:string-value="" calcext:value-type="error">
            <text:p>#VALUE!</text:p>
          </table:table-cell>
          <table:table-cell table:formula="of:=SEARCH(&quot;1206&quot;;[.G55])" office:value-type="string" office:string-value="" calcext:value-type="error">
            <text:p>#VALUE!</text:p>
          </table:table-cell>
          <table:table-cell table:formula="of:=IF(ISNUMBER([.M55]);&quot;1206&quot;;IF(ISNUMBER([.L55]);&quot;0603&quot;;[.K55]))" office:value-type="string" office:string-value="" calcext:value-type="error">
            <text:p>#VALUE!</text:p>
          </table:table-cell>
          <table:table-cell table:formula="of:=IF(ISNUMBER([$CopyFromThing.E51]*1);[$CopyFromThing.E51]*1;0)" office:value-type="float" office:value="0" calcext:value-type="float">
            <text:p>0</text:p>
          </table:table-cell>
          <table:table-cell table:formula="of:=VLOOKUP([.F55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5])&lt;&gt;&quot;&quot;;INDIRECT(&quot;Supplier_Lookup.L&quot;&amp;[.$P55]);INDIRECT(&quot;Supplier_Lookup.&quot;&amp;[.Q$4]&amp;[.$P55]))" office:value-type="float" office:value="0" calcext:value-type="float">
            <text:p>0</text:p>
          </table:table-cell>
          <table:table-cell table:formula="of:=INDIRECT(&quot;Supplier_Lookup.&quot;&amp;[.R$4]&amp;[.$P55])" office:value-type="float" office:value="0" calcext:value-type="float">
            <text:p>0</text:p>
          </table:table-cell>
          <table:table-cell table:formula="of:=INDIRECT(&quot;Supplier_Lookup.&quot;&amp;[.S$4]&amp;[.$P55])" office:value-type="float" office:value="0" calcext:value-type="float">
            <text:p>0</text:p>
          </table:table-cell>
          <table:table-cell table:formula="of:=INDIRECT(&quot;Supplier_Lookup.&quot;&amp;[.T$4]&amp;[.$P55])" office:value-type="float" office:value="0" calcext:value-type="float">
            <text:p>0</text:p>
          </table:table-cell>
          <table:table-cell table:formula="of:=INDIRECT(&quot;Supplier_Lookup.&quot;&amp;[.U$4]&amp;[.$P55])" office:value-type="float" office:value="0" calcext:value-type="float">
            <text:p>0</text:p>
          </table:table-cell>
          <table:table-cell table:formula="of:=INDIRECT(&quot;Supplier_Lookup.&quot;&amp;[.V$4]&amp;[.$P55])" office:value-type="float" office:value="0" calcext:value-type="float">
            <text:p>0</text:p>
          </table:table-cell>
          <table:table-cell table:formula="of:=INDIRECT(&quot;Supplier_Lookup.&quot;&amp;[.W$4]&amp;[.$P55])" office:value-type="float" office:value="0" calcext:value-type="float">
            <text:p>0</text:p>
          </table:table-cell>
          <table:table-cell table:formula="of:=INDIRECT(&quot;Supplier_Lookup.&quot;&amp;[.X$4]&amp;[.$P55])" office:value-type="float" office:value="0" calcext:value-type="float">
            <text:p>0</text:p>
          </table:table-cell>
          <table:table-cell table:formula="of:=INDIRECT(&quot;Supplier_Lookup.&quot;&amp;[.Y$4]&amp;[.$P55])" office:value-type="float" office:value="0" calcext:value-type="float">
            <text:p>0</text:p>
          </table:table-cell>
          <table:table-cell table:formula="of:=IF(INDIRECT(&quot;Supplier_Lookup.&quot;&amp;[.Z$4]&amp;[.$P55])=&quot;&quot;;&quot;&quot;;INDIRECT(&quot;Supplier_Lookup.&quot;&amp;[.Z$4]&amp;[.$P55]))">
            <text:p/>
          </table:table-cell>
          <table:table-cell table:formula="of:=IF(ISNUMBER([.Y55]);[.Y55];0)" office:value-type="float" office:value="0" calcext:value-type="float">
            <text:p>0</text:p>
          </table:table-cell>
          <table:table-cell table:formula="of:=[.AA55]*[.O55]" office:value-type="float" office:value="0" calcext:value-type="float">
            <text:p>0</text:p>
          </table:table-cell>
          <table:table-cell table:formula="of:=[.N55]&amp;&quot;-&quot;&amp;[.R55]" office:value-type="string" office:string-value="" calcext:value-type="error">
            <text:p>#VALUE!</text:p>
          </table:table-cell>
          <table:table-cell table:formula="of:=[$CopyFromThing.A51]">
            <text:p/>
          </table:table-cell>
          <table:table-cell table:formula="of:=[$CopyFromThing.G51]">
            <text:p/>
          </table:table-cell>
        </table:table-row>
        <table:table-row table:style-name="ro1">
          <table:table-cell/>
          <table:table-cell table:formula="of:=[$CopyFromThing.I52]">
            <text:p/>
          </table:table-cell>
          <table:table-cell table:formula="of:=IF(ISNUMBER(SEARCH(&quot;R&quot;;[$CopyFromThing.A52]));&quot;R&quot;;&quot;&quot;)">
            <text:p/>
          </table:table-cell>
          <table:table-cell table:formula="of:=IF(ISNUMBER(SEARCH(&quot;C&quot;;[$CopyFromThing.A52]));&quot;C&quot;;&quot;&quot;)">
            <text:p/>
          </table:table-cell>
          <table:table-cell table:formula="of:=IF([.D56]&amp;[.C56]&lt;&gt;&quot;&quot;;[.N56];&quot;&quot;)">
            <text:p/>
          </table:table-cell>
          <table:table-cell table:style-name="ce13" table:formula="of:=[.C56]&amp;[.D56]&amp;[.E56]&amp;&quot;__&quot;&amp;[$CopyFromThing.I52]&amp;&quot;__&quot;&amp;[$CopyFromThing.B52]" office:value-type="string" office:string-value="____" calcext:value-type="string">
            <text:p>____</text:p>
          </table:table-cell>
          <table:table-cell table:formula="of:=[$CopyFromThing.D52]">
            <text:p/>
          </table:table-cell>
          <table:table-cell table:formula="of:=FIND(&quot;_&quot;;[.G56])" office:value-type="string" office:string-value="" calcext:value-type="error">
            <text:p>#VALUE!</text:p>
          </table:table-cell>
          <table:table-cell table:formula="of:=IF(ISNUMBER([.H56]);RIGHT([.G56];LEN([.G56])-[.H56]);RIGHT([.G56];LEN([.G56])-FIND(&quot;:&quot;;[.G56])))" office:value-type="string" office:string-value="" calcext:value-type="error">
            <text:p>#VALUE!</text:p>
          </table:table-cell>
          <table:table-cell table:style-name="ce16" table:formula="of:=MATCH([.I56];{&quot;0603&quot;;&quot;1206&quot;};0)" office:value-type="string" office:string-value="" calcext:value-type="error">
            <text:p>#VALUE!</text:p>
          </table:table-cell>
          <table:table-cell table:style-name="ce16" table:formula="of:=RIGHT([.G56];LEN([.G56])-FIND(&quot;:&quot;;[.G56]))" office:value-type="string" office:string-value="" calcext:value-type="error">
            <text:p>#VALUE!</text:p>
          </table:table-cell>
          <table:table-cell table:formula="of:=SEARCH(&quot;0603&quot;;[.G56])" office:value-type="string" office:string-value="" calcext:value-type="error">
            <text:p>#VALUE!</text:p>
          </table:table-cell>
          <table:table-cell table:formula="of:=SEARCH(&quot;1206&quot;;[.G56])" office:value-type="string" office:string-value="" calcext:value-type="error">
            <text:p>#VALUE!</text:p>
          </table:table-cell>
          <table:table-cell table:formula="of:=IF(ISNUMBER([.M56]);&quot;1206&quot;;IF(ISNUMBER([.L56]);&quot;0603&quot;;[.K56]))" office:value-type="string" office:string-value="" calcext:value-type="error">
            <text:p>#VALUE!</text:p>
          </table:table-cell>
          <table:table-cell table:formula="of:=IF(ISNUMBER([$CopyFromThing.E52]*1);[$CopyFromThing.E52]*1;0)" office:value-type="float" office:value="0" calcext:value-type="float">
            <text:p>0</text:p>
          </table:table-cell>
          <table:table-cell table:formula="of:=VLOOKUP([.F56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6])&lt;&gt;&quot;&quot;;INDIRECT(&quot;Supplier_Lookup.L&quot;&amp;[.$P56]);INDIRECT(&quot;Supplier_Lookup.&quot;&amp;[.Q$4]&amp;[.$P56]))" office:value-type="float" office:value="0" calcext:value-type="float">
            <text:p>0</text:p>
          </table:table-cell>
          <table:table-cell table:formula="of:=INDIRECT(&quot;Supplier_Lookup.&quot;&amp;[.R$4]&amp;[.$P56])" office:value-type="float" office:value="0" calcext:value-type="float">
            <text:p>0</text:p>
          </table:table-cell>
          <table:table-cell table:formula="of:=INDIRECT(&quot;Supplier_Lookup.&quot;&amp;[.S$4]&amp;[.$P56])" office:value-type="float" office:value="0" calcext:value-type="float">
            <text:p>0</text:p>
          </table:table-cell>
          <table:table-cell table:formula="of:=INDIRECT(&quot;Supplier_Lookup.&quot;&amp;[.T$4]&amp;[.$P56])" office:value-type="float" office:value="0" calcext:value-type="float">
            <text:p>0</text:p>
          </table:table-cell>
          <table:table-cell table:formula="of:=INDIRECT(&quot;Supplier_Lookup.&quot;&amp;[.U$4]&amp;[.$P56])" office:value-type="float" office:value="0" calcext:value-type="float">
            <text:p>0</text:p>
          </table:table-cell>
          <table:table-cell table:formula="of:=INDIRECT(&quot;Supplier_Lookup.&quot;&amp;[.V$4]&amp;[.$P56])" office:value-type="float" office:value="0" calcext:value-type="float">
            <text:p>0</text:p>
          </table:table-cell>
          <table:table-cell table:formula="of:=INDIRECT(&quot;Supplier_Lookup.&quot;&amp;[.W$4]&amp;[.$P56])" office:value-type="float" office:value="0" calcext:value-type="float">
            <text:p>0</text:p>
          </table:table-cell>
          <table:table-cell table:formula="of:=INDIRECT(&quot;Supplier_Lookup.&quot;&amp;[.X$4]&amp;[.$P56])" office:value-type="float" office:value="0" calcext:value-type="float">
            <text:p>0</text:p>
          </table:table-cell>
          <table:table-cell table:formula="of:=INDIRECT(&quot;Supplier_Lookup.&quot;&amp;[.Y$4]&amp;[.$P56])" office:value-type="float" office:value="0" calcext:value-type="float">
            <text:p>0</text:p>
          </table:table-cell>
          <table:table-cell table:formula="of:=IF(INDIRECT(&quot;Supplier_Lookup.&quot;&amp;[.Z$4]&amp;[.$P56])=&quot;&quot;;&quot;&quot;;INDIRECT(&quot;Supplier_Lookup.&quot;&amp;[.Z$4]&amp;[.$P56]))">
            <text:p/>
          </table:table-cell>
          <table:table-cell table:formula="of:=IF(ISNUMBER([.Y56]);[.Y56];0)" office:value-type="float" office:value="0" calcext:value-type="float">
            <text:p>0</text:p>
          </table:table-cell>
          <table:table-cell table:formula="of:=[.AA56]*[.O56]" office:value-type="float" office:value="0" calcext:value-type="float">
            <text:p>0</text:p>
          </table:table-cell>
          <table:table-cell table:formula="of:=[.N56]&amp;&quot;-&quot;&amp;[.R56]" office:value-type="string" office:string-value="" calcext:value-type="error">
            <text:p>#VALUE!</text:p>
          </table:table-cell>
          <table:table-cell table:formula="of:=[$CopyFromThing.A52]">
            <text:p/>
          </table:table-cell>
          <table:table-cell table:formula="of:=[$CopyFromThing.G52]">
            <text:p/>
          </table:table-cell>
        </table:table-row>
        <table:table-row table:style-name="ro1">
          <table:table-cell/>
          <table:table-cell table:formula="of:=[$CopyFromThing.I53]">
            <text:p/>
          </table:table-cell>
          <table:table-cell table:formula="of:=IF(ISNUMBER(SEARCH(&quot;R&quot;;[$CopyFromThing.A53]));&quot;R&quot;;&quot;&quot;)">
            <text:p/>
          </table:table-cell>
          <table:table-cell table:formula="of:=IF(ISNUMBER(SEARCH(&quot;C&quot;;[$CopyFromThing.A53]));&quot;C&quot;;&quot;&quot;)">
            <text:p/>
          </table:table-cell>
          <table:table-cell table:formula="of:=IF([.D57]&amp;[.C57]&lt;&gt;&quot;&quot;;[.N57];&quot;&quot;)">
            <text:p/>
          </table:table-cell>
          <table:table-cell table:style-name="ce13" table:formula="of:=[.C57]&amp;[.D57]&amp;[.E57]&amp;&quot;__&quot;&amp;[$CopyFromThing.I53]&amp;&quot;__&quot;&amp;[$CopyFromThing.B53]" office:value-type="string" office:string-value="____" calcext:value-type="string">
            <text:p>____</text:p>
          </table:table-cell>
          <table:table-cell table:formula="of:=[$CopyFromThing.D53]">
            <text:p/>
          </table:table-cell>
          <table:table-cell table:formula="of:=FIND(&quot;_&quot;;[.G57])" office:value-type="string" office:string-value="" calcext:value-type="error">
            <text:p>#VALUE!</text:p>
          </table:table-cell>
          <table:table-cell table:formula="of:=IF(ISNUMBER([.H57]);RIGHT([.G57];LEN([.G57])-[.H57]);RIGHT([.G57];LEN([.G57])-FIND(&quot;:&quot;;[.G57])))" office:value-type="string" office:string-value="" calcext:value-type="error">
            <text:p>#VALUE!</text:p>
          </table:table-cell>
          <table:table-cell table:style-name="ce16" table:formula="of:=MATCH([.I57];{&quot;0603&quot;;&quot;1206&quot;};0)" office:value-type="string" office:string-value="" calcext:value-type="error">
            <text:p>#VALUE!</text:p>
          </table:table-cell>
          <table:table-cell table:style-name="ce16" table:formula="of:=RIGHT([.G57];LEN([.G57])-FIND(&quot;:&quot;;[.G57]))" office:value-type="string" office:string-value="" calcext:value-type="error">
            <text:p>#VALUE!</text:p>
          </table:table-cell>
          <table:table-cell table:formula="of:=SEARCH(&quot;0603&quot;;[.G57])" office:value-type="string" office:string-value="" calcext:value-type="error">
            <text:p>#VALUE!</text:p>
          </table:table-cell>
          <table:table-cell table:formula="of:=SEARCH(&quot;1206&quot;;[.G57])" office:value-type="string" office:string-value="" calcext:value-type="error">
            <text:p>#VALUE!</text:p>
          </table:table-cell>
          <table:table-cell table:formula="of:=IF(ISNUMBER([.M57]);&quot;1206&quot;;IF(ISNUMBER([.L57]);&quot;0603&quot;;[.K57]))" office:value-type="string" office:string-value="" calcext:value-type="error">
            <text:p>#VALUE!</text:p>
          </table:table-cell>
          <table:table-cell table:formula="of:=IF(ISNUMBER([$CopyFromThing.E53]*1);[$CopyFromThing.E53]*1;0)" office:value-type="float" office:value="0" calcext:value-type="float">
            <text:p>0</text:p>
          </table:table-cell>
          <table:table-cell table:formula="of:=VLOOKUP([.F57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7])&lt;&gt;&quot;&quot;;INDIRECT(&quot;Supplier_Lookup.L&quot;&amp;[.$P57]);INDIRECT(&quot;Supplier_Lookup.&quot;&amp;[.Q$4]&amp;[.$P57]))" office:value-type="float" office:value="0" calcext:value-type="float">
            <text:p>0</text:p>
          </table:table-cell>
          <table:table-cell table:formula="of:=INDIRECT(&quot;Supplier_Lookup.&quot;&amp;[.R$4]&amp;[.$P57])" office:value-type="float" office:value="0" calcext:value-type="float">
            <text:p>0</text:p>
          </table:table-cell>
          <table:table-cell table:formula="of:=INDIRECT(&quot;Supplier_Lookup.&quot;&amp;[.S$4]&amp;[.$P57])" office:value-type="float" office:value="0" calcext:value-type="float">
            <text:p>0</text:p>
          </table:table-cell>
          <table:table-cell table:formula="of:=INDIRECT(&quot;Supplier_Lookup.&quot;&amp;[.T$4]&amp;[.$P57])" office:value-type="float" office:value="0" calcext:value-type="float">
            <text:p>0</text:p>
          </table:table-cell>
          <table:table-cell table:formula="of:=INDIRECT(&quot;Supplier_Lookup.&quot;&amp;[.U$4]&amp;[.$P57])" office:value-type="float" office:value="0" calcext:value-type="float">
            <text:p>0</text:p>
          </table:table-cell>
          <table:table-cell table:formula="of:=INDIRECT(&quot;Supplier_Lookup.&quot;&amp;[.V$4]&amp;[.$P57])" office:value-type="float" office:value="0" calcext:value-type="float">
            <text:p>0</text:p>
          </table:table-cell>
          <table:table-cell table:formula="of:=INDIRECT(&quot;Supplier_Lookup.&quot;&amp;[.W$4]&amp;[.$P57])" office:value-type="float" office:value="0" calcext:value-type="float">
            <text:p>0</text:p>
          </table:table-cell>
          <table:table-cell table:formula="of:=INDIRECT(&quot;Supplier_Lookup.&quot;&amp;[.X$4]&amp;[.$P57])" office:value-type="float" office:value="0" calcext:value-type="float">
            <text:p>0</text:p>
          </table:table-cell>
          <table:table-cell table:formula="of:=INDIRECT(&quot;Supplier_Lookup.&quot;&amp;[.Y$4]&amp;[.$P57])" office:value-type="float" office:value="0" calcext:value-type="float">
            <text:p>0</text:p>
          </table:table-cell>
          <table:table-cell table:formula="of:=IF(INDIRECT(&quot;Supplier_Lookup.&quot;&amp;[.Z$4]&amp;[.$P57])=&quot;&quot;;&quot;&quot;;INDIRECT(&quot;Supplier_Lookup.&quot;&amp;[.Z$4]&amp;[.$P57]))">
            <text:p/>
          </table:table-cell>
          <table:table-cell table:formula="of:=IF(ISNUMBER([.Y57]);[.Y57];0)" office:value-type="float" office:value="0" calcext:value-type="float">
            <text:p>0</text:p>
          </table:table-cell>
          <table:table-cell table:formula="of:=[.AA57]*[.O57]" office:value-type="float" office:value="0" calcext:value-type="float">
            <text:p>0</text:p>
          </table:table-cell>
          <table:table-cell table:formula="of:=[.N57]&amp;&quot;-&quot;&amp;[.R57]" office:value-type="string" office:string-value="" calcext:value-type="error">
            <text:p>#VALUE!</text:p>
          </table:table-cell>
          <table:table-cell table:formula="of:=[$CopyFromThing.A53]">
            <text:p/>
          </table:table-cell>
          <table:table-cell table:formula="of:=[$CopyFromThing.G53]">
            <text:p/>
          </table:table-cell>
        </table:table-row>
        <table:table-row table:style-name="ro1">
          <table:table-cell/>
          <table:table-cell table:formula="of:=[$CopyFromThing.I54]">
            <text:p/>
          </table:table-cell>
          <table:table-cell table:formula="of:=IF(ISNUMBER(SEARCH(&quot;R&quot;;[$CopyFromThing.A54]));&quot;R&quot;;&quot;&quot;)">
            <text:p/>
          </table:table-cell>
          <table:table-cell table:formula="of:=IF(ISNUMBER(SEARCH(&quot;C&quot;;[$CopyFromThing.A54]));&quot;C&quot;;&quot;&quot;)">
            <text:p/>
          </table:table-cell>
          <table:table-cell table:formula="of:=IF([.D58]&amp;[.C58]&lt;&gt;&quot;&quot;;[.N58];&quot;&quot;)">
            <text:p/>
          </table:table-cell>
          <table:table-cell table:style-name="ce13" table:formula="of:=[.C58]&amp;[.D58]&amp;[.E58]&amp;&quot;__&quot;&amp;[$CopyFromThing.I54]&amp;&quot;__&quot;&amp;[$CopyFromThing.B54]" office:value-type="string" office:string-value="____" calcext:value-type="string">
            <text:p>____</text:p>
          </table:table-cell>
          <table:table-cell table:formula="of:=[$CopyFromThing.D54]">
            <text:p/>
          </table:table-cell>
          <table:table-cell table:formula="of:=FIND(&quot;_&quot;;[.G58])" office:value-type="string" office:string-value="" calcext:value-type="error">
            <text:p>#VALUE!</text:p>
          </table:table-cell>
          <table:table-cell table:formula="of:=IF(ISNUMBER([.H58]);RIGHT([.G58];LEN([.G58])-[.H58]);RIGHT([.G58];LEN([.G58])-FIND(&quot;:&quot;;[.G58])))" office:value-type="string" office:string-value="" calcext:value-type="error">
            <text:p>#VALUE!</text:p>
          </table:table-cell>
          <table:table-cell table:style-name="ce16" table:formula="of:=MATCH([.I58];{&quot;0603&quot;;&quot;1206&quot;};0)" office:value-type="string" office:string-value="" calcext:value-type="error">
            <text:p>#VALUE!</text:p>
          </table:table-cell>
          <table:table-cell table:style-name="ce16" table:formula="of:=RIGHT([.G58];LEN([.G58])-FIND(&quot;:&quot;;[.G58]))" office:value-type="string" office:string-value="" calcext:value-type="error">
            <text:p>#VALUE!</text:p>
          </table:table-cell>
          <table:table-cell table:formula="of:=SEARCH(&quot;0603&quot;;[.G58])" office:value-type="string" office:string-value="" calcext:value-type="error">
            <text:p>#VALUE!</text:p>
          </table:table-cell>
          <table:table-cell table:formula="of:=SEARCH(&quot;1206&quot;;[.G58])" office:value-type="string" office:string-value="" calcext:value-type="error">
            <text:p>#VALUE!</text:p>
          </table:table-cell>
          <table:table-cell table:formula="of:=IF(ISNUMBER([.M58]);&quot;1206&quot;;IF(ISNUMBER([.L58]);&quot;0603&quot;;[.K58]))" office:value-type="string" office:string-value="" calcext:value-type="error">
            <text:p>#VALUE!</text:p>
          </table:table-cell>
          <table:table-cell table:formula="of:=IF(ISNUMBER([$CopyFromThing.E54]*1);[$CopyFromThing.E54]*1;0)" office:value-type="float" office:value="0" calcext:value-type="float">
            <text:p>0</text:p>
          </table:table-cell>
          <table:table-cell table:formula="of:=VLOOKUP([.F58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8])&lt;&gt;&quot;&quot;;INDIRECT(&quot;Supplier_Lookup.L&quot;&amp;[.$P58]);INDIRECT(&quot;Supplier_Lookup.&quot;&amp;[.Q$4]&amp;[.$P58]))" office:value-type="float" office:value="0" calcext:value-type="float">
            <text:p>0</text:p>
          </table:table-cell>
          <table:table-cell table:formula="of:=INDIRECT(&quot;Supplier_Lookup.&quot;&amp;[.R$4]&amp;[.$P58])" office:value-type="float" office:value="0" calcext:value-type="float">
            <text:p>0</text:p>
          </table:table-cell>
          <table:table-cell table:formula="of:=INDIRECT(&quot;Supplier_Lookup.&quot;&amp;[.S$4]&amp;[.$P58])" office:value-type="float" office:value="0" calcext:value-type="float">
            <text:p>0</text:p>
          </table:table-cell>
          <table:table-cell table:formula="of:=INDIRECT(&quot;Supplier_Lookup.&quot;&amp;[.T$4]&amp;[.$P58])" office:value-type="float" office:value="0" calcext:value-type="float">
            <text:p>0</text:p>
          </table:table-cell>
          <table:table-cell table:formula="of:=INDIRECT(&quot;Supplier_Lookup.&quot;&amp;[.U$4]&amp;[.$P58])" office:value-type="float" office:value="0" calcext:value-type="float">
            <text:p>0</text:p>
          </table:table-cell>
          <table:table-cell table:formula="of:=INDIRECT(&quot;Supplier_Lookup.&quot;&amp;[.V$4]&amp;[.$P58])" office:value-type="float" office:value="0" calcext:value-type="float">
            <text:p>0</text:p>
          </table:table-cell>
          <table:table-cell table:formula="of:=INDIRECT(&quot;Supplier_Lookup.&quot;&amp;[.W$4]&amp;[.$P58])" office:value-type="float" office:value="0" calcext:value-type="float">
            <text:p>0</text:p>
          </table:table-cell>
          <table:table-cell table:formula="of:=INDIRECT(&quot;Supplier_Lookup.&quot;&amp;[.X$4]&amp;[.$P58])" office:value-type="float" office:value="0" calcext:value-type="float">
            <text:p>0</text:p>
          </table:table-cell>
          <table:table-cell table:formula="of:=INDIRECT(&quot;Supplier_Lookup.&quot;&amp;[.Y$4]&amp;[.$P58])" office:value-type="float" office:value="0" calcext:value-type="float">
            <text:p>0</text:p>
          </table:table-cell>
          <table:table-cell table:formula="of:=IF(INDIRECT(&quot;Supplier_Lookup.&quot;&amp;[.Z$4]&amp;[.$P58])=&quot;&quot;;&quot;&quot;;INDIRECT(&quot;Supplier_Lookup.&quot;&amp;[.Z$4]&amp;[.$P58]))">
            <text:p/>
          </table:table-cell>
          <table:table-cell table:formula="of:=IF(ISNUMBER([.Y58]);[.Y58];0)" office:value-type="float" office:value="0" calcext:value-type="float">
            <text:p>0</text:p>
          </table:table-cell>
          <table:table-cell table:formula="of:=[.AA58]*[.O58]" office:value-type="float" office:value="0" calcext:value-type="float">
            <text:p>0</text:p>
          </table:table-cell>
          <table:table-cell table:formula="of:=[.N58]&amp;&quot;-&quot;&amp;[.R58]" office:value-type="string" office:string-value="" calcext:value-type="error">
            <text:p>#VALUE!</text:p>
          </table:table-cell>
          <table:table-cell table:formula="of:=[$CopyFromThing.A54]">
            <text:p/>
          </table:table-cell>
          <table:table-cell table:formula="of:=[$CopyFromThing.G54]">
            <text:p/>
          </table:table-cell>
        </table:table-row>
        <table:table-row table:style-name="ro1">
          <table:table-cell/>
          <table:table-cell table:formula="of:=[$CopyFromThing.I55]">
            <text:p/>
          </table:table-cell>
          <table:table-cell table:formula="of:=IF(ISNUMBER(SEARCH(&quot;R&quot;;[$CopyFromThing.A55]));&quot;R&quot;;&quot;&quot;)">
            <text:p/>
          </table:table-cell>
          <table:table-cell table:formula="of:=IF(ISNUMBER(SEARCH(&quot;C&quot;;[$CopyFromThing.A55]));&quot;C&quot;;&quot;&quot;)">
            <text:p/>
          </table:table-cell>
          <table:table-cell table:formula="of:=IF([.D59]&amp;[.C59]&lt;&gt;&quot;&quot;;[.N59];&quot;&quot;)">
            <text:p/>
          </table:table-cell>
          <table:table-cell table:style-name="ce13" table:formula="of:=[.C59]&amp;[.D59]&amp;[.E59]&amp;&quot;__&quot;&amp;[$CopyFromThing.I55]&amp;&quot;__&quot;&amp;[$CopyFromThing.B55]" office:value-type="string" office:string-value="____" calcext:value-type="string">
            <text:p>____</text:p>
          </table:table-cell>
          <table:table-cell table:formula="of:=[$CopyFromThing.D55]">
            <text:p/>
          </table:table-cell>
          <table:table-cell table:formula="of:=FIND(&quot;_&quot;;[.G59])" office:value-type="string" office:string-value="" calcext:value-type="error">
            <text:p>#VALUE!</text:p>
          </table:table-cell>
          <table:table-cell table:formula="of:=IF(ISNUMBER([.H59]);RIGHT([.G59];LEN([.G59])-[.H59]);RIGHT([.G59];LEN([.G59])-FIND(&quot;:&quot;;[.G59])))" office:value-type="string" office:string-value="" calcext:value-type="error">
            <text:p>#VALUE!</text:p>
          </table:table-cell>
          <table:table-cell table:style-name="ce16" table:formula="of:=MATCH([.I59];{&quot;0603&quot;;&quot;1206&quot;};0)" office:value-type="string" office:string-value="" calcext:value-type="error">
            <text:p>#VALUE!</text:p>
          </table:table-cell>
          <table:table-cell table:style-name="ce16" table:formula="of:=RIGHT([.G59];LEN([.G59])-FIND(&quot;:&quot;;[.G59]))" office:value-type="string" office:string-value="" calcext:value-type="error">
            <text:p>#VALUE!</text:p>
          </table:table-cell>
          <table:table-cell table:formula="of:=SEARCH(&quot;0603&quot;;[.G59])" office:value-type="string" office:string-value="" calcext:value-type="error">
            <text:p>#VALUE!</text:p>
          </table:table-cell>
          <table:table-cell table:formula="of:=SEARCH(&quot;1206&quot;;[.G59])" office:value-type="string" office:string-value="" calcext:value-type="error">
            <text:p>#VALUE!</text:p>
          </table:table-cell>
          <table:table-cell table:formula="of:=IF(ISNUMBER([.M59]);&quot;1206&quot;;IF(ISNUMBER([.L59]);&quot;0603&quot;;[.K59]))" office:value-type="string" office:string-value="" calcext:value-type="error">
            <text:p>#VALUE!</text:p>
          </table:table-cell>
          <table:table-cell table:formula="of:=IF(ISNUMBER([$CopyFromThing.E55]*1);[$CopyFromThing.E55]*1;0)" office:value-type="float" office:value="0" calcext:value-type="float">
            <text:p>0</text:p>
          </table:table-cell>
          <table:table-cell table:formula="of:=VLOOKUP([.F59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59])&lt;&gt;&quot;&quot;;INDIRECT(&quot;Supplier_Lookup.L&quot;&amp;[.$P59]);INDIRECT(&quot;Supplier_Lookup.&quot;&amp;[.Q$4]&amp;[.$P59]))" office:value-type="float" office:value="0" calcext:value-type="float">
            <text:p>0</text:p>
          </table:table-cell>
          <table:table-cell table:style-name="ce40" table:formula="of:=INDIRECT(&quot;Supplier_Lookup.&quot;&amp;[.R$4]&amp;[.$P59])" office:value-type="float" office:value="0" calcext:value-type="float">
            <text:p>0</text:p>
          </table:table-cell>
          <table:table-cell table:formula="of:=INDIRECT(&quot;Supplier_Lookup.&quot;&amp;[.S$4]&amp;[.$P59])" office:value-type="float" office:value="0" calcext:value-type="float">
            <text:p>0</text:p>
          </table:table-cell>
          <table:table-cell table:formula="of:=INDIRECT(&quot;Supplier_Lookup.&quot;&amp;[.T$4]&amp;[.$P59])" office:value-type="float" office:value="0" calcext:value-type="float">
            <text:p>0</text:p>
          </table:table-cell>
          <table:table-cell table:formula="of:=INDIRECT(&quot;Supplier_Lookup.&quot;&amp;[.U$4]&amp;[.$P59])" office:value-type="float" office:value="0" calcext:value-type="float">
            <text:p>0</text:p>
          </table:table-cell>
          <table:table-cell table:formula="of:=INDIRECT(&quot;Supplier_Lookup.&quot;&amp;[.V$4]&amp;[.$P59])" office:value-type="float" office:value="0" calcext:value-type="float">
            <text:p>0</text:p>
          </table:table-cell>
          <table:table-cell table:formula="of:=INDIRECT(&quot;Supplier_Lookup.&quot;&amp;[.W$4]&amp;[.$P59])" office:value-type="float" office:value="0" calcext:value-type="float">
            <text:p>0</text:p>
          </table:table-cell>
          <table:table-cell table:formula="of:=INDIRECT(&quot;Supplier_Lookup.&quot;&amp;[.X$4]&amp;[.$P59])" office:value-type="float" office:value="0" calcext:value-type="float">
            <text:p>0</text:p>
          </table:table-cell>
          <table:table-cell table:formula="of:=INDIRECT(&quot;Supplier_Lookup.&quot;&amp;[.Y$4]&amp;[.$P59])" office:value-type="float" office:value="0" calcext:value-type="float">
            <text:p>0</text:p>
          </table:table-cell>
          <table:table-cell table:formula="of:=IF(INDIRECT(&quot;Supplier_Lookup.&quot;&amp;[.Z$4]&amp;[.$P59])=&quot;&quot;;&quot;&quot;;INDIRECT(&quot;Supplier_Lookup.&quot;&amp;[.Z$4]&amp;[.$P59]))">
            <text:p/>
          </table:table-cell>
          <table:table-cell table:formula="of:=IF(ISNUMBER([.Y59]);[.Y59];0)" office:value-type="float" office:value="0" calcext:value-type="float">
            <text:p>0</text:p>
          </table:table-cell>
          <table:table-cell table:formula="of:=[.AA59]*[.O59]" office:value-type="float" office:value="0" calcext:value-type="float">
            <text:p>0</text:p>
          </table:table-cell>
          <table:table-cell table:formula="of:=[.N59]&amp;&quot;-&quot;&amp;[.R59]" office:value-type="string" office:string-value="" calcext:value-type="error">
            <text:p>#VALUE!</text:p>
          </table:table-cell>
          <table:table-cell table:formula="of:=[$CopyFromThing.A55]">
            <text:p/>
          </table:table-cell>
          <table:table-cell table:formula="of:=[$CopyFromThing.G55]">
            <text:p/>
          </table:table-cell>
        </table:table-row>
        <table:table-row table:style-name="ro1">
          <table:table-cell/>
          <table:table-cell table:formula="of:=[$CopyFromThing.I56]">
            <text:p/>
          </table:table-cell>
          <table:table-cell table:formula="of:=IF(ISNUMBER(SEARCH(&quot;R&quot;;[$CopyFromThing.A56]));&quot;R&quot;;&quot;&quot;)">
            <text:p/>
          </table:table-cell>
          <table:table-cell table:formula="of:=IF(ISNUMBER(SEARCH(&quot;C&quot;;[$CopyFromThing.A56]));&quot;C&quot;;&quot;&quot;)">
            <text:p/>
          </table:table-cell>
          <table:table-cell table:formula="of:=IF([.D60]&amp;[.C60]&lt;&gt;&quot;&quot;;[.N60];&quot;&quot;)">
            <text:p/>
          </table:table-cell>
          <table:table-cell table:style-name="ce13" table:formula="of:=[.C60]&amp;[.D60]&amp;[.E60]&amp;&quot;__&quot;&amp;[$CopyFromThing.I56]&amp;&quot;__&quot;&amp;[$CopyFromThing.B56]" office:value-type="string" office:string-value="____" calcext:value-type="string">
            <text:p>____</text:p>
          </table:table-cell>
          <table:table-cell table:formula="of:=[$CopyFromThing.D56]">
            <text:p/>
          </table:table-cell>
          <table:table-cell table:formula="of:=FIND(&quot;_&quot;;[.G60])" office:value-type="string" office:string-value="" calcext:value-type="error">
            <text:p>#VALUE!</text:p>
          </table:table-cell>
          <table:table-cell table:formula="of:=IF(ISNUMBER([.H60]);RIGHT([.G60];LEN([.G60])-[.H60]);RIGHT([.G60];LEN([.G60])-FIND(&quot;:&quot;;[.G60])))" office:value-type="string" office:string-value="" calcext:value-type="error">
            <text:p>#VALUE!</text:p>
          </table:table-cell>
          <table:table-cell table:style-name="ce16" table:formula="of:=MATCH([.I60];{&quot;0603&quot;;&quot;1206&quot;};0)" office:value-type="string" office:string-value="" calcext:value-type="error">
            <text:p>#VALUE!</text:p>
          </table:table-cell>
          <table:table-cell table:style-name="ce16" table:formula="of:=RIGHT([.G60];LEN([.G60])-FIND(&quot;:&quot;;[.G60]))" office:value-type="string" office:string-value="" calcext:value-type="error">
            <text:p>#VALUE!</text:p>
          </table:table-cell>
          <table:table-cell table:formula="of:=SEARCH(&quot;0603&quot;;[.G60])" office:value-type="string" office:string-value="" calcext:value-type="error">
            <text:p>#VALUE!</text:p>
          </table:table-cell>
          <table:table-cell table:formula="of:=SEARCH(&quot;1206&quot;;[.G60])" office:value-type="string" office:string-value="" calcext:value-type="error">
            <text:p>#VALUE!</text:p>
          </table:table-cell>
          <table:table-cell table:formula="of:=IF(ISNUMBER([.M60]);&quot;1206&quot;;IF(ISNUMBER([.L60]);&quot;0603&quot;;[.K60]))" office:value-type="string" office:string-value="" calcext:value-type="error">
            <text:p>#VALUE!</text:p>
          </table:table-cell>
          <table:table-cell table:formula="of:=IF(ISNUMBER([$CopyFromThing.E56]*1);[$CopyFromThing.E56]*1;0)" office:value-type="float" office:value="0" calcext:value-type="float">
            <text:p>0</text:p>
          </table:table-cell>
          <table:table-cell table:formula="of:=VLOOKUP([.F60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0])&lt;&gt;&quot;&quot;;INDIRECT(&quot;Supplier_Lookup.L&quot;&amp;[.$P60]);INDIRECT(&quot;Supplier_Lookup.&quot;&amp;[.Q$4]&amp;[.$P60]))" office:value-type="float" office:value="0" calcext:value-type="float">
            <text:p>0</text:p>
          </table:table-cell>
          <table:table-cell table:style-name="ce40" table:formula="of:=INDIRECT(&quot;Supplier_Lookup.&quot;&amp;[.R$4]&amp;[.$P60])" office:value-type="float" office:value="0" calcext:value-type="float">
            <text:p>0</text:p>
          </table:table-cell>
          <table:table-cell table:formula="of:=INDIRECT(&quot;Supplier_Lookup.&quot;&amp;[.S$4]&amp;[.$P60])" office:value-type="float" office:value="0" calcext:value-type="float">
            <text:p>0</text:p>
          </table:table-cell>
          <table:table-cell table:formula="of:=INDIRECT(&quot;Supplier_Lookup.&quot;&amp;[.T$4]&amp;[.$P60])" office:value-type="float" office:value="0" calcext:value-type="float">
            <text:p>0</text:p>
          </table:table-cell>
          <table:table-cell table:formula="of:=INDIRECT(&quot;Supplier_Lookup.&quot;&amp;[.U$4]&amp;[.$P60])" office:value-type="float" office:value="0" calcext:value-type="float">
            <text:p>0</text:p>
          </table:table-cell>
          <table:table-cell table:formula="of:=INDIRECT(&quot;Supplier_Lookup.&quot;&amp;[.V$4]&amp;[.$P60])" office:value-type="float" office:value="0" calcext:value-type="float">
            <text:p>0</text:p>
          </table:table-cell>
          <table:table-cell table:formula="of:=INDIRECT(&quot;Supplier_Lookup.&quot;&amp;[.W$4]&amp;[.$P60])" office:value-type="float" office:value="0" calcext:value-type="float">
            <text:p>0</text:p>
          </table:table-cell>
          <table:table-cell table:formula="of:=INDIRECT(&quot;Supplier_Lookup.&quot;&amp;[.X$4]&amp;[.$P60])" office:value-type="float" office:value="0" calcext:value-type="float">
            <text:p>0</text:p>
          </table:table-cell>
          <table:table-cell table:formula="of:=INDIRECT(&quot;Supplier_Lookup.&quot;&amp;[.Y$4]&amp;[.$P60])" office:value-type="float" office:value="0" calcext:value-type="float">
            <text:p>0</text:p>
          </table:table-cell>
          <table:table-cell table:formula="of:=IF(INDIRECT(&quot;Supplier_Lookup.&quot;&amp;[.Z$4]&amp;[.$P60])=&quot;&quot;;&quot;&quot;;INDIRECT(&quot;Supplier_Lookup.&quot;&amp;[.Z$4]&amp;[.$P60]))">
            <text:p/>
          </table:table-cell>
          <table:table-cell table:formula="of:=IF(ISNUMBER([.Y60]);[.Y60];0)" office:value-type="float" office:value="0" calcext:value-type="float">
            <text:p>0</text:p>
          </table:table-cell>
          <table:table-cell table:formula="of:=[.AA60]*[.O60]" office:value-type="float" office:value="0" calcext:value-type="float">
            <text:p>0</text:p>
          </table:table-cell>
          <table:table-cell table:formula="of:=[.N60]&amp;&quot;-&quot;&amp;[.R60]" office:value-type="string" office:string-value="" calcext:value-type="error">
            <text:p>#VALUE!</text:p>
          </table:table-cell>
          <table:table-cell table:formula="of:=[$CopyFromThing.A56]">
            <text:p/>
          </table:table-cell>
          <table:table-cell table:formula="of:=[$CopyFromThing.G56]">
            <text:p/>
          </table:table-cell>
        </table:table-row>
        <table:table-row table:style-name="ro1">
          <table:table-cell/>
          <table:table-cell table:formula="of:=[$CopyFromThing.I57]">
            <text:p/>
          </table:table-cell>
          <table:table-cell table:formula="of:=IF(ISNUMBER(SEARCH(&quot;R&quot;;[$CopyFromThing.A57]));&quot;R&quot;;&quot;&quot;)">
            <text:p/>
          </table:table-cell>
          <table:table-cell table:formula="of:=IF(ISNUMBER(SEARCH(&quot;C&quot;;[$CopyFromThing.A57]));&quot;C&quot;;&quot;&quot;)">
            <text:p/>
          </table:table-cell>
          <table:table-cell table:formula="of:=IF([.D61]&amp;[.C61]&lt;&gt;&quot;&quot;;[.N61];&quot;&quot;)">
            <text:p/>
          </table:table-cell>
          <table:table-cell table:style-name="ce13" table:formula="of:=[.C61]&amp;[.D61]&amp;[.E61]&amp;&quot;__&quot;&amp;[$CopyFromThing.I57]&amp;&quot;__&quot;&amp;[$CopyFromThing.B57]" office:value-type="string" office:string-value="____" calcext:value-type="string">
            <text:p>____</text:p>
          </table:table-cell>
          <table:table-cell table:formula="of:=[$CopyFromThing.D57]">
            <text:p/>
          </table:table-cell>
          <table:table-cell table:formula="of:=FIND(&quot;_&quot;;[.G61])" office:value-type="string" office:string-value="" calcext:value-type="error">
            <text:p>#VALUE!</text:p>
          </table:table-cell>
          <table:table-cell table:formula="of:=IF(ISNUMBER([.H61]);RIGHT([.G61];LEN([.G61])-[.H61]);RIGHT([.G61];LEN([.G61])-FIND(&quot;:&quot;;[.G61])))" office:value-type="string" office:string-value="" calcext:value-type="error">
            <text:p>#VALUE!</text:p>
          </table:table-cell>
          <table:table-cell table:style-name="ce16" table:formula="of:=MATCH([.I61];{&quot;0603&quot;;&quot;1206&quot;};0)" office:value-type="string" office:string-value="" calcext:value-type="error">
            <text:p>#VALUE!</text:p>
          </table:table-cell>
          <table:table-cell table:style-name="ce16" table:formula="of:=RIGHT([.G61];LEN([.G61])-FIND(&quot;:&quot;;[.G61]))" office:value-type="string" office:string-value="" calcext:value-type="error">
            <text:p>#VALUE!</text:p>
          </table:table-cell>
          <table:table-cell table:formula="of:=SEARCH(&quot;0603&quot;;[.G61])" office:value-type="string" office:string-value="" calcext:value-type="error">
            <text:p>#VALUE!</text:p>
          </table:table-cell>
          <table:table-cell table:formula="of:=SEARCH(&quot;1206&quot;;[.G61])" office:value-type="string" office:string-value="" calcext:value-type="error">
            <text:p>#VALUE!</text:p>
          </table:table-cell>
          <table:table-cell table:formula="of:=IF(ISNUMBER([.M61]);&quot;1206&quot;;IF(ISNUMBER([.L61]);&quot;0603&quot;;[.K61]))" office:value-type="string" office:string-value="" calcext:value-type="error">
            <text:p>#VALUE!</text:p>
          </table:table-cell>
          <table:table-cell table:formula="of:=IF(ISNUMBER([$CopyFromThing.E57]*1);[$CopyFromThing.E57]*1;0)" office:value-type="float" office:value="0" calcext:value-type="float">
            <text:p>0</text:p>
          </table:table-cell>
          <table:table-cell table:formula="of:=VLOOKUP([.F61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1])&lt;&gt;&quot;&quot;;INDIRECT(&quot;Supplier_Lookup.L&quot;&amp;[.$P61]);INDIRECT(&quot;Supplier_Lookup.&quot;&amp;[.Q$4]&amp;[.$P61]))" office:value-type="float" office:value="0" calcext:value-type="float">
            <text:p>0</text:p>
          </table:table-cell>
          <table:table-cell table:style-name="ce40" table:formula="of:=INDIRECT(&quot;Supplier_Lookup.&quot;&amp;[.R$4]&amp;[.$P61])" office:value-type="float" office:value="0" calcext:value-type="float">
            <text:p>0</text:p>
          </table:table-cell>
          <table:table-cell table:formula="of:=INDIRECT(&quot;Supplier_Lookup.&quot;&amp;[.S$4]&amp;[.$P61])" office:value-type="float" office:value="0" calcext:value-type="float">
            <text:p>0</text:p>
          </table:table-cell>
          <table:table-cell table:formula="of:=INDIRECT(&quot;Supplier_Lookup.&quot;&amp;[.T$4]&amp;[.$P61])" office:value-type="float" office:value="0" calcext:value-type="float">
            <text:p>0</text:p>
          </table:table-cell>
          <table:table-cell table:formula="of:=INDIRECT(&quot;Supplier_Lookup.&quot;&amp;[.U$4]&amp;[.$P61])" office:value-type="float" office:value="0" calcext:value-type="float">
            <text:p>0</text:p>
          </table:table-cell>
          <table:table-cell table:formula="of:=INDIRECT(&quot;Supplier_Lookup.&quot;&amp;[.V$4]&amp;[.$P61])" office:value-type="float" office:value="0" calcext:value-type="float">
            <text:p>0</text:p>
          </table:table-cell>
          <table:table-cell table:formula="of:=INDIRECT(&quot;Supplier_Lookup.&quot;&amp;[.W$4]&amp;[.$P61])" office:value-type="float" office:value="0" calcext:value-type="float">
            <text:p>0</text:p>
          </table:table-cell>
          <table:table-cell table:formula="of:=INDIRECT(&quot;Supplier_Lookup.&quot;&amp;[.X$4]&amp;[.$P61])" office:value-type="float" office:value="0" calcext:value-type="float">
            <text:p>0</text:p>
          </table:table-cell>
          <table:table-cell table:formula="of:=INDIRECT(&quot;Supplier_Lookup.&quot;&amp;[.Y$4]&amp;[.$P61])" office:value-type="float" office:value="0" calcext:value-type="float">
            <text:p>0</text:p>
          </table:table-cell>
          <table:table-cell table:formula="of:=IF(INDIRECT(&quot;Supplier_Lookup.&quot;&amp;[.Z$4]&amp;[.$P61])=&quot;&quot;;&quot;&quot;;INDIRECT(&quot;Supplier_Lookup.&quot;&amp;[.Z$4]&amp;[.$P61]))">
            <text:p/>
          </table:table-cell>
          <table:table-cell table:formula="of:=IF(ISNUMBER([.Y61]);[.Y61];0)" office:value-type="float" office:value="0" calcext:value-type="float">
            <text:p>0</text:p>
          </table:table-cell>
          <table:table-cell table:formula="of:=[.AA61]*[.O61]" office:value-type="float" office:value="0" calcext:value-type="float">
            <text:p>0</text:p>
          </table:table-cell>
          <table:table-cell table:formula="of:=[.N61]&amp;&quot;-&quot;&amp;[.R61]" office:value-type="string" office:string-value="" calcext:value-type="error">
            <text:p>#VALUE!</text:p>
          </table:table-cell>
          <table:table-cell table:formula="of:=[$CopyFromThing.A57]">
            <text:p/>
          </table:table-cell>
          <table:table-cell table:formula="of:=[$CopyFromThing.G57]">
            <text:p/>
          </table:table-cell>
        </table:table-row>
        <table:table-row table:style-name="ro1">
          <table:table-cell/>
          <table:table-cell table:formula="of:=[$CopyFromThing.I58]">
            <text:p/>
          </table:table-cell>
          <table:table-cell table:formula="of:=IF(ISNUMBER(SEARCH(&quot;R&quot;;[$CopyFromThing.A58]));&quot;R&quot;;&quot;&quot;)">
            <text:p/>
          </table:table-cell>
          <table:table-cell table:formula="of:=IF(ISNUMBER(SEARCH(&quot;C&quot;;[$CopyFromThing.A58]));&quot;C&quot;;&quot;&quot;)">
            <text:p/>
          </table:table-cell>
          <table:table-cell table:formula="of:=IF([.D62]&amp;[.C62]&lt;&gt;&quot;&quot;;[.N62];&quot;&quot;)">
            <text:p/>
          </table:table-cell>
          <table:table-cell table:style-name="ce13" table:formula="of:=[.C62]&amp;[.D62]&amp;[.E62]&amp;&quot;__&quot;&amp;[$CopyFromThing.I58]&amp;&quot;__&quot;&amp;[$CopyFromThing.B58]" office:value-type="string" office:string-value="____" calcext:value-type="string">
            <text:p>____</text:p>
          </table:table-cell>
          <table:table-cell table:formula="of:=[$CopyFromThing.D58]">
            <text:p/>
          </table:table-cell>
          <table:table-cell table:formula="of:=FIND(&quot;_&quot;;[.G62])" office:value-type="string" office:string-value="" calcext:value-type="error">
            <text:p>#VALUE!</text:p>
          </table:table-cell>
          <table:table-cell table:formula="of:=IF(ISNUMBER([.H62]);RIGHT([.G62];LEN([.G62])-[.H62]);RIGHT([.G62];LEN([.G62])-FIND(&quot;:&quot;;[.G62])))" office:value-type="string" office:string-value="" calcext:value-type="error">
            <text:p>#VALUE!</text:p>
          </table:table-cell>
          <table:table-cell table:style-name="ce16" table:formula="of:=MATCH([.I62];{&quot;0603&quot;;&quot;1206&quot;};0)" office:value-type="string" office:string-value="" calcext:value-type="error">
            <text:p>#VALUE!</text:p>
          </table:table-cell>
          <table:table-cell table:style-name="ce16" table:formula="of:=RIGHT([.G62];LEN([.G62])-FIND(&quot;:&quot;;[.G62]))" office:value-type="string" office:string-value="" calcext:value-type="error">
            <text:p>#VALUE!</text:p>
          </table:table-cell>
          <table:table-cell table:formula="of:=SEARCH(&quot;0603&quot;;[.G62])" office:value-type="string" office:string-value="" calcext:value-type="error">
            <text:p>#VALUE!</text:p>
          </table:table-cell>
          <table:table-cell table:formula="of:=SEARCH(&quot;1206&quot;;[.G62])" office:value-type="string" office:string-value="" calcext:value-type="error">
            <text:p>#VALUE!</text:p>
          </table:table-cell>
          <table:table-cell table:formula="of:=IF(ISNUMBER([.M62]);&quot;1206&quot;;IF(ISNUMBER([.L62]);&quot;0603&quot;;[.K62]))" office:value-type="string" office:string-value="" calcext:value-type="error">
            <text:p>#VALUE!</text:p>
          </table:table-cell>
          <table:table-cell table:formula="of:=IF(ISNUMBER([$CopyFromThing.E58]*1);[$CopyFromThing.E58]*1;0)" office:value-type="float" office:value="0" calcext:value-type="float">
            <text:p>0</text:p>
          </table:table-cell>
          <table:table-cell table:formula="of:=VLOOKUP([.F62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2])&lt;&gt;&quot;&quot;;INDIRECT(&quot;Supplier_Lookup.L&quot;&amp;[.$P62]);INDIRECT(&quot;Supplier_Lookup.&quot;&amp;[.Q$4]&amp;[.$P62]))" office:value-type="float" office:value="0" calcext:value-type="float">
            <text:p>0</text:p>
          </table:table-cell>
          <table:table-cell table:style-name="ce40" table:formula="of:=INDIRECT(&quot;Supplier_Lookup.&quot;&amp;[.R$4]&amp;[.$P62])" office:value-type="float" office:value="0" calcext:value-type="float">
            <text:p>0</text:p>
          </table:table-cell>
          <table:table-cell table:formula="of:=INDIRECT(&quot;Supplier_Lookup.&quot;&amp;[.S$4]&amp;[.$P62])" office:value-type="float" office:value="0" calcext:value-type="float">
            <text:p>0</text:p>
          </table:table-cell>
          <table:table-cell table:formula="of:=INDIRECT(&quot;Supplier_Lookup.&quot;&amp;[.T$4]&amp;[.$P62])" office:value-type="float" office:value="0" calcext:value-type="float">
            <text:p>0</text:p>
          </table:table-cell>
          <table:table-cell table:formula="of:=INDIRECT(&quot;Supplier_Lookup.&quot;&amp;[.U$4]&amp;[.$P62])" office:value-type="float" office:value="0" calcext:value-type="float">
            <text:p>0</text:p>
          </table:table-cell>
          <table:table-cell table:formula="of:=INDIRECT(&quot;Supplier_Lookup.&quot;&amp;[.V$4]&amp;[.$P62])" office:value-type="float" office:value="0" calcext:value-type="float">
            <text:p>0</text:p>
          </table:table-cell>
          <table:table-cell table:formula="of:=INDIRECT(&quot;Supplier_Lookup.&quot;&amp;[.W$4]&amp;[.$P62])" office:value-type="float" office:value="0" calcext:value-type="float">
            <text:p>0</text:p>
          </table:table-cell>
          <table:table-cell table:formula="of:=INDIRECT(&quot;Supplier_Lookup.&quot;&amp;[.X$4]&amp;[.$P62])" office:value-type="float" office:value="0" calcext:value-type="float">
            <text:p>0</text:p>
          </table:table-cell>
          <table:table-cell table:formula="of:=INDIRECT(&quot;Supplier_Lookup.&quot;&amp;[.Y$4]&amp;[.$P62])" office:value-type="float" office:value="0" calcext:value-type="float">
            <text:p>0</text:p>
          </table:table-cell>
          <table:table-cell table:formula="of:=IF(INDIRECT(&quot;Supplier_Lookup.&quot;&amp;[.Z$4]&amp;[.$P62])=&quot;&quot;;&quot;&quot;;INDIRECT(&quot;Supplier_Lookup.&quot;&amp;[.Z$4]&amp;[.$P62]))">
            <text:p/>
          </table:table-cell>
          <table:table-cell table:formula="of:=IF(ISNUMBER([.Y62]);[.Y62];0)" office:value-type="float" office:value="0" calcext:value-type="float">
            <text:p>0</text:p>
          </table:table-cell>
          <table:table-cell table:formula="of:=[.AA62]*[.O62]" office:value-type="float" office:value="0" calcext:value-type="float">
            <text:p>0</text:p>
          </table:table-cell>
          <table:table-cell table:formula="of:=[.N62]&amp;&quot;-&quot;&amp;[.R62]" office:value-type="string" office:string-value="" calcext:value-type="error">
            <text:p>#VALUE!</text:p>
          </table:table-cell>
          <table:table-cell table:formula="of:=[$CopyFromThing.A58]">
            <text:p/>
          </table:table-cell>
          <table:table-cell table:formula="of:=[$CopyFromThing.G58]">
            <text:p/>
          </table:table-cell>
        </table:table-row>
        <table:table-row table:style-name="ro1">
          <table:table-cell/>
          <table:table-cell table:formula="of:=[$CopyFromThing.I59]">
            <text:p/>
          </table:table-cell>
          <table:table-cell table:formula="of:=IF(ISNUMBER(SEARCH(&quot;R&quot;;[$CopyFromThing.A59]));&quot;R&quot;;&quot;&quot;)">
            <text:p/>
          </table:table-cell>
          <table:table-cell table:formula="of:=IF(ISNUMBER(SEARCH(&quot;C&quot;;[$CopyFromThing.A59]));&quot;C&quot;;&quot;&quot;)">
            <text:p/>
          </table:table-cell>
          <table:table-cell table:formula="of:=IF([.D63]&amp;[.C63]&lt;&gt;&quot;&quot;;[.N63];&quot;&quot;)">
            <text:p/>
          </table:table-cell>
          <table:table-cell table:style-name="ce13" table:formula="of:=[.C63]&amp;[.D63]&amp;[.E63]&amp;&quot;__&quot;&amp;[$CopyFromThing.I59]&amp;&quot;__&quot;&amp;[$CopyFromThing.B59]" office:value-type="string" office:string-value="____" calcext:value-type="string">
            <text:p>____</text:p>
          </table:table-cell>
          <table:table-cell table:formula="of:=[$CopyFromThing.D59]">
            <text:p/>
          </table:table-cell>
          <table:table-cell table:formula="of:=FIND(&quot;_&quot;;[.G63])" office:value-type="string" office:string-value="" calcext:value-type="error">
            <text:p>#VALUE!</text:p>
          </table:table-cell>
          <table:table-cell table:formula="of:=IF(ISNUMBER([.H63]);RIGHT([.G63];LEN([.G63])-[.H63]);RIGHT([.G63];LEN([.G63])-FIND(&quot;:&quot;;[.G63])))" office:value-type="string" office:string-value="" calcext:value-type="error">
            <text:p>#VALUE!</text:p>
          </table:table-cell>
          <table:table-cell table:style-name="ce16" table:formula="of:=MATCH([.I63];{&quot;0603&quot;;&quot;1206&quot;};0)" office:value-type="string" office:string-value="" calcext:value-type="error">
            <text:p>#VALUE!</text:p>
          </table:table-cell>
          <table:table-cell table:style-name="ce16" table:formula="of:=RIGHT([.G63];LEN([.G63])-FIND(&quot;:&quot;;[.G63]))" office:value-type="string" office:string-value="" calcext:value-type="error">
            <text:p>#VALUE!</text:p>
          </table:table-cell>
          <table:table-cell table:formula="of:=SEARCH(&quot;0603&quot;;[.G63])" office:value-type="string" office:string-value="" calcext:value-type="error">
            <text:p>#VALUE!</text:p>
          </table:table-cell>
          <table:table-cell table:formula="of:=SEARCH(&quot;1206&quot;;[.G63])" office:value-type="string" office:string-value="" calcext:value-type="error">
            <text:p>#VALUE!</text:p>
          </table:table-cell>
          <table:table-cell table:formula="of:=IF(ISNUMBER([.M63]);&quot;1206&quot;;IF(ISNUMBER([.L63]);&quot;0603&quot;;[.K63]))" office:value-type="string" office:string-value="" calcext:value-type="error">
            <text:p>#VALUE!</text:p>
          </table:table-cell>
          <table:table-cell table:formula="of:=IF(ISNUMBER([$CopyFromThing.E59]*1);[$CopyFromThing.E59]*1;0)" office:value-type="float" office:value="0" calcext:value-type="float">
            <text:p>0</text:p>
          </table:table-cell>
          <table:table-cell table:formula="of:=VLOOKUP([.F63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3])&lt;&gt;&quot;&quot;;INDIRECT(&quot;Supplier_Lookup.L&quot;&amp;[.$P63]);INDIRECT(&quot;Supplier_Lookup.&quot;&amp;[.Q$4]&amp;[.$P63]))" office:value-type="float" office:value="0" calcext:value-type="float">
            <text:p>0</text:p>
          </table:table-cell>
          <table:table-cell table:style-name="ce40" table:formula="of:=INDIRECT(&quot;Supplier_Lookup.&quot;&amp;[.R$4]&amp;[.$P63])" office:value-type="float" office:value="0" calcext:value-type="float">
            <text:p>0</text:p>
          </table:table-cell>
          <table:table-cell table:formula="of:=INDIRECT(&quot;Supplier_Lookup.&quot;&amp;[.S$4]&amp;[.$P63])" office:value-type="float" office:value="0" calcext:value-type="float">
            <text:p>0</text:p>
          </table:table-cell>
          <table:table-cell table:formula="of:=INDIRECT(&quot;Supplier_Lookup.&quot;&amp;[.T$4]&amp;[.$P63])" office:value-type="float" office:value="0" calcext:value-type="float">
            <text:p>0</text:p>
          </table:table-cell>
          <table:table-cell table:formula="of:=INDIRECT(&quot;Supplier_Lookup.&quot;&amp;[.U$4]&amp;[.$P63])" office:value-type="float" office:value="0" calcext:value-type="float">
            <text:p>0</text:p>
          </table:table-cell>
          <table:table-cell table:formula="of:=INDIRECT(&quot;Supplier_Lookup.&quot;&amp;[.V$4]&amp;[.$P63])" office:value-type="float" office:value="0" calcext:value-type="float">
            <text:p>0</text:p>
          </table:table-cell>
          <table:table-cell table:formula="of:=INDIRECT(&quot;Supplier_Lookup.&quot;&amp;[.W$4]&amp;[.$P63])" office:value-type="float" office:value="0" calcext:value-type="float">
            <text:p>0</text:p>
          </table:table-cell>
          <table:table-cell table:formula="of:=INDIRECT(&quot;Supplier_Lookup.&quot;&amp;[.X$4]&amp;[.$P63])" office:value-type="float" office:value="0" calcext:value-type="float">
            <text:p>0</text:p>
          </table:table-cell>
          <table:table-cell table:formula="of:=INDIRECT(&quot;Supplier_Lookup.&quot;&amp;[.Y$4]&amp;[.$P63])" office:value-type="float" office:value="0" calcext:value-type="float">
            <text:p>0</text:p>
          </table:table-cell>
          <table:table-cell table:formula="of:=IF(INDIRECT(&quot;Supplier_Lookup.&quot;&amp;[.Z$4]&amp;[.$P63])=&quot;&quot;;&quot;&quot;;INDIRECT(&quot;Supplier_Lookup.&quot;&amp;[.Z$4]&amp;[.$P63]))">
            <text:p/>
          </table:table-cell>
          <table:table-cell table:formula="of:=IF(ISNUMBER([.Y63]);[.Y63];0)" office:value-type="float" office:value="0" calcext:value-type="float">
            <text:p>0</text:p>
          </table:table-cell>
          <table:table-cell table:formula="of:=[.AA63]*[.O63]" office:value-type="float" office:value="0" calcext:value-type="float">
            <text:p>0</text:p>
          </table:table-cell>
          <table:table-cell table:formula="of:=[.N63]&amp;&quot;-&quot;&amp;[.R63]" office:value-type="string" office:string-value="" calcext:value-type="error">
            <text:p>#VALUE!</text:p>
          </table:table-cell>
          <table:table-cell table:formula="of:=[$CopyFromThing.A59]">
            <text:p/>
          </table:table-cell>
          <table:table-cell table:formula="of:=[$CopyFromThing.G59]">
            <text:p/>
          </table:table-cell>
        </table:table-row>
        <table:table-row table:style-name="ro1">
          <table:table-cell/>
          <table:table-cell table:formula="of:=[$CopyFromThing.I60]" office:value-type="float" office:value="0" calcext:value-type="float">
            <text:p>0</text:p>
          </table:table-cell>
          <table:table-cell table:formula="of:=IF(ISNUMBER(SEARCH(&quot;R&quot;;[$CopyFromThing.A60]));&quot;R&quot;;&quot;&quot;)">
            <text:p/>
          </table:table-cell>
          <table:table-cell table:formula="of:=IF(ISNUMBER(SEARCH(&quot;C&quot;;[$CopyFromThing.A60]));&quot;C&quot;;&quot;&quot;)">
            <text:p/>
          </table:table-cell>
          <table:table-cell table:formula="of:=IF([.D64]&amp;[.C64]&lt;&gt;&quot;&quot;;[.N64];&quot;&quot;)">
            <text:p/>
          </table:table-cell>
          <table:table-cell table:style-name="ce13" table:formula="of:=[.C64]&amp;[.D64]&amp;[.E64]&amp;&quot;__&quot;&amp;[$CopyFromThing.I60]&amp;&quot;__&quot;&amp;[$CopyFromThing.B60]" office:value-type="string" office:string-value="____" calcext:value-type="string">
            <text:p>____</text:p>
          </table:table-cell>
          <table:table-cell table:formula="of:=[$CopyFromThing.D60]" office:value-type="float" office:value="0" calcext:value-type="float">
            <text:p>0</text:p>
          </table:table-cell>
          <table:table-cell table:formula="of:=FIND(&quot;_&quot;;[.G64])" office:value-type="string" office:string-value="" calcext:value-type="error">
            <text:p>#VALUE!</text:p>
          </table:table-cell>
          <table:table-cell table:formula="of:=IF(ISNUMBER([.H64]);RIGHT([.G64];LEN([.G64])-[.H64]);RIGHT([.G64];LEN([.G64])-FIND(&quot;:&quot;;[.G64])))" office:value-type="string" office:string-value="" calcext:value-type="error">
            <text:p>#VALUE!</text:p>
          </table:table-cell>
          <table:table-cell table:style-name="ce16" table:formula="of:=MATCH([.I64];{&quot;0603&quot;;&quot;1206&quot;};0)" office:value-type="string" office:string-value="" calcext:value-type="error">
            <text:p>#VALUE!</text:p>
          </table:table-cell>
          <table:table-cell table:style-name="ce16" table:formula="of:=RIGHT([.G64];LEN([.G64])-FIND(&quot;:&quot;;[.G64]))" office:value-type="string" office:string-value="" calcext:value-type="error">
            <text:p>#VALUE!</text:p>
          </table:table-cell>
          <table:table-cell table:formula="of:=SEARCH(&quot;0603&quot;;[.G64])" office:value-type="string" office:string-value="" calcext:value-type="error">
            <text:p>#VALUE!</text:p>
          </table:table-cell>
          <table:table-cell table:formula="of:=SEARCH(&quot;1206&quot;;[.G64])" office:value-type="string" office:string-value="" calcext:value-type="error">
            <text:p>#VALUE!</text:p>
          </table:table-cell>
          <table:table-cell table:formula="of:=IF(ISNUMBER([.M64]);&quot;1206&quot;;IF(ISNUMBER([.L64]);&quot;0603&quot;;[.K64]))" office:value-type="string" office:string-value="" calcext:value-type="error">
            <text:p>#VALUE!</text:p>
          </table:table-cell>
          <table:table-cell table:formula="of:=IF(ISNUMBER([$CopyFromThing.E60]*1);[$CopyFromThing.E60]*1;0)" office:value-type="float" office:value="0" calcext:value-type="float">
            <text:p>0</text:p>
          </table:table-cell>
          <table:table-cell table:formula="of:=VLOOKUP([.F64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4])&lt;&gt;&quot;&quot;;INDIRECT(&quot;Supplier_Lookup.L&quot;&amp;[.$P64]);INDIRECT(&quot;Supplier_Lookup.&quot;&amp;[.Q$4]&amp;[.$P64]))" office:value-type="float" office:value="0" calcext:value-type="float">
            <text:p>0</text:p>
          </table:table-cell>
          <table:table-cell table:style-name="ce40" table:formula="of:=INDIRECT(&quot;Supplier_Lookup.&quot;&amp;[.R$4]&amp;[.$P64])" office:value-type="float" office:value="0" calcext:value-type="float">
            <text:p>0</text:p>
          </table:table-cell>
          <table:table-cell table:formula="of:=INDIRECT(&quot;Supplier_Lookup.&quot;&amp;[.S$4]&amp;[.$P64])" office:value-type="float" office:value="0" calcext:value-type="float">
            <text:p>0</text:p>
          </table:table-cell>
          <table:table-cell table:formula="of:=INDIRECT(&quot;Supplier_Lookup.&quot;&amp;[.T$4]&amp;[.$P64])" office:value-type="float" office:value="0" calcext:value-type="float">
            <text:p>0</text:p>
          </table:table-cell>
          <table:table-cell table:formula="of:=INDIRECT(&quot;Supplier_Lookup.&quot;&amp;[.U$4]&amp;[.$P64])" office:value-type="float" office:value="0" calcext:value-type="float">
            <text:p>0</text:p>
          </table:table-cell>
          <table:table-cell table:formula="of:=INDIRECT(&quot;Supplier_Lookup.&quot;&amp;[.V$4]&amp;[.$P64])" office:value-type="float" office:value="0" calcext:value-type="float">
            <text:p>0</text:p>
          </table:table-cell>
          <table:table-cell table:formula="of:=INDIRECT(&quot;Supplier_Lookup.&quot;&amp;[.W$4]&amp;[.$P64])" office:value-type="float" office:value="0" calcext:value-type="float">
            <text:p>0</text:p>
          </table:table-cell>
          <table:table-cell table:formula="of:=INDIRECT(&quot;Supplier_Lookup.&quot;&amp;[.X$4]&amp;[.$P64])" office:value-type="float" office:value="0" calcext:value-type="float">
            <text:p>0</text:p>
          </table:table-cell>
          <table:table-cell table:formula="of:=INDIRECT(&quot;Supplier_Lookup.&quot;&amp;[.Y$4]&amp;[.$P64])" office:value-type="float" office:value="0" calcext:value-type="float">
            <text:p>0</text:p>
          </table:table-cell>
          <table:table-cell table:formula="of:=IF(INDIRECT(&quot;Supplier_Lookup.&quot;&amp;[.Z$4]&amp;[.$P64])=&quot;&quot;;&quot;&quot;;INDIRECT(&quot;Supplier_Lookup.&quot;&amp;[.Z$4]&amp;[.$P64]))">
            <text:p/>
          </table:table-cell>
          <table:table-cell table:formula="of:=IF(ISNUMBER([.Y64]);[.Y64];0)" office:value-type="float" office:value="0" calcext:value-type="float">
            <text:p>0</text:p>
          </table:table-cell>
          <table:table-cell table:formula="of:=[.AA64]*[.O64]" office:value-type="float" office:value="0" calcext:value-type="float">
            <text:p>0</text:p>
          </table:table-cell>
          <table:table-cell table:formula="of:=[.N64]&amp;&quot;-&quot;&amp;[.R64]" office:value-type="string" office:string-value="" calcext:value-type="error">
            <text:p>#VALUE!</text:p>
          </table:table-cell>
          <table:table-cell table:formula="of:=[$CopyFromThing.A60]" office:value-type="float" office:value="0" calcext:value-type="float">
            <text:p>0</text:p>
          </table:table-cell>
          <table:table-cell table:formula="of:=[$CopyFromThing.G6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1]" office:value-type="float" office:value="0" calcext:value-type="float">
            <text:p>0</text:p>
          </table:table-cell>
          <table:table-cell table:formula="of:=IF(ISNUMBER(SEARCH(&quot;R&quot;;[$CopyFromThing.A61]));&quot;R&quot;;&quot;&quot;)">
            <text:p/>
          </table:table-cell>
          <table:table-cell table:formula="of:=IF(ISNUMBER(SEARCH(&quot;C&quot;;[$CopyFromThing.A61]));&quot;C&quot;;&quot;&quot;)">
            <text:p/>
          </table:table-cell>
          <table:table-cell table:formula="of:=IF([.D65]&amp;[.C65]&lt;&gt;&quot;&quot;;[.N65];&quot;&quot;)">
            <text:p/>
          </table:table-cell>
          <table:table-cell table:style-name="ce13" table:formula="of:=[.C65]&amp;[.D65]&amp;[.E65]&amp;&quot;__&quot;&amp;[$CopyFromThing.I61]&amp;&quot;__&quot;&amp;[$CopyFromThing.B61]" office:value-type="string" office:string-value="____" calcext:value-type="string">
            <text:p>____</text:p>
          </table:table-cell>
          <table:table-cell table:formula="of:=[$CopyFromThing.D61]" office:value-type="float" office:value="0" calcext:value-type="float">
            <text:p>0</text:p>
          </table:table-cell>
          <table:table-cell table:formula="of:=FIND(&quot;_&quot;;[.G65])" office:value-type="string" office:string-value="" calcext:value-type="error">
            <text:p>#VALUE!</text:p>
          </table:table-cell>
          <table:table-cell table:formula="of:=IF(ISNUMBER([.H65]);RIGHT([.G65];LEN([.G65])-[.H65]);RIGHT([.G65];LEN([.G65])-FIND(&quot;:&quot;;[.G65])))" office:value-type="string" office:string-value="" calcext:value-type="error">
            <text:p>#VALUE!</text:p>
          </table:table-cell>
          <table:table-cell table:style-name="ce16" table:formula="of:=MATCH([.I65];{&quot;0603&quot;;&quot;1206&quot;};0)" office:value-type="string" office:string-value="" calcext:value-type="error">
            <text:p>#VALUE!</text:p>
          </table:table-cell>
          <table:table-cell table:style-name="ce16" table:formula="of:=RIGHT([.G65];LEN([.G65])-FIND(&quot;:&quot;;[.G65]))" office:value-type="string" office:string-value="" calcext:value-type="error">
            <text:p>#VALUE!</text:p>
          </table:table-cell>
          <table:table-cell table:formula="of:=SEARCH(&quot;0603&quot;;[.G65])" office:value-type="string" office:string-value="" calcext:value-type="error">
            <text:p>#VALUE!</text:p>
          </table:table-cell>
          <table:table-cell table:formula="of:=SEARCH(&quot;1206&quot;;[.G65])" office:value-type="string" office:string-value="" calcext:value-type="error">
            <text:p>#VALUE!</text:p>
          </table:table-cell>
          <table:table-cell table:formula="of:=IF(ISNUMBER([.M65]);&quot;1206&quot;;IF(ISNUMBER([.L65]);&quot;0603&quot;;[.K65]))" office:value-type="string" office:string-value="" calcext:value-type="error">
            <text:p>#VALUE!</text:p>
          </table:table-cell>
          <table:table-cell table:formula="of:=IF(ISNUMBER([$CopyFromThing.E61]*1);[$CopyFromThing.E61]*1;0)" office:value-type="float" office:value="0" calcext:value-type="float">
            <text:p>0</text:p>
          </table:table-cell>
          <table:table-cell table:formula="of:=VLOOKUP([.F65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5])&lt;&gt;&quot;&quot;;INDIRECT(&quot;Supplier_Lookup.L&quot;&amp;[.$P65]);INDIRECT(&quot;Supplier_Lookup.&quot;&amp;[.Q$4]&amp;[.$P65]))" office:value-type="float" office:value="0" calcext:value-type="float">
            <text:p>0</text:p>
          </table:table-cell>
          <table:table-cell table:style-name="ce40" table:formula="of:=INDIRECT(&quot;Supplier_Lookup.&quot;&amp;[.R$4]&amp;[.$P65])" office:value-type="float" office:value="0" calcext:value-type="float">
            <text:p>0</text:p>
          </table:table-cell>
          <table:table-cell table:formula="of:=INDIRECT(&quot;Supplier_Lookup.&quot;&amp;[.S$4]&amp;[.$P65])" office:value-type="float" office:value="0" calcext:value-type="float">
            <text:p>0</text:p>
          </table:table-cell>
          <table:table-cell table:formula="of:=INDIRECT(&quot;Supplier_Lookup.&quot;&amp;[.T$4]&amp;[.$P65])" office:value-type="float" office:value="0" calcext:value-type="float">
            <text:p>0</text:p>
          </table:table-cell>
          <table:table-cell table:formula="of:=INDIRECT(&quot;Supplier_Lookup.&quot;&amp;[.U$4]&amp;[.$P65])" office:value-type="float" office:value="0" calcext:value-type="float">
            <text:p>0</text:p>
          </table:table-cell>
          <table:table-cell table:formula="of:=INDIRECT(&quot;Supplier_Lookup.&quot;&amp;[.V$4]&amp;[.$P65])" office:value-type="float" office:value="0" calcext:value-type="float">
            <text:p>0</text:p>
          </table:table-cell>
          <table:table-cell table:formula="of:=INDIRECT(&quot;Supplier_Lookup.&quot;&amp;[.W$4]&amp;[.$P65])" office:value-type="float" office:value="0" calcext:value-type="float">
            <text:p>0</text:p>
          </table:table-cell>
          <table:table-cell table:formula="of:=INDIRECT(&quot;Supplier_Lookup.&quot;&amp;[.X$4]&amp;[.$P65])" office:value-type="float" office:value="0" calcext:value-type="float">
            <text:p>0</text:p>
          </table:table-cell>
          <table:table-cell table:formula="of:=INDIRECT(&quot;Supplier_Lookup.&quot;&amp;[.Y$4]&amp;[.$P65])" office:value-type="float" office:value="0" calcext:value-type="float">
            <text:p>0</text:p>
          </table:table-cell>
          <table:table-cell table:formula="of:=IF(INDIRECT(&quot;Supplier_Lookup.&quot;&amp;[.Z$4]&amp;[.$P65])=&quot;&quot;;&quot;&quot;;INDIRECT(&quot;Supplier_Lookup.&quot;&amp;[.Z$4]&amp;[.$P65]))">
            <text:p/>
          </table:table-cell>
          <table:table-cell table:formula="of:=IF(ISNUMBER([.Y65]);[.Y65];0)" office:value-type="float" office:value="0" calcext:value-type="float">
            <text:p>0</text:p>
          </table:table-cell>
          <table:table-cell table:formula="of:=[.AA65]*[.O65]" office:value-type="float" office:value="0" calcext:value-type="float">
            <text:p>0</text:p>
          </table:table-cell>
          <table:table-cell table:formula="of:=[.N65]&amp;&quot;-&quot;&amp;[.R65]" office:value-type="string" office:string-value="" calcext:value-type="error">
            <text:p>#VALUE!</text:p>
          </table:table-cell>
          <table:table-cell table:formula="of:=[$CopyFromThing.A61]" office:value-type="float" office:value="0" calcext:value-type="float">
            <text:p>0</text:p>
          </table:table-cell>
          <table:table-cell table:formula="of:=[$CopyFromThing.G6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2]" office:value-type="float" office:value="0" calcext:value-type="float">
            <text:p>0</text:p>
          </table:table-cell>
          <table:table-cell table:formula="of:=IF(ISNUMBER(SEARCH(&quot;R&quot;;[$CopyFromThing.A62]));&quot;R&quot;;&quot;&quot;)">
            <text:p/>
          </table:table-cell>
          <table:table-cell table:formula="of:=IF(ISNUMBER(SEARCH(&quot;C&quot;;[$CopyFromThing.A62]));&quot;C&quot;;&quot;&quot;)">
            <text:p/>
          </table:table-cell>
          <table:table-cell table:formula="of:=IF([.D66]&amp;[.C66]&lt;&gt;&quot;&quot;;[.N66];&quot;&quot;)">
            <text:p/>
          </table:table-cell>
          <table:table-cell table:style-name="ce13" table:formula="of:=[.C66]&amp;[.D66]&amp;[.E66]&amp;&quot;__&quot;&amp;[$CopyFromThing.I62]&amp;&quot;__&quot;&amp;[$CopyFromThing.B62]" office:value-type="string" office:string-value="____" calcext:value-type="string">
            <text:p>____</text:p>
          </table:table-cell>
          <table:table-cell table:formula="of:=[$CopyFromThing.D62]" office:value-type="float" office:value="0" calcext:value-type="float">
            <text:p>0</text:p>
          </table:table-cell>
          <table:table-cell table:formula="of:=FIND(&quot;_&quot;;[.G66])" office:value-type="string" office:string-value="" calcext:value-type="error">
            <text:p>#VALUE!</text:p>
          </table:table-cell>
          <table:table-cell table:formula="of:=IF(ISNUMBER([.H66]);RIGHT([.G66];LEN([.G66])-[.H66]);RIGHT([.G66];LEN([.G66])-FIND(&quot;:&quot;;[.G66])))" office:value-type="string" office:string-value="" calcext:value-type="error">
            <text:p>#VALUE!</text:p>
          </table:table-cell>
          <table:table-cell table:style-name="ce16" table:formula="of:=MATCH([.I66];{&quot;0603&quot;;&quot;1206&quot;};0)" office:value-type="string" office:string-value="" calcext:value-type="error">
            <text:p>#VALUE!</text:p>
          </table:table-cell>
          <table:table-cell table:style-name="ce16" table:formula="of:=RIGHT([.G66];LEN([.G66])-FIND(&quot;:&quot;;[.G66]))" office:value-type="string" office:string-value="" calcext:value-type="error">
            <text:p>#VALUE!</text:p>
          </table:table-cell>
          <table:table-cell table:formula="of:=SEARCH(&quot;0603&quot;;[.G66])" office:value-type="string" office:string-value="" calcext:value-type="error">
            <text:p>#VALUE!</text:p>
          </table:table-cell>
          <table:table-cell table:formula="of:=SEARCH(&quot;1206&quot;;[.G66])" office:value-type="string" office:string-value="" calcext:value-type="error">
            <text:p>#VALUE!</text:p>
          </table:table-cell>
          <table:table-cell table:formula="of:=IF(ISNUMBER([.M66]);&quot;1206&quot;;IF(ISNUMBER([.L66]);&quot;0603&quot;;[.K66]))" office:value-type="string" office:string-value="" calcext:value-type="error">
            <text:p>#VALUE!</text:p>
          </table:table-cell>
          <table:table-cell table:formula="of:=IF(ISNUMBER([$CopyFromThing.E62]*1);[$CopyFromThing.E62]*1;0)" office:value-type="float" office:value="0" calcext:value-type="float">
            <text:p>0</text:p>
          </table:table-cell>
          <table:table-cell table:formula="of:=VLOOKUP([.F66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6])&lt;&gt;&quot;&quot;;INDIRECT(&quot;Supplier_Lookup.L&quot;&amp;[.$P66]);INDIRECT(&quot;Supplier_Lookup.&quot;&amp;[.Q$4]&amp;[.$P66]))" office:value-type="float" office:value="0" calcext:value-type="float">
            <text:p>0</text:p>
          </table:table-cell>
          <table:table-cell table:style-name="ce40" table:formula="of:=INDIRECT(&quot;Supplier_Lookup.&quot;&amp;[.R$4]&amp;[.$P66])" office:value-type="float" office:value="0" calcext:value-type="float">
            <text:p>0</text:p>
          </table:table-cell>
          <table:table-cell table:formula="of:=INDIRECT(&quot;Supplier_Lookup.&quot;&amp;[.S$4]&amp;[.$P66])" office:value-type="float" office:value="0" calcext:value-type="float">
            <text:p>0</text:p>
          </table:table-cell>
          <table:table-cell table:formula="of:=INDIRECT(&quot;Supplier_Lookup.&quot;&amp;[.T$4]&amp;[.$P66])" office:value-type="float" office:value="0" calcext:value-type="float">
            <text:p>0</text:p>
          </table:table-cell>
          <table:table-cell table:formula="of:=INDIRECT(&quot;Supplier_Lookup.&quot;&amp;[.U$4]&amp;[.$P66])" office:value-type="float" office:value="0" calcext:value-type="float">
            <text:p>0</text:p>
          </table:table-cell>
          <table:table-cell table:formula="of:=INDIRECT(&quot;Supplier_Lookup.&quot;&amp;[.V$4]&amp;[.$P66])" office:value-type="float" office:value="0" calcext:value-type="float">
            <text:p>0</text:p>
          </table:table-cell>
          <table:table-cell table:formula="of:=INDIRECT(&quot;Supplier_Lookup.&quot;&amp;[.W$4]&amp;[.$P66])" office:value-type="float" office:value="0" calcext:value-type="float">
            <text:p>0</text:p>
          </table:table-cell>
          <table:table-cell table:formula="of:=INDIRECT(&quot;Supplier_Lookup.&quot;&amp;[.X$4]&amp;[.$P66])" office:value-type="float" office:value="0" calcext:value-type="float">
            <text:p>0</text:p>
          </table:table-cell>
          <table:table-cell table:formula="of:=INDIRECT(&quot;Supplier_Lookup.&quot;&amp;[.Y$4]&amp;[.$P66])" office:value-type="float" office:value="0" calcext:value-type="float">
            <text:p>0</text:p>
          </table:table-cell>
          <table:table-cell table:formula="of:=IF(INDIRECT(&quot;Supplier_Lookup.&quot;&amp;[.Z$4]&amp;[.$P66])=&quot;&quot;;&quot;&quot;;INDIRECT(&quot;Supplier_Lookup.&quot;&amp;[.Z$4]&amp;[.$P66]))">
            <text:p/>
          </table:table-cell>
          <table:table-cell table:formula="of:=IF(ISNUMBER([.Y66]);[.Y66];0)" office:value-type="float" office:value="0" calcext:value-type="float">
            <text:p>0</text:p>
          </table:table-cell>
          <table:table-cell table:formula="of:=[.AA66]*[.O66]" office:value-type="float" office:value="0" calcext:value-type="float">
            <text:p>0</text:p>
          </table:table-cell>
          <table:table-cell table:formula="of:=[.N66]&amp;&quot;-&quot;&amp;[.R66]" office:value-type="string" office:string-value="" calcext:value-type="error">
            <text:p>#VALUE!</text:p>
          </table:table-cell>
          <table:table-cell table:formula="of:=[$CopyFromThing.A62]" office:value-type="float" office:value="0" calcext:value-type="float">
            <text:p>0</text:p>
          </table:table-cell>
          <table:table-cell table:formula="of:=[$CopyFromThing.G6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3]" office:value-type="float" office:value="0" calcext:value-type="float">
            <text:p>0</text:p>
          </table:table-cell>
          <table:table-cell table:formula="of:=IF(ISNUMBER(SEARCH(&quot;R&quot;;[$CopyFromThing.A63]));&quot;R&quot;;&quot;&quot;)">
            <text:p/>
          </table:table-cell>
          <table:table-cell table:formula="of:=IF(ISNUMBER(SEARCH(&quot;C&quot;;[$CopyFromThing.A63]));&quot;C&quot;;&quot;&quot;)">
            <text:p/>
          </table:table-cell>
          <table:table-cell table:formula="of:=IF([.D67]&amp;[.C67]&lt;&gt;&quot;&quot;;[.N67];&quot;&quot;)">
            <text:p/>
          </table:table-cell>
          <table:table-cell table:style-name="ce13" table:formula="of:=[.C67]&amp;[.D67]&amp;[.E67]&amp;&quot;__&quot;&amp;[$CopyFromThing.I63]&amp;&quot;__&quot;&amp;[$CopyFromThing.B63]" office:value-type="string" office:string-value="____" calcext:value-type="string">
            <text:p>____</text:p>
          </table:table-cell>
          <table:table-cell table:formula="of:=[$CopyFromThing.D63]" office:value-type="float" office:value="0" calcext:value-type="float">
            <text:p>0</text:p>
          </table:table-cell>
          <table:table-cell table:formula="of:=FIND(&quot;_&quot;;[.G67])" office:value-type="string" office:string-value="" calcext:value-type="error">
            <text:p>#VALUE!</text:p>
          </table:table-cell>
          <table:table-cell table:formula="of:=IF(ISNUMBER([.H67]);RIGHT([.G67];LEN([.G67])-[.H67]);RIGHT([.G67];LEN([.G67])-FIND(&quot;:&quot;;[.G67])))" office:value-type="string" office:string-value="" calcext:value-type="error">
            <text:p>#VALUE!</text:p>
          </table:table-cell>
          <table:table-cell table:style-name="ce16" table:formula="of:=MATCH([.I67];{&quot;0603&quot;;&quot;1206&quot;};0)" office:value-type="string" office:string-value="" calcext:value-type="error">
            <text:p>#VALUE!</text:p>
          </table:table-cell>
          <table:table-cell table:style-name="ce16" table:formula="of:=RIGHT([.G67];LEN([.G67])-FIND(&quot;:&quot;;[.G67]))" office:value-type="string" office:string-value="" calcext:value-type="error">
            <text:p>#VALUE!</text:p>
          </table:table-cell>
          <table:table-cell table:formula="of:=SEARCH(&quot;0603&quot;;[.G67])" office:value-type="string" office:string-value="" calcext:value-type="error">
            <text:p>#VALUE!</text:p>
          </table:table-cell>
          <table:table-cell table:formula="of:=SEARCH(&quot;1206&quot;;[.G67])" office:value-type="string" office:string-value="" calcext:value-type="error">
            <text:p>#VALUE!</text:p>
          </table:table-cell>
          <table:table-cell table:formula="of:=IF(ISNUMBER([.M67]);&quot;1206&quot;;IF(ISNUMBER([.L67]);&quot;0603&quot;;[.K67]))" office:value-type="string" office:string-value="" calcext:value-type="error">
            <text:p>#VALUE!</text:p>
          </table:table-cell>
          <table:table-cell table:formula="of:=IF(ISNUMBER([$CopyFromThing.E63]*1);[$CopyFromThing.E63]*1;0)" office:value-type="float" office:value="0" calcext:value-type="float">
            <text:p>0</text:p>
          </table:table-cell>
          <table:table-cell table:formula="of:=VLOOKUP([.F67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7])&lt;&gt;&quot;&quot;;INDIRECT(&quot;Supplier_Lookup.L&quot;&amp;[.$P67]);INDIRECT(&quot;Supplier_Lookup.&quot;&amp;[.Q$4]&amp;[.$P67]))" office:value-type="float" office:value="0" calcext:value-type="float">
            <text:p>0</text:p>
          </table:table-cell>
          <table:table-cell table:style-name="ce40" table:formula="of:=INDIRECT(&quot;Supplier_Lookup.&quot;&amp;[.R$4]&amp;[.$P67])" office:value-type="float" office:value="0" calcext:value-type="float">
            <text:p>0</text:p>
          </table:table-cell>
          <table:table-cell table:formula="of:=INDIRECT(&quot;Supplier_Lookup.&quot;&amp;[.S$4]&amp;[.$P67])" office:value-type="float" office:value="0" calcext:value-type="float">
            <text:p>0</text:p>
          </table:table-cell>
          <table:table-cell table:formula="of:=INDIRECT(&quot;Supplier_Lookup.&quot;&amp;[.T$4]&amp;[.$P67])" office:value-type="float" office:value="0" calcext:value-type="float">
            <text:p>0</text:p>
          </table:table-cell>
          <table:table-cell table:formula="of:=INDIRECT(&quot;Supplier_Lookup.&quot;&amp;[.U$4]&amp;[.$P67])" office:value-type="float" office:value="0" calcext:value-type="float">
            <text:p>0</text:p>
          </table:table-cell>
          <table:table-cell table:formula="of:=INDIRECT(&quot;Supplier_Lookup.&quot;&amp;[.V$4]&amp;[.$P67])" office:value-type="float" office:value="0" calcext:value-type="float">
            <text:p>0</text:p>
          </table:table-cell>
          <table:table-cell table:formula="of:=INDIRECT(&quot;Supplier_Lookup.&quot;&amp;[.W$4]&amp;[.$P67])" office:value-type="float" office:value="0" calcext:value-type="float">
            <text:p>0</text:p>
          </table:table-cell>
          <table:table-cell table:formula="of:=INDIRECT(&quot;Supplier_Lookup.&quot;&amp;[.X$4]&amp;[.$P67])" office:value-type="float" office:value="0" calcext:value-type="float">
            <text:p>0</text:p>
          </table:table-cell>
          <table:table-cell table:formula="of:=INDIRECT(&quot;Supplier_Lookup.&quot;&amp;[.Y$4]&amp;[.$P67])" office:value-type="float" office:value="0" calcext:value-type="float">
            <text:p>0</text:p>
          </table:table-cell>
          <table:table-cell table:formula="of:=IF(INDIRECT(&quot;Supplier_Lookup.&quot;&amp;[.Z$4]&amp;[.$P67])=&quot;&quot;;&quot;&quot;;INDIRECT(&quot;Supplier_Lookup.&quot;&amp;[.Z$4]&amp;[.$P67]))">
            <text:p/>
          </table:table-cell>
          <table:table-cell table:formula="of:=IF(ISNUMBER([.Y67]);[.Y67];0)" office:value-type="float" office:value="0" calcext:value-type="float">
            <text:p>0</text:p>
          </table:table-cell>
          <table:table-cell table:formula="of:=[.AA67]*[.O67]" office:value-type="float" office:value="0" calcext:value-type="float">
            <text:p>0</text:p>
          </table:table-cell>
          <table:table-cell table:formula="of:=[.N67]&amp;&quot;-&quot;&amp;[.R67]" office:value-type="string" office:string-value="" calcext:value-type="error">
            <text:p>#VALUE!</text:p>
          </table:table-cell>
          <table:table-cell table:formula="of:=[$CopyFromThing.A63]" office:value-type="float" office:value="0" calcext:value-type="float">
            <text:p>0</text:p>
          </table:table-cell>
          <table:table-cell table:formula="of:=[$CopyFromThing.G6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4]" office:value-type="float" office:value="0" calcext:value-type="float">
            <text:p>0</text:p>
          </table:table-cell>
          <table:table-cell table:formula="of:=IF(ISNUMBER(SEARCH(&quot;R&quot;;[$CopyFromThing.A64]));&quot;R&quot;;&quot;&quot;)">
            <text:p/>
          </table:table-cell>
          <table:table-cell table:formula="of:=IF(ISNUMBER(SEARCH(&quot;C&quot;;[$CopyFromThing.A64]));&quot;C&quot;;&quot;&quot;)">
            <text:p/>
          </table:table-cell>
          <table:table-cell table:formula="of:=IF([.D68]&amp;[.C68]&lt;&gt;&quot;&quot;;[.N68];&quot;&quot;)">
            <text:p/>
          </table:table-cell>
          <table:table-cell table:style-name="ce13" table:formula="of:=[.C68]&amp;[.D68]&amp;[.E68]&amp;&quot;__&quot;&amp;[$CopyFromThing.I64]&amp;&quot;__&quot;&amp;[$CopyFromThing.B64]" office:value-type="string" office:string-value="____" calcext:value-type="string">
            <text:p>____</text:p>
          </table:table-cell>
          <table:table-cell table:formula="of:=[$CopyFromThing.D64]" office:value-type="float" office:value="0" calcext:value-type="float">
            <text:p>0</text:p>
          </table:table-cell>
          <table:table-cell table:formula="of:=FIND(&quot;_&quot;;[.G68])" office:value-type="string" office:string-value="" calcext:value-type="error">
            <text:p>#VALUE!</text:p>
          </table:table-cell>
          <table:table-cell table:formula="of:=IF(ISNUMBER([.H68]);RIGHT([.G68];LEN([.G68])-[.H68]);RIGHT([.G68];LEN([.G68])-FIND(&quot;:&quot;;[.G68])))" office:value-type="string" office:string-value="" calcext:value-type="error">
            <text:p>#VALUE!</text:p>
          </table:table-cell>
          <table:table-cell table:style-name="ce16" table:formula="of:=MATCH([.I68];{&quot;0603&quot;;&quot;1206&quot;};0)" office:value-type="string" office:string-value="" calcext:value-type="error">
            <text:p>#VALUE!</text:p>
          </table:table-cell>
          <table:table-cell table:style-name="ce16" table:formula="of:=RIGHT([.G68];LEN([.G68])-FIND(&quot;:&quot;;[.G68]))" office:value-type="string" office:string-value="" calcext:value-type="error">
            <text:p>#VALUE!</text:p>
          </table:table-cell>
          <table:table-cell table:formula="of:=SEARCH(&quot;0603&quot;;[.G68])" office:value-type="string" office:string-value="" calcext:value-type="error">
            <text:p>#VALUE!</text:p>
          </table:table-cell>
          <table:table-cell table:formula="of:=SEARCH(&quot;1206&quot;;[.G68])" office:value-type="string" office:string-value="" calcext:value-type="error">
            <text:p>#VALUE!</text:p>
          </table:table-cell>
          <table:table-cell table:formula="of:=IF(ISNUMBER([.M68]);&quot;1206&quot;;IF(ISNUMBER([.L68]);&quot;0603&quot;;[.K68]))" office:value-type="string" office:string-value="" calcext:value-type="error">
            <text:p>#VALUE!</text:p>
          </table:table-cell>
          <table:table-cell table:formula="of:=IF(ISNUMBER([$CopyFromThing.E64]*1);[$CopyFromThing.E64]*1;0)" office:value-type="float" office:value="0" calcext:value-type="float">
            <text:p>0</text:p>
          </table:table-cell>
          <table:table-cell table:formula="of:=VLOOKUP([.F68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8])&lt;&gt;&quot;&quot;;INDIRECT(&quot;Supplier_Lookup.L&quot;&amp;[.$P68]);INDIRECT(&quot;Supplier_Lookup.&quot;&amp;[.Q$4]&amp;[.$P68]))" office:value-type="float" office:value="0" calcext:value-type="float">
            <text:p>0</text:p>
          </table:table-cell>
          <table:table-cell table:style-name="ce40" table:formula="of:=INDIRECT(&quot;Supplier_Lookup.&quot;&amp;[.R$4]&amp;[.$P68])" office:value-type="float" office:value="0" calcext:value-type="float">
            <text:p>0</text:p>
          </table:table-cell>
          <table:table-cell table:formula="of:=INDIRECT(&quot;Supplier_Lookup.&quot;&amp;[.S$4]&amp;[.$P68])" office:value-type="float" office:value="0" calcext:value-type="float">
            <text:p>0</text:p>
          </table:table-cell>
          <table:table-cell table:formula="of:=INDIRECT(&quot;Supplier_Lookup.&quot;&amp;[.T$4]&amp;[.$P68])" office:value-type="float" office:value="0" calcext:value-type="float">
            <text:p>0</text:p>
          </table:table-cell>
          <table:table-cell table:formula="of:=INDIRECT(&quot;Supplier_Lookup.&quot;&amp;[.U$4]&amp;[.$P68])" office:value-type="float" office:value="0" calcext:value-type="float">
            <text:p>0</text:p>
          </table:table-cell>
          <table:table-cell table:formula="of:=INDIRECT(&quot;Supplier_Lookup.&quot;&amp;[.V$4]&amp;[.$P68])" office:value-type="float" office:value="0" calcext:value-type="float">
            <text:p>0</text:p>
          </table:table-cell>
          <table:table-cell table:formula="of:=INDIRECT(&quot;Supplier_Lookup.&quot;&amp;[.W$4]&amp;[.$P68])" office:value-type="float" office:value="0" calcext:value-type="float">
            <text:p>0</text:p>
          </table:table-cell>
          <table:table-cell table:formula="of:=INDIRECT(&quot;Supplier_Lookup.&quot;&amp;[.X$4]&amp;[.$P68])" office:value-type="float" office:value="0" calcext:value-type="float">
            <text:p>0</text:p>
          </table:table-cell>
          <table:table-cell table:formula="of:=INDIRECT(&quot;Supplier_Lookup.&quot;&amp;[.Y$4]&amp;[.$P68])" office:value-type="float" office:value="0" calcext:value-type="float">
            <text:p>0</text:p>
          </table:table-cell>
          <table:table-cell table:formula="of:=IF(INDIRECT(&quot;Supplier_Lookup.&quot;&amp;[.Z$4]&amp;[.$P68])=&quot;&quot;;&quot;&quot;;INDIRECT(&quot;Supplier_Lookup.&quot;&amp;[.Z$4]&amp;[.$P68]))">
            <text:p/>
          </table:table-cell>
          <table:table-cell table:formula="of:=IF(ISNUMBER([.Y68]);[.Y68];0)" office:value-type="float" office:value="0" calcext:value-type="float">
            <text:p>0</text:p>
          </table:table-cell>
          <table:table-cell table:formula="of:=[.AA68]*[.O68]" office:value-type="float" office:value="0" calcext:value-type="float">
            <text:p>0</text:p>
          </table:table-cell>
          <table:table-cell table:formula="of:=[.N68]&amp;&quot;-&quot;&amp;[.R68]" office:value-type="string" office:string-value="" calcext:value-type="error">
            <text:p>#VALUE!</text:p>
          </table:table-cell>
          <table:table-cell table:formula="of:=[$CopyFromThing.A64]" office:value-type="float" office:value="0" calcext:value-type="float">
            <text:p>0</text:p>
          </table:table-cell>
          <table:table-cell table:formula="of:=[$CopyFromThing.G6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5]" office:value-type="float" office:value="0" calcext:value-type="float">
            <text:p>0</text:p>
          </table:table-cell>
          <table:table-cell table:formula="of:=IF(ISNUMBER(SEARCH(&quot;R&quot;;[$CopyFromThing.A65]));&quot;R&quot;;&quot;&quot;)">
            <text:p/>
          </table:table-cell>
          <table:table-cell table:formula="of:=IF(ISNUMBER(SEARCH(&quot;C&quot;;[$CopyFromThing.A65]));&quot;C&quot;;&quot;&quot;)">
            <text:p/>
          </table:table-cell>
          <table:table-cell table:formula="of:=IF([.D69]&amp;[.C69]&lt;&gt;&quot;&quot;;[.N69];&quot;&quot;)">
            <text:p/>
          </table:table-cell>
          <table:table-cell table:style-name="ce13" table:formula="of:=[.C69]&amp;[.D69]&amp;[.E69]&amp;&quot;__&quot;&amp;[$CopyFromThing.I65]&amp;&quot;__&quot;&amp;[$CopyFromThing.B65]" office:value-type="string" office:string-value="____" calcext:value-type="string">
            <text:p>____</text:p>
          </table:table-cell>
          <table:table-cell table:formula="of:=[$CopyFromThing.D65]" office:value-type="float" office:value="0" calcext:value-type="float">
            <text:p>0</text:p>
          </table:table-cell>
          <table:table-cell table:formula="of:=FIND(&quot;_&quot;;[.G69])" office:value-type="string" office:string-value="" calcext:value-type="error">
            <text:p>#VALUE!</text:p>
          </table:table-cell>
          <table:table-cell table:formula="of:=IF(ISNUMBER([.H69]);RIGHT([.G69];LEN([.G69])-[.H69]);RIGHT([.G69];LEN([.G69])-FIND(&quot;:&quot;;[.G69])))" office:value-type="string" office:string-value="" calcext:value-type="error">
            <text:p>#VALUE!</text:p>
          </table:table-cell>
          <table:table-cell table:style-name="ce16" table:formula="of:=MATCH([.I69];{&quot;0603&quot;;&quot;1206&quot;};0)" office:value-type="string" office:string-value="" calcext:value-type="error">
            <text:p>#VALUE!</text:p>
          </table:table-cell>
          <table:table-cell table:style-name="ce16" table:formula="of:=RIGHT([.G69];LEN([.G69])-FIND(&quot;:&quot;;[.G69]))" office:value-type="string" office:string-value="" calcext:value-type="error">
            <text:p>#VALUE!</text:p>
          </table:table-cell>
          <table:table-cell table:formula="of:=SEARCH(&quot;0603&quot;;[.G69])" office:value-type="string" office:string-value="" calcext:value-type="error">
            <text:p>#VALUE!</text:p>
          </table:table-cell>
          <table:table-cell table:formula="of:=SEARCH(&quot;1206&quot;;[.G69])" office:value-type="string" office:string-value="" calcext:value-type="error">
            <text:p>#VALUE!</text:p>
          </table:table-cell>
          <table:table-cell table:formula="of:=IF(ISNUMBER([.M69]);&quot;1206&quot;;IF(ISNUMBER([.L69]);&quot;0603&quot;;[.K69]))" office:value-type="string" office:string-value="" calcext:value-type="error">
            <text:p>#VALUE!</text:p>
          </table:table-cell>
          <table:table-cell table:formula="of:=IF(ISNUMBER([$CopyFromThing.E65]*1);[$CopyFromThing.E65]*1;0)" office:value-type="float" office:value="0" calcext:value-type="float">
            <text:p>0</text:p>
          </table:table-cell>
          <table:table-cell table:formula="of:=VLOOKUP([.F69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69])&lt;&gt;&quot;&quot;;INDIRECT(&quot;Supplier_Lookup.L&quot;&amp;[.$P69]);INDIRECT(&quot;Supplier_Lookup.&quot;&amp;[.Q$4]&amp;[.$P69]))" office:value-type="float" office:value="0" calcext:value-type="float">
            <text:p>0</text:p>
          </table:table-cell>
          <table:table-cell table:style-name="ce40" table:formula="of:=INDIRECT(&quot;Supplier_Lookup.&quot;&amp;[.R$4]&amp;[.$P69])" office:value-type="float" office:value="0" calcext:value-type="float">
            <text:p>0</text:p>
          </table:table-cell>
          <table:table-cell table:formula="of:=INDIRECT(&quot;Supplier_Lookup.&quot;&amp;[.S$4]&amp;[.$P69])" office:value-type="float" office:value="0" calcext:value-type="float">
            <text:p>0</text:p>
          </table:table-cell>
          <table:table-cell table:formula="of:=INDIRECT(&quot;Supplier_Lookup.&quot;&amp;[.T$4]&amp;[.$P69])" office:value-type="float" office:value="0" calcext:value-type="float">
            <text:p>0</text:p>
          </table:table-cell>
          <table:table-cell table:formula="of:=INDIRECT(&quot;Supplier_Lookup.&quot;&amp;[.U$4]&amp;[.$P69])" office:value-type="float" office:value="0" calcext:value-type="float">
            <text:p>0</text:p>
          </table:table-cell>
          <table:table-cell table:formula="of:=INDIRECT(&quot;Supplier_Lookup.&quot;&amp;[.V$4]&amp;[.$P69])" office:value-type="float" office:value="0" calcext:value-type="float">
            <text:p>0</text:p>
          </table:table-cell>
          <table:table-cell table:formula="of:=INDIRECT(&quot;Supplier_Lookup.&quot;&amp;[.W$4]&amp;[.$P69])" office:value-type="float" office:value="0" calcext:value-type="float">
            <text:p>0</text:p>
          </table:table-cell>
          <table:table-cell table:formula="of:=INDIRECT(&quot;Supplier_Lookup.&quot;&amp;[.X$4]&amp;[.$P69])" office:value-type="float" office:value="0" calcext:value-type="float">
            <text:p>0</text:p>
          </table:table-cell>
          <table:table-cell table:formula="of:=INDIRECT(&quot;Supplier_Lookup.&quot;&amp;[.Y$4]&amp;[.$P69])" office:value-type="float" office:value="0" calcext:value-type="float">
            <text:p>0</text:p>
          </table:table-cell>
          <table:table-cell table:formula="of:=IF(INDIRECT(&quot;Supplier_Lookup.&quot;&amp;[.Z$4]&amp;[.$P69])=&quot;&quot;;&quot;&quot;;INDIRECT(&quot;Supplier_Lookup.&quot;&amp;[.Z$4]&amp;[.$P69]))">
            <text:p/>
          </table:table-cell>
          <table:table-cell table:formula="of:=IF(ISNUMBER([.Y69]);[.Y69];0)" office:value-type="float" office:value="0" calcext:value-type="float">
            <text:p>0</text:p>
          </table:table-cell>
          <table:table-cell table:formula="of:=[.AA69]*[.O69]" office:value-type="float" office:value="0" calcext:value-type="float">
            <text:p>0</text:p>
          </table:table-cell>
          <table:table-cell table:formula="of:=[.N69]&amp;&quot;-&quot;&amp;[.R69]" office:value-type="string" office:string-value="" calcext:value-type="error">
            <text:p>#VALUE!</text:p>
          </table:table-cell>
          <table:table-cell table:formula="of:=[$CopyFromThing.A65]" office:value-type="float" office:value="0" calcext:value-type="float">
            <text:p>0</text:p>
          </table:table-cell>
          <table:table-cell table:formula="of:=[$CopyFromThing.G6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6]" office:value-type="float" office:value="0" calcext:value-type="float">
            <text:p>0</text:p>
          </table:table-cell>
          <table:table-cell table:formula="of:=IF(ISNUMBER(SEARCH(&quot;R&quot;;[$CopyFromThing.A66]));&quot;R&quot;;&quot;&quot;)">
            <text:p/>
          </table:table-cell>
          <table:table-cell table:formula="of:=IF(ISNUMBER(SEARCH(&quot;C&quot;;[$CopyFromThing.A66]));&quot;C&quot;;&quot;&quot;)">
            <text:p/>
          </table:table-cell>
          <table:table-cell table:formula="of:=IF([.D70]&amp;[.C70]&lt;&gt;&quot;&quot;;[.N70];&quot;&quot;)">
            <text:p/>
          </table:table-cell>
          <table:table-cell table:style-name="ce13" table:formula="of:=[.C70]&amp;[.D70]&amp;[.E70]&amp;&quot;__&quot;&amp;[$CopyFromThing.I66]&amp;&quot;__&quot;&amp;[$CopyFromThing.B66]" office:value-type="string" office:string-value="____" calcext:value-type="string">
            <text:p>____</text:p>
          </table:table-cell>
          <table:table-cell table:formula="of:=[$CopyFromThing.D66]" office:value-type="float" office:value="0" calcext:value-type="float">
            <text:p>0</text:p>
          </table:table-cell>
          <table:table-cell table:formula="of:=FIND(&quot;_&quot;;[.G70])" office:value-type="string" office:string-value="" calcext:value-type="error">
            <text:p>#VALUE!</text:p>
          </table:table-cell>
          <table:table-cell table:formula="of:=IF(ISNUMBER([.H70]);RIGHT([.G70];LEN([.G70])-[.H70]);RIGHT([.G70];LEN([.G70])-FIND(&quot;:&quot;;[.G70])))" office:value-type="string" office:string-value="" calcext:value-type="error">
            <text:p>#VALUE!</text:p>
          </table:table-cell>
          <table:table-cell table:style-name="ce16" table:formula="of:=MATCH([.I70];{&quot;0603&quot;;&quot;1206&quot;};0)" office:value-type="string" office:string-value="" calcext:value-type="error">
            <text:p>#VALUE!</text:p>
          </table:table-cell>
          <table:table-cell table:style-name="ce16" table:formula="of:=RIGHT([.G70];LEN([.G70])-FIND(&quot;:&quot;;[.G70]))" office:value-type="string" office:string-value="" calcext:value-type="error">
            <text:p>#VALUE!</text:p>
          </table:table-cell>
          <table:table-cell table:formula="of:=SEARCH(&quot;0603&quot;;[.G70])" office:value-type="string" office:string-value="" calcext:value-type="error">
            <text:p>#VALUE!</text:p>
          </table:table-cell>
          <table:table-cell table:formula="of:=SEARCH(&quot;1206&quot;;[.G70])" office:value-type="string" office:string-value="" calcext:value-type="error">
            <text:p>#VALUE!</text:p>
          </table:table-cell>
          <table:table-cell table:formula="of:=IF(ISNUMBER([.M70]);&quot;1206&quot;;IF(ISNUMBER([.L70]);&quot;0603&quot;;[.K70]))" office:value-type="string" office:string-value="" calcext:value-type="error">
            <text:p>#VALUE!</text:p>
          </table:table-cell>
          <table:table-cell table:formula="of:=IF(ISNUMBER([$CopyFromThing.E66]*1);[$CopyFromThing.E66]*1;0)" office:value-type="float" office:value="0" calcext:value-type="float">
            <text:p>0</text:p>
          </table:table-cell>
          <table:table-cell table:formula="of:=VLOOKUP([.F70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0])&lt;&gt;&quot;&quot;;INDIRECT(&quot;Supplier_Lookup.L&quot;&amp;[.$P70]);INDIRECT(&quot;Supplier_Lookup.&quot;&amp;[.Q$4]&amp;[.$P70]))" office:value-type="float" office:value="0" calcext:value-type="float">
            <text:p>0</text:p>
          </table:table-cell>
          <table:table-cell table:style-name="ce40" table:formula="of:=INDIRECT(&quot;Supplier_Lookup.&quot;&amp;[.R$4]&amp;[.$P70])" office:value-type="float" office:value="0" calcext:value-type="float">
            <text:p>0</text:p>
          </table:table-cell>
          <table:table-cell table:formula="of:=INDIRECT(&quot;Supplier_Lookup.&quot;&amp;[.S$4]&amp;[.$P70])" office:value-type="float" office:value="0" calcext:value-type="float">
            <text:p>0</text:p>
          </table:table-cell>
          <table:table-cell table:formula="of:=INDIRECT(&quot;Supplier_Lookup.&quot;&amp;[.T$4]&amp;[.$P70])" office:value-type="float" office:value="0" calcext:value-type="float">
            <text:p>0</text:p>
          </table:table-cell>
          <table:table-cell table:formula="of:=INDIRECT(&quot;Supplier_Lookup.&quot;&amp;[.U$4]&amp;[.$P70])" office:value-type="float" office:value="0" calcext:value-type="float">
            <text:p>0</text:p>
          </table:table-cell>
          <table:table-cell table:formula="of:=INDIRECT(&quot;Supplier_Lookup.&quot;&amp;[.V$4]&amp;[.$P70])" office:value-type="float" office:value="0" calcext:value-type="float">
            <text:p>0</text:p>
          </table:table-cell>
          <table:table-cell table:formula="of:=INDIRECT(&quot;Supplier_Lookup.&quot;&amp;[.W$4]&amp;[.$P70])" office:value-type="float" office:value="0" calcext:value-type="float">
            <text:p>0</text:p>
          </table:table-cell>
          <table:table-cell table:formula="of:=INDIRECT(&quot;Supplier_Lookup.&quot;&amp;[.X$4]&amp;[.$P70])" office:value-type="float" office:value="0" calcext:value-type="float">
            <text:p>0</text:p>
          </table:table-cell>
          <table:table-cell table:formula="of:=INDIRECT(&quot;Supplier_Lookup.&quot;&amp;[.Y$4]&amp;[.$P70])" office:value-type="float" office:value="0" calcext:value-type="float">
            <text:p>0</text:p>
          </table:table-cell>
          <table:table-cell table:formula="of:=IF(INDIRECT(&quot;Supplier_Lookup.&quot;&amp;[.Z$4]&amp;[.$P70])=&quot;&quot;;&quot;&quot;;INDIRECT(&quot;Supplier_Lookup.&quot;&amp;[.Z$4]&amp;[.$P70]))">
            <text:p/>
          </table:table-cell>
          <table:table-cell table:formula="of:=IF(ISNUMBER([.Y70]);[.Y70];0)" office:value-type="float" office:value="0" calcext:value-type="float">
            <text:p>0</text:p>
          </table:table-cell>
          <table:table-cell table:formula="of:=[.AA70]*[.O70]" office:value-type="float" office:value="0" calcext:value-type="float">
            <text:p>0</text:p>
          </table:table-cell>
          <table:table-cell table:formula="of:=[.N70]&amp;&quot;-&quot;&amp;[.R70]" office:value-type="string" office:string-value="" calcext:value-type="error">
            <text:p>#VALUE!</text:p>
          </table:table-cell>
          <table:table-cell table:formula="of:=[$CopyFromThing.A66]" office:value-type="float" office:value="0" calcext:value-type="float">
            <text:p>0</text:p>
          </table:table-cell>
          <table:table-cell table:formula="of:=[$CopyFromThing.G6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7]" office:value-type="float" office:value="0" calcext:value-type="float">
            <text:p>0</text:p>
          </table:table-cell>
          <table:table-cell table:formula="of:=IF(ISNUMBER(SEARCH(&quot;R&quot;;[$CopyFromThing.A67]));&quot;R&quot;;&quot;&quot;)">
            <text:p/>
          </table:table-cell>
          <table:table-cell table:formula="of:=IF(ISNUMBER(SEARCH(&quot;C&quot;;[$CopyFromThing.A67]));&quot;C&quot;;&quot;&quot;)">
            <text:p/>
          </table:table-cell>
          <table:table-cell table:formula="of:=IF([.D71]&amp;[.C71]&lt;&gt;&quot;&quot;;[.N71];&quot;&quot;)">
            <text:p/>
          </table:table-cell>
          <table:table-cell table:style-name="ce13" table:formula="of:=[.C71]&amp;[.D71]&amp;[.E71]&amp;&quot;__&quot;&amp;[$CopyFromThing.I67]&amp;&quot;__&quot;&amp;[$CopyFromThing.B67]" office:value-type="string" office:string-value="____" calcext:value-type="string">
            <text:p>____</text:p>
          </table:table-cell>
          <table:table-cell table:formula="of:=[$CopyFromThing.D67]" office:value-type="float" office:value="0" calcext:value-type="float">
            <text:p>0</text:p>
          </table:table-cell>
          <table:table-cell table:formula="of:=FIND(&quot;_&quot;;[.G71])" office:value-type="string" office:string-value="" calcext:value-type="error">
            <text:p>#VALUE!</text:p>
          </table:table-cell>
          <table:table-cell table:formula="of:=IF(ISNUMBER([.H71]);RIGHT([.G71];LEN([.G71])-[.H71]);RIGHT([.G71];LEN([.G71])-FIND(&quot;:&quot;;[.G71])))" office:value-type="string" office:string-value="" calcext:value-type="error">
            <text:p>#VALUE!</text:p>
          </table:table-cell>
          <table:table-cell table:style-name="ce16" table:formula="of:=MATCH([.I71];{&quot;0603&quot;;&quot;1206&quot;};0)" office:value-type="string" office:string-value="" calcext:value-type="error">
            <text:p>#VALUE!</text:p>
          </table:table-cell>
          <table:table-cell table:style-name="ce16" table:formula="of:=RIGHT([.G71];LEN([.G71])-FIND(&quot;:&quot;;[.G71]))" office:value-type="string" office:string-value="" calcext:value-type="error">
            <text:p>#VALUE!</text:p>
          </table:table-cell>
          <table:table-cell table:formula="of:=SEARCH(&quot;0603&quot;;[.G71])" office:value-type="string" office:string-value="" calcext:value-type="error">
            <text:p>#VALUE!</text:p>
          </table:table-cell>
          <table:table-cell table:formula="of:=SEARCH(&quot;1206&quot;;[.G71])" office:value-type="string" office:string-value="" calcext:value-type="error">
            <text:p>#VALUE!</text:p>
          </table:table-cell>
          <table:table-cell table:formula="of:=IF(ISNUMBER([.M71]);&quot;1206&quot;;IF(ISNUMBER([.L71]);&quot;0603&quot;;[.K71]))" office:value-type="string" office:string-value="" calcext:value-type="error">
            <text:p>#VALUE!</text:p>
          </table:table-cell>
          <table:table-cell table:formula="of:=IF(ISNUMBER([$CopyFromThing.E67]*1);[$CopyFromThing.E67]*1;0)" office:value-type="float" office:value="0" calcext:value-type="float">
            <text:p>0</text:p>
          </table:table-cell>
          <table:table-cell table:formula="of:=VLOOKUP([.F71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1])&lt;&gt;&quot;&quot;;INDIRECT(&quot;Supplier_Lookup.L&quot;&amp;[.$P71]);INDIRECT(&quot;Supplier_Lookup.&quot;&amp;[.Q$4]&amp;[.$P71]))" office:value-type="float" office:value="0" calcext:value-type="float">
            <text:p>0</text:p>
          </table:table-cell>
          <table:table-cell table:style-name="ce40" table:formula="of:=INDIRECT(&quot;Supplier_Lookup.&quot;&amp;[.R$4]&amp;[.$P71])" office:value-type="float" office:value="0" calcext:value-type="float">
            <text:p>0</text:p>
          </table:table-cell>
          <table:table-cell table:formula="of:=INDIRECT(&quot;Supplier_Lookup.&quot;&amp;[.S$4]&amp;[.$P71])" office:value-type="float" office:value="0" calcext:value-type="float">
            <text:p>0</text:p>
          </table:table-cell>
          <table:table-cell table:formula="of:=INDIRECT(&quot;Supplier_Lookup.&quot;&amp;[.T$4]&amp;[.$P71])" office:value-type="float" office:value="0" calcext:value-type="float">
            <text:p>0</text:p>
          </table:table-cell>
          <table:table-cell table:formula="of:=INDIRECT(&quot;Supplier_Lookup.&quot;&amp;[.U$4]&amp;[.$P71])" office:value-type="float" office:value="0" calcext:value-type="float">
            <text:p>0</text:p>
          </table:table-cell>
          <table:table-cell table:formula="of:=INDIRECT(&quot;Supplier_Lookup.&quot;&amp;[.V$4]&amp;[.$P71])" office:value-type="float" office:value="0" calcext:value-type="float">
            <text:p>0</text:p>
          </table:table-cell>
          <table:table-cell table:formula="of:=INDIRECT(&quot;Supplier_Lookup.&quot;&amp;[.W$4]&amp;[.$P71])" office:value-type="float" office:value="0" calcext:value-type="float">
            <text:p>0</text:p>
          </table:table-cell>
          <table:table-cell table:formula="of:=INDIRECT(&quot;Supplier_Lookup.&quot;&amp;[.X$4]&amp;[.$P71])" office:value-type="float" office:value="0" calcext:value-type="float">
            <text:p>0</text:p>
          </table:table-cell>
          <table:table-cell table:formula="of:=INDIRECT(&quot;Supplier_Lookup.&quot;&amp;[.Y$4]&amp;[.$P71])" office:value-type="float" office:value="0" calcext:value-type="float">
            <text:p>0</text:p>
          </table:table-cell>
          <table:table-cell table:formula="of:=IF(INDIRECT(&quot;Supplier_Lookup.&quot;&amp;[.Z$4]&amp;[.$P71])=&quot;&quot;;&quot;&quot;;INDIRECT(&quot;Supplier_Lookup.&quot;&amp;[.Z$4]&amp;[.$P71]))">
            <text:p/>
          </table:table-cell>
          <table:table-cell table:formula="of:=IF(ISNUMBER([.Y71]);[.Y71];0)" office:value-type="float" office:value="0" calcext:value-type="float">
            <text:p>0</text:p>
          </table:table-cell>
          <table:table-cell table:formula="of:=[.AA71]*[.O71]" office:value-type="float" office:value="0" calcext:value-type="float">
            <text:p>0</text:p>
          </table:table-cell>
          <table:table-cell table:formula="of:=[.N71]&amp;&quot;-&quot;&amp;[.R71]" office:value-type="string" office:string-value="" calcext:value-type="error">
            <text:p>#VALUE!</text:p>
          </table:table-cell>
          <table:table-cell table:formula="of:=[$CopyFromThing.A67]" office:value-type="float" office:value="0" calcext:value-type="float">
            <text:p>0</text:p>
          </table:table-cell>
          <table:table-cell table:formula="of:=[$CopyFromThing.G6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8]" office:value-type="float" office:value="0" calcext:value-type="float">
            <text:p>0</text:p>
          </table:table-cell>
          <table:table-cell table:formula="of:=IF(ISNUMBER(SEARCH(&quot;R&quot;;[$CopyFromThing.A68]));&quot;R&quot;;&quot;&quot;)">
            <text:p/>
          </table:table-cell>
          <table:table-cell table:formula="of:=IF(ISNUMBER(SEARCH(&quot;C&quot;;[$CopyFromThing.A68]));&quot;C&quot;;&quot;&quot;)">
            <text:p/>
          </table:table-cell>
          <table:table-cell table:formula="of:=IF([.D72]&amp;[.C72]&lt;&gt;&quot;&quot;;[.N72];&quot;&quot;)">
            <text:p/>
          </table:table-cell>
          <table:table-cell table:style-name="ce13" table:formula="of:=[.C72]&amp;[.D72]&amp;[.E72]&amp;&quot;__&quot;&amp;[$CopyFromThing.I68]&amp;&quot;__&quot;&amp;[$CopyFromThing.B68]" office:value-type="string" office:string-value="____" calcext:value-type="string">
            <text:p>____</text:p>
          </table:table-cell>
          <table:table-cell table:formula="of:=[$CopyFromThing.D68]" office:value-type="float" office:value="0" calcext:value-type="float">
            <text:p>0</text:p>
          </table:table-cell>
          <table:table-cell table:formula="of:=FIND(&quot;_&quot;;[.G72])" office:value-type="string" office:string-value="" calcext:value-type="error">
            <text:p>#VALUE!</text:p>
          </table:table-cell>
          <table:table-cell table:formula="of:=IF(ISNUMBER([.H72]);RIGHT([.G72];LEN([.G72])-[.H72]);RIGHT([.G72];LEN([.G72])-FIND(&quot;:&quot;;[.G72])))" office:value-type="string" office:string-value="" calcext:value-type="error">
            <text:p>#VALUE!</text:p>
          </table:table-cell>
          <table:table-cell table:style-name="ce16" table:formula="of:=MATCH([.I72];{&quot;0603&quot;;&quot;1206&quot;};0)" office:value-type="string" office:string-value="" calcext:value-type="error">
            <text:p>#VALUE!</text:p>
          </table:table-cell>
          <table:table-cell table:style-name="ce16" table:formula="of:=RIGHT([.G72];LEN([.G72])-FIND(&quot;:&quot;;[.G72]))" office:value-type="string" office:string-value="" calcext:value-type="error">
            <text:p>#VALUE!</text:p>
          </table:table-cell>
          <table:table-cell table:formula="of:=SEARCH(&quot;0603&quot;;[.G72])" office:value-type="string" office:string-value="" calcext:value-type="error">
            <text:p>#VALUE!</text:p>
          </table:table-cell>
          <table:table-cell table:formula="of:=SEARCH(&quot;1206&quot;;[.G72])" office:value-type="string" office:string-value="" calcext:value-type="error">
            <text:p>#VALUE!</text:p>
          </table:table-cell>
          <table:table-cell table:formula="of:=IF(ISNUMBER([.M72]);&quot;1206&quot;;IF(ISNUMBER([.L72]);&quot;0603&quot;;[.K72]))" office:value-type="string" office:string-value="" calcext:value-type="error">
            <text:p>#VALUE!</text:p>
          </table:table-cell>
          <table:table-cell table:formula="of:=IF(ISNUMBER([$CopyFromThing.E68]*1);[$CopyFromThing.E68]*1;0)" office:value-type="float" office:value="0" calcext:value-type="float">
            <text:p>0</text:p>
          </table:table-cell>
          <table:table-cell table:formula="of:=VLOOKUP([.F72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2])&lt;&gt;&quot;&quot;;INDIRECT(&quot;Supplier_Lookup.L&quot;&amp;[.$P72]);INDIRECT(&quot;Supplier_Lookup.&quot;&amp;[.Q$4]&amp;[.$P72]))" office:value-type="float" office:value="0" calcext:value-type="float">
            <text:p>0</text:p>
          </table:table-cell>
          <table:table-cell table:style-name="ce40" table:formula="of:=INDIRECT(&quot;Supplier_Lookup.&quot;&amp;[.R$4]&amp;[.$P72])" office:value-type="float" office:value="0" calcext:value-type="float">
            <text:p>0</text:p>
          </table:table-cell>
          <table:table-cell table:formula="of:=INDIRECT(&quot;Supplier_Lookup.&quot;&amp;[.S$4]&amp;[.$P72])" office:value-type="float" office:value="0" calcext:value-type="float">
            <text:p>0</text:p>
          </table:table-cell>
          <table:table-cell table:formula="of:=INDIRECT(&quot;Supplier_Lookup.&quot;&amp;[.T$4]&amp;[.$P72])" office:value-type="float" office:value="0" calcext:value-type="float">
            <text:p>0</text:p>
          </table:table-cell>
          <table:table-cell table:formula="of:=INDIRECT(&quot;Supplier_Lookup.&quot;&amp;[.U$4]&amp;[.$P72])" office:value-type="float" office:value="0" calcext:value-type="float">
            <text:p>0</text:p>
          </table:table-cell>
          <table:table-cell table:formula="of:=INDIRECT(&quot;Supplier_Lookup.&quot;&amp;[.V$4]&amp;[.$P72])" office:value-type="float" office:value="0" calcext:value-type="float">
            <text:p>0</text:p>
          </table:table-cell>
          <table:table-cell table:formula="of:=INDIRECT(&quot;Supplier_Lookup.&quot;&amp;[.W$4]&amp;[.$P72])" office:value-type="float" office:value="0" calcext:value-type="float">
            <text:p>0</text:p>
          </table:table-cell>
          <table:table-cell table:formula="of:=INDIRECT(&quot;Supplier_Lookup.&quot;&amp;[.X$4]&amp;[.$P72])" office:value-type="float" office:value="0" calcext:value-type="float">
            <text:p>0</text:p>
          </table:table-cell>
          <table:table-cell table:formula="of:=INDIRECT(&quot;Supplier_Lookup.&quot;&amp;[.Y$4]&amp;[.$P72])" office:value-type="float" office:value="0" calcext:value-type="float">
            <text:p>0</text:p>
          </table:table-cell>
          <table:table-cell table:formula="of:=IF(INDIRECT(&quot;Supplier_Lookup.&quot;&amp;[.Z$4]&amp;[.$P72])=&quot;&quot;;&quot;&quot;;INDIRECT(&quot;Supplier_Lookup.&quot;&amp;[.Z$4]&amp;[.$P72]))">
            <text:p/>
          </table:table-cell>
          <table:table-cell table:formula="of:=IF(ISNUMBER([.Y72]);[.Y72];0)" office:value-type="float" office:value="0" calcext:value-type="float">
            <text:p>0</text:p>
          </table:table-cell>
          <table:table-cell table:formula="of:=[.AA72]*[.O72]" office:value-type="float" office:value="0" calcext:value-type="float">
            <text:p>0</text:p>
          </table:table-cell>
          <table:table-cell table:formula="of:=[.N72]&amp;&quot;-&quot;&amp;[.R72]" office:value-type="string" office:string-value="" calcext:value-type="error">
            <text:p>#VALUE!</text:p>
          </table:table-cell>
          <table:table-cell table:formula="of:=[$CopyFromThing.A68]" office:value-type="float" office:value="0" calcext:value-type="float">
            <text:p>0</text:p>
          </table:table-cell>
          <table:table-cell table:formula="of:=[$CopyFromThing.G6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69]" office:value-type="float" office:value="0" calcext:value-type="float">
            <text:p>0</text:p>
          </table:table-cell>
          <table:table-cell table:formula="of:=IF(ISNUMBER(SEARCH(&quot;R&quot;;[$CopyFromThing.A69]));&quot;R&quot;;&quot;&quot;)">
            <text:p/>
          </table:table-cell>
          <table:table-cell table:formula="of:=IF(ISNUMBER(SEARCH(&quot;C&quot;;[$CopyFromThing.A69]));&quot;C&quot;;&quot;&quot;)">
            <text:p/>
          </table:table-cell>
          <table:table-cell table:formula="of:=IF([.D73]&amp;[.C73]&lt;&gt;&quot;&quot;;[.N73];&quot;&quot;)">
            <text:p/>
          </table:table-cell>
          <table:table-cell table:style-name="ce13" table:formula="of:=[.C73]&amp;[.D73]&amp;[.E73]&amp;&quot;__&quot;&amp;[$CopyFromThing.I69]&amp;&quot;__&quot;&amp;[$CopyFromThing.B69]" office:value-type="string" office:string-value="____" calcext:value-type="string">
            <text:p>____</text:p>
          </table:table-cell>
          <table:table-cell table:formula="of:=[$CopyFromThing.D69]" office:value-type="float" office:value="0" calcext:value-type="float">
            <text:p>0</text:p>
          </table:table-cell>
          <table:table-cell table:formula="of:=FIND(&quot;_&quot;;[.G73])" office:value-type="string" office:string-value="" calcext:value-type="error">
            <text:p>#VALUE!</text:p>
          </table:table-cell>
          <table:table-cell table:formula="of:=IF(ISNUMBER([.H73]);RIGHT([.G73];LEN([.G73])-[.H73]);RIGHT([.G73];LEN([.G73])-FIND(&quot;:&quot;;[.G73])))" office:value-type="string" office:string-value="" calcext:value-type="error">
            <text:p>#VALUE!</text:p>
          </table:table-cell>
          <table:table-cell table:style-name="ce16" table:formula="of:=MATCH([.I73];{&quot;0603&quot;;&quot;1206&quot;};0)" office:value-type="string" office:string-value="" calcext:value-type="error">
            <text:p>#VALUE!</text:p>
          </table:table-cell>
          <table:table-cell table:style-name="ce16" table:formula="of:=RIGHT([.G73];LEN([.G73])-FIND(&quot;:&quot;;[.G73]))" office:value-type="string" office:string-value="" calcext:value-type="error">
            <text:p>#VALUE!</text:p>
          </table:table-cell>
          <table:table-cell table:formula="of:=SEARCH(&quot;0603&quot;;[.G73])" office:value-type="string" office:string-value="" calcext:value-type="error">
            <text:p>#VALUE!</text:p>
          </table:table-cell>
          <table:table-cell table:formula="of:=SEARCH(&quot;1206&quot;;[.G73])" office:value-type="string" office:string-value="" calcext:value-type="error">
            <text:p>#VALUE!</text:p>
          </table:table-cell>
          <table:table-cell table:formula="of:=IF(ISNUMBER([.M73]);&quot;1206&quot;;IF(ISNUMBER([.L73]);&quot;0603&quot;;[.K73]))" office:value-type="string" office:string-value="" calcext:value-type="error">
            <text:p>#VALUE!</text:p>
          </table:table-cell>
          <table:table-cell table:formula="of:=IF(ISNUMBER([$CopyFromThing.E69]*1);[$CopyFromThing.E69]*1;0)" office:value-type="float" office:value="0" calcext:value-type="float">
            <text:p>0</text:p>
          </table:table-cell>
          <table:table-cell table:formula="of:=VLOOKUP([.F73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3])&lt;&gt;&quot;&quot;;INDIRECT(&quot;Supplier_Lookup.L&quot;&amp;[.$P73]);INDIRECT(&quot;Supplier_Lookup.&quot;&amp;[.Q$4]&amp;[.$P73]))" office:value-type="float" office:value="0" calcext:value-type="float">
            <text:p>0</text:p>
          </table:table-cell>
          <table:table-cell table:style-name="ce40" table:formula="of:=INDIRECT(&quot;Supplier_Lookup.&quot;&amp;[.R$4]&amp;[.$P73])" office:value-type="float" office:value="0" calcext:value-type="float">
            <text:p>0</text:p>
          </table:table-cell>
          <table:table-cell table:formula="of:=INDIRECT(&quot;Supplier_Lookup.&quot;&amp;[.S$4]&amp;[.$P73])" office:value-type="float" office:value="0" calcext:value-type="float">
            <text:p>0</text:p>
          </table:table-cell>
          <table:table-cell table:formula="of:=INDIRECT(&quot;Supplier_Lookup.&quot;&amp;[.T$4]&amp;[.$P73])" office:value-type="float" office:value="0" calcext:value-type="float">
            <text:p>0</text:p>
          </table:table-cell>
          <table:table-cell table:formula="of:=INDIRECT(&quot;Supplier_Lookup.&quot;&amp;[.U$4]&amp;[.$P73])" office:value-type="float" office:value="0" calcext:value-type="float">
            <text:p>0</text:p>
          </table:table-cell>
          <table:table-cell table:formula="of:=INDIRECT(&quot;Supplier_Lookup.&quot;&amp;[.V$4]&amp;[.$P73])" office:value-type="float" office:value="0" calcext:value-type="float">
            <text:p>0</text:p>
          </table:table-cell>
          <table:table-cell table:formula="of:=INDIRECT(&quot;Supplier_Lookup.&quot;&amp;[.W$4]&amp;[.$P73])" office:value-type="float" office:value="0" calcext:value-type="float">
            <text:p>0</text:p>
          </table:table-cell>
          <table:table-cell table:formula="of:=INDIRECT(&quot;Supplier_Lookup.&quot;&amp;[.X$4]&amp;[.$P73])" office:value-type="float" office:value="0" calcext:value-type="float">
            <text:p>0</text:p>
          </table:table-cell>
          <table:table-cell table:formula="of:=INDIRECT(&quot;Supplier_Lookup.&quot;&amp;[.Y$4]&amp;[.$P73])" office:value-type="float" office:value="0" calcext:value-type="float">
            <text:p>0</text:p>
          </table:table-cell>
          <table:table-cell table:formula="of:=IF(INDIRECT(&quot;Supplier_Lookup.&quot;&amp;[.Z$4]&amp;[.$P73])=&quot;&quot;;&quot;&quot;;INDIRECT(&quot;Supplier_Lookup.&quot;&amp;[.Z$4]&amp;[.$P73]))">
            <text:p/>
          </table:table-cell>
          <table:table-cell table:formula="of:=IF(ISNUMBER([.Y73]);[.Y73];0)" office:value-type="float" office:value="0" calcext:value-type="float">
            <text:p>0</text:p>
          </table:table-cell>
          <table:table-cell table:formula="of:=[.AA73]*[.O73]" office:value-type="float" office:value="0" calcext:value-type="float">
            <text:p>0</text:p>
          </table:table-cell>
          <table:table-cell table:formula="of:=[.N73]&amp;&quot;-&quot;&amp;[.R73]" office:value-type="string" office:string-value="" calcext:value-type="error">
            <text:p>#VALUE!</text:p>
          </table:table-cell>
          <table:table-cell table:formula="of:=[$CopyFromThing.A69]" office:value-type="float" office:value="0" calcext:value-type="float">
            <text:p>0</text:p>
          </table:table-cell>
          <table:table-cell table:formula="of:=[$CopyFromThing.G6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70]" office:value-type="float" office:value="0" calcext:value-type="float">
            <text:p>0</text:p>
          </table:table-cell>
          <table:table-cell table:formula="of:=IF(ISNUMBER(SEARCH(&quot;R&quot;;[$CopyFromThing.A70]));&quot;R&quot;;&quot;&quot;)">
            <text:p/>
          </table:table-cell>
          <table:table-cell table:formula="of:=IF(ISNUMBER(SEARCH(&quot;C&quot;;[$CopyFromThing.A70]));&quot;C&quot;;&quot;&quot;)">
            <text:p/>
          </table:table-cell>
          <table:table-cell table:formula="of:=IF([.D74]&amp;[.C74]&lt;&gt;&quot;&quot;;[.N74];&quot;&quot;)">
            <text:p/>
          </table:table-cell>
          <table:table-cell table:style-name="ce13" table:formula="of:=[.C74]&amp;[.D74]&amp;[.E74]&amp;&quot;__&quot;&amp;[$CopyFromThing.I70]&amp;&quot;__&quot;&amp;[$CopyFromThing.B70]" office:value-type="string" office:string-value="____" calcext:value-type="string">
            <text:p>____</text:p>
          </table:table-cell>
          <table:table-cell table:formula="of:=[$CopyFromThing.D70]" office:value-type="float" office:value="0" calcext:value-type="float">
            <text:p>0</text:p>
          </table:table-cell>
          <table:table-cell table:formula="of:=FIND(&quot;_&quot;;[.G74])" office:value-type="string" office:string-value="" calcext:value-type="error">
            <text:p>#VALUE!</text:p>
          </table:table-cell>
          <table:table-cell table:formula="of:=IF(ISNUMBER([.H74]);RIGHT([.G74];LEN([.G74])-[.H74]);RIGHT([.G74];LEN([.G74])-FIND(&quot;:&quot;;[.G74])))" office:value-type="string" office:string-value="" calcext:value-type="error">
            <text:p>#VALUE!</text:p>
          </table:table-cell>
          <table:table-cell table:style-name="ce16" table:formula="of:=MATCH([.I74];{&quot;0603&quot;;&quot;1206&quot;};0)" office:value-type="string" office:string-value="" calcext:value-type="error">
            <text:p>#VALUE!</text:p>
          </table:table-cell>
          <table:table-cell table:style-name="ce16" table:formula="of:=RIGHT([.G74];LEN([.G74])-FIND(&quot;:&quot;;[.G74]))" office:value-type="string" office:string-value="" calcext:value-type="error">
            <text:p>#VALUE!</text:p>
          </table:table-cell>
          <table:table-cell table:formula="of:=SEARCH(&quot;0603&quot;;[.G74])" office:value-type="string" office:string-value="" calcext:value-type="error">
            <text:p>#VALUE!</text:p>
          </table:table-cell>
          <table:table-cell table:formula="of:=SEARCH(&quot;1206&quot;;[.G74])" office:value-type="string" office:string-value="" calcext:value-type="error">
            <text:p>#VALUE!</text:p>
          </table:table-cell>
          <table:table-cell table:formula="of:=IF(ISNUMBER([.M74]);&quot;1206&quot;;IF(ISNUMBER([.L74]);&quot;0603&quot;;[.K74]))" office:value-type="string" office:string-value="" calcext:value-type="error">
            <text:p>#VALUE!</text:p>
          </table:table-cell>
          <table:table-cell table:formula="of:=IF(ISNUMBER([$CopyFromThing.E70]*1);[$CopyFromThing.E70]*1;0)" office:value-type="float" office:value="0" calcext:value-type="float">
            <text:p>0</text:p>
          </table:table-cell>
          <table:table-cell table:formula="of:=VLOOKUP([.F74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4])&lt;&gt;&quot;&quot;;INDIRECT(&quot;Supplier_Lookup.L&quot;&amp;[.$P74]);INDIRECT(&quot;Supplier_Lookup.&quot;&amp;[.Q$4]&amp;[.$P74]))" office:value-type="float" office:value="0" calcext:value-type="float">
            <text:p>0</text:p>
          </table:table-cell>
          <table:table-cell table:style-name="ce40" table:formula="of:=INDIRECT(&quot;Supplier_Lookup.&quot;&amp;[.R$4]&amp;[.$P74])" office:value-type="float" office:value="0" calcext:value-type="float">
            <text:p>0</text:p>
          </table:table-cell>
          <table:table-cell table:formula="of:=INDIRECT(&quot;Supplier_Lookup.&quot;&amp;[.S$4]&amp;[.$P74])" office:value-type="float" office:value="0" calcext:value-type="float">
            <text:p>0</text:p>
          </table:table-cell>
          <table:table-cell table:formula="of:=INDIRECT(&quot;Supplier_Lookup.&quot;&amp;[.T$4]&amp;[.$P74])" office:value-type="float" office:value="0" calcext:value-type="float">
            <text:p>0</text:p>
          </table:table-cell>
          <table:table-cell table:formula="of:=INDIRECT(&quot;Supplier_Lookup.&quot;&amp;[.U$4]&amp;[.$P74])" office:value-type="float" office:value="0" calcext:value-type="float">
            <text:p>0</text:p>
          </table:table-cell>
          <table:table-cell table:formula="of:=INDIRECT(&quot;Supplier_Lookup.&quot;&amp;[.V$4]&amp;[.$P74])" office:value-type="float" office:value="0" calcext:value-type="float">
            <text:p>0</text:p>
          </table:table-cell>
          <table:table-cell table:formula="of:=INDIRECT(&quot;Supplier_Lookup.&quot;&amp;[.W$4]&amp;[.$P74])" office:value-type="float" office:value="0" calcext:value-type="float">
            <text:p>0</text:p>
          </table:table-cell>
          <table:table-cell table:formula="of:=INDIRECT(&quot;Supplier_Lookup.&quot;&amp;[.X$4]&amp;[.$P74])" office:value-type="float" office:value="0" calcext:value-type="float">
            <text:p>0</text:p>
          </table:table-cell>
          <table:table-cell table:formula="of:=INDIRECT(&quot;Supplier_Lookup.&quot;&amp;[.Y$4]&amp;[.$P74])" office:value-type="float" office:value="0" calcext:value-type="float">
            <text:p>0</text:p>
          </table:table-cell>
          <table:table-cell table:formula="of:=IF(INDIRECT(&quot;Supplier_Lookup.&quot;&amp;[.Z$4]&amp;[.$P74])=&quot;&quot;;&quot;&quot;;INDIRECT(&quot;Supplier_Lookup.&quot;&amp;[.Z$4]&amp;[.$P74]))">
            <text:p/>
          </table:table-cell>
          <table:table-cell table:formula="of:=IF(ISNUMBER([.Y74]);[.Y74];0)" office:value-type="float" office:value="0" calcext:value-type="float">
            <text:p>0</text:p>
          </table:table-cell>
          <table:table-cell table:formula="of:=[.AA74]*[.O74]" office:value-type="float" office:value="0" calcext:value-type="float">
            <text:p>0</text:p>
          </table:table-cell>
          <table:table-cell table:formula="of:=[.N74]&amp;&quot;-&quot;&amp;[.R74]" office:value-type="string" office:string-value="" calcext:value-type="error">
            <text:p>#VALUE!</text:p>
          </table:table-cell>
          <table:table-cell table:formula="of:=[$CopyFromThing.A70]" office:value-type="float" office:value="0" calcext:value-type="float">
            <text:p>0</text:p>
          </table:table-cell>
          <table:table-cell table:formula="of:=[$CopyFromThing.G7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71]" office:value-type="float" office:value="0" calcext:value-type="float">
            <text:p>0</text:p>
          </table:table-cell>
          <table:table-cell table:formula="of:=IF(ISNUMBER(SEARCH(&quot;R&quot;;[$CopyFromThing.A71]));&quot;R&quot;;&quot;&quot;)">
            <text:p/>
          </table:table-cell>
          <table:table-cell table:formula="of:=IF(ISNUMBER(SEARCH(&quot;C&quot;;[$CopyFromThing.A71]));&quot;C&quot;;&quot;&quot;)">
            <text:p/>
          </table:table-cell>
          <table:table-cell table:formula="of:=IF([.D75]&amp;[.C75]&lt;&gt;&quot;&quot;;[.N75];&quot;&quot;)">
            <text:p/>
          </table:table-cell>
          <table:table-cell table:style-name="ce13" table:formula="of:=[.C75]&amp;[.D75]&amp;[.E75]&amp;&quot;__&quot;&amp;[$CopyFromThing.I71]&amp;&quot;__&quot;&amp;[$CopyFromThing.B71]" office:value-type="string" office:string-value="____" calcext:value-type="string">
            <text:p>____</text:p>
          </table:table-cell>
          <table:table-cell table:formula="of:=[$CopyFromThing.D71]" office:value-type="float" office:value="0" calcext:value-type="float">
            <text:p>0</text:p>
          </table:table-cell>
          <table:table-cell table:formula="of:=FIND(&quot;_&quot;;[.G75])" office:value-type="string" office:string-value="" calcext:value-type="error">
            <text:p>#VALUE!</text:p>
          </table:table-cell>
          <table:table-cell table:formula="of:=IF(ISNUMBER([.H75]);RIGHT([.G75];LEN([.G75])-[.H75]);RIGHT([.G75];LEN([.G75])-FIND(&quot;:&quot;;[.G75])))" office:value-type="string" office:string-value="" calcext:value-type="error">
            <text:p>#VALUE!</text:p>
          </table:table-cell>
          <table:table-cell table:style-name="ce16" table:formula="of:=MATCH([.I75];{&quot;0603&quot;;&quot;1206&quot;};0)" office:value-type="string" office:string-value="" calcext:value-type="error">
            <text:p>#VALUE!</text:p>
          </table:table-cell>
          <table:table-cell table:style-name="ce16" table:formula="of:=RIGHT([.G75];LEN([.G75])-FIND(&quot;:&quot;;[.G75]))" office:value-type="string" office:string-value="" calcext:value-type="error">
            <text:p>#VALUE!</text:p>
          </table:table-cell>
          <table:table-cell table:formula="of:=SEARCH(&quot;0603&quot;;[.G75])" office:value-type="string" office:string-value="" calcext:value-type="error">
            <text:p>#VALUE!</text:p>
          </table:table-cell>
          <table:table-cell table:formula="of:=SEARCH(&quot;1206&quot;;[.G75])" office:value-type="string" office:string-value="" calcext:value-type="error">
            <text:p>#VALUE!</text:p>
          </table:table-cell>
          <table:table-cell table:formula="of:=IF(ISNUMBER([.M75]);&quot;1206&quot;;IF(ISNUMBER([.L75]);&quot;0603&quot;;[.K75]))" office:value-type="string" office:string-value="" calcext:value-type="error">
            <text:p>#VALUE!</text:p>
          </table:table-cell>
          <table:table-cell table:formula="of:=IF(ISNUMBER([$CopyFromThing.E71]*1);[$CopyFromThing.E71]*1;0)" office:value-type="float" office:value="0" calcext:value-type="float">
            <text:p>0</text:p>
          </table:table-cell>
          <table:table-cell table:formula="of:=VLOOKUP([.F75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5])&lt;&gt;&quot;&quot;;INDIRECT(&quot;Supplier_Lookup.L&quot;&amp;[.$P75]);INDIRECT(&quot;Supplier_Lookup.&quot;&amp;[.Q$4]&amp;[.$P75]))" office:value-type="float" office:value="0" calcext:value-type="float">
            <text:p>0</text:p>
          </table:table-cell>
          <table:table-cell table:style-name="ce40" table:formula="of:=INDIRECT(&quot;Supplier_Lookup.&quot;&amp;[.R$4]&amp;[.$P75])" office:value-type="float" office:value="0" calcext:value-type="float">
            <text:p>0</text:p>
          </table:table-cell>
          <table:table-cell table:formula="of:=INDIRECT(&quot;Supplier_Lookup.&quot;&amp;[.S$4]&amp;[.$P75])" office:value-type="float" office:value="0" calcext:value-type="float">
            <text:p>0</text:p>
          </table:table-cell>
          <table:table-cell table:formula="of:=INDIRECT(&quot;Supplier_Lookup.&quot;&amp;[.T$4]&amp;[.$P75])" office:value-type="float" office:value="0" calcext:value-type="float">
            <text:p>0</text:p>
          </table:table-cell>
          <table:table-cell table:formula="of:=INDIRECT(&quot;Supplier_Lookup.&quot;&amp;[.U$4]&amp;[.$P75])" office:value-type="float" office:value="0" calcext:value-type="float">
            <text:p>0</text:p>
          </table:table-cell>
          <table:table-cell table:formula="of:=INDIRECT(&quot;Supplier_Lookup.&quot;&amp;[.V$4]&amp;[.$P75])" office:value-type="float" office:value="0" calcext:value-type="float">
            <text:p>0</text:p>
          </table:table-cell>
          <table:table-cell table:formula="of:=INDIRECT(&quot;Supplier_Lookup.&quot;&amp;[.W$4]&amp;[.$P75])" office:value-type="float" office:value="0" calcext:value-type="float">
            <text:p>0</text:p>
          </table:table-cell>
          <table:table-cell table:formula="of:=INDIRECT(&quot;Supplier_Lookup.&quot;&amp;[.X$4]&amp;[.$P75])" office:value-type="float" office:value="0" calcext:value-type="float">
            <text:p>0</text:p>
          </table:table-cell>
          <table:table-cell table:formula="of:=INDIRECT(&quot;Supplier_Lookup.&quot;&amp;[.Y$4]&amp;[.$P75])" office:value-type="float" office:value="0" calcext:value-type="float">
            <text:p>0</text:p>
          </table:table-cell>
          <table:table-cell table:formula="of:=IF(INDIRECT(&quot;Supplier_Lookup.&quot;&amp;[.Z$4]&amp;[.$P75])=&quot;&quot;;&quot;&quot;;INDIRECT(&quot;Supplier_Lookup.&quot;&amp;[.Z$4]&amp;[.$P75]))">
            <text:p/>
          </table:table-cell>
          <table:table-cell table:formula="of:=IF(ISNUMBER([.Y75]);[.Y75];0)" office:value-type="float" office:value="0" calcext:value-type="float">
            <text:p>0</text:p>
          </table:table-cell>
          <table:table-cell table:formula="of:=[.AA75]*[.O75]" office:value-type="float" office:value="0" calcext:value-type="float">
            <text:p>0</text:p>
          </table:table-cell>
          <table:table-cell table:formula="of:=[.N75]&amp;&quot;-&quot;&amp;[.R75]" office:value-type="string" office:string-value="" calcext:value-type="error">
            <text:p>#VALUE!</text:p>
          </table:table-cell>
          <table:table-cell table:formula="of:=[$CopyFromThing.A71]" office:value-type="float" office:value="0" calcext:value-type="float">
            <text:p>0</text:p>
          </table:table-cell>
          <table:table-cell table:formula="of:=[$CopyFromThing.G7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72]" office:value-type="float" office:value="0" calcext:value-type="float">
            <text:p>0</text:p>
          </table:table-cell>
          <table:table-cell table:formula="of:=IF(ISNUMBER(SEARCH(&quot;R&quot;;[$CopyFromThing.A72]));&quot;R&quot;;&quot;&quot;)">
            <text:p/>
          </table:table-cell>
          <table:table-cell table:formula="of:=IF(ISNUMBER(SEARCH(&quot;C&quot;;[$CopyFromThing.A72]));&quot;C&quot;;&quot;&quot;)">
            <text:p/>
          </table:table-cell>
          <table:table-cell table:formula="of:=IF([.D76]&amp;[.C76]&lt;&gt;&quot;&quot;;[.N76];&quot;&quot;)">
            <text:p/>
          </table:table-cell>
          <table:table-cell table:style-name="ce13" table:formula="of:=[.C76]&amp;[.D76]&amp;[.E76]&amp;&quot;__&quot;&amp;[$CopyFromThing.I72]&amp;&quot;__&quot;&amp;[$CopyFromThing.B72]" office:value-type="string" office:string-value="____" calcext:value-type="string">
            <text:p>____</text:p>
          </table:table-cell>
          <table:table-cell table:formula="of:=[$CopyFromThing.D72]" office:value-type="float" office:value="0" calcext:value-type="float">
            <text:p>0</text:p>
          </table:table-cell>
          <table:table-cell table:formula="of:=FIND(&quot;_&quot;;[.G76])" office:value-type="string" office:string-value="" calcext:value-type="error">
            <text:p>#VALUE!</text:p>
          </table:table-cell>
          <table:table-cell table:formula="of:=IF(ISNUMBER([.H76]);RIGHT([.G76];LEN([.G76])-[.H76]);RIGHT([.G76];LEN([.G76])-FIND(&quot;:&quot;;[.G76])))" office:value-type="string" office:string-value="" calcext:value-type="error">
            <text:p>#VALUE!</text:p>
          </table:table-cell>
          <table:table-cell table:style-name="ce16" table:formula="of:=MATCH([.I76];{&quot;0603&quot;;&quot;1206&quot;};0)" office:value-type="string" office:string-value="" calcext:value-type="error">
            <text:p>#VALUE!</text:p>
          </table:table-cell>
          <table:table-cell table:style-name="ce16" table:formula="of:=RIGHT([.G76];LEN([.G76])-FIND(&quot;:&quot;;[.G76]))" office:value-type="string" office:string-value="" calcext:value-type="error">
            <text:p>#VALUE!</text:p>
          </table:table-cell>
          <table:table-cell table:formula="of:=SEARCH(&quot;0603&quot;;[.G76])" office:value-type="string" office:string-value="" calcext:value-type="error">
            <text:p>#VALUE!</text:p>
          </table:table-cell>
          <table:table-cell table:formula="of:=SEARCH(&quot;1206&quot;;[.G76])" office:value-type="string" office:string-value="" calcext:value-type="error">
            <text:p>#VALUE!</text:p>
          </table:table-cell>
          <table:table-cell table:formula="of:=IF(ISNUMBER([.M76]);&quot;1206&quot;;IF(ISNUMBER([.L76]);&quot;0603&quot;;[.K76]))" office:value-type="string" office:string-value="" calcext:value-type="error">
            <text:p>#VALUE!</text:p>
          </table:table-cell>
          <table:table-cell table:formula="of:=IF(ISNUMBER([$CopyFromThing.E72]*1);[$CopyFromThing.E72]*1;0)" office:value-type="float" office:value="0" calcext:value-type="float">
            <text:p>0</text:p>
          </table:table-cell>
          <table:table-cell table:formula="of:=VLOOKUP([.F76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6])&lt;&gt;&quot;&quot;;INDIRECT(&quot;Supplier_Lookup.L&quot;&amp;[.$P76]);INDIRECT(&quot;Supplier_Lookup.&quot;&amp;[.Q$4]&amp;[.$P76]))" office:value-type="float" office:value="0" calcext:value-type="float">
            <text:p>0</text:p>
          </table:table-cell>
          <table:table-cell table:style-name="ce40" table:formula="of:=INDIRECT(&quot;Supplier_Lookup.&quot;&amp;[.R$4]&amp;[.$P76])" office:value-type="float" office:value="0" calcext:value-type="float">
            <text:p>0</text:p>
          </table:table-cell>
          <table:table-cell table:formula="of:=INDIRECT(&quot;Supplier_Lookup.&quot;&amp;[.S$4]&amp;[.$P76])" office:value-type="float" office:value="0" calcext:value-type="float">
            <text:p>0</text:p>
          </table:table-cell>
          <table:table-cell table:formula="of:=INDIRECT(&quot;Supplier_Lookup.&quot;&amp;[.T$4]&amp;[.$P76])" office:value-type="float" office:value="0" calcext:value-type="float">
            <text:p>0</text:p>
          </table:table-cell>
          <table:table-cell table:formula="of:=INDIRECT(&quot;Supplier_Lookup.&quot;&amp;[.U$4]&amp;[.$P76])" office:value-type="float" office:value="0" calcext:value-type="float">
            <text:p>0</text:p>
          </table:table-cell>
          <table:table-cell table:formula="of:=INDIRECT(&quot;Supplier_Lookup.&quot;&amp;[.V$4]&amp;[.$P76])" office:value-type="float" office:value="0" calcext:value-type="float">
            <text:p>0</text:p>
          </table:table-cell>
          <table:table-cell table:formula="of:=INDIRECT(&quot;Supplier_Lookup.&quot;&amp;[.W$4]&amp;[.$P76])" office:value-type="float" office:value="0" calcext:value-type="float">
            <text:p>0</text:p>
          </table:table-cell>
          <table:table-cell table:formula="of:=INDIRECT(&quot;Supplier_Lookup.&quot;&amp;[.X$4]&amp;[.$P76])" office:value-type="float" office:value="0" calcext:value-type="float">
            <text:p>0</text:p>
          </table:table-cell>
          <table:table-cell table:formula="of:=INDIRECT(&quot;Supplier_Lookup.&quot;&amp;[.Y$4]&amp;[.$P76])" office:value-type="float" office:value="0" calcext:value-type="float">
            <text:p>0</text:p>
          </table:table-cell>
          <table:table-cell table:formula="of:=IF(INDIRECT(&quot;Supplier_Lookup.&quot;&amp;[.Z$4]&amp;[.$P76])=&quot;&quot;;&quot;&quot;;INDIRECT(&quot;Supplier_Lookup.&quot;&amp;[.Z$4]&amp;[.$P76]))">
            <text:p/>
          </table:table-cell>
          <table:table-cell table:formula="of:=IF(ISNUMBER([.Y76]);[.Y76];0)" office:value-type="float" office:value="0" calcext:value-type="float">
            <text:p>0</text:p>
          </table:table-cell>
          <table:table-cell table:formula="of:=[.AA76]*[.O76]" office:value-type="float" office:value="0" calcext:value-type="float">
            <text:p>0</text:p>
          </table:table-cell>
          <table:table-cell table:formula="of:=[.N76]&amp;&quot;-&quot;&amp;[.R76]" office:value-type="string" office:string-value="" calcext:value-type="error">
            <text:p>#VALUE!</text:p>
          </table:table-cell>
          <table:table-cell table:formula="of:=[$CopyFromThing.A72]" office:value-type="float" office:value="0" calcext:value-type="float">
            <text:p>0</text:p>
          </table:table-cell>
          <table:table-cell table:formula="of:=[$CopyFromThing.G7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73]" office:value-type="float" office:value="0" calcext:value-type="float">
            <text:p>0</text:p>
          </table:table-cell>
          <table:table-cell table:formula="of:=IF(ISNUMBER(SEARCH(&quot;R&quot;;[$CopyFromThing.A73]));&quot;R&quot;;&quot;&quot;)">
            <text:p/>
          </table:table-cell>
          <table:table-cell table:formula="of:=IF(ISNUMBER(SEARCH(&quot;C&quot;;[$CopyFromThing.A73]));&quot;C&quot;;&quot;&quot;)">
            <text:p/>
          </table:table-cell>
          <table:table-cell table:formula="of:=IF([.D77]&amp;[.C77]&lt;&gt;&quot;&quot;;[.N77];&quot;&quot;)">
            <text:p/>
          </table:table-cell>
          <table:table-cell table:style-name="ce13" table:formula="of:=[.C77]&amp;[.D77]&amp;[.E77]&amp;&quot;__&quot;&amp;[$CopyFromThing.I73]&amp;&quot;__&quot;&amp;[$CopyFromThing.B73]" office:value-type="string" office:string-value="____" calcext:value-type="string">
            <text:p>____</text:p>
          </table:table-cell>
          <table:table-cell table:formula="of:=[$CopyFromThing.D73]" office:value-type="float" office:value="0" calcext:value-type="float">
            <text:p>0</text:p>
          </table:table-cell>
          <table:table-cell table:formula="of:=FIND(&quot;_&quot;;[.G77])" office:value-type="string" office:string-value="" calcext:value-type="error">
            <text:p>#VALUE!</text:p>
          </table:table-cell>
          <table:table-cell table:formula="of:=IF(ISNUMBER([.H77]);RIGHT([.G77];LEN([.G77])-[.H77]);RIGHT([.G77];LEN([.G77])-FIND(&quot;:&quot;;[.G77])))" office:value-type="string" office:string-value="" calcext:value-type="error">
            <text:p>#VALUE!</text:p>
          </table:table-cell>
          <table:table-cell table:style-name="ce16" table:formula="of:=MATCH([.I77];{&quot;0603&quot;;&quot;1206&quot;};0)" office:value-type="string" office:string-value="" calcext:value-type="error">
            <text:p>#VALUE!</text:p>
          </table:table-cell>
          <table:table-cell table:style-name="ce16" table:formula="of:=RIGHT([.G77];LEN([.G77])-FIND(&quot;:&quot;;[.G77]))" office:value-type="string" office:string-value="" calcext:value-type="error">
            <text:p>#VALUE!</text:p>
          </table:table-cell>
          <table:table-cell table:formula="of:=SEARCH(&quot;0603&quot;;[.G77])" office:value-type="string" office:string-value="" calcext:value-type="error">
            <text:p>#VALUE!</text:p>
          </table:table-cell>
          <table:table-cell table:formula="of:=SEARCH(&quot;1206&quot;;[.G77])" office:value-type="string" office:string-value="" calcext:value-type="error">
            <text:p>#VALUE!</text:p>
          </table:table-cell>
          <table:table-cell table:formula="of:=IF(ISNUMBER([.M77]);&quot;1206&quot;;IF(ISNUMBER([.L77]);&quot;0603&quot;;[.K77]))" office:value-type="string" office:string-value="" calcext:value-type="error">
            <text:p>#VALUE!</text:p>
          </table:table-cell>
          <table:table-cell table:formula="of:=IF(ISNUMBER([$CopyFromThing.E73]*1);[$CopyFromThing.E73]*1;0)" office:value-type="float" office:value="0" calcext:value-type="float">
            <text:p>0</text:p>
          </table:table-cell>
          <table:table-cell table:formula="of:=VLOOKUP([.F77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7])&lt;&gt;&quot;&quot;;INDIRECT(&quot;Supplier_Lookup.L&quot;&amp;[.$P77]);INDIRECT(&quot;Supplier_Lookup.&quot;&amp;[.Q$4]&amp;[.$P77]))" office:value-type="float" office:value="0" calcext:value-type="float">
            <text:p>0</text:p>
          </table:table-cell>
          <table:table-cell table:style-name="ce40" table:formula="of:=INDIRECT(&quot;Supplier_Lookup.&quot;&amp;[.R$4]&amp;[.$P77])" office:value-type="float" office:value="0" calcext:value-type="float">
            <text:p>0</text:p>
          </table:table-cell>
          <table:table-cell table:formula="of:=INDIRECT(&quot;Supplier_Lookup.&quot;&amp;[.S$4]&amp;[.$P77])" office:value-type="float" office:value="0" calcext:value-type="float">
            <text:p>0</text:p>
          </table:table-cell>
          <table:table-cell table:formula="of:=INDIRECT(&quot;Supplier_Lookup.&quot;&amp;[.T$4]&amp;[.$P77])" office:value-type="float" office:value="0" calcext:value-type="float">
            <text:p>0</text:p>
          </table:table-cell>
          <table:table-cell table:formula="of:=INDIRECT(&quot;Supplier_Lookup.&quot;&amp;[.U$4]&amp;[.$P77])" office:value-type="float" office:value="0" calcext:value-type="float">
            <text:p>0</text:p>
          </table:table-cell>
          <table:table-cell table:formula="of:=INDIRECT(&quot;Supplier_Lookup.&quot;&amp;[.V$4]&amp;[.$P77])" office:value-type="float" office:value="0" calcext:value-type="float">
            <text:p>0</text:p>
          </table:table-cell>
          <table:table-cell table:formula="of:=INDIRECT(&quot;Supplier_Lookup.&quot;&amp;[.W$4]&amp;[.$P77])" office:value-type="float" office:value="0" calcext:value-type="float">
            <text:p>0</text:p>
          </table:table-cell>
          <table:table-cell table:formula="of:=INDIRECT(&quot;Supplier_Lookup.&quot;&amp;[.X$4]&amp;[.$P77])" office:value-type="float" office:value="0" calcext:value-type="float">
            <text:p>0</text:p>
          </table:table-cell>
          <table:table-cell table:formula="of:=INDIRECT(&quot;Supplier_Lookup.&quot;&amp;[.Y$4]&amp;[.$P77])" office:value-type="float" office:value="0" calcext:value-type="float">
            <text:p>0</text:p>
          </table:table-cell>
          <table:table-cell table:formula="of:=IF(INDIRECT(&quot;Supplier_Lookup.&quot;&amp;[.Z$4]&amp;[.$P77])=&quot;&quot;;&quot;&quot;;INDIRECT(&quot;Supplier_Lookup.&quot;&amp;[.Z$4]&amp;[.$P77]))">
            <text:p/>
          </table:table-cell>
          <table:table-cell table:formula="of:=IF(ISNUMBER([.Y77]);[.Y77];0)" office:value-type="float" office:value="0" calcext:value-type="float">
            <text:p>0</text:p>
          </table:table-cell>
          <table:table-cell table:formula="of:=[.AA77]*[.O77]" office:value-type="float" office:value="0" calcext:value-type="float">
            <text:p>0</text:p>
          </table:table-cell>
          <table:table-cell table:formula="of:=[.N77]&amp;&quot;-&quot;&amp;[.R77]" office:value-type="string" office:string-value="" calcext:value-type="error">
            <text:p>#VALUE!</text:p>
          </table:table-cell>
          <table:table-cell table:formula="of:=[$CopyFromThing.A73]" office:value-type="float" office:value="0" calcext:value-type="float">
            <text:p>0</text:p>
          </table:table-cell>
          <table:table-cell table:formula="of:=[$CopyFromThing.G7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CopyFromThing.I74]" office:value-type="float" office:value="0" calcext:value-type="float">
            <text:p>0</text:p>
          </table:table-cell>
          <table:table-cell table:formula="of:=IF(ISNUMBER(SEARCH(&quot;R&quot;;[$CopyFromThing.A74]));&quot;R&quot;;&quot;&quot;)">
            <text:p/>
          </table:table-cell>
          <table:table-cell table:formula="of:=IF(ISNUMBER(SEARCH(&quot;C&quot;;[$CopyFromThing.A74]));&quot;C&quot;;&quot;&quot;)">
            <text:p/>
          </table:table-cell>
          <table:table-cell table:formula="of:=IF([.D78]&amp;[.C78]&lt;&gt;&quot;&quot;;[.N78];&quot;&quot;)">
            <text:p/>
          </table:table-cell>
          <table:table-cell table:style-name="ce13" table:formula="of:=[.C78]&amp;[.D78]&amp;[.E78]&amp;&quot;__&quot;&amp;[$CopyFromThing.I74]&amp;&quot;__&quot;&amp;[$CopyFromThing.B74]" office:value-type="string" office:string-value="____" calcext:value-type="string">
            <text:p>____</text:p>
          </table:table-cell>
          <table:table-cell table:formula="of:=[$CopyFromThing.D74]" office:value-type="float" office:value="0" calcext:value-type="float">
            <text:p>0</text:p>
          </table:table-cell>
          <table:table-cell table:formula="of:=FIND(&quot;_&quot;;[.G78])" office:value-type="string" office:string-value="" calcext:value-type="error">
            <text:p>#VALUE!</text:p>
          </table:table-cell>
          <table:table-cell table:formula="of:=IF(ISNUMBER([.H78]);RIGHT([.G78];LEN([.G78])-[.H78]);RIGHT([.G78];LEN([.G78])-FIND(&quot;:&quot;;[.G78])))" office:value-type="string" office:string-value="" calcext:value-type="error">
            <text:p>#VALUE!</text:p>
          </table:table-cell>
          <table:table-cell table:style-name="ce16" table:formula="of:=MATCH([.I78];{&quot;0603&quot;;&quot;1206&quot;};0)" office:value-type="string" office:string-value="" calcext:value-type="error">
            <text:p>#VALUE!</text:p>
          </table:table-cell>
          <table:table-cell table:style-name="ce16" table:formula="of:=RIGHT([.G78];LEN([.G78])-FIND(&quot;:&quot;;[.G78]))" office:value-type="string" office:string-value="" calcext:value-type="error">
            <text:p>#VALUE!</text:p>
          </table:table-cell>
          <table:table-cell table:formula="of:=SEARCH(&quot;0603&quot;;[.G78])" office:value-type="string" office:string-value="" calcext:value-type="error">
            <text:p>#VALUE!</text:p>
          </table:table-cell>
          <table:table-cell table:formula="of:=SEARCH(&quot;1206&quot;;[.G78])" office:value-type="string" office:string-value="" calcext:value-type="error">
            <text:p>#VALUE!</text:p>
          </table:table-cell>
          <table:table-cell table:formula="of:=IF(ISNUMBER([.M78]);&quot;1206&quot;;IF(ISNUMBER([.L78]);&quot;0603&quot;;[.K78]))" office:value-type="string" office:string-value="" calcext:value-type="error">
            <text:p>#VALUE!</text:p>
          </table:table-cell>
          <table:table-cell table:formula="of:=IF(ISNUMBER([$CopyFromThing.E74]*1);[$CopyFromThing.E74]*1;0)" office:value-type="float" office:value="0" calcext:value-type="float">
            <text:p>0</text:p>
          </table:table-cell>
          <table:table-cell table:formula="of:=VLOOKUP([.F78];[$Supplier_Lookup.$O$7:.$P$104];2;0)" office:value-type="float" office:value="60" calcext:value-type="float">
            <text:p>60</text:p>
          </table:table-cell>
          <table:table-cell table:formula="of:=IF(INDIRECT(&quot;Supplier_Lookup.&quot;&amp;[.Q$3]&amp;[.$P78])&lt;&gt;&quot;&quot;;INDIRECT(&quot;Supplier_Lookup.L&quot;&amp;[.$P78]);INDIRECT(&quot;Supplier_Lookup.&quot;&amp;[.Q$4]&amp;[.$P78]))" office:value-type="float" office:value="0" calcext:value-type="float">
            <text:p>0</text:p>
          </table:table-cell>
          <table:table-cell table:style-name="ce40" table:formula="of:=INDIRECT(&quot;Supplier_Lookup.&quot;&amp;[.R$4]&amp;[.$P78])" office:value-type="float" office:value="0" calcext:value-type="float">
            <text:p>0</text:p>
          </table:table-cell>
          <table:table-cell table:formula="of:=INDIRECT(&quot;Supplier_Lookup.&quot;&amp;[.S$4]&amp;[.$P78])" office:value-type="float" office:value="0" calcext:value-type="float">
            <text:p>0</text:p>
          </table:table-cell>
          <table:table-cell table:formula="of:=INDIRECT(&quot;Supplier_Lookup.&quot;&amp;[.T$4]&amp;[.$P78])" office:value-type="float" office:value="0" calcext:value-type="float">
            <text:p>0</text:p>
          </table:table-cell>
          <table:table-cell table:formula="of:=INDIRECT(&quot;Supplier_Lookup.&quot;&amp;[.U$4]&amp;[.$P78])" office:value-type="float" office:value="0" calcext:value-type="float">
            <text:p>0</text:p>
          </table:table-cell>
          <table:table-cell table:formula="of:=INDIRECT(&quot;Supplier_Lookup.&quot;&amp;[.V$4]&amp;[.$P78])" office:value-type="float" office:value="0" calcext:value-type="float">
            <text:p>0</text:p>
          </table:table-cell>
          <table:table-cell table:formula="of:=INDIRECT(&quot;Supplier_Lookup.&quot;&amp;[.W$4]&amp;[.$P78])" office:value-type="float" office:value="0" calcext:value-type="float">
            <text:p>0</text:p>
          </table:table-cell>
          <table:table-cell table:formula="of:=INDIRECT(&quot;Supplier_Lookup.&quot;&amp;[.X$4]&amp;[.$P78])" office:value-type="float" office:value="0" calcext:value-type="float">
            <text:p>0</text:p>
          </table:table-cell>
          <table:table-cell table:formula="of:=INDIRECT(&quot;Supplier_Lookup.&quot;&amp;[.Y$4]&amp;[.$P78])" office:value-type="float" office:value="0" calcext:value-type="float">
            <text:p>0</text:p>
          </table:table-cell>
          <table:table-cell table:formula="of:=IF(INDIRECT(&quot;Supplier_Lookup.&quot;&amp;[.Z$4]&amp;[.$P78])=&quot;&quot;;&quot;&quot;;INDIRECT(&quot;Supplier_Lookup.&quot;&amp;[.Z$4]&amp;[.$P78]))">
            <text:p/>
          </table:table-cell>
          <table:table-cell table:formula="of:=IF(ISNUMBER([.Y78]);[.Y78];0)" office:value-type="float" office:value="0" calcext:value-type="float">
            <text:p>0</text:p>
          </table:table-cell>
          <table:table-cell table:formula="of:=[.AA78]*[.O78]" office:value-type="float" office:value="0" calcext:value-type="float">
            <text:p>0</text:p>
          </table:table-cell>
          <table:table-cell table:formula="of:=[.N78]&amp;&quot;-&quot;&amp;[.R78]" office:value-type="string" office:string-value="" calcext:value-type="error">
            <text:p>#VALUE!</text:p>
          </table:table-cell>
          <table:table-cell table:formula="of:=[$CopyFromThing.A74]" office:value-type="float" office:value="0" calcext:value-type="float">
            <text:p>0</text:p>
          </table:table-cell>
          <table:table-cell table:formula="of:=[$CopyFromThing.G74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5"/>
          <table:table-cell table:style-name="ce14"/>
          <table:table-cell table:number-columns-repeated="25"/>
        </table:table-row>
        <table:table-row table:style-name="ro1" table:number-rows-repeated="1048488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Linking.B1:Linking.B1048576">
            <calcext:condition calcext:apply-style-name="Good" calcext:value="formula-is(ISNUMBER([$Linking.$P1]))" calcext:base-cell-address="Linking.B1"/>
          </calcext:conditional-format>
          <calcext:conditional-format calcext:target-range-address="Linking.F1:Linking.F1048576">
            <calcext:condition calcext:apply-style-name="Bad" calcext:value="formula-is(NOT(ISNUMBER([$Linking.$P1])))" calcext:base-cell-address="Linking.F1"/>
          </calcext:conditional-format>
        </calcext:conditional-formats>
      </table:table>
      <table:table table:name="'file:///G:/Other%20computers/My%20Laptop/Hobby/mmtr/PCBs/LCMTR_01_01/LCMTR_01_01.csv'#LCMTR_01_01" table:print="false" table:style-name="ta_extref">
        <table:table-source xlink:type="simple" xlink:href="../LCMTR_01_01.csv" table:table-name="LCMTR_01_01" table:filter-name="Text - txt - csv (StarCalc)" table:filter-options="44,34,12,1,,0,true,false,true,false,false,0,false,false,false" table:mode="copy-results-only"/>
        <table:table-column table:number-columns-repeated="13"/>
        <table:table-row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NP</text:p>
          </table:table-cell>
          <table:table-cell table:style-name="ce1" office:value-type="string">
            <text:p>#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 #</text:p>
          </table:table-cell>
          <table:table-cell table:style-name="ce1" office:value-type="string">
            <text:p>Supplier 1</text:p>
          </table:table-cell>
          <table:table-cell table:style-name="ce1" office:value-type="string">
            <text:p>Supplier 1 Link</text:p>
          </table:table-cell>
          <table:table-cell table:style-name="ce1" office:value-type="string">
            <text:p>Supplier 1 Part #</text:p>
          </table:table-cell>
          <table:table-cell table:style-name="ce1" office:value-type="string">
            <text:p>Supplier 2</text:p>
          </table:table-cell>
        </table:table-row>
        <table:table-row>
          <table:table-cell table:style-name="ce1" office:value-type="string">
            <text:p>C2,C3,C4</text:p>
          </table:table-cell>
          <table:table-cell table:style-name="ce1" office:value-type="string">
            <text:p>330p</text:p>
          </table:table-cell>
          <table:table-cell/>
          <table:table-cell table:style-name="ce1" office:value-type="string">
            <text:p>AADuffy:Resistor_1206_ThinEnds</text:p>
          </table:table-cell>
          <table:table-cell table:style-name="ce1" office:value-type="string">
            <text:p>3</text:p>
          </table:table-cell>
          <table:table-cell/>
          <table:table-cell table:style-name="ce1" office:value-type="string">
            <text:p>1</text:p>
          </table:table-cell>
        </table:table-row>
        <table:table-row>
          <table:table-cell table:style-name="ce1" office:value-type="string">
            <text:p>C5,C14,C43,C44</text:p>
          </table:table-cell>
          <table:table-cell table:style-name="ce1" office:value-type="string">
            <text:p>100p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2</text:p>
          </table:table-cell>
        </table:table-row>
        <table:table-row>
          <table:table-cell table:style-name="ce1" office:value-type="string">
            <text:p>C6,C10,C13,C85,C86,C87,C88,C95</text:p>
          </table:table-cell>
          <table:table-cell table:style-name="ce1" office:value-type="string">
            <text:p>1n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8</text:p>
          </table:table-cell>
          <table:table-cell/>
          <table:table-cell table:style-name="ce1" office:value-type="string">
            <text:p>3</text:p>
          </table:table-cell>
        </table:table-row>
        <table:table-row>
          <table:table-cell table:style-name="ce1" office:value-type="string">
            <text:p>C7</text:p>
          </table:table-cell>
          <table:table-cell table:style-name="ce1" office:value-type="string">
            <text:p>33n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4</text:p>
          </table:table-cell>
        </table:table-row>
        <table:table-row>
          <table:table-cell table:style-name="ce1" office:value-type="string">
            <text:p>C9,C21,C33,C34,C35,C36,C37,C38,C39,C81</text:p>
          </table:table-cell>
          <table:table-cell table:style-name="ce1" office:value-type="string">
            <text:p>10n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10</text:p>
          </table:table-cell>
          <table:table-cell/>
          <table:table-cell table:style-name="ce1" office:value-type="string">
            <text:p>5</text:p>
          </table:table-cell>
        </table:table-row>
        <table:table-row>
          <table:table-cell table:style-name="ce1" office:value-type="string">
            <text:p>C11</text:p>
          </table:table-cell>
          <table:table-cell table:style-name="ce1" office:value-type="string">
            <text:p>3.3n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6</text:p>
          </table:table-cell>
        </table:table-row>
        <table:table-row>
          <table:table-cell table:style-name="ce1" office:value-type="string">
            <text:p>C16</text:p>
          </table:table-cell>
          <table:table-cell table:style-name="ce1" office:value-type="string">
            <text:p>330p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7</text:p>
          </table:table-cell>
        </table:table-row>
        <table:table-row>
          <table:table-cell table:style-name="ce1" office:value-type="string">
            <text:p>C17,C18,C19,C20,C23,C24,C25,C45,C46,C52,C53,C55</text:p>
          </table:table-cell>
          <table:table-cell table:style-name="ce1" office:value-type="string">
            <text:p>100n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12</text:p>
          </table:table-cell>
          <table:table-cell/>
          <table:table-cell table:style-name="ce1" office:value-type="string">
            <text:p>8</text:p>
          </table:table-cell>
        </table:table-row>
        <table:table-row>
          <table:table-cell table:style-name="ce1" office:value-type="string">
            <text:p>C22,C26,C28,C29,C30,C31,C32,C40,C41,C42,C47,C48,C49,C50,C51,C54,C56,C57,C58,C59,C60,C61,C62,C63,C64,C65,C66,C67,C68,C69,C70,C73,C76,C78,C79,C80,C82,C83,C84,C89,C90,C91</text:p>
          </table:table-cell>
          <table:table-cell table:style-name="ce1" office:value-type="string">
            <text:p>1u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42</text:p>
          </table:table-cell>
          <table:table-cell/>
          <table:table-cell table:style-name="ce1" office:value-type="string">
            <text:p>9</text:p>
          </table:table-cell>
        </table:table-row>
        <table:table-row>
          <table:table-cell table:style-name="ce1" office:value-type="string">
            <text:p>C71,C72,C74,C75</text:p>
          </table:table-cell>
          <table:table-cell table:style-name="ce1" office:value-type="string">
            <text:p>15p</text:p>
          </table:table-cell>
          <table:table-cell/>
          <table:table-cell table:style-name="ce1" office:value-type="string">
            <text:p>AADuffy:Cap_SMD_0603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10</text:p>
          </table:table-cell>
        </table:table-row>
        <table:table-row>
          <table:table-cell table:style-name="ce1" office:value-type="string">
            <text:p>D1,D4,D5,D6,D7,D8</text:p>
          </table:table-cell>
          <table:table-cell table:style-name="ce1" office:value-type="string">
            <text:p>1N4007FL</text:p>
          </table:table-cell>
          <table:table-cell table:style-name="ce1" office:value-type="string">
            <text:p>https://www.smc-diodes.com/propdf/1N4001FL-1N4007FL%20N1646%20REV.A.pdf</text:p>
          </table:table-cell>
          <table:table-cell table:style-name="ce1" office:value-type="string">
            <text:p>AADuffy:1N4007FL</text:p>
          </table:table-cell>
          <table:table-cell table:style-name="ce1" office:value-type="string">
            <text:p>6</text:p>
          </table:table-cell>
          <table:table-cell/>
          <table:table-cell table:style-name="ce1" office:value-type="string">
            <text:p>11</text:p>
          </table:table-cell>
          <table:table-cell table:style-name="ce1" office:value-type="string">
            <text:p>SMC</text:p>
          </table:table-cell>
          <table:table-cell table:style-name="ce1" office:value-type="string">
            <text:p>1N4007FL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smc-diode-solutions/1N4007FL/11657817</text:p>
          </table:table-cell>
          <table:table-cell table:style-name="ce1" office:value-type="string">
            <text:p>1655-1N4007FLCT-ND</text:p>
          </table:table-cell>
        </table:table-row>
        <table:table-row>
          <table:table-cell table:style-name="ce1" office:value-type="string">
            <text:p>D2</text:p>
          </table:table-cell>
          <table:table-cell table:style-name="ce1" office:value-type="string">
            <text:p>6.1V</text:p>
          </table:table-cell>
          <table:table-cell table:style-name="ce1" office:value-type="string">
            <text:p>https://www.diodes.com/assets/Datasheets/ds18010.pdf</text:p>
          </table:table-cell>
          <table:table-cell table:style-name="ce1" office:value-type="string">
            <text:p>AADuffy:SOD123_MMSZ5231B-7-F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12</text:p>
          </table:table-cell>
          <table:table-cell table:style-name="ce1" office:value-type="string">
            <text:p>Diodes Inc</text:p>
          </table:table-cell>
          <table:table-cell table:style-name="ce1" office:value-type="string">
            <text:p>MMSZ5231B-7-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MMSZ5231B-7-F/755472</text:p>
          </table:table-cell>
          <table:table-cell table:style-name="ce1" office:value-type="string">
            <text:p>MMSZ5231B-FDICT-ND</text:p>
          </table:table-cell>
        </table:table-row>
        <table:table-row>
          <table:table-cell table:style-name="ce1" office:value-type="string">
            <text:p>D3</text:p>
          </table:table-cell>
          <table:table-cell table:style-name="ce1" office:value-type="string">
            <text:p>5.6V</text:p>
          </table:table-cell>
          <table:table-cell table:style-name="ce1" office:value-type="string">
            <text:p>https://www.diodes.com/assets/Datasheets/ds18010.pdf</text:p>
          </table:table-cell>
          <table:table-cell table:style-name="ce1" office:value-type="string">
            <text:p>AADuffy:SOD123_MMSZ5231B-7-F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13</text:p>
          </table:table-cell>
          <table:table-cell table:style-name="ce1" office:value-type="string">
            <text:p>Diodes Inc</text:p>
          </table:table-cell>
          <table:table-cell table:style-name="ce1" office:value-type="string">
            <text:p>MMSZ5231B-7-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MMSZ5231B-7-F/755472</text:p>
          </table:table-cell>
          <table:table-cell table:style-name="ce1" office:value-type="string">
            <text:p>MMSZ5231B-FDICT-ND</text:p>
          </table:table-cell>
        </table:table-row>
        <table:table-row>
          <table:table-cell table:style-name="ce1" office:value-type="string">
            <text:p>Q1,Q3,Q5,Q7,Q8,Q9,Q12,Q13,Q14,Q17,Q20,Q26,Q30,Q37</text:p>
          </table:table-cell>
          <table:table-cell/>
          <table:table-cell table:style-name="ce1" office:value-type="string">
            <text:p>https://www.mccsemi.com/pdf/Products/MMBT3904(SOT-23).pdf</text:p>
          </table:table-cell>
          <table:table-cell table:style-name="ce1" office:value-type="string">
            <text:p>AADuffy:SOT23-3</text:p>
          </table:table-cell>
          <table:table-cell table:style-name="ce1" office:value-type="string">
            <text:p>14</text:p>
          </table:table-cell>
          <table:table-cell/>
          <table:table-cell table:style-name="ce1" office:value-type="string">
            <text:p>14</text:p>
          </table:table-cell>
          <table:table-cell table:style-name="ce1" office:value-type="string">
            <text:p>Micro Commercial</text:p>
          </table:table-cell>
          <table:table-cell table:style-name="ce1" office:value-type="string">
            <text:p>MMBT3904-TP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micro-commercial-co/MMBT3904-TP/717280</text:p>
          </table:table-cell>
          <table:table-cell table:style-name="ce1" office:value-type="string">
            <text:p>MMBT3904TPMSCT-ND</text:p>
          </table:table-cell>
        </table:table-row>
        <table:table-row>
          <table:table-cell table:style-name="ce1" office:value-type="string">
            <text:p>Q2,Q4,Q6,Q11,Q15,Q18,Q22,Q24,Q25,Q27,Q29,Q31</text:p>
          </table:table-cell>
          <table:table-cell/>
          <table:table-cell table:style-name="ce1" office:value-type="string">
            <text:p>https://diotec.com/request/datasheet/mmftp84.pdf</text:p>
          </table:table-cell>
          <table:table-cell table:style-name="ce1" office:value-type="string">
            <text:p>AADuffy:DMN65D8L-7</text:p>
          </table:table-cell>
          <table:table-cell table:style-name="ce1" office:value-type="string">
            <text:p>12</text:p>
          </table:table-cell>
          <table:table-cell/>
          <table:table-cell table:style-name="ce1" office:value-type="string">
            <text:p>15</text:p>
          </table:table-cell>
          <table:table-cell table:style-name="ce1" office:value-type="string">
            <text:p>Diotec</text:p>
          </table:table-cell>
          <table:table-cell table:style-name="ce1" office:value-type="string">
            <text:p>MMFTP84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tec-semiconductor/MMFTP84/13154778</text:p>
          </table:table-cell>
          <table:table-cell table:style-name="ce1" office:value-type="string">
            <text:p>4878-MMFTP84CT-ND</text:p>
          </table:table-cell>
        </table:table-row>
        <table:table-row>
          <table:table-cell table:style-name="ce1" office:value-type="string">
            <text:p>Q16,Q19,Q21,Q23</text:p>
          </table:table-cell>
          <table:table-cell/>
          <table:table-cell table:style-name="ce1" office:value-type="string">
            <text:p>https://www.diodes.com/assets/Datasheets/DMN65D8L.pdf</text:p>
          </table:table-cell>
          <table:table-cell table:style-name="ce1" office:value-type="string">
            <text:p>AADuffy:DMN65D8L-7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16</text:p>
          </table:table-cell>
          <table:table-cell table:style-name="ce1" office:value-type="string">
            <text:p>Diodes Incorporated</text:p>
          </table:table-cell>
          <table:table-cell table:style-name="ce1" office:value-type="string">
            <text:p>DMN65D8L-7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DMN65D8L-7/3678136</text:p>
          </table:table-cell>
          <table:table-cell table:style-name="ce1" office:value-type="string">
            <text:p>DMN65D8L-7DICT-ND</text:p>
          </table:table-cell>
        </table:table-row>
        <table:table-row>
          <table:table-cell table:style-name="ce1" office:value-type="string">
            <text:p>R1,R11,R17,R26,R34,R39,R45,R49,R50,R52,R53,R71,R72,R95,R96,R97</text:p>
          </table:table-cell>
          <table:table-cell table:style-name="ce1" office:value-type="string">
            <text:p>100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16</text:p>
          </table:table-cell>
          <table:table-cell/>
          <table:table-cell table:style-name="ce1" office:value-type="string">
            <text:p>17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2,R13,R20,R27,R35,R36,R47,R54,R68,R69,R70,R73,R74</text:p>
          </table:table-cell>
          <table:table-cell table:style-name="ce1" office:value-type="string">
            <text:p>330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13</text:p>
          </table:table-cell>
          <table:table-cell/>
          <table:table-cell table:style-name="ce1" office:value-type="string">
            <text:p>18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14,R33,R42,R55,R80,R83,R86,R88,R109</text:p>
          </table:table-cell>
          <table:table-cell table:style-name="ce1" office:value-type="string">
            <text:p>1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9</text:p>
          </table:table-cell>
          <table:table-cell/>
          <table:table-cell table:style-name="ce1" office:value-type="string">
            <text:p>19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16</text:p>
          </table:table-cell>
          <table:table-cell table:style-name="ce1" office:value-type="string">
            <text:p>100K</text:p>
          </table:table-cell>
          <table:table-cell/>
          <table:table-cell table:style-name="ce1" office:value-type="string">
            <text:p>AADuffy:Resistor_1206_ThinEnds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20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18</text:p>
          </table:table-cell>
          <table:table-cell table:style-name="ce1" office:value-type="string">
            <text:p>470</text:p>
          </table:table-cell>
          <table:table-cell/>
          <table:table-cell table:style-name="ce1" office:value-type="string">
            <text:p>AADuffy:Resistor_1206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21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21,R22</text:p>
          </table:table-cell>
          <table:table-cell table:style-name="ce1" office:value-type="string">
            <text:p>1M</text:p>
          </table:table-cell>
          <table:table-cell/>
          <table:table-cell table:style-name="ce1" office:value-type="string">
            <text:p>AADuffy:Resistor_1206_ThinEnds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22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41,R48,R66,R67,R76,R77,R82,R87</text:p>
          </table:table-cell>
          <table:table-cell table:style-name="ce1" office:value-type="string">
            <text:p>10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8</text:p>
          </table:table-cell>
          <table:table-cell/>
          <table:table-cell table:style-name="ce1" office:value-type="string">
            <text:p>23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43,R44</text:p>
          </table:table-cell>
          <table:table-cell table:style-name="ce1" office:value-type="string">
            <text:p>3.3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24</text:p>
          </table:table-cell>
          <table:table-cell/>
          <table:table-cell table:style-name="ce1" office:value-type="string">
            <text:p>CRIT</text:p>
          </table:table-cell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46,R51,R94,R98,R99,R100,R101,R102</text:p>
          </table:table-cell>
          <table:table-cell table:style-name="ce1" office:value-type="string">
            <text:p>33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8</text:p>
          </table:table-cell>
          <table:table-cell/>
          <table:table-cell table:style-name="ce1" office:value-type="string">
            <text:p>25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56</text:p>
          </table:table-cell>
          <table:table-cell table:style-name="ce1" office:value-type="string">
            <text:p>100</text:p>
          </table:table-cell>
          <table:table-cell/>
          <table:table-cell table:style-name="ce1" office:value-type="string">
            <text:p>AADuffy:Resistor_1206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26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59,R60,R61,R62,R63,R64,R65,R106,R107</text:p>
          </table:table-cell>
          <table:table-cell table:style-name="ce1" office:value-type="string">
            <text:p>220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9</text:p>
          </table:table-cell>
          <table:table-cell/>
          <table:table-cell table:style-name="ce1" office:value-type="string">
            <text:p>27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75,R78,R79,R81,R84,R85,R103,R104,R105</text:p>
          </table:table-cell>
          <table:table-cell table:style-name="ce1" office:value-type="string">
            <text:p>27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9</text:p>
          </table:table-cell>
          <table:table-cell/>
          <table:table-cell table:style-name="ce1" office:value-type="string">
            <text:p>28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R89,R90,R91,R92</text:p>
          </table:table-cell>
          <table:table-cell table:style-name="ce1" office:value-type="string">
            <text:p>5.1K</text:p>
          </table:table-cell>
          <table:table-cell/>
          <table:table-cell table:style-name="ce1" office:value-type="string">
            <text:p>AADuffy:Resistor_0603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29</text:p>
          </table:table-cell>
          <table:table-cell table:number-columns-repeated="2"/>
          <table:table-cell table:style-name="ce1" office:value-type="string">
            <text:p>Digikey</text:p>
          </table:table-cell>
        </table:table-row>
        <table:table-row>
          <table:table-cell table:style-name="ce1" office:value-type="string">
            <text:p>U1</text:p>
          </table:table-cell>
          <table:table-cell table:style-name="ce1" office:value-type="string">
            <text:p>0.2pA 5uV</text:p>
          </table:table-cell>
          <table:table-cell table:style-name="ce1" office:value-type="string">
            <text:p>https://www.diodes.com/assets/Datasheets/AS2376.pdf</text:p>
          </table:table-cell>
          <table:table-cell table:style-name="ce1" office:value-type="string">
            <text:p>AADuffy:SOIC-8_AS2376S-13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30</text:p>
          </table:table-cell>
          <table:table-cell table:style-name="ce1" office:value-type="string">
            <text:p>Diodes Inc</text:p>
          </table:table-cell>
          <table:table-cell table:style-name="ce1" office:value-type="string">
            <text:p>AS2376S-13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AS2376S-13/20371292</text:p>
          </table:table-cell>
          <table:table-cell table:style-name="ce1" office:value-type="string">
            <text:p>31-AS2376S-13CT-ND</text:p>
          </table:table-cell>
        </table:table-row>
        <table:table-row>
          <table:table-cell table:style-name="ce1" office:value-type="string">
            <text:p>U2,U3,U4,U5</text:p>
          </table:table-cell>
          <table:table-cell table:style-name="ce1" office:value-type="string">
            <text:p>TS5A3159DCKR</text:p>
          </table:table-cell>
          <table:table-cell table:style-name="ce1" office:value-type="string">
            <text:p>https://www.ti.com/lit/ds/symlink/ts5a3159.pdf?HQS=dis-dk-null-digikeymode-dsf-pf-null-wwe&amp;ts=1735579328072</text:p>
          </table:table-cell>
          <table:table-cell table:style-name="ce1" office:value-type="string">
            <text:p>AADuffy:SC-70_TS5A3159DCKR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31</text:p>
          </table:table-cell>
          <table:table-cell table:style-name="ce1" office:value-type="string">
            <text:p>TI</text:p>
          </table:table-cell>
          <table:table-cell table:style-name="ce1" office:value-type="string">
            <text:p>TS5A3159DCK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texas-instruments/TS5A3159DCKR/684802</text:p>
          </table:table-cell>
          <table:table-cell table:style-name="ce1" office:value-type="string">
            <text:p>296-17303-1-ND</text:p>
          </table:table-cell>
        </table:table-row>
        <table:table-row>
          <table:table-cell table:style-name="ce1" office:value-type="string">
            <text:p>U6,U7,U8,U12,U13,U16</text:p>
          </table:table-cell>
          <table:table-cell table:style-name="ce1" office:value-type="string">
            <text:p>70pA 8uV</text:p>
          </table:table-cell>
          <table:table-cell table:style-name="ce1" office:value-type="string">
            <text:p>kicad-embed://AS333.pdf</text:p>
          </table:table-cell>
          <table:table-cell table:style-name="ce1" office:value-type="string">
            <text:p>AADuffy:SC-70-5_AS333SE-7</text:p>
          </table:table-cell>
          <table:table-cell table:style-name="ce1" office:value-type="string">
            <text:p>6</text:p>
          </table:table-cell>
          <table:table-cell/>
          <table:table-cell table:style-name="ce1" office:value-type="string">
            <text:p>32</text:p>
          </table:table-cell>
          <table:table-cell table:style-name="ce1" office:value-type="string">
            <text:p>Diodes Inc</text:p>
          </table:table-cell>
          <table:table-cell table:style-name="ce1" office:value-type="string">
            <text:p>AS333SE-7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AS333SE-7/18784660</text:p>
          </table:table-cell>
          <table:table-cell table:style-name="ce1" office:value-type="string">
            <text:p>31-AS333SE-7CT-ND</text:p>
          </table:table-cell>
        </table:table-row>
        <table:table-row>
          <table:table-cell table:style-name="ce1" office:value-type="string">
            <text:p>U9,U10</text:p>
          </table:table-cell>
          <table:table-cell table:style-name="ce1" office:value-type="string">
            <text:p>5V</text:p>
          </table:table-cell>
          <table:table-cell table:style-name="ce1" office:value-type="string">
            <text:p>https://www.diodes.com/assets/Datasheets/AP2210.pdf</text:p>
          </table:table-cell>
          <table:table-cell table:style-name="ce1" office:value-type="string">
            <text:p>AADuffy:SOT23-5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33</text:p>
          </table:table-cell>
          <table:table-cell table:style-name="ce1" office:value-type="string">
            <text:p>Diodes Incorporated</text:p>
          </table:table-cell>
          <table:table-cell table:style-name="ce1" office:value-type="string">
            <text:p>AP2210K-5.0TRG1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diodes-incorporated/AP2210K-5-0TRG1/4470820</text:p>
          </table:table-cell>
          <table:table-cell table:style-name="ce1" office:value-type="string">
            <text:p>AP2210K-5.0TRG1DICT-ND</text:p>
          </table:table-cell>
        </table:table-row>
        <table:table-row>
          <table:table-cell table:style-name="ce1" office:value-type="string">
            <text:p>U11,U15,U27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https://www.diodes.com/assets/Datasheets/AP7375.pdf</text:p>
          </table:table-cell>
          <table:table-cell table:style-name="ce1" office:value-type="string">
            <text:p>AADuffy:SC-74A_standard</text:p>
          </table:table-cell>
          <table:table-cell table:style-name="ce1" office:value-type="string">
            <text:p>3</text:p>
          </table:table-cell>
          <table:table-cell/>
          <table:table-cell table:style-name="ce1" office:value-type="string">
            <text:p>34</text:p>
          </table:table-cell>
          <table:table-cell table:style-name="ce1" office:value-type="string">
            <text:p>Toshiba</text:p>
          </table:table-cell>
          <table:table-cell table:style-name="ce1" office:value-type="string">
            <text:p>TCR2EF33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toshiba-semiconductor-and-storage/TCR2EF33-LM-CT/4503183</text:p>
          </table:table-cell>
          <table:table-cell table:style-name="ce1" office:value-type="string">
            <text:p>TCR2EF33LM(CTCT-ND</text:p>
          </table:table-cell>
        </table:table-row>
        <table:table-row>
          <table:table-cell table:style-name="ce1" office:value-type="string">
            <text:p>U14</text:p>
          </table:table-cell>
          <table:table-cell table:style-name="ce1" office:value-type="string">
            <text:p>NMUX1308</text:p>
          </table:table-cell>
          <table:table-cell table:style-name="ce1" office:value-type="string">
            <text:p>https://assets.nexperia.com/documents/data-sheet/NMUX1308.pdf</text:p>
          </table:table-cell>
          <table:table-cell table:style-name="ce1" office:value-type="string">
            <text:p>AADuffy:16-DHVQFN_NMUX1308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35</text:p>
          </table:table-cell>
          <table:table-cell table:style-name="ce1" office:value-type="string">
            <text:p>NXP</text:p>
          </table:table-cell>
          <table:table-cell table:style-name="ce1" office:value-type="string">
            <text:p>NMUX1308BQ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nexperia-usa-inc/NMUX1308BQX/22050149</text:p>
          </table:table-cell>
          <table:table-cell table:style-name="ce1" office:value-type="string">
            <text:p>1727-NMUX1308BQXCT-ND</text:p>
          </table:table-cell>
        </table:table-row>
        <table:table-row>
          <table:table-cell table:style-name="ce1" office:value-type="string">
            <text:p>U17</text:p>
          </table:table-cell>
          <table:table-cell table:style-name="ce1" office:value-type="string">
            <text:p>MCP3460RT</text:p>
          </table:table-cell>
          <table:table-cell table:style-name="ce1" office:value-type="string">
            <text:p>kicad-embed://MCP3460R-Data-Sheet-DS20006975.pdf</text:p>
          </table:table-cell>
          <table:table-cell table:style-name="ce1" office:value-type="string">
            <text:p>AADuffy:MCP3460R_VQFN-20_3x3mm_EP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36</text:p>
          </table:table-cell>
          <table:table-cell table:style-name="ce1" office:value-type="string">
            <text:p>Microchip</text:p>
          </table:table-cell>
          <table:table-cell table:style-name="ce1" office:value-type="string">
            <text:p>MCP3460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microchip-technology/MCP3460RT-E-2LX/26653549</text:p>
          </table:table-cell>
          <table:table-cell table:style-name="ce1" office:value-type="string">
            <text:p>MCP3460RT-E/2LX</text:p>
          </table:table-cell>
        </table:table-row>
        <table:table-row>
          <table:table-cell table:style-name="ce1" office:value-type="string">
            <text:p>U18,U19,U20,U31</text:p>
          </table:table-cell>
          <table:table-cell table:style-name="ce1" office:value-type="string">
            <text:p>74HC595BQ,115</text:p>
          </table:table-cell>
          <table:table-cell table:style-name="ce1" office:value-type="string">
            <text:p>https://rocelec.widen.net/view/pdf/umsr6rbkih/PHGL-S-A0000283114-1.pdf?t.download=true&amp;u=5oefqw</text:p>
          </table:table-cell>
          <table:table-cell table:style-name="ce1" office:value-type="string">
            <text:p>AADuffy:16-DHVQFN_74HC595BQ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37</text:p>
          </table:table-cell>
          <table:table-cell table:style-name="ce1" office:value-type="string">
            <text:p>Nexperia</text:p>
          </table:table-cell>
          <table:table-cell table:style-name="ce1" office:value-type="string">
            <text:p>74HC595BQ,115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nexperia-usa-inc/74HC595BQ-115/1022994</text:p>
          </table:table-cell>
          <table:table-cell table:style-name="ce1" office:value-type="string">
            <text:p>1727-3327-1-ND</text:p>
          </table:table-cell>
        </table:table-row>
        <table:table-row>
          <table:table-cell table:style-name="ce1" office:value-type="string">
            <text:p>U21</text:p>
          </table:table-cell>
          <table:table-cell table:style-name="ce1" office:value-type="string">
            <text:p>8kbit</text:p>
          </table:table-cell>
          <table:table-cell table:style-name="ce1" office:value-type="string">
            <text:p>https://ww1.microchip.com/downloads/en/DeviceDoc/22067J.pdf</text:p>
          </table:table-cell>
          <table:table-cell table:style-name="ce1" office:value-type="string">
            <text:p>AADuffy:SOT23-3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38</text:p>
          </table:table-cell>
          <table:table-cell table:style-name="ce1" office:value-type="string">
            <text:p>Microchip</text:p>
          </table:table-cell>
          <table:table-cell table:style-name="ce1" office:value-type="string">
            <text:p>11AA080T-I/T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microchip-technology/11AA080T-I-TT/1939121</text:p>
          </table:table-cell>
          <table:table-cell table:style-name="ce1" office:value-type="string">
            <text:p>11AA080T-I/TTCT-ND</text:p>
          </table:table-cell>
        </table:table-row>
        <table:table-row>
          <table:table-cell table:style-name="ce1" office:value-type="string">
            <text:p>U23</text:p>
          </table:table-cell>
          <table:table-cell table:style-name="ce1" office:value-type="string">
            <text:p>18012115421H</text:p>
          </table:table-cell>
          <table:table-cell table:style-name="ce1" office:value-type="string">
            <text:p>https://www.we-online.com/components/products/datasheet/18012115421H.pdf</text:p>
          </table:table-cell>
          <table:table-cell table:style-name="ce1" office:value-type="string">
            <text:p>AADuffy:SOIC-8_STISO621TR</text:p>
          </table:table-cell>
          <table:table-cell table:style-name="ce1" office:value-type="string">
            <text:p>1</text:p>
          </table:table-cell>
          <table:table-cell/>
          <table:table-cell table:style-name="ce1" office:value-type="string">
            <text:p>39</text:p>
          </table:table-cell>
          <table:table-cell table:style-name="ce1" office:value-type="string">
            <text:p>Wurth</text:p>
          </table:table-cell>
          <table:table-cell table:style-name="ce1" office:value-type="string">
            <text:p>18012115421H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w%C3%BCrth-elektronik/18012115421H/26766176</text:p>
          </table:table-cell>
          <table:table-cell table:style-name="ce1" office:value-type="string">
            <text:p>732-18012115421HCT-ND</text:p>
          </table:table-cell>
        </table:table-row>
        <table:table-row>
          <table:table-cell table:style-name="ce1" office:value-type="string">
            <text:p>U25,U26</text:p>
          </table:table-cell>
          <table:table-cell table:style-name="ce1" office:value-type="string">
            <text:p>RP2040</text:p>
          </table:table-cell>
          <table:table-cell table:style-name="ce1" office:value-type="string">
            <text:p>https://datasheets.raspberrypi.com/rp2040/rp2040-datasheet.pdf</text:p>
          </table:table-cell>
          <table:table-cell table:style-name="ce1" office:value-type="string">
            <text:p>Package_DFN_QFN:QFN-56-1EP_7x7mm_P0.4mm_EP3.2x3.2mm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40</text:p>
          </table:table-cell>
        </table:table-row>
        <table:table-row>
          <table:table-cell table:style-name="ce1" office:value-type="string">
            <text:p>U28,U29</text:p>
          </table:table-cell>
          <table:table-cell table:style-name="ce1" office:value-type="string">
            <text:p>W25Q16JVSS</text:p>
          </table:table-cell>
          <table:table-cell table:style-name="ce1" office:value-type="string">
            <text:p>https://www.winbond.com/hq/support/documentation/levelOne.jsp?__locale=en&amp;DocNo=DA00-W25Q16JV.1</text:p>
          </table:table-cell>
          <table:table-cell table:style-name="ce1" office:value-type="string">
            <text:p>Package_SO:SOIC-8_5.3x5.3mm_P1.27mm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41</text:p>
          </table:table-cell>
        </table:table-row>
        <table:table-row>
          <table:table-cell table:style-name="ce1" office:value-type="string">
            <text:p>U30,U32,U33,U34,U35,U36,U37</text:p>
          </table:table-cell>
          <table:table-cell table:style-name="ce1" office:value-type="string">
            <text:p>NST3904DP6T5G</text:p>
          </table:table-cell>
          <table:table-cell table:style-name="ce1" office:value-type="string">
            <text:p>kicad-embed://NST3904DP6-D.PDF</text:p>
          </table:table-cell>
          <table:table-cell table:style-name="ce1" office:value-type="string">
            <text:p>AADuffy:SOT-963_NST3904DP6T5G</text:p>
          </table:table-cell>
          <table:table-cell table:style-name="ce1" office:value-type="string">
            <text:p>7</text:p>
          </table:table-cell>
          <table:table-cell/>
          <table:table-cell table:style-name="ce1" office:value-type="string">
            <text:p>42</text:p>
          </table:table-cell>
          <table:table-cell table:style-name="ce1" office:value-type="string">
            <text:p>onsemi</text:p>
          </table:table-cell>
          <table:table-cell table:style-name="ce1" office:value-type="string">
            <text:p>NST3904DP6T5G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onsemi/NST3904DP6T5G/1961252</text:p>
          </table:table-cell>
          <table:table-cell table:style-name="ce1" office:value-type="string">
            <text:p>NST3904DP6T5GOSCT-ND</text:p>
          </table:table-cell>
        </table:table-row>
        <table:table-row>
          <table:table-cell table:style-name="ce1" office:value-type="string">
            <text:p>Y1,Y2</text:p>
          </table:table-cell>
          <table:table-cell table:style-name="ce1" office:value-type="string">
            <text:p>ABM8-272-T3</text:p>
          </table:table-cell>
          <table:table-cell/>
          <table:table-cell table:style-name="ce1" office:value-type="string">
            <text:p>AADuffy:XTAL_3225-4Pin_3.2x2.5mm</text:p>
          </table:table-cell>
          <table:table-cell table:style-name="ce1" office:value-type="string">
            <text:p>2</text:p>
          </table:table-cell>
          <table:table-cell/>
          <table:table-cell table:style-name="ce1" office:value-type="string">
            <text:p>43</text:p>
          </table:table-cell>
          <table:table-cell table:style-name="ce1" office:value-type="string">
            <text:p>Abracon</text:p>
          </table:table-cell>
          <table:table-cell table:style-name="ce1" office:value-type="string">
            <text:p>ABM8-272-T3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https://www.digikey.com/en/products/detail/abracon-llc/ABM8-272-T3/22472366</text:p>
          </table:table-cell>
          <table:table-cell table:style-name="ce1" office:value-type="string">
            <text:p>535-ABM8-272-T3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00:38:45.38229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23:20:04.530867100</meta:creation-date>
    <dc:date>2026-05-14T00:07:25.906315200</dc:date>
    <meta:editing-duration>P9DT1H37M43S</meta:editing-duration>
    <meta:editing-cycles>85</meta:editing-cycles>
    <meta:generator>LibreOffice/25.8.3.1$Windows_X86_64 LibreOffice_project/52ad9dd1c984050a9fb6932dbfb16e86a49e9758</meta:generator>
    <meta:document-statistic meta:table-count="4" meta:cell-count="4321" meta:object-count="0"/>
  </office:meta>
</office:document-meta>
</file>